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et2utc.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717in"/>
    </style:style>
    <style:style style:name="co2" style:family="table-column">
      <style:table-column-properties fo:break-before="auto" style:column-width="1.5008in"/>
    </style:style>
    <style:style style:name="co3" style:family="table-column">
      <style:table-column-properties fo:break-before="auto" style:column-width="1.5693in"/>
    </style:style>
    <style:style style:name="co4" style:family="table-column">
      <style:table-column-properties fo:break-before="auto" style:column-width="2.3591in"/>
    </style:style>
    <style:style style:name="co5" style:family="table-column">
      <style:table-column-properties fo:break-before="auto" style:column-width="2.1874in"/>
    </style:style>
    <style:style style:name="co6" style:family="table-column">
      <style:table-column-properties fo:break-before="auto" style:column-width="2.7362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sclk_dat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Default"/>
        <table:table-column table:style-name="co7" table:default-cell-style-name="Default"/>
        <table:table-row table:style-name="ro1">
          <table:table-cell office:value-type="string" calcext:value-type="string">
            <text:p>met</text:p>
          </table:table-cell>
          <table:table-cell office:value-type="string" calcext:value-type="string">
            <text:p>tdt-leapsec</text:p>
          </table:table-cell>
          <table:table-cell office:value-type="string" calcext:value-type="string">
            <text:p>offset_scale</text:p>
          </table:table-cell>
          <table:table-cell office:value-type="string" calcext:value-type="string">
            <text:p>utc</text:p>
          </table:table-cell>
          <table:table-cell table:style-name="Default" office:value-type="string" calcext:value-type="string">
            <text:p>tdt</text:p>
          </table:table-cell>
          <table:table-cell office:value-type="string" calcext:value-type="string">
            <text:p>naif0012.tls</text:p>
          </table:table-cell>
          <table:table-cell office:value-type="string" calcext:value-type="string">
            <text:p>new-horizons_3381.tsc</text:p>
          </table:table-cell>
        </table:table-row>
        <table:table-row table:style-name="ro1">
          <table:table-cell office:value-type="string" calcext:value-type="string">
            <text:p>A3:A1987</text:p>
          </table:table-cell>
          <table:table-cell office:value-type="string" calcext:value-type="string">
            <text:p>B3:B1987</text:p>
          </table:table-cell>
          <table:table-cell office:value-type="string" calcext:value-type="string">
            <text:p>C3:C4</text:p>
          </table:table-cell>
          <table:table-cell/>
          <table:table-cell table:style-name="Default"/>
          <table:table-cell table:number-columns-repeated="2"/>
        </table:table-row>
        <table:table-row table:style-name="ro1">
          <table:table-cell office:value-type="float" office:value="346118620" calcext:value-type="float">
            <text:p>346118620</text:p>
          </table:table-cell>
          <table:table-cell office:value-type="float" office:value="537084701.42624" calcext:value-type="float">
            <text:p>537084701.42624</text:p>
          </table:table-cell>
          <table:table-cell table:style-name="ce1" office:value-type="string" calcext:value-type="string">
            <text:p>2000-01-01 12:00:00</text:p>
          </table:table-cell>
          <table:table-cell office:value-type="string" calcext:value-type="string">
            <text:p>2017-01-07T18:11:41.4262399Z</text:p>
          </table:table-cell>
          <table:table-cell office:value-type="string" calcext:value-type="string">
            <text:p>2017-01-07-18:12:50.6102399</text:p>
          </table:table-cell>
          <table:table-cell table:number-columns-repeated="2"/>
        </table:table-row>
        <table:table-row table:style-name="ro1">
          <table:table-cell office:value-type="float" office:value="346291416" calcext:value-type="float">
            <text:p>346291416</text:p>
          </table:table-cell>
          <table:table-cell office:value-type="float" office:value="537257497.428191" calcext:value-type="float">
            <text:p>537257497.428191</text:p>
          </table:table-cell>
          <table:table-cell office:value-type="float" office:value="86400" calcext:value-type="float">
            <text:p>86400</text:p>
          </table:table-cell>
          <table:table-cell office:value-type="string" calcext:value-type="string">
            <text:p>2017-01-09T18:11:37.4281909Z</text:p>
          </table:table-cell>
          <table:table-cell office:value-type="string" calcext:value-type="string">
            <text:p>2017-01-09-18:12:46.6121909</text:p>
          </table:table-cell>
          <table:table-cell table:number-columns-repeated="2"/>
        </table:table-row>
        <table:table-row table:style-name="ro1">
          <table:table-cell office:value-type="float" office:value="346428190" calcext:value-type="float">
            <text:p>346428190</text:p>
          </table:table-cell>
          <table:table-cell office:value-type="float" office:value="537394271.429719" calcext:value-type="float">
            <text:p>537394271.429719</text:p>
          </table:table-cell>
          <table:table-cell/>
          <table:table-cell office:value-type="string" calcext:value-type="string">
            <text:p>2017-01-11T08:11:11.4297189Z</text:p>
          </table:table-cell>
          <table:table-cell office:value-type="string" calcext:value-type="string">
            <text:p>2017-01-11-08:12:20.6137189</text:p>
          </table:table-cell>
          <table:table-cell table:number-columns-repeated="2"/>
        </table:table-row>
        <table:table-row table:style-name="ro1">
          <table:table-cell office:value-type="float" office:value="346604594" calcext:value-type="float">
            <text:p>346604594</text:p>
          </table:table-cell>
          <table:table-cell office:value-type="float" office:value="537570675.431719" calcext:value-type="float">
            <text:p>537570675.431719</text:p>
          </table:table-cell>
          <table:table-cell/>
          <table:table-cell office:value-type="string" calcext:value-type="string">
            <text:p>2017-01-13T09:11:15.4317189Z</text:p>
          </table:table-cell>
          <table:table-cell office:value-type="string" calcext:value-type="string">
            <text:p>2017-01-13-09:12:24.6157189</text:p>
          </table:table-cell>
          <table:table-cell table:number-columns-repeated="2"/>
        </table:table-row>
        <table:table-row table:style-name="ro1">
          <table:table-cell office:value-type="float" office:value="346860176" calcext:value-type="float">
            <text:p>346860176</text:p>
          </table:table-cell>
          <table:table-cell office:value-type="float" office:value="537826257.43459" calcext:value-type="float">
            <text:p>537826257.43459</text:p>
          </table:table-cell>
          <table:table-cell/>
          <table:table-cell office:value-type="string" calcext:value-type="string">
            <text:p>2017-01-16T08:10:57.4345899Z</text:p>
          </table:table-cell>
          <table:table-cell office:value-type="string" calcext:value-type="string">
            <text:p>2017-01-16-08:12:06.6185899</text:p>
          </table:table-cell>
          <table:table-cell table:number-columns-repeated="2"/>
        </table:table-row>
        <table:table-row table:style-name="ro1">
          <table:table-cell office:value-type="float" office:value="347022168" calcext:value-type="float">
            <text:p>347022168</text:p>
          </table:table-cell>
          <table:table-cell office:value-type="float" office:value="537988249.436408" calcext:value-type="float">
            <text:p>537988249.436408</text:p>
          </table:table-cell>
          <table:table-cell/>
          <table:table-cell office:value-type="string" calcext:value-type="string">
            <text:p>2017-01-18T05:10:49.4364080Z</text:p>
          </table:table-cell>
          <table:table-cell office:value-type="string" calcext:value-type="string">
            <text:p>2017-01-18-05:11:58.6204080</text:p>
          </table:table-cell>
          <table:table-cell table:number-columns-repeated="2"/>
        </table:table-row>
        <table:table-row table:style-name="ro1">
          <table:table-cell office:value-type="float" office:value="347151788" calcext:value-type="float">
            <text:p>347151788</text:p>
          </table:table-cell>
          <table:table-cell office:value-type="float" office:value="538117869.4379" calcext:value-type="float">
            <text:p>538117869.4379</text:p>
          </table:table-cell>
          <table:table-cell/>
          <table:table-cell office:value-type="string" calcext:value-type="string">
            <text:p>2017-01-19T17:11:09.4378999Z</text:p>
          </table:table-cell>
          <table:table-cell office:value-type="string" calcext:value-type="string">
            <text:p>2017-01-19-17:12:18.6218999</text:p>
          </table:table-cell>
          <table:table-cell table:number-columns-repeated="2"/>
        </table:table-row>
        <table:table-row table:style-name="ro1">
          <table:table-cell office:value-type="float" office:value="347202166" calcext:value-type="float">
            <text:p>347202166</text:p>
          </table:table-cell>
          <table:table-cell office:value-type="float" office:value="538168247.43845" calcext:value-type="float">
            <text:p>538168247.43845</text:p>
          </table:table-cell>
          <table:table-cell/>
          <table:table-cell office:value-type="string" calcext:value-type="string">
            <text:p>2017-01-20T07:10:47.4384499Z</text:p>
          </table:table-cell>
          <table:table-cell office:value-type="string" calcext:value-type="string">
            <text:p>2017-01-20-07:11:56.6224499</text:p>
          </table:table-cell>
          <table:table-cell table:number-columns-repeated="2"/>
        </table:table-row>
        <table:table-row table:style-name="ro1">
          <table:table-cell office:value-type="float" office:value="347464967" calcext:value-type="float">
            <text:p>347464967</text:p>
          </table:table-cell>
          <table:table-cell office:value-type="float" office:value="538431048.441423" calcext:value-type="float">
            <text:p>538431048.441423</text:p>
          </table:table-cell>
          <table:table-cell/>
          <table:table-cell office:value-type="string" calcext:value-type="string">
            <text:p>2017-01-23T08:10:48.4414229Z</text:p>
          </table:table-cell>
          <table:table-cell office:value-type="string" calcext:value-type="string">
            <text:p>2017-01-23-08:11:57.6254229</text:p>
          </table:table-cell>
          <table:table-cell table:number-columns-repeated="2"/>
        </table:table-row>
        <table:table-row table:style-name="ro1">
          <table:table-cell office:value-type="float" office:value="347612597" calcext:value-type="float">
            <text:p>347612597</text:p>
          </table:table-cell>
          <table:table-cell office:value-type="float" office:value="538578678.443114" calcext:value-type="float">
            <text:p>538578678.443114</text:p>
          </table:table-cell>
          <table:table-cell/>
          <table:table-cell office:value-type="string" calcext:value-type="string">
            <text:p>2017-01-25T01:11:18.4431140Z</text:p>
          </table:table-cell>
          <table:table-cell office:value-type="string" calcext:value-type="string">
            <text:p>2017-01-25-01:12:27.6271140</text:p>
          </table:table-cell>
          <table:table-cell table:number-columns-repeated="2"/>
        </table:table-row>
        <table:table-row table:style-name="ro1">
          <table:table-cell office:value-type="float" office:value="347698989" calcext:value-type="float">
            <text:p>347698989</text:p>
          </table:table-cell>
          <table:table-cell office:value-type="float" office:value="538665070.444096" calcext:value-type="float">
            <text:p>538665070.444096</text:p>
          </table:table-cell>
          <table:table-cell/>
          <table:table-cell office:value-type="string" calcext:value-type="string">
            <text:p>2017-01-26T01:11:10.4440959Z</text:p>
          </table:table-cell>
          <table:table-cell office:value-type="string" calcext:value-type="string">
            <text:p>2017-01-26-01:12:19.6280959</text:p>
          </table:table-cell>
          <table:table-cell table:number-columns-repeated="2"/>
        </table:table-row>
        <table:table-row table:style-name="ro1">
          <table:table-cell office:value-type="float" office:value="347828574" calcext:value-type="float">
            <text:p>347828574</text:p>
          </table:table-cell>
          <table:table-cell office:value-type="float" office:value="538794655.445521" calcext:value-type="float">
            <text:p>538794655.445521</text:p>
          </table:table-cell>
          <table:table-cell/>
          <table:table-cell office:value-type="string" calcext:value-type="string">
            <text:p>2017-01-27T13:10:55.4455209Z</text:p>
          </table:table-cell>
          <table:table-cell office:value-type="string" calcext:value-type="string">
            <text:p>2017-01-27-13:12:04.6295210</text:p>
          </table:table-cell>
          <table:table-cell table:number-columns-repeated="2"/>
        </table:table-row>
        <table:table-row table:style-name="ro1">
          <table:table-cell office:value-type="float" office:value="348019376" calcext:value-type="float">
            <text:p>348019376</text:p>
          </table:table-cell>
          <table:table-cell office:value-type="float" office:value="538985457.447692" calcext:value-type="float">
            <text:p>538985457.447692</text:p>
          </table:table-cell>
          <table:table-cell/>
          <table:table-cell office:value-type="string" calcext:value-type="string">
            <text:p>2017-01-29T18:10:57.4476920Z</text:p>
          </table:table-cell>
          <table:table-cell office:value-type="string" calcext:value-type="string">
            <text:p>2017-01-29-18:12:06.6316920</text:p>
          </table:table-cell>
          <table:table-cell table:number-columns-repeated="2"/>
        </table:table-row>
        <table:table-row table:style-name="ro1">
          <table:table-cell office:value-type="float" office:value="348091416" calcext:value-type="float">
            <text:p>348091416</text:p>
          </table:table-cell>
          <table:table-cell office:value-type="float" office:value="539057497.448506" calcext:value-type="float">
            <text:p>539057497.448506</text:p>
          </table:table-cell>
          <table:table-cell/>
          <table:table-cell office:value-type="string" calcext:value-type="string">
            <text:p>2017-01-30T14:11:37.4485059Z</text:p>
          </table:table-cell>
          <table:table-cell office:value-type="string" calcext:value-type="string">
            <text:p>2017-01-30-14:12:46.6325060</text:p>
          </table:table-cell>
          <table:table-cell table:number-columns-repeated="2"/>
        </table:table-row>
        <table:table-row table:style-name="ro1">
          <table:table-cell office:value-type="float" office:value="348192174" calcext:value-type="float">
            <text:p>348192174</text:p>
          </table:table-cell>
          <table:table-cell office:value-type="float" office:value="539158255.449642" calcext:value-type="float">
            <text:p>539158255.449642</text:p>
          </table:table-cell>
          <table:table-cell/>
          <table:table-cell office:value-type="string" calcext:value-type="string">
            <text:p>2017-01-31T18:10:55.4496419Z</text:p>
          </table:table-cell>
          <table:table-cell office:value-type="string" calcext:value-type="string">
            <text:p>2017-01-31-18:12:04.6336419</text:p>
          </table:table-cell>
          <table:table-cell table:number-columns-repeated="2"/>
        </table:table-row>
        <table:table-row table:style-name="ro1">
          <table:table-cell office:value-type="float" office:value="348278575" calcext:value-type="float">
            <text:p>348278575</text:p>
          </table:table-cell>
          <table:table-cell office:value-type="float" office:value="539244656.450601" calcext:value-type="float">
            <text:p>539244656.450601</text:p>
          </table:table-cell>
          <table:table-cell/>
          <table:table-cell office:value-type="string" calcext:value-type="string">
            <text:p>2017-02-01T18:10:56.4506009Z</text:p>
          </table:table-cell>
          <table:table-cell office:value-type="string" calcext:value-type="string">
            <text:p>2017-02-01-18:12:05.6346009</text:p>
          </table:table-cell>
          <table:table-cell table:number-columns-repeated="2"/>
        </table:table-row>
        <table:table-row table:style-name="ro1">
          <table:table-cell office:value-type="float" office:value="348328957" calcext:value-type="float">
            <text:p>348328957</text:p>
          </table:table-cell>
          <table:table-cell office:value-type="float" office:value="539295038.451187" calcext:value-type="float">
            <text:p>539295038.451187</text:p>
          </table:table-cell>
          <table:table-cell/>
          <table:table-cell office:value-type="string" calcext:value-type="string">
            <text:p>2017-02-02T08:10:38.4511870Z</text:p>
          </table:table-cell>
          <table:table-cell office:value-type="string" calcext:value-type="string">
            <text:p>2017-02-02-08:11:47.6351870</text:p>
          </table:table-cell>
          <table:table-cell table:number-columns-repeated="2"/>
        </table:table-row>
        <table:table-row table:style-name="ro1">
          <table:table-cell office:value-type="float" office:value="348624221" calcext:value-type="float">
            <text:p>348624221</text:p>
          </table:table-cell>
          <table:table-cell office:value-type="float" office:value="539590302.454515" calcext:value-type="float">
            <text:p>539590302.454515</text:p>
          </table:table-cell>
          <table:table-cell/>
          <table:table-cell office:value-type="string" calcext:value-type="string">
            <text:p>2017-02-05T18:11:42.4545149Z</text:p>
          </table:table-cell>
          <table:table-cell office:value-type="string" calcext:value-type="string">
            <text:p>2017-02-05-18:12:51.6385149</text:p>
          </table:table-cell>
          <table:table-cell table:number-columns-repeated="2"/>
        </table:table-row>
        <table:table-row table:style-name="ro1">
          <table:table-cell office:value-type="float" office:value="348703375" calcext:value-type="float">
            <text:p>348703375</text:p>
          </table:table-cell>
          <table:table-cell office:value-type="float" office:value="539669456.455435" calcext:value-type="float">
            <text:p>539669456.455435</text:p>
          </table:table-cell>
          <table:table-cell/>
          <table:table-cell office:value-type="string" calcext:value-type="string">
            <text:p>2017-02-06T16:10:56.4554350Z</text:p>
          </table:table-cell>
          <table:table-cell office:value-type="string" calcext:value-type="string">
            <text:p>2017-02-06-16:12:05.6394350</text:p>
          </table:table-cell>
          <table:table-cell table:number-columns-repeated="2"/>
        </table:table-row>
        <table:table-row table:style-name="ro1">
          <table:table-cell office:value-type="float" office:value="348959883" calcext:value-type="float">
            <text:p>348959883</text:p>
          </table:table-cell>
          <table:table-cell office:value-type="float" office:value="539925964.458318" calcext:value-type="float">
            <text:p>539925964.458318</text:p>
          </table:table-cell>
          <table:table-cell/>
          <table:table-cell office:value-type="string" calcext:value-type="string">
            <text:p>2017-02-09T15:26:04.4583179Z</text:p>
          </table:table-cell>
          <table:table-cell office:value-type="string" calcext:value-type="string">
            <text:p>2017-02-09-15:27:13.6423180</text:p>
          </table:table-cell>
          <table:table-cell table:number-columns-repeated="2"/>
        </table:table-row>
        <table:table-row table:style-name="ro1">
          <table:table-cell office:value-type="float" office:value="349056219" calcext:value-type="float">
            <text:p>349056219</text:p>
          </table:table-cell>
          <table:table-cell office:value-type="float" office:value="540022300.459433" calcext:value-type="float">
            <text:p>540022300.459433</text:p>
          </table:table-cell>
          <table:table-cell/>
          <table:table-cell office:value-type="string" calcext:value-type="string">
            <text:p>2017-02-10T18:11:40.4594329Z</text:p>
          </table:table-cell>
          <table:table-cell office:value-type="string" calcext:value-type="string">
            <text:p>2017-02-10-18:12:49.6434329</text:p>
          </table:table-cell>
          <table:table-cell table:number-columns-repeated="2"/>
        </table:table-row>
        <table:table-row table:style-name="ro1">
          <table:table-cell office:value-type="float" office:value="349142624" calcext:value-type="float">
            <text:p>349142624</text:p>
          </table:table-cell>
          <table:table-cell office:value-type="float" office:value="540108705.460406" calcext:value-type="float">
            <text:p>540108705.460406</text:p>
          </table:table-cell>
          <table:table-cell/>
          <table:table-cell office:value-type="string" calcext:value-type="string">
            <text:p>2017-02-11T18:11:45.4604059Z</text:p>
          </table:table-cell>
          <table:table-cell office:value-type="string" calcext:value-type="string">
            <text:p>2017-02-11-18:12:54.6444059</text:p>
          </table:table-cell>
          <table:table-cell table:number-columns-repeated="2"/>
        </table:table-row>
        <table:table-row table:style-name="ro1">
          <table:table-cell office:value-type="float" office:value="349228966" calcext:value-type="float">
            <text:p>349228966</text:p>
          </table:table-cell>
          <table:table-cell office:value-type="float" office:value="540195047.461392" calcext:value-type="float">
            <text:p>540195047.461392</text:p>
          </table:table-cell>
          <table:table-cell/>
          <table:table-cell office:value-type="string" calcext:value-type="string">
            <text:p>2017-02-12T18:10:47.4613919Z</text:p>
          </table:table-cell>
          <table:table-cell office:value-type="string" calcext:value-type="string">
            <text:p>2017-02-12-18:11:56.6453919</text:p>
          </table:table-cell>
          <table:table-cell table:number-columns-repeated="2"/>
        </table:table-row>
        <table:table-row table:style-name="ro1">
          <table:table-cell office:value-type="float" office:value="349275763" calcext:value-type="float">
            <text:p>349275763</text:p>
          </table:table-cell>
          <table:table-cell office:value-type="float" office:value="540241844.46192" calcext:value-type="float">
            <text:p>540241844.46192</text:p>
          </table:table-cell>
          <table:table-cell/>
          <table:table-cell office:value-type="string" calcext:value-type="string">
            <text:p>2017-02-13T07:10:44.4619200Z</text:p>
          </table:table-cell>
          <table:table-cell office:value-type="string" calcext:value-type="string">
            <text:p>2017-02-13-07:11:53.6459200</text:p>
          </table:table-cell>
          <table:table-cell table:number-columns-repeated="2"/>
        </table:table-row>
        <table:table-row table:style-name="ro1">
          <table:table-cell office:value-type="float" office:value="349488170" calcext:value-type="float">
            <text:p>349488170</text:p>
          </table:table-cell>
          <table:table-cell office:value-type="float" office:value="540454251.464341" calcext:value-type="float">
            <text:p>540454251.464341</text:p>
          </table:table-cell>
          <table:table-cell/>
          <table:table-cell office:value-type="string" calcext:value-type="string">
            <text:p>2017-02-15T18:10:51.4643409Z</text:p>
          </table:table-cell>
          <table:table-cell office:value-type="string" calcext:value-type="string">
            <text:p>2017-02-15-18:12:00.6483409</text:p>
          </table:table-cell>
          <table:table-cell table:number-columns-repeated="2"/>
        </table:table-row>
        <table:table-row table:style-name="ro1">
          <table:table-cell office:value-type="float" office:value="349506157" calcext:value-type="float">
            <text:p>349506157</text:p>
          </table:table-cell>
          <table:table-cell office:value-type="float" office:value="540472238.464554" calcext:value-type="float">
            <text:p>540472238.464554</text:p>
          </table:table-cell>
          <table:table-cell/>
          <table:table-cell office:value-type="string" calcext:value-type="string">
            <text:p>2017-02-15T23:10:38.4645539Z</text:p>
          </table:table-cell>
          <table:table-cell office:value-type="string" calcext:value-type="string">
            <text:p>2017-02-15-23:11:47.6485539</text:p>
          </table:table-cell>
          <table:table-cell table:number-columns-repeated="2"/>
        </table:table-row>
        <table:table-row table:style-name="ro1">
          <table:table-cell office:value-type="float" office:value="349610561" calcext:value-type="float">
            <text:p>349610561</text:p>
          </table:table-cell>
          <table:table-cell office:value-type="float" office:value="540576642.46572" calcext:value-type="float">
            <text:p>540576642.46572</text:p>
          </table:table-cell>
          <table:table-cell/>
          <table:table-cell office:value-type="string" calcext:value-type="string">
            <text:p>2017-02-17T04:10:42.4657199Z</text:p>
          </table:table-cell>
          <table:table-cell office:value-type="string" calcext:value-type="string">
            <text:p>2017-02-17-04:11:51.6497199</text:p>
          </table:table-cell>
          <table:table-cell table:number-columns-repeated="2"/>
        </table:table-row>
        <table:table-row table:style-name="ro1">
          <table:table-cell office:value-type="float" office:value="349707771" calcext:value-type="float">
            <text:p>349707771</text:p>
          </table:table-cell>
          <table:table-cell office:value-type="float" office:value="540673852.466844" calcext:value-type="float">
            <text:p>540673852.466844</text:p>
          </table:table-cell>
          <table:table-cell/>
          <table:table-cell office:value-type="string" calcext:value-type="string">
            <text:p>2017-02-18T07:10:52.4668439Z</text:p>
          </table:table-cell>
          <table:table-cell office:value-type="string" calcext:value-type="string">
            <text:p>2017-02-18-07:12:01.6508439</text:p>
          </table:table-cell>
          <table:table-cell table:number-columns-repeated="2"/>
        </table:table-row>
        <table:table-row table:style-name="ro1">
          <table:table-cell office:value-type="float" office:value="349909442" calcext:value-type="float">
            <text:p>349909442</text:p>
          </table:table-cell>
          <table:table-cell office:value-type="float" office:value="540875523.469146" calcext:value-type="float">
            <text:p>540875523.469146</text:p>
          </table:table-cell>
          <table:table-cell/>
          <table:table-cell office:value-type="string" calcext:value-type="string">
            <text:p>2017-02-20T15:12:03.4691460Z</text:p>
          </table:table-cell>
          <table:table-cell office:value-type="string" calcext:value-type="string">
            <text:p>2017-02-20-15:13:12.6531460</text:p>
          </table:table-cell>
          <table:table-cell table:number-columns-repeated="2"/>
        </table:table-row>
        <table:table-row table:style-name="ro1">
          <table:table-cell office:value-type="float" office:value="349995791" calcext:value-type="float">
            <text:p>349995791</text:p>
          </table:table-cell>
          <table:table-cell office:value-type="float" office:value="540961872.470124" calcext:value-type="float">
            <text:p>540961872.470124</text:p>
          </table:table-cell>
          <table:table-cell/>
          <table:table-cell office:value-type="string" calcext:value-type="string">
            <text:p>2017-02-21T15:11:12.4701240Z</text:p>
          </table:table-cell>
          <table:table-cell office:value-type="string" calcext:value-type="string">
            <text:p>2017-02-21-15:12:21.6541240</text:p>
          </table:table-cell>
          <table:table-cell table:number-columns-repeated="2"/>
        </table:table-row>
        <table:table-row table:style-name="ro1">
          <table:table-cell office:value-type="float" office:value="350021024" calcext:value-type="float">
            <text:p>350021024</text:p>
          </table:table-cell>
          <table:table-cell office:value-type="float" office:value="540987105.470407" calcext:value-type="float">
            <text:p>540987105.470407</text:p>
          </table:table-cell>
          <table:table-cell/>
          <table:table-cell office:value-type="string" calcext:value-type="string">
            <text:p>2017-02-21T22:11:45.4704070Z</text:p>
          </table:table-cell>
          <table:table-cell office:value-type="string" calcext:value-type="string">
            <text:p>2017-02-21-22:12:54.6544070</text:p>
          </table:table-cell>
          <table:table-cell table:number-columns-repeated="2"/>
        </table:table-row>
        <table:table-row table:style-name="ro1">
          <table:table-cell office:value-type="float" office:value="350312595" calcext:value-type="float">
            <text:p>350312595</text:p>
          </table:table-cell>
          <table:table-cell office:value-type="float" office:value="541278676.473728" calcext:value-type="float">
            <text:p>541278676.473728</text:p>
          </table:table-cell>
          <table:table-cell/>
          <table:table-cell office:value-type="string" calcext:value-type="string">
            <text:p>2017-02-25T07:11:16.4737279Z</text:p>
          </table:table-cell>
          <table:table-cell office:value-type="string" calcext:value-type="string">
            <text:p>2017-02-25-07:12:25.6577279</text:p>
          </table:table-cell>
          <table:table-cell table:number-columns-repeated="2"/>
        </table:table-row>
        <table:table-row table:style-name="ro1">
          <table:table-cell office:value-type="float" office:value="350384581" calcext:value-type="float">
            <text:p>350384581</text:p>
          </table:table-cell>
          <table:table-cell office:value-type="float" office:value="541350662.47454" calcext:value-type="float">
            <text:p>541350662.47454</text:p>
          </table:table-cell>
          <table:table-cell/>
          <table:table-cell office:value-type="string" calcext:value-type="string">
            <text:p>2017-02-26T03:11:02.4745399Z</text:p>
          </table:table-cell>
          <table:table-cell office:value-type="string" calcext:value-type="string">
            <text:p>2017-02-26-03:12:11.6585400</text:p>
          </table:table-cell>
          <table:table-cell table:number-columns-repeated="2"/>
        </table:table-row>
        <table:table-row table:style-name="ro1">
          <table:table-cell office:value-type="float" office:value="350557387" calcext:value-type="float">
            <text:p>350557387</text:p>
          </table:table-cell>
          <table:table-cell office:value-type="float" office:value="541523468.476507" calcext:value-type="float">
            <text:p>541523468.476507</text:p>
          </table:table-cell>
          <table:table-cell/>
          <table:table-cell office:value-type="string" calcext:value-type="string">
            <text:p>2017-02-28T03:11:08.4765069Z</text:p>
          </table:table-cell>
          <table:table-cell office:value-type="string" calcext:value-type="string">
            <text:p>2017-02-28-03:12:17.6605069</text:p>
          </table:table-cell>
          <table:table-cell table:number-columns-repeated="2"/>
        </table:table-row>
        <table:table-row table:style-name="ro1">
          <table:table-cell office:value-type="float" office:value="350683460" calcext:value-type="float">
            <text:p>350683460</text:p>
          </table:table-cell>
          <table:table-cell office:value-type="float" office:value="541649541.477964" calcext:value-type="float">
            <text:p>541649541.477964</text:p>
          </table:table-cell>
          <table:table-cell/>
          <table:table-cell office:value-type="string" calcext:value-type="string">
            <text:p>2017-03-01T14:12:21.4779640Z</text:p>
          </table:table-cell>
          <table:table-cell office:value-type="string" calcext:value-type="string">
            <text:p>2017-03-01-14:13:30.6619640</text:p>
          </table:table-cell>
          <table:table-cell table:number-columns-repeated="2"/>
        </table:table-row>
        <table:table-row table:style-name="ro1">
          <table:table-cell office:value-type="float" office:value="350870608" calcext:value-type="float">
            <text:p>350870608</text:p>
          </table:table-cell>
          <table:table-cell office:value-type="float" office:value="541836689.480087" calcext:value-type="float">
            <text:p>541836689.480087</text:p>
          </table:table-cell>
          <table:table-cell/>
          <table:table-cell office:value-type="string" calcext:value-type="string">
            <text:p>2017-03-03T18:11:29.4800870Z</text:p>
          </table:table-cell>
          <table:table-cell office:value-type="string" calcext:value-type="string">
            <text:p>2017-03-03-18:12:38.6640870</text:p>
          </table:table-cell>
          <table:table-cell table:number-columns-repeated="2"/>
        </table:table-row>
        <table:table-row table:style-name="ro1">
          <table:table-cell office:value-type="float" office:value="350942618" calcext:value-type="float">
            <text:p>350942618</text:p>
          </table:table-cell>
          <table:table-cell office:value-type="float" office:value="541908699.480938" calcext:value-type="float">
            <text:p>541908699.480938</text:p>
          </table:table-cell>
          <table:table-cell/>
          <table:table-cell office:value-type="string" calcext:value-type="string">
            <text:p>2017-03-04T14:11:39.4809379Z</text:p>
          </table:table-cell>
          <table:table-cell office:value-type="string" calcext:value-type="string">
            <text:p>2017-03-04-14:12:48.6649379</text:p>
          </table:table-cell>
          <table:table-cell table:number-columns-repeated="2"/>
        </table:table-row>
        <table:table-row table:style-name="ro1">
          <table:table-cell office:value-type="float" office:value="351029023" calcext:value-type="float">
            <text:p>351029023</text:p>
          </table:table-cell>
          <table:table-cell office:value-type="float" office:value="541995104.481884" calcext:value-type="float">
            <text:p>541995104.481884</text:p>
          </table:table-cell>
          <table:table-cell/>
          <table:table-cell office:value-type="string" calcext:value-type="string">
            <text:p>2017-03-05T14:11:44.4818840Z</text:p>
          </table:table-cell>
          <table:table-cell office:value-type="string" calcext:value-type="string">
            <text:p>2017-03-05-14:12:53.6658840</text:p>
          </table:table-cell>
          <table:table-cell table:number-columns-repeated="2"/>
        </table:table-row>
        <table:table-row table:style-name="ro1">
          <table:table-cell office:value-type="float" office:value="351115470" calcext:value-type="float">
            <text:p>351115470</text:p>
          </table:table-cell>
          <table:table-cell office:value-type="float" office:value="542081551.482887" calcext:value-type="float">
            <text:p>542081551.482887</text:p>
          </table:table-cell>
          <table:table-cell/>
          <table:table-cell office:value-type="string" calcext:value-type="string">
            <text:p>2017-03-06T14:12:31.4828870Z</text:p>
          </table:table-cell>
          <table:table-cell office:value-type="string" calcext:value-type="string">
            <text:p>2017-03-06-14:13:40.6668870</text:p>
          </table:table-cell>
          <table:table-cell table:number-columns-repeated="2"/>
        </table:table-row>
        <table:table-row table:style-name="ro1">
          <table:table-cell office:value-type="float" office:value="351338616" calcext:value-type="float">
            <text:p>351338616</text:p>
          </table:table-cell>
          <table:table-cell office:value-type="float" office:value="542304697.485463" calcext:value-type="float">
            <text:p>542304697.485463</text:p>
          </table:table-cell>
          <table:table-cell/>
          <table:table-cell office:value-type="string" calcext:value-type="string">
            <text:p>2017-03-09T04:11:37.4854630Z</text:p>
          </table:table-cell>
          <table:table-cell office:value-type="string" calcext:value-type="string">
            <text:p>2017-03-09-04:12:46.6694630</text:p>
          </table:table-cell>
          <table:table-cell table:number-columns-repeated="2"/>
        </table:table-row>
        <table:table-row table:style-name="ro1">
          <table:table-cell office:value-type="float" office:value="351475430" calcext:value-type="float">
            <text:p>351475430</text:p>
          </table:table-cell>
          <table:table-cell office:value-type="float" office:value="542441511.487019" calcext:value-type="float">
            <text:p>542441511.487019</text:p>
          </table:table-cell>
          <table:table-cell/>
          <table:table-cell office:value-type="string" calcext:value-type="string">
            <text:p>2017-03-10T18:11:51.4870189Z</text:p>
          </table:table-cell>
          <table:table-cell office:value-type="string" calcext:value-type="string">
            <text:p>2017-03-10-18:13:00.6710189</text:p>
          </table:table-cell>
          <table:table-cell table:number-columns-repeated="2"/>
        </table:table-row>
        <table:table-row table:style-name="ro1">
          <table:table-cell office:value-type="float" office:value="351518636" calcext:value-type="float">
            <text:p>351518636</text:p>
          </table:table-cell>
          <table:table-cell office:value-type="float" office:value="542484717.487518" calcext:value-type="float">
            <text:p>542484717.487518</text:p>
          </table:table-cell>
          <table:table-cell/>
          <table:table-cell office:value-type="string" calcext:value-type="string">
            <text:p>2017-03-11T06:11:57.4875179Z</text:p>
          </table:table-cell>
          <table:table-cell office:value-type="string" calcext:value-type="string">
            <text:p>2017-03-11-06:13:06.6715179</text:p>
          </table:table-cell>
          <table:table-cell table:number-columns-repeated="2"/>
        </table:table-row>
        <table:table-row table:style-name="ro1">
          <table:table-cell office:value-type="float" office:value="351601428" calcext:value-type="float">
            <text:p>351601428</text:p>
          </table:table-cell>
          <table:table-cell office:value-type="float" office:value="542567509.488469" calcext:value-type="float">
            <text:p>542567509.488469</text:p>
          </table:table-cell>
          <table:table-cell/>
          <table:table-cell office:value-type="string" calcext:value-type="string">
            <text:p>2017-03-12T05:11:49.4884690Z</text:p>
          </table:table-cell>
          <table:table-cell office:value-type="string" calcext:value-type="string">
            <text:p>2017-03-12-05:12:58.6724690</text:p>
          </table:table-cell>
          <table:table-cell table:number-columns-repeated="2"/>
        </table:table-row>
        <table:table-row table:style-name="ro1">
          <table:table-cell office:value-type="float" office:value="351734699" calcext:value-type="float">
            <text:p>351734699</text:p>
          </table:table-cell>
          <table:table-cell office:value-type="float" office:value="542700780.49001" calcext:value-type="float">
            <text:p>542700780.49001</text:p>
          </table:table-cell>
          <table:table-cell/>
          <table:table-cell office:value-type="string" calcext:value-type="string">
            <text:p>2017-03-13T18:13:00.4900100Z</text:p>
          </table:table-cell>
          <table:table-cell office:value-type="string" calcext:value-type="string">
            <text:p>2017-03-13-18:14:09.6740100</text:p>
          </table:table-cell>
          <table:table-cell table:number-columns-repeated="2"/>
        </table:table-row>
        <table:table-row table:style-name="ro1">
          <table:table-cell office:value-type="float" office:value="351777849" calcext:value-type="float">
            <text:p>351777849</text:p>
          </table:table-cell>
          <table:table-cell office:value-type="float" office:value="542743930.490498" calcext:value-type="float">
            <text:p>542743930.490498</text:p>
          </table:table-cell>
          <table:table-cell/>
          <table:table-cell office:value-type="string" calcext:value-type="string">
            <text:p>2017-03-14T06:12:10.4904979Z</text:p>
          </table:table-cell>
          <table:table-cell office:value-type="string" calcext:value-type="string">
            <text:p>2017-03-14-06:13:19.6744979</text:p>
          </table:table-cell>
          <table:table-cell table:number-columns-repeated="2"/>
        </table:table-row>
        <table:table-row table:style-name="ro1">
          <table:table-cell office:value-type="float" office:value="351972272" calcext:value-type="float">
            <text:p>351972272</text:p>
          </table:table-cell>
          <table:table-cell office:value-type="float" office:value="542938353.492731" calcext:value-type="float">
            <text:p>542938353.492731</text:p>
          </table:table-cell>
          <table:table-cell/>
          <table:table-cell office:value-type="string" calcext:value-type="string">
            <text:p>2017-03-16T12:12:33.4927309Z</text:p>
          </table:table-cell>
          <table:table-cell office:value-type="string" calcext:value-type="string">
            <text:p>2017-03-16-12:13:42.6767309</text:p>
          </table:table-cell>
          <table:table-cell table:number-columns-repeated="2"/>
        </table:table-row>
        <table:table-row table:style-name="ro1">
          <table:table-cell office:value-type="float" office:value="352148701" calcext:value-type="float">
            <text:p>352148701</text:p>
          </table:table-cell>
          <table:table-cell office:value-type="float" office:value="543114782.494766" calcext:value-type="float">
            <text:p>543114782.494766</text:p>
          </table:table-cell>
          <table:table-cell/>
          <table:table-cell office:value-type="string" calcext:value-type="string">
            <text:p>2017-03-18T13:13:02.4947659Z</text:p>
          </table:table-cell>
          <table:table-cell office:value-type="string" calcext:value-type="string">
            <text:p>2017-03-18-13:14:11.6787660</text:p>
          </table:table-cell>
          <table:table-cell table:number-columns-repeated="2"/>
        </table:table-row>
        <table:table-row table:style-name="ro1">
          <table:table-cell office:value-type="float" office:value="352242261" calcext:value-type="float">
            <text:p>352242261</text:p>
          </table:table-cell>
          <table:table-cell office:value-type="float" office:value="543208342.495833" calcext:value-type="float">
            <text:p>543208342.495833</text:p>
          </table:table-cell>
          <table:table-cell/>
          <table:table-cell office:value-type="string" calcext:value-type="string">
            <text:p>2017-03-19T15:12:22.4958330Z</text:p>
          </table:table-cell>
          <table:table-cell office:value-type="string" calcext:value-type="string">
            <text:p>2017-03-19-15:13:31.6798330</text:p>
          </table:table-cell>
          <table:table-cell table:number-columns-repeated="2"/>
        </table:table-row>
        <table:table-row table:style-name="ro1">
          <table:table-cell office:value-type="float" office:value="352339469" calcext:value-type="float">
            <text:p>352339469</text:p>
          </table:table-cell>
          <table:table-cell office:value-type="float" office:value="543305550.496973" calcext:value-type="float">
            <text:p>543305550.496973</text:p>
          </table:table-cell>
          <table:table-cell/>
          <table:table-cell office:value-type="string" calcext:value-type="string">
            <text:p>2017-03-20T18:12:30.4969730Z</text:p>
          </table:table-cell>
          <table:table-cell office:value-type="string" calcext:value-type="string">
            <text:p>2017-03-20-18:13:39.6809730</text:p>
          </table:table-cell>
          <table:table-cell table:number-columns-repeated="2"/>
        </table:table-row>
        <table:table-row table:style-name="ro1">
          <table:table-cell office:value-type="float" office:value="352379073" calcext:value-type="float">
            <text:p>352379073</text:p>
          </table:table-cell>
          <table:table-cell office:value-type="float" office:value="543345154.497424" calcext:value-type="float">
            <text:p>543345154.497424</text:p>
          </table:table-cell>
          <table:table-cell/>
          <table:table-cell office:value-type="string" calcext:value-type="string">
            <text:p>2017-03-21T05:12:34.4974240Z</text:p>
          </table:table-cell>
          <table:table-cell office:value-type="string" calcext:value-type="string">
            <text:p>2017-03-21-05:13:43.6814240</text:p>
          </table:table-cell>
          <table:table-cell table:number-columns-repeated="2"/>
        </table:table-row>
        <table:table-row table:style-name="ro1">
          <table:table-cell office:value-type="float" office:value="352566289" calcext:value-type="float">
            <text:p>352566289</text:p>
          </table:table-cell>
          <table:table-cell office:value-type="float" office:value="543532370.499563" calcext:value-type="float">
            <text:p>543532370.499563</text:p>
          </table:table-cell>
          <table:table-cell/>
          <table:table-cell office:value-type="string" calcext:value-type="string">
            <text:p>2017-03-23T09:12:50.4995629Z</text:p>
          </table:table-cell>
          <table:table-cell office:value-type="string" calcext:value-type="string">
            <text:p>2017-03-23-09:13:59.6835629</text:p>
          </table:table-cell>
          <table:table-cell table:number-columns-repeated="2"/>
        </table:table-row>
        <table:table-row table:style-name="ro1">
          <table:table-cell office:value-type="float" office:value="352638286" calcext:value-type="float">
            <text:p>352638286</text:p>
          </table:table-cell>
          <table:table-cell office:value-type="float" office:value="543604367.500419" calcext:value-type="float">
            <text:p>543604367.500419</text:p>
          </table:table-cell>
          <table:table-cell/>
          <table:table-cell office:value-type="string" calcext:value-type="string">
            <text:p>2017-03-24T05:12:47.5004190Z</text:p>
          </table:table-cell>
          <table:table-cell office:value-type="string" calcext:value-type="string">
            <text:p>2017-03-24-05:13:56.6844190</text:p>
          </table:table-cell>
          <table:table-cell table:number-columns-repeated="2"/>
        </table:table-row>
        <table:table-row table:style-name="ro1">
          <table:table-cell office:value-type="float" office:value="352854308" calcext:value-type="float">
            <text:p>352854308</text:p>
          </table:table-cell>
          <table:table-cell office:value-type="float" office:value="543820389.502904" calcext:value-type="float">
            <text:p>543820389.502904</text:p>
          </table:table-cell>
          <table:table-cell/>
          <table:table-cell office:value-type="string" calcext:value-type="string">
            <text:p>2017-03-26T17:13:09.5029039Z</text:p>
          </table:table-cell>
          <table:table-cell office:value-type="string" calcext:value-type="string">
            <text:p>2017-03-26-17:14:18.6869039</text:p>
          </table:table-cell>
          <table:table-cell table:number-columns-repeated="2"/>
        </table:table-row>
        <table:table-row table:style-name="ro1">
          <table:table-cell office:value-type="float" office:value="353009109" calcext:value-type="float">
            <text:p>353009109</text:p>
          </table:table-cell>
          <table:table-cell office:value-type="float" office:value="543975190.50471" calcext:value-type="float">
            <text:p>543975190.50471</text:p>
          </table:table-cell>
          <table:table-cell/>
          <table:table-cell office:value-type="string" calcext:value-type="string">
            <text:p>2017-03-28T12:13:10.5047099Z</text:p>
          </table:table-cell>
          <table:table-cell office:value-type="string" calcext:value-type="string">
            <text:p>2017-03-28-12:14:19.6887099</text:p>
          </table:table-cell>
          <table:table-cell table:number-columns-repeated="2"/>
        </table:table-row>
        <table:table-row table:style-name="ro1">
          <table:table-cell office:value-type="float" office:value="353174705" calcext:value-type="float">
            <text:p>353174705</text:p>
          </table:table-cell>
          <table:table-cell office:value-type="float" office:value="544140786.506604" calcext:value-type="float">
            <text:p>544140786.506604</text:p>
          </table:table-cell>
          <table:table-cell/>
          <table:table-cell office:value-type="string" calcext:value-type="string">
            <text:p>2017-03-30T10:13:06.5066039Z</text:p>
          </table:table-cell>
          <table:table-cell office:value-type="string" calcext:value-type="string">
            <text:p>2017-03-30-10:14:15.6906039</text:p>
          </table:table-cell>
          <table:table-cell table:number-columns-repeated="2"/>
        </table:table-row>
        <table:table-row table:style-name="ro1">
          <table:table-cell office:value-type="float" office:value="353318723" calcext:value-type="float">
            <text:p>353318723</text:p>
          </table:table-cell>
          <table:table-cell office:value-type="float" office:value="544284804.508271" calcext:value-type="float">
            <text:p>544284804.508271</text:p>
          </table:table-cell>
          <table:table-cell/>
          <table:table-cell office:value-type="string" calcext:value-type="string">
            <text:p>2017-04-01T02:13:24.5082709Z</text:p>
          </table:table-cell>
          <table:table-cell office:value-type="string" calcext:value-type="string">
            <text:p>2017-04-01-02:14:33.6922709</text:p>
          </table:table-cell>
          <table:table-cell table:number-columns-repeated="2"/>
        </table:table-row>
        <table:table-row table:style-name="ro1">
          <table:table-cell office:value-type="float" office:value="353441135" calcext:value-type="float">
            <text:p>353441135</text:p>
          </table:table-cell>
          <table:table-cell office:value-type="float" office:value="544407216.509714" calcext:value-type="float">
            <text:p>544407216.509714</text:p>
          </table:table-cell>
          <table:table-cell/>
          <table:table-cell office:value-type="string" calcext:value-type="string">
            <text:p>2017-04-02T12:13:36.5097140Z</text:p>
          </table:table-cell>
          <table:table-cell office:value-type="string" calcext:value-type="string">
            <text:p>2017-04-02-12:14:45.6937140</text:p>
          </table:table-cell>
          <table:table-cell table:number-columns-repeated="2"/>
        </table:table-row>
        <table:table-row table:style-name="ro1">
          <table:table-cell office:value-type="float" office:value="353545529" calcext:value-type="float">
            <text:p>353545529</text:p>
          </table:table-cell>
          <table:table-cell office:value-type="float" office:value="544511610.510911" calcext:value-type="float">
            <text:p>544511610.510911</text:p>
          </table:table-cell>
          <table:table-cell/>
          <table:table-cell office:value-type="string" calcext:value-type="string">
            <text:p>2017-04-03T17:13:30.5109109Z</text:p>
          </table:table-cell>
          <table:table-cell office:value-type="string" calcext:value-type="string">
            <text:p>2017-04-03-17:14:39.6949110</text:p>
          </table:table-cell>
          <table:table-cell table:number-columns-repeated="2"/>
        </table:table-row>
        <table:table-row table:style-name="ro1">
          <table:table-cell office:value-type="float" office:value="353592344" calcext:value-type="float">
            <text:p>353592344</text:p>
          </table:table-cell>
          <table:table-cell office:value-type="float" office:value="544558425.511431" calcext:value-type="float">
            <text:p>544558425.511431</text:p>
          </table:table-cell>
          <table:table-cell/>
          <table:table-cell office:value-type="string" calcext:value-type="string">
            <text:p>2017-04-04T06:13:45.5114309Z</text:p>
          </table:table-cell>
          <table:table-cell office:value-type="string" calcext:value-type="string">
            <text:p>2017-04-04-06:14:54.6954309</text:p>
          </table:table-cell>
          <table:table-cell table:number-columns-repeated="2"/>
        </table:table-row>
        <table:table-row table:style-name="ro1">
          <table:table-cell office:value-type="float" office:value="367449320" calcext:value-type="float">
            <text:p>367449320</text:p>
          </table:table-cell>
          <table:table-cell office:value-type="float" office:value="558415401.675064" calcext:value-type="float">
            <text:p>558415401.675064</text:p>
          </table:table-cell>
          <table:table-cell/>
          <table:table-cell office:value-type="string" calcext:value-type="string">
            <text:p>2017-09-11T15:23:21.6750639Z</text:p>
          </table:table-cell>
          <table:table-cell office:value-type="string" calcext:value-type="string">
            <text:p>2017-09-11-15:24:30.8590639</text:p>
          </table:table-cell>
          <table:table-cell table:number-columns-repeated="2"/>
        </table:table-row>
        <table:table-row table:style-name="ro1">
          <table:table-cell office:value-type="float" office:value="367485357" calcext:value-type="float">
            <text:p>367485357</text:p>
          </table:table-cell>
          <table:table-cell office:value-type="float" office:value="558451438.675495" calcext:value-type="float">
            <text:p>558451438.675495</text:p>
          </table:table-cell>
          <table:table-cell/>
          <table:table-cell office:value-type="string" calcext:value-type="string">
            <text:p>2017-09-12T01:23:58.6754950Z</text:p>
          </table:table-cell>
          <table:table-cell office:value-type="string" calcext:value-type="string">
            <text:p>2017-09-12-01:25:07.8594950</text:p>
          </table:table-cell>
          <table:table-cell table:number-columns-repeated="2"/>
        </table:table-row>
        <table:table-row table:style-name="ro1">
          <table:table-cell office:value-type="float" office:value="367617536" calcext:value-type="float">
            <text:p>367617536</text:p>
          </table:table-cell>
          <table:table-cell office:value-type="float" office:value="558583617.677149" calcext:value-type="float">
            <text:p>558583617.677149</text:p>
          </table:table-cell>
          <table:table-cell/>
          <table:table-cell office:value-type="string" calcext:value-type="string">
            <text:p>2017-09-13T14:06:57.6771489Z</text:p>
          </table:table-cell>
          <table:table-cell office:value-type="string" calcext:value-type="string">
            <text:p>2017-09-13-14:08:06.8611489</text:p>
          </table:table-cell>
          <table:table-cell table:number-columns-repeated="2"/>
        </table:table-row>
        <table:table-row table:style-name="ro1">
          <table:table-cell office:value-type="float" office:value="367685926" calcext:value-type="float">
            <text:p>367685926</text:p>
          </table:table-cell>
          <table:table-cell office:value-type="float" office:value="558652007.677961" calcext:value-type="float">
            <text:p>558652007.677961</text:p>
          </table:table-cell>
          <table:table-cell/>
          <table:table-cell office:value-type="string" calcext:value-type="string">
            <text:p>2017-09-14T09:06:47.6779609Z</text:p>
          </table:table-cell>
          <table:table-cell office:value-type="string" calcext:value-type="string">
            <text:p>2017-09-14-09:07:56.8619610</text:p>
          </table:table-cell>
          <table:table-cell table:number-columns-repeated="2"/>
        </table:table-row>
        <table:table-row table:style-name="ro1">
          <table:table-cell office:value-type="float" office:value="367801101" calcext:value-type="float">
            <text:p>367801101</text:p>
          </table:table-cell>
          <table:table-cell office:value-type="float" office:value="558767182.679294" calcext:value-type="float">
            <text:p>558767182.679294</text:p>
          </table:table-cell>
          <table:table-cell/>
          <table:table-cell office:value-type="string" calcext:value-type="string">
            <text:p>2017-09-15T17:06:22.6792939Z</text:p>
          </table:table-cell>
          <table:table-cell office:value-type="string" calcext:value-type="string">
            <text:p>2017-09-15-17:07:31.8632940</text:p>
          </table:table-cell>
          <table:table-cell table:number-columns-repeated="2"/>
        </table:table-row>
        <table:table-row table:style-name="ro1">
          <table:table-cell office:value-type="float" office:value="367887462" calcext:value-type="float">
            <text:p>367887462</text:p>
          </table:table-cell>
          <table:table-cell office:value-type="float" office:value="558853543.680312" calcext:value-type="float">
            <text:p>558853543.680312</text:p>
          </table:table-cell>
          <table:table-cell/>
          <table:table-cell office:value-type="string" calcext:value-type="string">
            <text:p>2017-09-16T17:05:43.6803120Z</text:p>
          </table:table-cell>
          <table:table-cell office:value-type="string" calcext:value-type="string">
            <text:p>2017-09-16-17:06:52.8643120</text:p>
          </table:table-cell>
          <table:table-cell table:number-columns-repeated="2"/>
        </table:table-row>
        <table:table-row table:style-name="ro1">
          <table:table-cell office:value-type="float" office:value="367941432" calcext:value-type="float">
            <text:p>367941432</text:p>
          </table:table-cell>
          <table:table-cell office:value-type="float" office:value="558907513.680948" calcext:value-type="float">
            <text:p>558907513.680948</text:p>
          </table:table-cell>
          <table:table-cell/>
          <table:table-cell office:value-type="string" calcext:value-type="string">
            <text:p>2017-09-17T08:05:13.6809480Z</text:p>
          </table:table-cell>
          <table:table-cell office:value-type="string" calcext:value-type="string">
            <text:p>2017-09-17-08:06:22.8649480</text:p>
          </table:table-cell>
          <table:table-cell table:number-columns-repeated="2"/>
        </table:table-row>
        <table:table-row table:style-name="ro1">
          <table:table-cell office:value-type="float" office:value="368031453" calcext:value-type="float">
            <text:p>368031453</text:p>
          </table:table-cell>
          <table:table-cell office:value-type="float" office:value="558997534.681993" calcext:value-type="float">
            <text:p>558997534.681993</text:p>
          </table:table-cell>
          <table:table-cell/>
          <table:table-cell office:value-type="string" calcext:value-type="string">
            <text:p>2017-09-18T09:05:34.6819930Z</text:p>
          </table:table-cell>
          <table:table-cell office:value-type="string" calcext:value-type="string">
            <text:p>2017-09-18-09:06:43.8659930</text:p>
          </table:table-cell>
          <table:table-cell table:number-columns-repeated="2"/>
        </table:table-row>
        <table:table-row table:style-name="ro1">
          <table:table-cell office:value-type="float" office:value="368204229" calcext:value-type="float">
            <text:p>368204229</text:p>
          </table:table-cell>
          <table:table-cell office:value-type="float" office:value="559170310.684008" calcext:value-type="float">
            <text:p>559170310.684008</text:p>
          </table:table-cell>
          <table:table-cell/>
          <table:table-cell office:value-type="string" calcext:value-type="string">
            <text:p>2017-09-20T09:05:10.6840080Z</text:p>
          </table:table-cell>
          <table:table-cell office:value-type="string" calcext:value-type="string">
            <text:p>2017-09-20-09:06:19.8680080</text:p>
          </table:table-cell>
          <table:table-cell table:number-columns-repeated="2"/>
        </table:table-row>
        <table:table-row table:style-name="ro1">
          <table:table-cell office:value-type="float" office:value="368398602" calcext:value-type="float">
            <text:p>368398602</text:p>
          </table:table-cell>
          <table:table-cell office:value-type="float" office:value="559364683.686246" calcext:value-type="float">
            <text:p>559364683.686246</text:p>
          </table:table-cell>
          <table:table-cell/>
          <table:table-cell office:value-type="string" calcext:value-type="string">
            <text:p>2017-09-22T15:04:43.6862460Z</text:p>
          </table:table-cell>
          <table:table-cell office:value-type="string" calcext:value-type="string">
            <text:p>2017-09-22-15:05:52.8702460</text:p>
          </table:table-cell>
          <table:table-cell table:number-columns-repeated="2"/>
        </table:table-row>
        <table:table-row table:style-name="ro1">
          <table:table-cell office:value-type="float" office:value="368582157" calcext:value-type="float">
            <text:p>368582157</text:p>
          </table:table-cell>
          <table:table-cell office:value-type="float" office:value="559548238.688369" calcext:value-type="float">
            <text:p>559548238.688369</text:p>
          </table:table-cell>
          <table:table-cell/>
          <table:table-cell office:value-type="string" calcext:value-type="string">
            <text:p>2017-09-24T18:03:58.6883690Z</text:p>
          </table:table-cell>
          <table:table-cell office:value-type="string" calcext:value-type="string">
            <text:p>2017-09-24-18:05:07.8723690</text:p>
          </table:table-cell>
          <table:table-cell table:number-columns-repeated="2"/>
        </table:table-row>
        <table:table-row table:style-name="ro1">
          <table:table-cell office:value-type="float" office:value="368657795" calcext:value-type="float">
            <text:p>368657795</text:p>
          </table:table-cell>
          <table:table-cell office:value-type="float" office:value="559623876.689294" calcext:value-type="float">
            <text:p>559623876.689294</text:p>
          </table:table-cell>
          <table:table-cell/>
          <table:table-cell office:value-type="string" calcext:value-type="string">
            <text:p>2017-09-25T15:04:36.6892939Z</text:p>
          </table:table-cell>
          <table:table-cell office:value-type="string" calcext:value-type="string">
            <text:p>2017-09-25-15:05:45.8732939</text:p>
          </table:table-cell>
          <table:table-cell table:number-columns-repeated="2"/>
        </table:table-row>
        <table:table-row table:style-name="ro1">
          <table:table-cell office:value-type="float" office:value="368722539" calcext:value-type="float">
            <text:p>368722539</text:p>
          </table:table-cell>
          <table:table-cell office:value-type="float" office:value="559688620.690044" calcext:value-type="float">
            <text:p>559688620.690044</text:p>
          </table:table-cell>
          <table:table-cell/>
          <table:table-cell office:value-type="string" calcext:value-type="string">
            <text:p>2017-09-26T09:03:40.6900439Z</text:p>
          </table:table-cell>
          <table:table-cell office:value-type="string" calcext:value-type="string">
            <text:p>2017-09-26-09:04:49.8740439</text:p>
          </table:table-cell>
          <table:table-cell table:number-columns-repeated="2"/>
        </table:table-row>
        <table:table-row table:style-name="ro1">
          <table:table-cell office:value-type="float" office:value="369100480" calcext:value-type="float">
            <text:p>369100480</text:p>
          </table:table-cell>
          <table:table-cell office:value-type="float" office:value="560066561.694401" calcext:value-type="float">
            <text:p>560066561.694401</text:p>
          </table:table-cell>
          <table:table-cell/>
          <table:table-cell office:value-type="string" calcext:value-type="string">
            <text:p>2017-09-30T18:02:41.6944010Z</text:p>
          </table:table-cell>
          <table:table-cell office:value-type="string" calcext:value-type="string">
            <text:p>2017-09-30-18:03:50.8784010</text:p>
          </table:table-cell>
          <table:table-cell table:number-columns-repeated="2"/>
        </table:table-row>
        <table:table-row table:style-name="ro1">
          <table:table-cell office:value-type="float" office:value="369150863" calcext:value-type="float">
            <text:p>369150863</text:p>
          </table:table-cell>
          <table:table-cell office:value-type="float" office:value="560116944.695014" calcext:value-type="float">
            <text:p>560116944.695014</text:p>
          </table:table-cell>
          <table:table-cell/>
          <table:table-cell office:value-type="string" calcext:value-type="string">
            <text:p>2017-10-01T08:02:24.6950139Z</text:p>
          </table:table-cell>
          <table:table-cell office:value-type="string" calcext:value-type="string">
            <text:p>2017-10-01-08:03:33.8790140</text:p>
          </table:table-cell>
          <table:table-cell table:number-columns-repeated="2"/>
        </table:table-row>
        <table:table-row table:style-name="ro1">
          <table:table-cell office:value-type="float" office:value="369266056" calcext:value-type="float">
            <text:p>369266056</text:p>
          </table:table-cell>
          <table:table-cell office:value-type="float" office:value="560232137.696342" calcext:value-type="float">
            <text:p>560232137.696342</text:p>
          </table:table-cell>
          <table:table-cell/>
          <table:table-cell office:value-type="string" calcext:value-type="string">
            <text:p>2017-10-02T16:02:17.6963419Z</text:p>
          </table:table-cell>
          <table:table-cell office:value-type="string" calcext:value-type="string">
            <text:p>2017-10-02-16:03:26.8803420</text:p>
          </table:table-cell>
          <table:table-cell table:number-columns-repeated="2"/>
        </table:table-row>
        <table:table-row table:style-name="ro1">
          <table:table-cell office:value-type="float" office:value="369359662" calcext:value-type="float">
            <text:p>369359662</text:p>
          </table:table-cell>
          <table:table-cell office:value-type="float" office:value="560325743.697404" calcext:value-type="float">
            <text:p>560325743.697404</text:p>
          </table:table-cell>
          <table:table-cell/>
          <table:table-cell office:value-type="string" calcext:value-type="string">
            <text:p>2017-10-03T18:02:23.6974040Z</text:p>
          </table:table-cell>
          <table:table-cell office:value-type="string" calcext:value-type="string">
            <text:p>2017-10-03-18:03:32.8814040</text:p>
          </table:table-cell>
          <table:table-cell table:number-columns-repeated="2"/>
        </table:table-row>
        <table:table-row table:style-name="ro1">
          <table:table-cell office:value-type="float" office:value="369431672" calcext:value-type="float">
            <text:p>369431672</text:p>
          </table:table-cell>
          <table:table-cell office:value-type="float" office:value="560397753.69825" calcext:value-type="float">
            <text:p>560397753.69825</text:p>
          </table:table-cell>
          <table:table-cell/>
          <table:table-cell office:value-type="string" calcext:value-type="string">
            <text:p>2017-10-04T14:02:33.6982499Z</text:p>
          </table:table-cell>
          <table:table-cell office:value-type="string" calcext:value-type="string">
            <text:p>2017-10-04-14:03:42.8822499</text:p>
          </table:table-cell>
          <table:table-cell table:number-columns-repeated="2"/>
        </table:table-row>
        <table:table-row table:style-name="ro1">
          <table:table-cell office:value-type="float" office:value="369518034" calcext:value-type="float">
            <text:p>369518034</text:p>
          </table:table-cell>
          <table:table-cell office:value-type="float" office:value="560484115.699239" calcext:value-type="float">
            <text:p>560484115.699239</text:p>
          </table:table-cell>
          <table:table-cell/>
          <table:table-cell office:value-type="string" calcext:value-type="string">
            <text:p>2017-10-05T14:01:55.6992390Z</text:p>
          </table:table-cell>
          <table:table-cell office:value-type="string" calcext:value-type="string">
            <text:p>2017-10-05-14:03:04.8832390</text:p>
          </table:table-cell>
          <table:table-cell table:number-columns-repeated="2"/>
        </table:table-row>
        <table:table-row table:style-name="ro1">
          <table:table-cell office:value-type="float" office:value="369611616" calcext:value-type="float">
            <text:p>369611616</text:p>
          </table:table-cell>
          <table:table-cell office:value-type="float" office:value="560577697.700338" calcext:value-type="float">
            <text:p>560577697.700338</text:p>
          </table:table-cell>
          <table:table-cell/>
          <table:table-cell office:value-type="string" calcext:value-type="string">
            <text:p>2017-10-06T16:01:37.7003380Z</text:p>
          </table:table-cell>
          <table:table-cell office:value-type="string" calcext:value-type="string">
            <text:p>2017-10-06-16:02:46.8843380</text:p>
          </table:table-cell>
          <table:table-cell table:number-columns-repeated="2"/>
        </table:table-row>
        <table:table-row table:style-name="ro1">
          <table:table-cell office:value-type="float" office:value="369698000" calcext:value-type="float">
            <text:p>369698000</text:p>
          </table:table-cell>
          <table:table-cell office:value-type="float" office:value="560664081.701337" calcext:value-type="float">
            <text:p>560664081.701337</text:p>
          </table:table-cell>
          <table:table-cell/>
          <table:table-cell office:value-type="string" calcext:value-type="string">
            <text:p>2017-10-07T16:01:21.7013369Z</text:p>
          </table:table-cell>
          <table:table-cell office:value-type="string" calcext:value-type="string">
            <text:p>2017-10-07-16:02:30.8853369</text:p>
          </table:table-cell>
          <table:table-cell table:number-columns-repeated="2"/>
        </table:table-row>
        <table:table-row table:style-name="ro1">
          <table:table-cell office:value-type="float" office:value="369784388" calcext:value-type="float">
            <text:p>369784388</text:p>
          </table:table-cell>
          <table:table-cell office:value-type="float" office:value="560750469.702347" calcext:value-type="float">
            <text:p>560750469.702347</text:p>
          </table:table-cell>
          <table:table-cell/>
          <table:table-cell office:value-type="string" calcext:value-type="string">
            <text:p>2017-10-08T16:01:09.7023470Z</text:p>
          </table:table-cell>
          <table:table-cell office:value-type="string" calcext:value-type="string">
            <text:p>2017-10-08-16:02:18.8863470</text:p>
          </table:table-cell>
          <table:table-cell table:number-columns-repeated="2"/>
        </table:table-row>
        <table:table-row table:style-name="ro1">
          <table:table-cell office:value-type="float" office:value="369870780" calcext:value-type="float">
            <text:p>369870780</text:p>
          </table:table-cell>
          <table:table-cell office:value-type="float" office:value="560836861.703343" calcext:value-type="float">
            <text:p>560836861.703343</text:p>
          </table:table-cell>
          <table:table-cell/>
          <table:table-cell office:value-type="string" calcext:value-type="string">
            <text:p>2017-10-09T16:01:01.7033430Z</text:p>
          </table:table-cell>
          <table:table-cell office:value-type="string" calcext:value-type="string">
            <text:p>2017-10-09-16:02:10.8873430</text:p>
          </table:table-cell>
          <table:table-cell table:number-columns-repeated="2"/>
        </table:table-row>
        <table:table-row table:style-name="ro1">
          <table:table-cell office:value-type="float" office:value="369957165" calcext:value-type="float">
            <text:p>369957165</text:p>
          </table:table-cell>
          <table:table-cell office:value-type="float" office:value="560923246.704333" calcext:value-type="float">
            <text:p>560923246.704333</text:p>
          </table:table-cell>
          <table:table-cell/>
          <table:table-cell office:value-type="string" calcext:value-type="string">
            <text:p>2017-10-10T16:00:46.7043329Z</text:p>
          </table:table-cell>
          <table:table-cell office:value-type="string" calcext:value-type="string">
            <text:p>2017-10-10-16:01:55.8883329</text:p>
          </table:table-cell>
          <table:table-cell table:number-columns-repeated="2"/>
        </table:table-row>
        <table:table-row table:style-name="ro1">
          <table:table-cell office:value-type="float" office:value="370043550" calcext:value-type="float">
            <text:p>370043550</text:p>
          </table:table-cell>
          <table:table-cell office:value-type="float" office:value="561009631.705329" calcext:value-type="float">
            <text:p>561009631.705329</text:p>
          </table:table-cell>
          <table:table-cell/>
          <table:table-cell office:value-type="string" calcext:value-type="string">
            <text:p>2017-10-11T16:00:31.7053289Z</text:p>
          </table:table-cell>
          <table:table-cell office:value-type="string" calcext:value-type="string">
            <text:p>2017-10-11-16:01:40.8893289</text:p>
          </table:table-cell>
          <table:table-cell table:number-columns-repeated="2"/>
        </table:table-row>
        <table:table-row table:style-name="ro1">
          <table:table-cell office:value-type="float" office:value="370129942" calcext:value-type="float">
            <text:p>370129942</text:p>
          </table:table-cell>
          <table:table-cell office:value-type="float" office:value="561096023.706329" calcext:value-type="float">
            <text:p>561096023.706329</text:p>
          </table:table-cell>
          <table:table-cell/>
          <table:table-cell office:value-type="string" calcext:value-type="string">
            <text:p>2017-10-12T16:00:23.7063289Z</text:p>
          </table:table-cell>
          <table:table-cell office:value-type="string" calcext:value-type="string">
            <text:p>2017-10-12-16:01:32.8903290</text:p>
          </table:table-cell>
          <table:table-cell table:number-columns-repeated="2"/>
        </table:table-row>
        <table:table-row table:style-name="ro1">
          <table:table-cell office:value-type="float" office:value="370212719" calcext:value-type="float">
            <text:p>370212719</text:p>
          </table:table-cell>
          <table:table-cell office:value-type="float" office:value="561178800.707283" calcext:value-type="float">
            <text:p>561178800.707283</text:p>
          </table:table-cell>
          <table:table-cell/>
          <table:table-cell office:value-type="string" calcext:value-type="string">
            <text:p>2017-10-13T15:00:00.7072830Z</text:p>
          </table:table-cell>
          <table:table-cell office:value-type="string" calcext:value-type="string">
            <text:p>2017-10-13-15:01:09.8912830</text:p>
          </table:table-cell>
          <table:table-cell table:number-columns-repeated="2"/>
        </table:table-row>
        <table:table-row table:style-name="ro1">
          <table:table-cell office:value-type="float" office:value="370311002" calcext:value-type="float">
            <text:p>370311002</text:p>
          </table:table-cell>
          <table:table-cell office:value-type="float" office:value="561277083.708384" calcext:value-type="float">
            <text:p>561277083.708384</text:p>
          </table:table-cell>
          <table:table-cell/>
          <table:table-cell office:value-type="string" calcext:value-type="string">
            <text:p>2017-10-14T18:18:03.7083840Z</text:p>
          </table:table-cell>
          <table:table-cell office:value-type="string" calcext:value-type="string">
            <text:p>2017-10-14-18:19:12.8923840</text:p>
          </table:table-cell>
          <table:table-cell table:number-columns-repeated="2"/>
        </table:table-row>
        <table:table-row table:style-name="ro1">
          <table:table-cell office:value-type="float" office:value="370385494" calcext:value-type="float">
            <text:p>370385494</text:p>
          </table:table-cell>
          <table:table-cell office:value-type="float" office:value="561351575.709261" calcext:value-type="float">
            <text:p>561351575.709261</text:p>
          </table:table-cell>
          <table:table-cell/>
          <table:table-cell office:value-type="string" calcext:value-type="string">
            <text:p>2017-10-15T14:59:35.7092609Z</text:p>
          </table:table-cell>
          <table:table-cell office:value-type="string" calcext:value-type="string">
            <text:p>2017-10-15-15:00:44.8932609</text:p>
          </table:table-cell>
          <table:table-cell table:number-columns-repeated="2"/>
        </table:table-row>
        <table:table-row table:style-name="ro1">
          <table:table-cell office:value-type="float" office:value="370471885" calcext:value-type="float">
            <text:p>370471885</text:p>
          </table:table-cell>
          <table:table-cell office:value-type="float" office:value="561437966.710265" calcext:value-type="float">
            <text:p>561437966.710265</text:p>
          </table:table-cell>
          <table:table-cell/>
          <table:table-cell office:value-type="string" calcext:value-type="string">
            <text:p>2017-10-16T14:59:26.7102650Z</text:p>
          </table:table-cell>
          <table:table-cell office:value-type="string" calcext:value-type="string">
            <text:p>2017-10-16-15:00:35.8942650</text:p>
          </table:table-cell>
          <table:table-cell table:number-columns-repeated="2"/>
        </table:table-row>
        <table:table-row table:style-name="ro1">
          <table:table-cell office:value-type="float" office:value="370558271" calcext:value-type="float">
            <text:p>370558271</text:p>
          </table:table-cell>
          <table:table-cell office:value-type="float" office:value="561524352.711259" calcext:value-type="float">
            <text:p>561524352.711259</text:p>
          </table:table-cell>
          <table:table-cell/>
          <table:table-cell office:value-type="string" calcext:value-type="string">
            <text:p>2017-10-17T14:59:12.7112590Z</text:p>
          </table:table-cell>
          <table:table-cell office:value-type="string" calcext:value-type="string">
            <text:p>2017-10-17-15:00:21.8952590</text:p>
          </table:table-cell>
          <table:table-cell table:number-columns-repeated="2"/>
        </table:table-row>
        <table:table-row table:style-name="ro1">
          <table:table-cell office:value-type="float" office:value="370657140" calcext:value-type="float">
            <text:p>370657140</text:p>
          </table:table-cell>
          <table:table-cell office:value-type="float" office:value="561623221.712382" calcext:value-type="float">
            <text:p>561623221.712382</text:p>
          </table:table-cell>
          <table:table-cell/>
          <table:table-cell office:value-type="string" calcext:value-type="string">
            <text:p>2017-10-18T18:27:01.7123819Z</text:p>
          </table:table-cell>
          <table:table-cell office:value-type="string" calcext:value-type="string">
            <text:p>2017-10-18-18:28:10.8963819</text:p>
          </table:table-cell>
          <table:table-cell table:number-columns-repeated="2"/>
        </table:table-row>
        <table:table-row table:style-name="ro1">
          <table:table-cell office:value-type="float" office:value="370731093" calcext:value-type="float">
            <text:p>370731093</text:p>
          </table:table-cell>
          <table:table-cell office:value-type="float" office:value="561697174.713245" calcext:value-type="float">
            <text:p>561697174.713245</text:p>
          </table:table-cell>
          <table:table-cell/>
          <table:table-cell office:value-type="string" calcext:value-type="string">
            <text:p>2017-10-19T14:59:34.7132450Z</text:p>
          </table:table-cell>
          <table:table-cell office:value-type="string" calcext:value-type="string">
            <text:p>2017-10-19-15:00:43.8972450</text:p>
          </table:table-cell>
          <table:table-cell table:number-columns-repeated="2"/>
        </table:table-row>
        <table:table-row table:style-name="ro1">
          <table:table-cell office:value-type="float" office:value="370829735" calcext:value-type="float">
            <text:p>370829735</text:p>
          </table:table-cell>
          <table:table-cell office:value-type="float" office:value="561795816.714351" calcext:value-type="float">
            <text:p>561795816.714351</text:p>
          </table:table-cell>
          <table:table-cell/>
          <table:table-cell office:value-type="string" calcext:value-type="string">
            <text:p>2017-10-20T18:23:36.7143509Z</text:p>
          </table:table-cell>
          <table:table-cell office:value-type="string" calcext:value-type="string">
            <text:p>2017-10-20-18:24:45.8983509</text:p>
          </table:table-cell>
          <table:table-cell table:number-columns-repeated="2"/>
        </table:table-row>
        <table:table-row table:style-name="ro1">
          <table:table-cell office:value-type="float" office:value="370903827" calcext:value-type="float">
            <text:p>370903827</text:p>
          </table:table-cell>
          <table:table-cell office:value-type="float" office:value="561869908.715223" calcext:value-type="float">
            <text:p>561869908.715223</text:p>
          </table:table-cell>
          <table:table-cell/>
          <table:table-cell office:value-type="string" calcext:value-type="string">
            <text:p>2017-10-21T14:58:28.7152229Z</text:p>
          </table:table-cell>
          <table:table-cell office:value-type="string" calcext:value-type="string">
            <text:p>2017-10-21-14:59:37.8992229</text:p>
          </table:table-cell>
          <table:table-cell table:number-columns-repeated="2"/>
        </table:table-row>
        <table:table-row table:style-name="ro1">
          <table:table-cell office:value-type="float" office:value="371001003" calcext:value-type="float">
            <text:p>371001003</text:p>
          </table:table-cell>
          <table:table-cell office:value-type="float" office:value="561967084.716312" calcext:value-type="float">
            <text:p>561967084.716312</text:p>
          </table:table-cell>
          <table:table-cell/>
          <table:table-cell office:value-type="string" calcext:value-type="string">
            <text:p>2017-10-22T17:58:04.7163119Z</text:p>
          </table:table-cell>
          <table:table-cell office:value-type="string" calcext:value-type="string">
            <text:p>2017-10-22-17:59:13.9003119</text:p>
          </table:table-cell>
          <table:table-cell table:number-columns-repeated="2"/>
        </table:table-row>
        <table:table-row table:style-name="ro1">
          <table:table-cell office:value-type="float" office:value="371076601" calcext:value-type="float">
            <text:p>371076601</text:p>
          </table:table-cell>
          <table:table-cell office:value-type="float" office:value="562042682.71721" calcext:value-type="float">
            <text:p>562042682.71721</text:p>
          </table:table-cell>
          <table:table-cell/>
          <table:table-cell office:value-type="string" calcext:value-type="string">
            <text:p>2017-10-23T14:58:02.7172099Z</text:p>
          </table:table-cell>
          <table:table-cell office:value-type="string" calcext:value-type="string">
            <text:p>2017-10-23-14:59:11.9012099</text:p>
          </table:table-cell>
          <table:table-cell table:number-columns-repeated="2"/>
        </table:table-row>
        <table:table-row table:style-name="ro1">
          <table:table-cell office:value-type="float" office:value="371162990" calcext:value-type="float">
            <text:p>371162990</text:p>
          </table:table-cell>
          <table:table-cell office:value-type="float" office:value="562129071.718189" calcext:value-type="float">
            <text:p>562129071.718189</text:p>
          </table:table-cell>
          <table:table-cell/>
          <table:table-cell office:value-type="string" calcext:value-type="string">
            <text:p>2017-10-24T14:57:51.7181890Z</text:p>
          </table:table-cell>
          <table:table-cell office:value-type="string" calcext:value-type="string">
            <text:p>2017-10-24-14:59:00.9021890</text:p>
          </table:table-cell>
          <table:table-cell table:number-columns-repeated="2"/>
        </table:table-row>
        <table:table-row table:style-name="ro1">
          <table:table-cell office:value-type="float" office:value="371249376" calcext:value-type="float">
            <text:p>371249376</text:p>
          </table:table-cell>
          <table:table-cell office:value-type="float" office:value="562215457.719189" calcext:value-type="float">
            <text:p>562215457.719189</text:p>
          </table:table-cell>
          <table:table-cell/>
          <table:table-cell office:value-type="string" calcext:value-type="string">
            <text:p>2017-10-25T14:57:37.7191889Z</text:p>
          </table:table-cell>
          <table:table-cell office:value-type="string" calcext:value-type="string">
            <text:p>2017-10-25-14:58:46.9031889</text:p>
          </table:table-cell>
          <table:table-cell table:number-columns-repeated="2"/>
        </table:table-row>
        <table:table-row table:style-name="ro1">
          <table:table-cell office:value-type="float" office:value="371335766" calcext:value-type="float">
            <text:p>371335766</text:p>
          </table:table-cell>
          <table:table-cell office:value-type="float" office:value="562301847.720164" calcext:value-type="float">
            <text:p>562301847.720164</text:p>
          </table:table-cell>
          <table:table-cell/>
          <table:table-cell office:value-type="string" calcext:value-type="string">
            <text:p>2017-10-26T14:57:27.7201639Z</text:p>
          </table:table-cell>
          <table:table-cell office:value-type="string" calcext:value-type="string">
            <text:p>2017-10-26-14:58:36.9041639</text:p>
          </table:table-cell>
          <table:table-cell table:number-columns-repeated="2"/>
        </table:table-row>
        <table:table-row table:style-name="ro1">
          <table:table-cell office:value-type="float" office:value="371411340" calcext:value-type="float">
            <text:p>371411340</text:p>
          </table:table-cell>
          <table:table-cell office:value-type="float" office:value="562377421.721027" calcext:value-type="float">
            <text:p>562377421.721027</text:p>
          </table:table-cell>
          <table:table-cell/>
          <table:table-cell office:value-type="string" calcext:value-type="string">
            <text:p>2017-10-27T11:57:01.7210270Z</text:p>
          </table:table-cell>
          <table:table-cell office:value-type="string" calcext:value-type="string">
            <text:p>2017-10-27-11:58:10.9050270</text:p>
          </table:table-cell>
          <table:table-cell table:number-columns-repeated="2"/>
        </table:table-row>
        <table:table-row table:style-name="ro1">
          <table:table-cell office:value-type="float" office:value="371504933" calcext:value-type="float">
            <text:p>371504933</text:p>
          </table:table-cell>
          <table:table-cell office:value-type="float" office:value="562471014.722114" calcext:value-type="float">
            <text:p>562471014.722114</text:p>
          </table:table-cell>
          <table:table-cell/>
          <table:table-cell office:value-type="string" calcext:value-type="string">
            <text:p>2017-10-28T13:56:54.7221139Z</text:p>
          </table:table-cell>
          <table:table-cell office:value-type="string" calcext:value-type="string">
            <text:p>2017-10-28-13:58:03.9061139</text:p>
          </table:table-cell>
          <table:table-cell table:number-columns-repeated="2"/>
        </table:table-row>
        <table:table-row table:style-name="ro1">
          <table:table-cell office:value-type="float" office:value="371591326" calcext:value-type="float">
            <text:p>371591326</text:p>
          </table:table-cell>
          <table:table-cell office:value-type="float" office:value="562557407.723099" calcext:value-type="float">
            <text:p>562557407.723099</text:p>
          </table:table-cell>
          <table:table-cell/>
          <table:table-cell office:value-type="string" calcext:value-type="string">
            <text:p>2017-10-29T13:56:47.7230989Z</text:p>
          </table:table-cell>
          <table:table-cell office:value-type="string" calcext:value-type="string">
            <text:p>2017-10-29-13:57:56.9070990</text:p>
          </table:table-cell>
          <table:table-cell table:number-columns-repeated="2"/>
        </table:table-row>
        <table:table-row table:style-name="ro1">
          <table:table-cell office:value-type="float" office:value="371670568" calcext:value-type="float">
            <text:p>371670568</text:p>
          </table:table-cell>
          <table:table-cell office:value-type="float" office:value="562636649.723996" calcext:value-type="float">
            <text:p>562636649.723996</text:p>
          </table:table-cell>
          <table:table-cell/>
          <table:table-cell office:value-type="string" calcext:value-type="string">
            <text:p>2017-10-30T11:57:29.7239960Z</text:p>
          </table:table-cell>
          <table:table-cell office:value-type="string" calcext:value-type="string">
            <text:p>2017-10-30-11:58:38.9079960</text:p>
          </table:table-cell>
          <table:table-cell table:number-columns-repeated="2"/>
        </table:table-row>
        <table:table-row table:style-name="ro1">
          <table:table-cell office:value-type="float" office:value="371864895" calcext:value-type="float">
            <text:p>371864895</text:p>
          </table:table-cell>
          <table:table-cell office:value-type="float" office:value="562830976.726192" calcext:value-type="float">
            <text:p>562830976.726192</text:p>
          </table:table-cell>
          <table:table-cell/>
          <table:table-cell office:value-type="string" calcext:value-type="string">
            <text:p>2017-11-01T17:56:16.7261919Z</text:p>
          </table:table-cell>
          <table:table-cell office:value-type="string" calcext:value-type="string">
            <text:p>2017-11-01-17:57:25.9101920</text:p>
          </table:table-cell>
          <table:table-cell table:number-columns-repeated="2"/>
        </table:table-row>
        <table:table-row table:style-name="ro1">
          <table:table-cell office:value-type="float" office:value="371879310" calcext:value-type="float">
            <text:p>371879310</text:p>
          </table:table-cell>
          <table:table-cell office:value-type="float" office:value="562845391.726387" calcext:value-type="float">
            <text:p>562845391.726387</text:p>
          </table:table-cell>
          <table:table-cell/>
          <table:table-cell office:value-type="string" calcext:value-type="string">
            <text:p>2017-11-01T21:56:31.7263870Z</text:p>
          </table:table-cell>
          <table:table-cell office:value-type="string" calcext:value-type="string">
            <text:p>2017-11-01-21:57:40.9103870</text:p>
          </table:table-cell>
          <table:table-cell table:number-columns-repeated="2"/>
        </table:table-row>
        <table:table-row table:style-name="ro1">
          <table:table-cell office:value-type="float" office:value="372109660" calcext:value-type="float">
            <text:p>372109660</text:p>
          </table:table-cell>
          <table:table-cell office:value-type="float" office:value="563075741.729005" calcext:value-type="float">
            <text:p>563075741.729005</text:p>
          </table:table-cell>
          <table:table-cell/>
          <table:table-cell office:value-type="string" calcext:value-type="string">
            <text:p>2017-11-04T13:55:41.7290049Z</text:p>
          </table:table-cell>
          <table:table-cell office:value-type="string" calcext:value-type="string">
            <text:p>2017-11-04-13:56:50.9130049</text:p>
          </table:table-cell>
          <table:table-cell table:number-columns-repeated="2"/>
        </table:table-row>
        <table:table-row table:style-name="ro1">
          <table:table-cell office:value-type="float" office:value="372138440" calcext:value-type="float">
            <text:p>372138440</text:p>
          </table:table-cell>
          <table:table-cell office:value-type="float" office:value="563104521.729344" calcext:value-type="float">
            <text:p>563104521.729344</text:p>
          </table:table-cell>
          <table:table-cell/>
          <table:table-cell office:value-type="string" calcext:value-type="string">
            <text:p>2017-11-04T21:55:21.7293440Z</text:p>
          </table:table-cell>
          <table:table-cell office:value-type="string" calcext:value-type="string">
            <text:p>2017-11-04-21:56:30.9133440</text:p>
          </table:table-cell>
          <table:table-cell table:number-columns-repeated="2"/>
        </table:table-row>
        <table:table-row table:style-name="ro1">
          <table:table-cell office:value-type="float" office:value="372282433" calcext:value-type="float">
            <text:p>372282433</text:p>
          </table:table-cell>
          <table:table-cell office:value-type="float" office:value="563248514.730988" calcext:value-type="float">
            <text:p>563248514.730988</text:p>
          </table:table-cell>
          <table:table-cell/>
          <table:table-cell office:value-type="string" calcext:value-type="string">
            <text:p>2017-11-06T13:55:14.7309880Z</text:p>
          </table:table-cell>
          <table:table-cell office:value-type="string" calcext:value-type="string">
            <text:p>2017-11-06-13:56:23.9149880</text:p>
          </table:table-cell>
          <table:table-cell table:number-columns-repeated="2"/>
        </table:table-row>
        <table:table-row table:style-name="ro1">
          <table:table-cell office:value-type="float" office:value="372368822" calcext:value-type="float">
            <text:p>372368822</text:p>
          </table:table-cell>
          <table:table-cell office:value-type="float" office:value="563334903.731969" calcext:value-type="float">
            <text:p>563334903.731969</text:p>
          </table:table-cell>
          <table:table-cell/>
          <table:table-cell office:value-type="string" calcext:value-type="string">
            <text:p>2017-11-07T13:55:03.7319689Z</text:p>
          </table:table-cell>
          <table:table-cell office:value-type="string" calcext:value-type="string">
            <text:p>2017-11-07-13:56:12.9159690</text:p>
          </table:table-cell>
          <table:table-cell table:number-columns-repeated="2"/>
        </table:table-row>
        <table:table-row table:style-name="ro1">
          <table:table-cell office:value-type="float" office:value="372469598" calcext:value-type="float">
            <text:p>372469598</text:p>
          </table:table-cell>
          <table:table-cell office:value-type="float" office:value="563435679.733105" calcext:value-type="float">
            <text:p>563435679.733105</text:p>
          </table:table-cell>
          <table:table-cell/>
          <table:table-cell office:value-type="string" calcext:value-type="string">
            <text:p>2017-11-08T17:54:39.7331049Z</text:p>
          </table:table-cell>
          <table:table-cell office:value-type="string" calcext:value-type="string">
            <text:p>2017-11-08-17:55:48.9171049</text:p>
          </table:table-cell>
          <table:table-cell table:number-columns-repeated="2"/>
        </table:table-row>
        <table:table-row table:style-name="ro1">
          <table:table-cell office:value-type="float" office:value="372541600" calcext:value-type="float">
            <text:p>372541600</text:p>
          </table:table-cell>
          <table:table-cell office:value-type="float" office:value="563507681.73394" calcext:value-type="float">
            <text:p>563507681.73394</text:p>
          </table:table-cell>
          <table:table-cell/>
          <table:table-cell office:value-type="string" calcext:value-type="string">
            <text:p>2017-11-09T13:54:41.7339400Z</text:p>
          </table:table-cell>
          <table:table-cell office:value-type="string" calcext:value-type="string">
            <text:p>2017-11-09-13:55:50.9179400</text:p>
          </table:table-cell>
          <table:table-cell table:number-columns-repeated="2"/>
        </table:table-row>
        <table:table-row table:style-name="ro1">
          <table:table-cell office:value-type="float" office:value="372656770" calcext:value-type="float">
            <text:p>372656770</text:p>
          </table:table-cell>
          <table:table-cell office:value-type="float" office:value="563622851.735247" calcext:value-type="float">
            <text:p>563622851.735247</text:p>
          </table:table-cell>
          <table:table-cell/>
          <table:table-cell office:value-type="string" calcext:value-type="string">
            <text:p>2017-11-10T21:54:11.7352470Z</text:p>
          </table:table-cell>
          <table:table-cell office:value-type="string" calcext:value-type="string">
            <text:p>2017-11-10-21:55:20.9192470</text:p>
          </table:table-cell>
          <table:table-cell table:number-columns-repeated="2"/>
        </table:table-row>
        <table:table-row table:style-name="ro1">
          <table:table-cell office:value-type="float" office:value="372797164" calcext:value-type="float">
            <text:p>372797164</text:p>
          </table:table-cell>
          <table:table-cell office:value-type="float" office:value="563763245.736835" calcext:value-type="float">
            <text:p>563763245.736835</text:p>
          </table:table-cell>
          <table:table-cell/>
          <table:table-cell office:value-type="string" calcext:value-type="string">
            <text:p>2017-11-12T12:54:05.7368350Z</text:p>
          </table:table-cell>
          <table:table-cell office:value-type="string" calcext:value-type="string">
            <text:p>2017-11-12-12:55:14.9208350</text:p>
          </table:table-cell>
          <table:table-cell table:number-columns-repeated="2"/>
        </table:table-row>
        <table:table-row table:style-name="ro1">
          <table:table-cell office:value-type="float" office:value="372883548" calcext:value-type="float">
            <text:p>372883548</text:p>
          </table:table-cell>
          <table:table-cell office:value-type="float" office:value="563849629.737824" calcext:value-type="float">
            <text:p>563849629.737824</text:p>
          </table:table-cell>
          <table:table-cell/>
          <table:table-cell office:value-type="string" calcext:value-type="string">
            <text:p>2017-11-13T12:53:49.7378239Z</text:p>
          </table:table-cell>
          <table:table-cell office:value-type="string" calcext:value-type="string">
            <text:p>2017-11-13-12:54:58.9218239</text:p>
          </table:table-cell>
          <table:table-cell table:number-columns-repeated="2"/>
        </table:table-row>
        <table:table-row table:style-name="ro1">
          <table:table-cell office:value-type="float" office:value="372987934" calcext:value-type="float">
            <text:p>372987934</text:p>
          </table:table-cell>
          <table:table-cell office:value-type="float" office:value="563954015.739004" calcext:value-type="float">
            <text:p>563954015.739004</text:p>
          </table:table-cell>
          <table:table-cell/>
          <table:table-cell office:value-type="string" calcext:value-type="string">
            <text:p>2017-11-14T17:53:35.7390040Z</text:p>
          </table:table-cell>
          <table:table-cell office:value-type="string" calcext:value-type="string">
            <text:p>2017-11-14-17:54:44.9230040</text:p>
          </table:table-cell>
          <table:table-cell table:number-columns-repeated="2"/>
        </table:table-row>
        <table:table-row table:style-name="ro1">
          <table:table-cell office:value-type="float" office:value="373056325" calcext:value-type="float">
            <text:p>373056325</text:p>
          </table:table-cell>
          <table:table-cell office:value-type="float" office:value="564022406.739779" calcext:value-type="float">
            <text:p>564022406.739779</text:p>
          </table:table-cell>
          <table:table-cell/>
          <table:table-cell office:value-type="string" calcext:value-type="string">
            <text:p>2017-11-15T12:53:26.7397789Z</text:p>
          </table:table-cell>
          <table:table-cell office:value-type="string" calcext:value-type="string">
            <text:p>2017-11-15-12:54:35.9237790</text:p>
          </table:table-cell>
          <table:table-cell table:number-columns-repeated="2"/>
        </table:table-row>
        <table:table-row table:style-name="ro1">
          <table:table-cell office:value-type="float" office:value="373085108" calcext:value-type="float">
            <text:p>373085108</text:p>
          </table:table-cell>
          <table:table-cell office:value-type="float" office:value="564051189.740104" calcext:value-type="float">
            <text:p>564051189.740104</text:p>
          </table:table-cell>
          <table:table-cell/>
          <table:table-cell office:value-type="string" calcext:value-type="string">
            <text:p>2017-11-15T20:53:09.7401039Z</text:p>
          </table:table-cell>
          <table:table-cell office:value-type="string" calcext:value-type="string">
            <text:p>2017-11-15-20:54:18.9241039</text:p>
          </table:table-cell>
          <table:table-cell table:number-columns-repeated="2"/>
        </table:table-row>
        <table:table-row table:style-name="ro1">
          <table:table-cell office:value-type="float" office:value="373225501" calcext:value-type="float">
            <text:p>373225501</text:p>
          </table:table-cell>
          <table:table-cell office:value-type="float" office:value="564191582.7417" calcext:value-type="float">
            <text:p>564191582.7417</text:p>
          </table:table-cell>
          <table:table-cell/>
          <table:table-cell office:value-type="string" calcext:value-type="string">
            <text:p>2017-11-17T11:53:02.7416999Z</text:p>
          </table:table-cell>
          <table:table-cell office:value-type="string" calcext:value-type="string">
            <text:p>2017-11-17-11:54:11.9256999</text:p>
          </table:table-cell>
          <table:table-cell table:number-columns-repeated="2"/>
        </table:table-row>
        <table:table-row table:style-name="ro1">
          <table:table-cell office:value-type="float" office:value="373333490" calcext:value-type="float">
            <text:p>373333490</text:p>
          </table:table-cell>
          <table:table-cell office:value-type="float" office:value="564299571.742918" calcext:value-type="float">
            <text:p>564299571.742918</text:p>
          </table:table-cell>
          <table:table-cell/>
          <table:table-cell office:value-type="string" calcext:value-type="string">
            <text:p>2017-11-18T17:52:51.7429180Z</text:p>
          </table:table-cell>
          <table:table-cell office:value-type="string" calcext:value-type="string">
            <text:p>2017-11-18-17:54:00.9269180</text:p>
          </table:table-cell>
          <table:table-cell table:number-columns-repeated="2"/>
        </table:table-row>
        <table:table-row table:style-name="ro1">
          <table:table-cell office:value-type="float" office:value="373401889" calcext:value-type="float">
            <text:p>373401889</text:p>
          </table:table-cell>
          <table:table-cell office:value-type="float" office:value="564367970.743694" calcext:value-type="float">
            <text:p>564367970.743694</text:p>
          </table:table-cell>
          <table:table-cell/>
          <table:table-cell office:value-type="string" calcext:value-type="string">
            <text:p>2017-11-19T12:52:50.7436939Z</text:p>
          </table:table-cell>
          <table:table-cell office:value-type="string" calcext:value-type="string">
            <text:p>2017-11-19-12:53:59.9276939</text:p>
          </table:table-cell>
          <table:table-cell table:number-columns-repeated="2"/>
        </table:table-row>
        <table:table-row table:style-name="ro1">
          <table:table-cell office:value-type="float" office:value="373488282" calcext:value-type="float">
            <text:p>373488282</text:p>
          </table:table-cell>
          <table:table-cell office:value-type="float" office:value="564454363.744689" calcext:value-type="float">
            <text:p>564454363.744689</text:p>
          </table:table-cell>
          <table:table-cell/>
          <table:table-cell office:value-type="string" calcext:value-type="string">
            <text:p>2017-11-20T12:52:43.7446889Z</text:p>
          </table:table-cell>
          <table:table-cell office:value-type="string" calcext:value-type="string">
            <text:p>2017-11-20-12:53:52.9286890</text:p>
          </table:table-cell>
          <table:table-cell table:number-columns-repeated="2"/>
        </table:table-row>
        <table:table-row table:style-name="ro1">
          <table:table-cell office:value-type="float" office:value="373593639" calcext:value-type="float">
            <text:p>373593639</text:p>
          </table:table-cell>
          <table:table-cell office:value-type="float" office:value="564559720.745865" calcext:value-type="float">
            <text:p>564559720.745865</text:p>
          </table:table-cell>
          <table:table-cell/>
          <table:table-cell office:value-type="string" calcext:value-type="string">
            <text:p>2017-11-21T18:08:40.7458649Z</text:p>
          </table:table-cell>
          <table:table-cell office:value-type="string" calcext:value-type="string">
            <text:p>2017-11-21-18:09:49.9298650</text:p>
          </table:table-cell>
          <table:table-cell table:number-columns-repeated="2"/>
        </table:table-row>
        <table:table-row table:style-name="ro1">
          <table:table-cell office:value-type="float" office:value="373661061" calcext:value-type="float">
            <text:p>373661061</text:p>
          </table:table-cell>
          <table:table-cell office:value-type="float" office:value="564627142.74663" calcext:value-type="float">
            <text:p>564627142.74663</text:p>
          </table:table-cell>
          <table:table-cell/>
          <table:table-cell office:value-type="string" calcext:value-type="string">
            <text:p>2017-11-22T12:52:22.7466299Z</text:p>
          </table:table-cell>
          <table:table-cell office:value-type="string" calcext:value-type="string">
            <text:p>2017-11-22-12:53:31.9306299</text:p>
          </table:table-cell>
          <table:table-cell table:number-columns-repeated="2"/>
        </table:table-row>
        <table:table-row table:style-name="ro1">
          <table:table-cell office:value-type="float" office:value="373689841" calcext:value-type="float">
            <text:p>373689841</text:p>
          </table:table-cell>
          <table:table-cell office:value-type="float" office:value="564655922.746958" calcext:value-type="float">
            <text:p>564655922.746958</text:p>
          </table:table-cell>
          <table:table-cell/>
          <table:table-cell office:value-type="string" calcext:value-type="string">
            <text:p>2017-11-22T20:52:02.7469580Z</text:p>
          </table:table-cell>
          <table:table-cell office:value-type="string" calcext:value-type="string">
            <text:p>2017-11-22-20:53:11.9309580</text:p>
          </table:table-cell>
          <table:table-cell table:number-columns-repeated="2"/>
        </table:table-row>
        <table:table-row table:style-name="ro1">
          <table:table-cell office:value-type="float" office:value="373938221" calcext:value-type="float">
            <text:p>373938221</text:p>
          </table:table-cell>
          <table:table-cell office:value-type="float" office:value="564904302.749765" calcext:value-type="float">
            <text:p>564904302.749765</text:p>
          </table:table-cell>
          <table:table-cell/>
          <table:table-cell office:value-type="string" calcext:value-type="string">
            <text:p>2017-11-25T17:51:42.7497650Z</text:p>
          </table:table-cell>
          <table:table-cell office:value-type="string" calcext:value-type="string">
            <text:p>2017-11-25-17:52:51.9337650</text:p>
          </table:table-cell>
          <table:table-cell table:number-columns-repeated="2"/>
        </table:table-row>
        <table:table-row table:style-name="ro1">
          <table:table-cell office:value-type="float" office:value="374003023" calcext:value-type="float">
            <text:p>374003023</text:p>
          </table:table-cell>
          <table:table-cell office:value-type="float" office:value="564969104.750494" calcext:value-type="float">
            <text:p>564969104.750494</text:p>
          </table:table-cell>
          <table:table-cell/>
          <table:table-cell office:value-type="string" calcext:value-type="string">
            <text:p>2017-11-26T11:51:44.7504940Z</text:p>
          </table:table-cell>
          <table:table-cell office:value-type="string" calcext:value-type="string">
            <text:p>2017-11-26-11:52:53.9344940</text:p>
          </table:table-cell>
          <table:table-cell table:number-columns-repeated="2"/>
        </table:table-row>
        <table:table-row table:style-name="ro1">
          <table:table-cell office:value-type="float" office:value="374168592" calcext:value-type="float">
            <text:p>374168592</text:p>
          </table:table-cell>
          <table:table-cell office:value-type="float" office:value="565134673.752368" calcext:value-type="float">
            <text:p>565134673.752368</text:p>
          </table:table-cell>
          <table:table-cell/>
          <table:table-cell office:value-type="string" calcext:value-type="string">
            <text:p>2017-11-28T09:51:13.7523679Z</text:p>
          </table:table-cell>
          <table:table-cell office:value-type="string" calcext:value-type="string">
            <text:p>2017-11-28-09:52:22.9363679</text:p>
          </table:table-cell>
          <table:table-cell table:number-columns-repeated="2"/>
        </table:table-row>
        <table:table-row table:style-name="ro1">
          <table:table-cell office:value-type="float" office:value="374284705" calcext:value-type="float">
            <text:p>374284705</text:p>
          </table:table-cell>
          <table:table-cell office:value-type="float" office:value="565250786.753685" calcext:value-type="float">
            <text:p>565250786.753685</text:p>
          </table:table-cell>
          <table:table-cell/>
          <table:table-cell office:value-type="string" calcext:value-type="string">
            <text:p>2017-11-29T18:06:26.7536849Z</text:p>
          </table:table-cell>
          <table:table-cell office:value-type="string" calcext:value-type="string">
            <text:p>2017-11-29-18:07:35.9376850</text:p>
          </table:table-cell>
          <table:table-cell table:number-columns-repeated="2"/>
        </table:table-row>
        <table:table-row table:style-name="ro1">
          <table:table-cell office:value-type="float" office:value="374370172" calcext:value-type="float">
            <text:p>374370172</text:p>
          </table:table-cell>
          <table:table-cell office:value-type="float" office:value="565336253.754643" calcext:value-type="float">
            <text:p>565336253.754643</text:p>
          </table:table-cell>
          <table:table-cell/>
          <table:table-cell office:value-type="string" calcext:value-type="string">
            <text:p>2017-11-30T17:50:53.7546429Z</text:p>
          </table:table-cell>
          <table:table-cell office:value-type="string" calcext:value-type="string">
            <text:p>2017-11-30-17:52:02.9386429</text:p>
          </table:table-cell>
          <table:table-cell table:number-columns-repeated="2"/>
        </table:table-row>
        <table:table-row table:style-name="ro1">
          <table:table-cell office:value-type="float" office:value="374434978" calcext:value-type="float">
            <text:p>374434978</text:p>
          </table:table-cell>
          <table:table-cell office:value-type="float" office:value="565401059.755385" calcext:value-type="float">
            <text:p>565401059.755385</text:p>
          </table:table-cell>
          <table:table-cell/>
          <table:table-cell office:value-type="string" calcext:value-type="string">
            <text:p>2017-12-01T11:50:59.7553850Z</text:p>
          </table:table-cell>
          <table:table-cell office:value-type="string" calcext:value-type="string">
            <text:p>2017-12-01-11:52:08.9393850</text:p>
          </table:table-cell>
          <table:table-cell table:number-columns-repeated="2"/>
        </table:table-row>
        <table:table-row table:style-name="ro1">
          <table:table-cell office:value-type="float" office:value="374542954" calcext:value-type="float">
            <text:p>374542954</text:p>
          </table:table-cell>
          <table:table-cell office:value-type="float" office:value="565509035.75659" calcext:value-type="float">
            <text:p>565509035.75659</text:p>
          </table:table-cell>
          <table:table-cell/>
          <table:table-cell office:value-type="string" calcext:value-type="string">
            <text:p>2017-12-02T17:50:35.7565900Z</text:p>
          </table:table-cell>
          <table:table-cell office:value-type="string" calcext:value-type="string">
            <text:p>2017-12-02-17:51:44.9405900</text:p>
          </table:table-cell>
          <table:table-cell table:number-columns-repeated="2"/>
        </table:table-row>
        <table:table-row table:style-name="ro1">
          <table:table-cell office:value-type="float" office:value="374546538" calcext:value-type="float">
            <text:p>374546538</text:p>
          </table:table-cell>
          <table:table-cell office:value-type="float" office:value="565512619.756641" calcext:value-type="float">
            <text:p>565512619.756641</text:p>
          </table:table-cell>
          <table:table-cell/>
          <table:table-cell office:value-type="string" calcext:value-type="string">
            <text:p>2017-12-02T18:50:19.7566410Z</text:p>
          </table:table-cell>
          <table:table-cell office:value-type="string" calcext:value-type="string">
            <text:p>2017-12-02-18:51:28.9406410</text:p>
          </table:table-cell>
          <table:table-cell table:number-columns-repeated="2"/>
        </table:table-row>
        <table:table-row table:style-name="ro1">
          <table:table-cell office:value-type="float" office:value="374694149" calcext:value-type="float">
            <text:p>374694149</text:p>
          </table:table-cell>
          <table:table-cell office:value-type="float" office:value="565660230.758308" calcext:value-type="float">
            <text:p>565660230.758308</text:p>
          </table:table-cell>
          <table:table-cell/>
          <table:table-cell office:value-type="string" calcext:value-type="string">
            <text:p>2017-12-04T11:50:30.7583079Z</text:p>
          </table:table-cell>
          <table:table-cell office:value-type="string" calcext:value-type="string">
            <text:p>2017-12-04-11:51:39.9423079</text:p>
          </table:table-cell>
          <table:table-cell table:number-columns-repeated="2"/>
        </table:table-row>
        <table:table-row table:style-name="ro1">
          <table:table-cell office:value-type="float" office:value="374780572" calcext:value-type="float">
            <text:p>374780572</text:p>
          </table:table-cell>
          <table:table-cell office:value-type="float" office:value="565746653.759286" calcext:value-type="float">
            <text:p>565746653.759286</text:p>
          </table:table-cell>
          <table:table-cell/>
          <table:table-cell office:value-type="string" calcext:value-type="string">
            <text:p>2017-12-05T11:50:53.7592859Z</text:p>
          </table:table-cell>
          <table:table-cell office:value-type="string" calcext:value-type="string">
            <text:p>2017-12-05-11:52:02.9432859</text:p>
          </table:table-cell>
          <table:table-cell table:number-columns-repeated="2"/>
        </table:table-row>
        <table:table-row table:style-name="ro1">
          <table:table-cell office:value-type="float" office:value="374974931" calcext:value-type="float">
            <text:p>374974931</text:p>
          </table:table-cell>
          <table:table-cell office:value-type="float" office:value="565941012.761601" calcext:value-type="float">
            <text:p>565941012.761601</text:p>
          </table:table-cell>
          <table:table-cell/>
          <table:table-cell office:value-type="string" calcext:value-type="string">
            <text:p>2017-12-07T17:50:12.7616009Z</text:p>
          </table:table-cell>
          <table:table-cell office:value-type="string" calcext:value-type="string">
            <text:p>2017-12-07-17:51:21.9456009</text:p>
          </table:table-cell>
          <table:table-cell table:number-columns-repeated="2"/>
        </table:table-row>
        <table:table-row table:style-name="ro1">
          <table:table-cell office:value-type="float" office:value="375050524" calcext:value-type="float">
            <text:p>375050524</text:p>
          </table:table-cell>
          <table:table-cell office:value-type="float" office:value="566016605.762437" calcext:value-type="float">
            <text:p>566016605.762437</text:p>
          </table:table-cell>
          <table:table-cell/>
          <table:table-cell office:value-type="string" calcext:value-type="string">
            <text:p>2017-12-08T14:50:05.7624369Z</text:p>
          </table:table-cell>
          <table:table-cell office:value-type="string" calcext:value-type="string">
            <text:p>2017-12-08-14:51:14.9464370</text:p>
          </table:table-cell>
          <table:table-cell table:number-columns-repeated="2"/>
        </table:table-row>
        <table:table-row table:style-name="ro1">
          <table:table-cell office:value-type="float" office:value="375147744" calcext:value-type="float">
            <text:p>375147744</text:p>
          </table:table-cell>
          <table:table-cell office:value-type="float" office:value="566113825.763558" calcext:value-type="float">
            <text:p>566113825.763558</text:p>
          </table:table-cell>
          <table:table-cell/>
          <table:table-cell office:value-type="string" calcext:value-type="string">
            <text:p>2017-12-09T17:50:25.7635580Z</text:p>
          </table:table-cell>
          <table:table-cell office:value-type="string" calcext:value-type="string">
            <text:p>2017-12-09-17:51:34.9475580</text:p>
          </table:table-cell>
          <table:table-cell table:number-columns-repeated="2"/>
        </table:table-row>
        <table:table-row table:style-name="ro1">
          <table:table-cell office:value-type="float" office:value="375234093" calcext:value-type="float">
            <text:p>375234093</text:p>
          </table:table-cell>
          <table:table-cell office:value-type="float" office:value="566200174.764524" calcext:value-type="float">
            <text:p>566200174.764524</text:p>
          </table:table-cell>
          <table:table-cell/>
          <table:table-cell office:value-type="string" calcext:value-type="string">
            <text:p>2017-12-10T17:49:34.7645239Z</text:p>
          </table:table-cell>
          <table:table-cell office:value-type="string" calcext:value-type="string">
            <text:p>2017-12-10-17:50:43.9485239</text:p>
          </table:table-cell>
          <table:table-cell table:number-columns-repeated="2"/>
        </table:table-row>
        <table:table-row table:style-name="ro1">
          <table:table-cell office:value-type="float" office:value="375295292" calcext:value-type="float">
            <text:p>375295292</text:p>
          </table:table-cell>
          <table:table-cell office:value-type="float" office:value="566261373.765205" calcext:value-type="float">
            <text:p>566261373.765205</text:p>
          </table:table-cell>
          <table:table-cell/>
          <table:table-cell office:value-type="string" calcext:value-type="string">
            <text:p>2017-12-11T10:49:33.7652050Z</text:p>
          </table:table-cell>
          <table:table-cell office:value-type="string" calcext:value-type="string">
            <text:p>2017-12-11-10:50:42.9492050</text:p>
          </table:table-cell>
          <table:table-cell table:number-columns-repeated="2"/>
        </table:table-row>
        <table:table-row table:style-name="ro1">
          <table:table-cell office:value-type="float" office:value="375381683" calcext:value-type="float">
            <text:p>375381683</text:p>
          </table:table-cell>
          <table:table-cell office:value-type="float" office:value="566347764.766188" calcext:value-type="float">
            <text:p>566347764.766188</text:p>
          </table:table-cell>
          <table:table-cell/>
          <table:table-cell office:value-type="string" calcext:value-type="string">
            <text:p>2017-12-12T10:49:24.7661880Z</text:p>
          </table:table-cell>
          <table:table-cell office:value-type="string" calcext:value-type="string">
            <text:p>2017-12-12-10:50:33.9501880</text:p>
          </table:table-cell>
          <table:table-cell table:number-columns-repeated="2"/>
        </table:table-row>
        <table:table-row table:style-name="ro1">
          <table:table-cell office:value-type="float" office:value="375493442" calcext:value-type="float">
            <text:p>375493442</text:p>
          </table:table-cell>
          <table:table-cell office:value-type="float" office:value="566459523.767458" calcext:value-type="float">
            <text:p>566459523.767458</text:p>
          </table:table-cell>
          <table:table-cell/>
          <table:table-cell office:value-type="string" calcext:value-type="string">
            <text:p>2017-12-13T17:52:03.7674579Z</text:p>
          </table:table-cell>
          <table:table-cell office:value-type="string" calcext:value-type="string">
            <text:p>2017-12-13-17:53:12.9514579</text:p>
          </table:table-cell>
          <table:table-cell table:number-columns-repeated="2"/>
        </table:table-row>
        <table:table-row table:style-name="ro1">
          <table:table-cell office:value-type="float" office:value="375543654" calcext:value-type="float">
            <text:p>375543654</text:p>
          </table:table-cell>
          <table:table-cell office:value-type="float" office:value="566509735.768" calcext:value-type="float">
            <text:p>566509735.768</text:p>
          </table:table-cell>
          <table:table-cell/>
          <table:table-cell office:value-type="string" calcext:value-type="string">
            <text:p>2017-12-14T07:48:55.7680000Z</text:p>
          </table:table-cell>
          <table:table-cell office:value-type="string" calcext:value-type="string">
            <text:p>2017-12-14-07:50:04.9520000</text:p>
          </table:table-cell>
          <table:table-cell table:number-columns-repeated="2"/>
        </table:table-row>
        <table:table-row table:style-name="ro1">
          <table:table-cell office:value-type="float" office:value="375640860" calcext:value-type="float">
            <text:p>375640860</text:p>
          </table:table-cell>
          <table:table-cell office:value-type="float" office:value="566606941.7691" calcext:value-type="float">
            <text:p>566606941.7691</text:p>
          </table:table-cell>
          <table:table-cell/>
          <table:table-cell office:value-type="string" calcext:value-type="string">
            <text:p>2017-12-15T10:49:01.7690999Z</text:p>
          </table:table-cell>
          <table:table-cell office:value-type="string" calcext:value-type="string">
            <text:p>2017-12-15-10:50:10.9530999</text:p>
          </table:table-cell>
          <table:table-cell table:number-columns-repeated="2"/>
        </table:table-row>
        <table:table-row table:style-name="ro1">
          <table:table-cell office:value-type="float" office:value="375752454" calcext:value-type="float">
            <text:p>375752454</text:p>
          </table:table-cell>
          <table:table-cell office:value-type="float" office:value="566718535.770358" calcext:value-type="float">
            <text:p>566718535.770358</text:p>
          </table:table-cell>
          <table:table-cell/>
          <table:table-cell office:value-type="string" calcext:value-type="string">
            <text:p>2017-12-16T17:48:55.7703579Z</text:p>
          </table:table-cell>
          <table:table-cell office:value-type="string" calcext:value-type="string">
            <text:p>2017-12-16-17:50:04.9543579</text:p>
          </table:table-cell>
          <table:table-cell table:number-columns-repeated="2"/>
        </table:table-row>
        <table:table-row table:style-name="ro1">
          <table:table-cell office:value-type="float" office:value="375838841" calcext:value-type="float">
            <text:p>375838841</text:p>
          </table:table-cell>
          <table:table-cell office:value-type="float" office:value="566804922.771325" calcext:value-type="float">
            <text:p>566804922.771325</text:p>
          </table:table-cell>
          <table:table-cell/>
          <table:table-cell office:value-type="string" calcext:value-type="string">
            <text:p>2017-12-17T17:48:42.7713249Z</text:p>
          </table:table-cell>
          <table:table-cell office:value-type="string" calcext:value-type="string">
            <text:p>2017-12-17-17:49:51.9553250</text:p>
          </table:table-cell>
          <table:table-cell table:number-columns-repeated="2"/>
        </table:table-row>
        <table:table-row table:style-name="ro1">
          <table:table-cell office:value-type="float" office:value="375925235" calcext:value-type="float">
            <text:p>375925235</text:p>
          </table:table-cell>
          <table:table-cell office:value-type="float" office:value="566891316.772294" calcext:value-type="float">
            <text:p>566891316.772294</text:p>
          </table:table-cell>
          <table:table-cell/>
          <table:table-cell office:value-type="string" calcext:value-type="string">
            <text:p>2017-12-18T17:48:36.7722939Z</text:p>
          </table:table-cell>
          <table:table-cell office:value-type="string" calcext:value-type="string">
            <text:p>2017-12-18-17:49:45.9562939</text:p>
          </table:table-cell>
          <table:table-cell table:number-columns-repeated="2"/>
        </table:table-row>
        <table:table-row table:style-name="ro1">
          <table:table-cell office:value-type="float" office:value="375968458" calcext:value-type="float">
            <text:p>375968458</text:p>
          </table:table-cell>
          <table:table-cell office:value-type="float" office:value="566934539.77275" calcext:value-type="float">
            <text:p>566934539.77275</text:p>
          </table:table-cell>
          <table:table-cell/>
          <table:table-cell office:value-type="string" calcext:value-type="string">
            <text:p>2017-12-19T05:48:59.7727500Z</text:p>
          </table:table-cell>
          <table:table-cell office:value-type="string" calcext:value-type="string">
            <text:p>2017-12-19-05:50:08.9567500</text:p>
          </table:table-cell>
          <table:table-cell table:number-columns-repeated="2"/>
        </table:table-row>
        <table:table-row table:style-name="ro1">
          <table:table-cell office:value-type="float" office:value="390520899" calcext:value-type="float">
            <text:p>390520899</text:p>
          </table:table-cell>
          <table:table-cell office:value-type="float" office:value="581486980.938854" calcext:value-type="float">
            <text:p>581486980.938854</text:p>
          </table:table-cell>
          <table:table-cell/>
          <table:table-cell office:value-type="string" calcext:value-type="string">
            <text:p>2018-06-05T16:09:40.9388539Z</text:p>
          </table:table-cell>
          <table:table-cell office:value-type="string" calcext:value-type="string">
            <text:p>2018-06-05-16:10:50.1228539</text:p>
          </table:table-cell>
          <table:table-cell table:number-columns-repeated="2"/>
        </table:table-row>
        <table:table-row table:style-name="ro1">
          <table:table-cell office:value-type="float" office:value="390584687" calcext:value-type="float">
            <text:p>390584687</text:p>
          </table:table-cell>
          <table:table-cell office:value-type="float" office:value="581550768.940093" calcext:value-type="float">
            <text:p>581550768.940093</text:p>
          </table:table-cell>
          <table:table-cell/>
          <table:table-cell office:value-type="string" calcext:value-type="string">
            <text:p>2018-06-06T09:52:48.9400930Z</text:p>
          </table:table-cell>
          <table:table-cell office:value-type="string" calcext:value-type="string">
            <text:p>2018-06-06-09:53:58.1240930</text:p>
          </table:table-cell>
          <table:table-cell table:number-columns-repeated="2"/>
        </table:table-row>
        <table:table-row table:style-name="ro1">
          <table:table-cell office:value-type="float" office:value="390656682" calcext:value-type="float">
            <text:p>390656682</text:p>
          </table:table-cell>
          <table:table-cell office:value-type="float" office:value="581622763.940946" calcext:value-type="float">
            <text:p>581622763.940946</text:p>
          </table:table-cell>
          <table:table-cell/>
          <table:table-cell office:value-type="string" calcext:value-type="string">
            <text:p>2018-06-07T05:52:43.9409459Z</text:p>
          </table:table-cell>
          <table:table-cell office:value-type="string" calcext:value-type="string">
            <text:p>2018-06-07-05:53:53.1249459</text:p>
          </table:table-cell>
          <table:table-cell table:number-columns-repeated="2"/>
        </table:table-row>
        <table:table-row table:style-name="ro1">
          <table:table-cell office:value-type="float" office:value="390764660" calcext:value-type="float">
            <text:p>390764660</text:p>
          </table:table-cell>
          <table:table-cell office:value-type="float" office:value="581730741.94221" calcext:value-type="float">
            <text:p>581730741.94221</text:p>
          </table:table-cell>
          <table:table-cell/>
          <table:table-cell office:value-type="string" calcext:value-type="string">
            <text:p>2018-06-08T11:52:21.9422099Z</text:p>
          </table:table-cell>
          <table:table-cell office:value-type="string" calcext:value-type="string">
            <text:p>2018-06-08-11:53:31.1262099</text:p>
          </table:table-cell>
          <table:table-cell table:number-columns-repeated="2"/>
        </table:table-row>
        <table:table-row table:style-name="ro1">
          <table:table-cell office:value-type="float" office:value="390865466" calcext:value-type="float">
            <text:p>390865466</text:p>
          </table:table-cell>
          <table:table-cell office:value-type="float" office:value="581831547.943415" calcext:value-type="float">
            <text:p>581831547.943415</text:p>
          </table:table-cell>
          <table:table-cell/>
          <table:table-cell office:value-type="string" calcext:value-type="string">
            <text:p>2018-06-09T15:52:27.9434149Z</text:p>
          </table:table-cell>
          <table:table-cell office:value-type="string" calcext:value-type="string">
            <text:p>2018-06-09-15:53:37.1274149</text:p>
          </table:table-cell>
          <table:table-cell table:number-columns-repeated="2"/>
        </table:table-row>
        <table:table-row table:style-name="ro1">
          <table:table-cell office:value-type="float" office:value="390951865" calcext:value-type="float">
            <text:p>390951865</text:p>
          </table:table-cell>
          <table:table-cell office:value-type="float" office:value="581917946.944437" calcext:value-type="float">
            <text:p>581917946.944437</text:p>
          </table:table-cell>
          <table:table-cell/>
          <table:table-cell office:value-type="string" calcext:value-type="string">
            <text:p>2018-06-10T15:52:26.9444370Z</text:p>
          </table:table-cell>
          <table:table-cell office:value-type="string" calcext:value-type="string">
            <text:p>2018-06-10-15:53:36.1284370</text:p>
          </table:table-cell>
          <table:table-cell table:number-columns-repeated="2"/>
        </table:table-row>
        <table:table-row table:style-name="ro1">
          <table:table-cell office:value-type="float" office:value="391028004" calcext:value-type="float">
            <text:p>391028004</text:p>
          </table:table-cell>
          <table:table-cell office:value-type="float" office:value="581994085.945342" calcext:value-type="float">
            <text:p>581994085.945342</text:p>
          </table:table-cell>
          <table:table-cell/>
          <table:table-cell office:value-type="string" calcext:value-type="string">
            <text:p>2018-06-11T13:01:25.9453419Z</text:p>
          </table:table-cell>
          <table:table-cell office:value-type="string" calcext:value-type="string">
            <text:p>2018-06-11-13:02:35.1293419</text:p>
          </table:table-cell>
          <table:table-cell table:number-columns-repeated="2"/>
        </table:table-row>
        <table:table-row table:style-name="ro1">
          <table:table-cell office:value-type="float" office:value="391085035" calcext:value-type="float">
            <text:p>391085035</text:p>
          </table:table-cell>
          <table:table-cell office:value-type="float" office:value="582051116.945993" calcext:value-type="float">
            <text:p>582051116.945993</text:p>
          </table:table-cell>
          <table:table-cell/>
          <table:table-cell office:value-type="string" calcext:value-type="string">
            <text:p>2018-06-12T04:51:56.9459929Z</text:p>
          </table:table-cell>
          <table:table-cell office:value-type="string" calcext:value-type="string">
            <text:p>2018-06-12-04:53:06.1299929</text:p>
          </table:table-cell>
          <table:table-cell table:number-columns-repeated="2"/>
        </table:table-row>
        <table:table-row table:style-name="ro1">
          <table:table-cell office:value-type="float" office:value="391211066" calcext:value-type="float">
            <text:p>391211066</text:p>
          </table:table-cell>
          <table:table-cell office:value-type="float" office:value="582177147.947506" calcext:value-type="float">
            <text:p>582177147.947506</text:p>
          </table:table-cell>
          <table:table-cell/>
          <table:table-cell office:value-type="string" calcext:value-type="string">
            <text:p>2018-06-13T15:52:27.9475059Z</text:p>
          </table:table-cell>
          <table:table-cell office:value-type="string" calcext:value-type="string">
            <text:p>2018-06-13-15:53:37.1315059</text:p>
          </table:table-cell>
          <table:table-cell table:number-columns-repeated="2"/>
        </table:table-row>
        <table:table-row table:style-name="ro1">
          <table:table-cell office:value-type="float" office:value="391304780" calcext:value-type="float">
            <text:p>391304780</text:p>
          </table:table-cell>
          <table:table-cell office:value-type="float" office:value="582270861.948565" calcext:value-type="float">
            <text:p>582270861.948565</text:p>
          </table:table-cell>
          <table:table-cell/>
          <table:table-cell office:value-type="string" calcext:value-type="string">
            <text:p>2018-06-14T17:54:21.9485650Z</text:p>
          </table:table-cell>
          <table:table-cell office:value-type="string" calcext:value-type="string">
            <text:p>2018-06-14-17:55:31.1325650</text:p>
          </table:table-cell>
          <table:table-cell table:number-columns-repeated="2"/>
        </table:table-row>
        <table:table-row table:style-name="ro1">
          <table:table-cell office:value-type="float" office:value="391380245" calcext:value-type="float">
            <text:p>391380245</text:p>
          </table:table-cell>
          <table:table-cell office:value-type="float" office:value="582346326.949497" calcext:value-type="float">
            <text:p>582346326.949497</text:p>
          </table:table-cell>
          <table:table-cell/>
          <table:table-cell office:value-type="string" calcext:value-type="string">
            <text:p>2018-06-15T14:52:06.9494969Z</text:p>
          </table:table-cell>
          <table:table-cell office:value-type="string" calcext:value-type="string">
            <text:p>2018-06-15-14:53:16.1334969</text:p>
          </table:table-cell>
          <table:table-cell table:number-columns-repeated="2"/>
        </table:table-row>
        <table:table-row table:style-name="ro1">
          <table:table-cell office:value-type="float" office:value="391459435" calcext:value-type="float">
            <text:p>391459435</text:p>
          </table:table-cell>
          <table:table-cell office:value-type="float" office:value="582425516.950439" calcext:value-type="float">
            <text:p>582425516.950439</text:p>
          </table:table-cell>
          <table:table-cell/>
          <table:table-cell office:value-type="string" calcext:value-type="string">
            <text:p>2018-06-16T12:51:56.9504389Z</text:p>
          </table:table-cell>
          <table:table-cell office:value-type="string" calcext:value-type="string">
            <text:p>2018-06-16-12:53:06.1344389</text:p>
          </table:table-cell>
          <table:table-cell table:number-columns-repeated="2"/>
        </table:table-row>
        <table:table-row table:style-name="ro1">
          <table:table-cell office:value-type="float" office:value="391553047" calcext:value-type="float">
            <text:p>391553047</text:p>
          </table:table-cell>
          <table:table-cell office:value-type="float" office:value="582519128.951536" calcext:value-type="float">
            <text:p>582519128.951536</text:p>
          </table:table-cell>
          <table:table-cell/>
          <table:table-cell office:value-type="string" calcext:value-type="string">
            <text:p>2018-06-17T14:52:08.9515359Z</text:p>
          </table:table-cell>
          <table:table-cell office:value-type="string" calcext:value-type="string">
            <text:p>2018-06-17-14:53:18.1355359</text:p>
          </table:table-cell>
          <table:table-cell table:number-columns-repeated="2"/>
        </table:table-row>
        <table:table-row table:style-name="ro1">
          <table:table-cell office:value-type="float" office:value="391610648" calcext:value-type="float">
            <text:p>391610648</text:p>
          </table:table-cell>
          <table:table-cell office:value-type="float" office:value="582576729.952212" calcext:value-type="float">
            <text:p>582576729.952212</text:p>
          </table:table-cell>
          <table:table-cell/>
          <table:table-cell office:value-type="string" calcext:value-type="string">
            <text:p>2018-06-18T06:52:09.9522119Z</text:p>
          </table:table-cell>
          <table:table-cell office:value-type="string" calcext:value-type="string">
            <text:p>2018-06-18-06:53:19.1362119</text:p>
          </table:table-cell>
          <table:table-cell table:number-columns-repeated="2"/>
        </table:table-row>
        <table:table-row table:style-name="ro1">
          <table:table-cell office:value-type="float" office:value="391715033" calcext:value-type="float">
            <text:p>391715033</text:p>
          </table:table-cell>
          <table:table-cell office:value-type="float" office:value="582681114.953453" calcext:value-type="float">
            <text:p>582681114.953453</text:p>
          </table:table-cell>
          <table:table-cell/>
          <table:table-cell office:value-type="string" calcext:value-type="string">
            <text:p>2018-06-19T11:51:54.9534529Z</text:p>
          </table:table-cell>
          <table:table-cell office:value-type="string" calcext:value-type="string">
            <text:p>2018-06-19-11:53:04.1374529</text:p>
          </table:table-cell>
          <table:table-cell table:number-columns-repeated="2"/>
        </table:table-row>
        <table:table-row table:style-name="ro1">
          <table:table-cell office:value-type="float" office:value="391783448" calcext:value-type="float">
            <text:p>391783448</text:p>
          </table:table-cell>
          <table:table-cell office:value-type="float" office:value="582749529.954248" calcext:value-type="float">
            <text:p>582749529.954248</text:p>
          </table:table-cell>
          <table:table-cell/>
          <table:table-cell office:value-type="string" calcext:value-type="string">
            <text:p>2018-06-20T06:52:09.9542479Z</text:p>
          </table:table-cell>
          <table:table-cell office:value-type="string" calcext:value-type="string">
            <text:p>2018-06-20-06:53:19.1382479</text:p>
          </table:table-cell>
          <table:table-cell table:number-columns-repeated="2"/>
        </table:table-row>
        <table:table-row table:style-name="ro1">
          <table:table-cell office:value-type="float" office:value="391910236" calcext:value-type="float">
            <text:p>391910236</text:p>
          </table:table-cell>
          <table:table-cell office:value-type="float" office:value="582876317.955778" calcext:value-type="float">
            <text:p>582876317.955778</text:p>
          </table:table-cell>
          <table:table-cell/>
          <table:table-cell office:value-type="string" calcext:value-type="string">
            <text:p>2018-06-21T18:05:17.9557780Z</text:p>
          </table:table-cell>
          <table:table-cell office:value-type="string" calcext:value-type="string">
            <text:p>2018-06-21-18:06:27.1397780</text:p>
          </table:table-cell>
          <table:table-cell table:number-columns-repeated="2"/>
        </table:table-row>
        <table:table-row table:style-name="ro1">
          <table:table-cell office:value-type="float" office:value="391985042" calcext:value-type="float">
            <text:p>391985042</text:p>
          </table:table-cell>
          <table:table-cell office:value-type="float" office:value="582951123.956652" calcext:value-type="float">
            <text:p>582951123.956652</text:p>
          </table:table-cell>
          <table:table-cell/>
          <table:table-cell office:value-type="string" calcext:value-type="string">
            <text:p>2018-06-22T14:52:03.9566519Z</text:p>
          </table:table-cell>
          <table:table-cell office:value-type="string" calcext:value-type="string">
            <text:p>2018-06-22-14:53:13.1406519</text:p>
          </table:table-cell>
          <table:table-cell table:number-columns-repeated="2"/>
        </table:table-row>
        <table:table-row table:style-name="ro1">
          <table:table-cell office:value-type="float" office:value="392082400" calcext:value-type="float">
            <text:p>392082400</text:p>
          </table:table-cell>
          <table:table-cell office:value-type="float" office:value="583048481.95777" calcext:value-type="float">
            <text:p>583048481.95777</text:p>
          </table:table-cell>
          <table:table-cell/>
          <table:table-cell office:value-type="string" calcext:value-type="string">
            <text:p>2018-06-23T17:54:41.9577699Z</text:p>
          </table:table-cell>
          <table:table-cell office:value-type="string" calcext:value-type="string">
            <text:p>2018-06-23-17:55:51.1417700</text:p>
          </table:table-cell>
          <table:table-cell table:number-columns-repeated="2"/>
        </table:table-row>
        <table:table-row table:style-name="ro1">
          <table:table-cell office:value-type="float" office:value="392154236" calcext:value-type="float">
            <text:p>392154236</text:p>
          </table:table-cell>
          <table:table-cell office:value-type="float" office:value="583120317.958659" calcext:value-type="float">
            <text:p>583120317.958659</text:p>
          </table:table-cell>
          <table:table-cell/>
          <table:table-cell office:value-type="string" calcext:value-type="string">
            <text:p>2018-06-24T13:51:57.9586589Z</text:p>
          </table:table-cell>
          <table:table-cell office:value-type="string" calcext:value-type="string">
            <text:p>2018-06-24-13:53:07.1426589</text:p>
          </table:table-cell>
          <table:table-cell table:number-columns-repeated="2"/>
        </table:table-row>
        <table:table-row table:style-name="ro1">
          <table:table-cell office:value-type="float" office:value="392208237" calcext:value-type="float">
            <text:p>392208237</text:p>
          </table:table-cell>
          <table:table-cell office:value-type="float" office:value="583174318.959277" calcext:value-type="float">
            <text:p>583174318.959277</text:p>
          </table:table-cell>
          <table:table-cell/>
          <table:table-cell office:value-type="string" calcext:value-type="string">
            <text:p>2018-06-25T04:51:58.9592770Z</text:p>
          </table:table-cell>
          <table:table-cell office:value-type="string" calcext:value-type="string">
            <text:p>2018-06-25-04:53:08.1432770</text:p>
          </table:table-cell>
          <table:table-cell table:number-columns-repeated="2"/>
        </table:table-row>
        <table:table-row table:style-name="ro1">
          <table:table-cell office:value-type="float" office:value="392330681" calcext:value-type="float">
            <text:p>392330681</text:p>
          </table:table-cell>
          <table:table-cell office:value-type="float" office:value="583296762.960745" calcext:value-type="float">
            <text:p>583296762.960745</text:p>
          </table:table-cell>
          <table:table-cell/>
          <table:table-cell office:value-type="string" calcext:value-type="string">
            <text:p>2018-06-26T14:52:42.9607449Z</text:p>
          </table:table-cell>
          <table:table-cell office:value-type="string" calcext:value-type="string">
            <text:p>2018-06-26-14:53:52.1447449</text:p>
          </table:table-cell>
          <table:table-cell table:number-columns-repeated="2"/>
        </table:table-row>
        <table:table-row table:style-name="ro1">
          <table:table-cell office:value-type="float" office:value="392417075" calcext:value-type="float">
            <text:p>392417075</text:p>
          </table:table-cell>
          <table:table-cell office:value-type="float" office:value="583383156.961765" calcext:value-type="float">
            <text:p>583383156.961765</text:p>
          </table:table-cell>
          <table:table-cell/>
          <table:table-cell office:value-type="string" calcext:value-type="string">
            <text:p>2018-06-27T14:52:36.9617649Z</text:p>
          </table:table-cell>
          <table:table-cell office:value-type="string" calcext:value-type="string">
            <text:p>2018-06-27-14:53:46.1457649</text:p>
          </table:table-cell>
          <table:table-cell table:number-columns-repeated="2"/>
        </table:table-row>
        <table:table-row table:style-name="ro1">
          <table:table-cell office:value-type="float" office:value="392503471" calcext:value-type="float">
            <text:p>392503471</text:p>
          </table:table-cell>
          <table:table-cell office:value-type="float" office:value="583469552.962789" calcext:value-type="float">
            <text:p>583469552.962789</text:p>
          </table:table-cell>
          <table:table-cell/>
          <table:table-cell office:value-type="string" calcext:value-type="string">
            <text:p>2018-06-28T14:52:32.9627889Z</text:p>
          </table:table-cell>
          <table:table-cell office:value-type="string" calcext:value-type="string">
            <text:p>2018-06-28-14:53:42.1467889</text:p>
          </table:table-cell>
          <table:table-cell table:number-columns-repeated="2"/>
        </table:table-row>
        <table:table-row table:style-name="ro1">
          <table:table-cell office:value-type="float" office:value="392589881" calcext:value-type="float">
            <text:p>392589881</text:p>
          </table:table-cell>
          <table:table-cell office:value-type="float" office:value="583555962.963797" calcext:value-type="float">
            <text:p>583555962.963797</text:p>
          </table:table-cell>
          <table:table-cell/>
          <table:table-cell office:value-type="string" calcext:value-type="string">
            <text:p>2018-06-29T14:52:42.9637969Z</text:p>
          </table:table-cell>
          <table:table-cell office:value-type="string" calcext:value-type="string">
            <text:p>2018-06-29-14:53:52.1477969</text:p>
          </table:table-cell>
          <table:table-cell table:number-columns-repeated="2"/>
        </table:table-row>
        <table:table-row table:style-name="ro1">
          <table:table-cell office:value-type="float" office:value="392669014" calcext:value-type="float">
            <text:p>392669014</text:p>
          </table:table-cell>
          <table:table-cell office:value-type="float" office:value="583635095.964736" calcext:value-type="float">
            <text:p>583635095.964736</text:p>
          </table:table-cell>
          <table:table-cell/>
          <table:table-cell office:value-type="string" calcext:value-type="string">
            <text:p>2018-06-30T12:51:35.9647359Z</text:p>
          </table:table-cell>
          <table:table-cell office:value-type="string" calcext:value-type="string">
            <text:p>2018-06-30-12:52:45.1487360</text:p>
          </table:table-cell>
          <table:table-cell table:number-columns-repeated="2"/>
        </table:table-row>
        <table:table-row table:style-name="ro1">
          <table:table-cell office:value-type="float" office:value="392759013" calcext:value-type="float">
            <text:p>392759013</text:p>
          </table:table-cell>
          <table:table-cell office:value-type="float" office:value="583725094.965808" calcext:value-type="float">
            <text:p>583725094.965808</text:p>
          </table:table-cell>
          <table:table-cell/>
          <table:table-cell office:value-type="string" calcext:value-type="string">
            <text:p>2018-07-01T13:51:34.9658080Z</text:p>
          </table:table-cell>
          <table:table-cell office:value-type="string" calcext:value-type="string">
            <text:p>2018-07-01-13:52:44.1498080</text:p>
          </table:table-cell>
          <table:table-cell table:number-columns-repeated="2"/>
        </table:table-row>
        <table:table-row table:style-name="ro1">
          <table:table-cell office:value-type="float" office:value="392838204" calcext:value-type="float">
            <text:p>392838204</text:p>
          </table:table-cell>
          <table:table-cell office:value-type="float" office:value="583804285.966734" calcext:value-type="float">
            <text:p>583804285.966734</text:p>
          </table:table-cell>
          <table:table-cell/>
          <table:table-cell office:value-type="string" calcext:value-type="string">
            <text:p>2018-07-02T11:51:25.9667339Z</text:p>
          </table:table-cell>
          <table:table-cell office:value-type="string" calcext:value-type="string">
            <text:p>2018-07-02-11:52:35.1507339</text:p>
          </table:table-cell>
          <table:table-cell table:number-columns-repeated="2"/>
        </table:table-row>
        <table:table-row table:style-name="ro1">
          <table:table-cell office:value-type="float" office:value="392917399" calcext:value-type="float">
            <text:p>392917399</text:p>
          </table:table-cell>
          <table:table-cell office:value-type="float" office:value="583883480.967671" calcext:value-type="float">
            <text:p>583883480.967671</text:p>
          </table:table-cell>
          <table:table-cell/>
          <table:table-cell office:value-type="string" calcext:value-type="string">
            <text:p>2018-07-03T09:51:20.9676710Z</text:p>
          </table:table-cell>
          <table:table-cell office:value-type="string" calcext:value-type="string">
            <text:p>2018-07-03-09:52:30.1516710</text:p>
          </table:table-cell>
          <table:table-cell table:number-columns-repeated="2"/>
        </table:table-row>
        <table:table-row table:style-name="ro1">
          <table:table-cell office:value-type="float" office:value="393000194" calcext:value-type="float">
            <text:p>393000194</text:p>
          </table:table-cell>
          <table:table-cell office:value-type="float" office:value="583966275.96865" calcext:value-type="float">
            <text:p>583966275.96865</text:p>
          </table:table-cell>
          <table:table-cell/>
          <table:table-cell office:value-type="string" calcext:value-type="string">
            <text:p>2018-07-04T08:51:15.9686499Z</text:p>
          </table:table-cell>
          <table:table-cell office:value-type="string" calcext:value-type="string">
            <text:p>2018-07-04-08:52:25.1526499</text:p>
          </table:table-cell>
          <table:table-cell table:number-columns-repeated="2"/>
        </table:table-row>
        <table:table-row table:style-name="ro1">
          <table:table-cell office:value-type="float" office:value="393119468" calcext:value-type="float">
            <text:p>393119468</text:p>
          </table:table-cell>
          <table:table-cell office:value-type="float" office:value="584085549.970064" calcext:value-type="float">
            <text:p>584085549.970064</text:p>
          </table:table-cell>
          <table:table-cell/>
          <table:table-cell office:value-type="string" calcext:value-type="string">
            <text:p>2018-07-05T17:59:09.9700640Z</text:p>
          </table:table-cell>
          <table:table-cell office:value-type="string" calcext:value-type="string">
            <text:p>2018-07-05-18:00:19.1540640</text:p>
          </table:table-cell>
          <table:table-cell table:number-columns-repeated="2"/>
        </table:table-row>
        <table:table-row table:style-name="ro1">
          <table:table-cell office:value-type="float" office:value="393180186" calcext:value-type="float">
            <text:p>393180186</text:p>
          </table:table-cell>
          <table:table-cell office:value-type="float" office:value="584146267.97077" calcext:value-type="float">
            <text:p>584146267.97077</text:p>
          </table:table-cell>
          <table:table-cell/>
          <table:table-cell office:value-type="string" calcext:value-type="string">
            <text:p>2018-07-06T10:51:07.9707700Z</text:p>
          </table:table-cell>
          <table:table-cell office:value-type="string" calcext:value-type="string">
            <text:p>2018-07-06-10:52:17.1547700</text:p>
          </table:table-cell>
          <table:table-cell table:number-columns-repeated="2"/>
        </table:table-row>
        <table:table-row table:style-name="ro1">
          <table:table-cell office:value-type="float" office:value="393273793" calcext:value-type="float">
            <text:p>393273793</text:p>
          </table:table-cell>
          <table:table-cell office:value-type="float" office:value="584239874.971895" calcext:value-type="float">
            <text:p>584239874.971895</text:p>
          </table:table-cell>
          <table:table-cell/>
          <table:table-cell office:value-type="string" calcext:value-type="string">
            <text:p>2018-07-07T12:51:14.9718949Z</text:p>
          </table:table-cell>
          <table:table-cell office:value-type="string" calcext:value-type="string">
            <text:p>2018-07-07-12:52:24.1558949</text:p>
          </table:table-cell>
          <table:table-cell table:number-columns-repeated="2"/>
        </table:table-row>
        <table:table-row table:style-name="ro1">
          <table:table-cell office:value-type="float" office:value="393360185" calcext:value-type="float">
            <text:p>393360185</text:p>
          </table:table-cell>
          <table:table-cell office:value-type="float" office:value="584326266.972915" calcext:value-type="float">
            <text:p>584326266.972915</text:p>
          </table:table-cell>
          <table:table-cell/>
          <table:table-cell office:value-type="string" calcext:value-type="string">
            <text:p>2018-07-08T12:51:06.9729149Z</text:p>
          </table:table-cell>
          <table:table-cell office:value-type="string" calcext:value-type="string">
            <text:p>2018-07-08-12:52:16.1569149</text:p>
          </table:table-cell>
          <table:table-cell table:number-columns-repeated="2"/>
        </table:table-row>
        <table:table-row table:style-name="ro1">
          <table:table-cell office:value-type="float" office:value="393464750" calcext:value-type="float">
            <text:p>393464750</text:p>
          </table:table-cell>
          <table:table-cell office:value-type="float" office:value="584430831.974121" calcext:value-type="float">
            <text:p>584430831.974121</text:p>
          </table:table-cell>
          <table:table-cell/>
          <table:table-cell office:value-type="string" calcext:value-type="string">
            <text:p>2018-07-09T17:53:51.9741209Z</text:p>
          </table:table-cell>
          <table:table-cell office:value-type="string" calcext:value-type="string">
            <text:p>2018-07-09-17:55:01.1581209</text:p>
          </table:table-cell>
          <table:table-cell table:number-columns-repeated="2"/>
        </table:table-row>
        <table:table-row table:style-name="ro1">
          <table:table-cell office:value-type="float" office:value="393522169" calcext:value-type="float">
            <text:p>393522169</text:p>
          </table:table-cell>
          <table:table-cell office:value-type="float" office:value="584488250.974813" calcext:value-type="float">
            <text:p>584488250.974813</text:p>
          </table:table-cell>
          <table:table-cell/>
          <table:table-cell office:value-type="string" calcext:value-type="string">
            <text:p>2018-07-10T09:50:50.9748129Z</text:p>
          </table:table-cell>
          <table:table-cell office:value-type="string" calcext:value-type="string">
            <text:p>2018-07-10-09:52:00.1588129</text:p>
          </table:table-cell>
          <table:table-cell table:number-columns-repeated="2"/>
        </table:table-row>
        <table:table-row table:style-name="ro1">
          <table:table-cell office:value-type="float" office:value="393637540" calcext:value-type="float">
            <text:p>393637540</text:p>
          </table:table-cell>
          <table:table-cell office:value-type="float" office:value="584603621.97616" calcext:value-type="float">
            <text:p>584603621.97616</text:p>
          </table:table-cell>
          <table:table-cell/>
          <table:table-cell office:value-type="string" calcext:value-type="string">
            <text:p>2018-07-11T17:53:41.9761599Z</text:p>
          </table:table-cell>
          <table:table-cell office:value-type="string" calcext:value-type="string">
            <text:p>2018-07-11-17:54:51.1601599</text:p>
          </table:table-cell>
          <table:table-cell table:number-columns-repeated="2"/>
        </table:table-row>
        <table:table-row table:style-name="ro1">
          <table:table-cell office:value-type="float" office:value="393691360" calcext:value-type="float">
            <text:p>393691360</text:p>
          </table:table-cell>
          <table:table-cell office:value-type="float" office:value="584657441.976807" calcext:value-type="float">
            <text:p>584657441.976807</text:p>
          </table:table-cell>
          <table:table-cell/>
          <table:table-cell office:value-type="string" calcext:value-type="string">
            <text:p>2018-07-12T08:50:41.9768069Z</text:p>
          </table:table-cell>
          <table:table-cell office:value-type="string" calcext:value-type="string">
            <text:p>2018-07-12-08:51:51.1608070</text:p>
          </table:table-cell>
          <table:table-cell table:number-columns-repeated="2"/>
        </table:table-row>
        <table:table-row table:style-name="ro1">
          <table:table-cell office:value-type="float" office:value="393792165" calcext:value-type="float">
            <text:p>393792165</text:p>
          </table:table-cell>
          <table:table-cell office:value-type="float" office:value="584758246.97803" calcext:value-type="float">
            <text:p>584758246.97803</text:p>
          </table:table-cell>
          <table:table-cell/>
          <table:table-cell office:value-type="string" calcext:value-type="string">
            <text:p>2018-07-13T12:50:46.9780299Z</text:p>
          </table:table-cell>
          <table:table-cell office:value-type="string" calcext:value-type="string">
            <text:p>2018-07-13-12:51:56.1620299</text:p>
          </table:table-cell>
          <table:table-cell table:number-columns-repeated="2"/>
        </table:table-row>
        <table:table-row table:style-name="ro1">
          <table:table-cell office:value-type="float" office:value="393878561" calcext:value-type="float">
            <text:p>393878561</text:p>
          </table:table-cell>
          <table:table-cell office:value-type="float" office:value="584844642.97904" calcext:value-type="float">
            <text:p>584844642.97904</text:p>
          </table:table-cell>
          <table:table-cell/>
          <table:table-cell office:value-type="string" calcext:value-type="string">
            <text:p>2018-07-14T12:50:42.9790400Z</text:p>
          </table:table-cell>
          <table:table-cell office:value-type="string" calcext:value-type="string">
            <text:p>2018-07-14-12:51:52.1630400</text:p>
          </table:table-cell>
          <table:table-cell table:number-columns-repeated="2"/>
        </table:table-row>
        <table:table-row table:style-name="ro1">
          <table:table-cell office:value-type="float" office:value="393957746" calcext:value-type="float">
            <text:p>393957746</text:p>
          </table:table-cell>
          <table:table-cell office:value-type="float" office:value="584923827.979969" calcext:value-type="float">
            <text:p>584923827.979969</text:p>
          </table:table-cell>
          <table:table-cell/>
          <table:table-cell office:value-type="string" calcext:value-type="string">
            <text:p>2018-07-15T10:50:27.9799690Z</text:p>
          </table:table-cell>
          <table:table-cell office:value-type="string" calcext:value-type="string">
            <text:p>2018-07-15-10:51:37.1639690</text:p>
          </table:table-cell>
          <table:table-cell table:number-columns-repeated="2"/>
        </table:table-row>
        <table:table-row table:style-name="ro1">
          <table:table-cell office:value-type="float" office:value="394062335" calcext:value-type="float">
            <text:p>394062335</text:p>
          </table:table-cell>
          <table:table-cell office:value-type="float" office:value="585028416.981193" calcext:value-type="float">
            <text:p>585028416.981193</text:p>
          </table:table-cell>
          <table:table-cell/>
          <table:table-cell office:value-type="string" calcext:value-type="string">
            <text:p>2018-07-16T15:53:36.9811929Z</text:p>
          </table:table-cell>
          <table:table-cell office:value-type="string" calcext:value-type="string">
            <text:p>2018-07-16-15:54:46.1651929</text:p>
          </table:table-cell>
          <table:table-cell table:number-columns-repeated="2"/>
        </table:table-row>
        <table:table-row table:style-name="ro1">
          <table:table-cell office:value-type="float" office:value="394108952" calcext:value-type="float">
            <text:p>394108952</text:p>
          </table:table-cell>
          <table:table-cell office:value-type="float" office:value="585075033.981763" calcext:value-type="float">
            <text:p>585075033.981763</text:p>
          </table:table-cell>
          <table:table-cell/>
          <table:table-cell office:value-type="string" calcext:value-type="string">
            <text:p>2018-07-17T04:50:33.9817630Z</text:p>
          </table:table-cell>
          <table:table-cell office:value-type="string" calcext:value-type="string">
            <text:p>2018-07-17-04:51:43.1657630</text:p>
          </table:table-cell>
          <table:table-cell table:number-columns-repeated="2"/>
        </table:table-row>
        <table:table-row table:style-name="ro1">
          <table:table-cell office:value-type="float" office:value="394328692" calcext:value-type="float">
            <text:p>394328692</text:p>
          </table:table-cell>
          <table:table-cell office:value-type="float" office:value="585294773.984324" calcext:value-type="float">
            <text:p>585294773.984324</text:p>
          </table:table-cell>
          <table:table-cell/>
          <table:table-cell office:value-type="string" calcext:value-type="string">
            <text:p>2018-07-19T17:52:53.9843239Z</text:p>
          </table:table-cell>
          <table:table-cell office:value-type="string" calcext:value-type="string">
            <text:p>2018-07-19-17:54:03.1683239</text:p>
          </table:table-cell>
          <table:table-cell table:number-columns-repeated="2"/>
        </table:table-row>
        <table:table-row table:style-name="ro1">
          <table:table-cell office:value-type="float" office:value="394382520" calcext:value-type="float">
            <text:p>394382520</text:p>
          </table:table-cell>
          <table:table-cell office:value-type="float" office:value="585348601.984989" calcext:value-type="float">
            <text:p>585348601.984989</text:p>
          </table:table-cell>
          <table:table-cell/>
          <table:table-cell office:value-type="string" calcext:value-type="string">
            <text:p>2018-07-20T08:50:01.9849889Z</text:p>
          </table:table-cell>
          <table:table-cell office:value-type="string" calcext:value-type="string">
            <text:p>2018-07-20-08:51:11.1689889</text:p>
          </table:table-cell>
          <table:table-cell table:number-columns-repeated="2"/>
        </table:table-row>
        <table:table-row table:style-name="ro1">
          <table:table-cell office:value-type="float" office:value="394476118" calcext:value-type="float">
            <text:p>394476118</text:p>
          </table:table-cell>
          <table:table-cell office:value-type="float" office:value="585442199.986101" calcext:value-type="float">
            <text:p>585442199.986101</text:p>
          </table:table-cell>
          <table:table-cell/>
          <table:table-cell office:value-type="string" calcext:value-type="string">
            <text:p>2018-07-21T10:49:59.9861010Z</text:p>
          </table:table-cell>
          <table:table-cell office:value-type="string" calcext:value-type="string">
            <text:p>2018-07-21-10:51:09.1701010</text:p>
          </table:table-cell>
          <table:table-cell table:number-columns-repeated="2"/>
        </table:table-row>
        <table:table-row table:style-name="ro1">
          <table:table-cell office:value-type="float" office:value="394540930" calcext:value-type="float">
            <text:p>394540930</text:p>
          </table:table-cell>
          <table:table-cell office:value-type="float" office:value="585507011.986865" calcext:value-type="float">
            <text:p>585507011.986865</text:p>
          </table:table-cell>
          <table:table-cell/>
          <table:table-cell office:value-type="string" calcext:value-type="string">
            <text:p>2018-07-22T04:50:11.9868650Z</text:p>
          </table:table-cell>
          <table:table-cell office:value-type="string" calcext:value-type="string">
            <text:p>2018-07-22-04:51:21.1708650</text:p>
          </table:table-cell>
          <table:table-cell table:number-columns-repeated="2"/>
        </table:table-row>
        <table:table-row table:style-name="ro1">
          <table:table-cell office:value-type="float" office:value="394648903" calcext:value-type="float">
            <text:p>394648903</text:p>
          </table:table-cell>
          <table:table-cell office:value-type="float" office:value="585614984.988141" calcext:value-type="float">
            <text:p>585614984.988141</text:p>
          </table:table-cell>
          <table:table-cell/>
          <table:table-cell office:value-type="string" calcext:value-type="string">
            <text:p>2018-07-23T10:49:44.9881409Z</text:p>
          </table:table-cell>
          <table:table-cell office:value-type="string" calcext:value-type="string">
            <text:p>2018-07-23-10:50:54.1721409</text:p>
          </table:table-cell>
          <table:table-cell table:number-columns-repeated="2"/>
        </table:table-row>
        <table:table-row table:style-name="ro1">
          <table:table-cell office:value-type="float" office:value="394800111" calcext:value-type="float">
            <text:p>394800111</text:p>
          </table:table-cell>
          <table:table-cell office:value-type="float" office:value="585766192.989934" calcext:value-type="float">
            <text:p>585766192.989934</text:p>
          </table:table-cell>
          <table:table-cell/>
          <table:table-cell office:value-type="string" calcext:value-type="string">
            <text:p>2018-07-25T04:49:52.9899339Z</text:p>
          </table:table-cell>
          <table:table-cell office:value-type="string" calcext:value-type="string">
            <text:p>2018-07-25-04:51:02.1739339</text:p>
          </table:table-cell>
          <table:table-cell table:number-columns-repeated="2"/>
        </table:table-row>
        <table:table-row table:style-name="ro1">
          <table:table-cell office:value-type="float" office:value="394933457" calcext:value-type="float">
            <text:p>394933457</text:p>
          </table:table-cell>
          <table:table-cell office:value-type="float" office:value="585899538.991492" calcext:value-type="float">
            <text:p>585899538.991492</text:p>
          </table:table-cell>
          <table:table-cell/>
          <table:table-cell office:value-type="string" calcext:value-type="string">
            <text:p>2018-07-26T17:52:18.9914920Z</text:p>
          </table:table-cell>
          <table:table-cell office:value-type="string" calcext:value-type="string">
            <text:p>2018-07-26-17:53:28.1754920</text:p>
          </table:table-cell>
          <table:table-cell table:number-columns-repeated="2"/>
        </table:table-row>
        <table:table-row table:style-name="ro1">
          <table:table-cell office:value-type="float" office:value="394987275" calcext:value-type="float">
            <text:p>394987275</text:p>
          </table:table-cell>
          <table:table-cell office:value-type="float" office:value="585953356.992137" calcext:value-type="float">
            <text:p>585953356.992137</text:p>
          </table:table-cell>
          <table:table-cell/>
          <table:table-cell office:value-type="string" calcext:value-type="string">
            <text:p>2018-07-27T08:49:16.9921369Z</text:p>
          </table:table-cell>
          <table:table-cell office:value-type="string" calcext:value-type="string">
            <text:p>2018-07-27-08:50:26.1761369</text:p>
          </table:table-cell>
          <table:table-cell table:number-columns-repeated="2"/>
        </table:table-row>
        <table:table-row table:style-name="ro1">
          <table:table-cell office:value-type="float" office:value="395048465" calcext:value-type="float">
            <text:p>395048465</text:p>
          </table:table-cell>
          <table:table-cell office:value-type="float" office:value="586014546.992846" calcext:value-type="float">
            <text:p>586014546.992846</text:p>
          </table:table-cell>
          <table:table-cell/>
          <table:table-cell office:value-type="string" calcext:value-type="string">
            <text:p>2018-07-28T01:49:06.9928460Z</text:p>
          </table:table-cell>
          <table:table-cell office:value-type="string" calcext:value-type="string">
            <text:p>2018-07-28-01:50:16.1768460</text:p>
          </table:table-cell>
          <table:table-cell table:number-columns-repeated="2"/>
        </table:table-row>
        <table:table-row table:style-name="ro1">
          <table:table-cell office:value-type="float" office:value="395189030" calcext:value-type="float">
            <text:p>395189030</text:p>
          </table:table-cell>
          <table:table-cell office:value-type="float" office:value="586155111.994536" calcext:value-type="float">
            <text:p>586155111.994536</text:p>
          </table:table-cell>
          <table:table-cell/>
          <table:table-cell office:value-type="string" calcext:value-type="string">
            <text:p>2018-07-29T16:51:51.9945360Z</text:p>
          </table:table-cell>
          <table:table-cell office:value-type="string" calcext:value-type="string">
            <text:p>2018-07-29-16:53:01.1785360</text:p>
          </table:table-cell>
          <table:table-cell table:number-columns-repeated="2"/>
        </table:table-row>
        <table:table-row table:style-name="ro1">
          <table:table-cell office:value-type="float" office:value="395275422" calcext:value-type="float">
            <text:p>395275422</text:p>
          </table:table-cell>
          <table:table-cell office:value-type="float" office:value="586241503.995495" calcext:value-type="float">
            <text:p>586241503.995495</text:p>
          </table:table-cell>
          <table:table-cell/>
          <table:table-cell office:value-type="string" calcext:value-type="string">
            <text:p>2018-07-30T16:51:43.9954949Z</text:p>
          </table:table-cell>
          <table:table-cell office:value-type="string" calcext:value-type="string">
            <text:p>2018-07-30-16:52:53.1794949</text:p>
          </table:table-cell>
          <table:table-cell table:number-columns-repeated="2"/>
        </table:table-row>
        <table:table-row table:style-name="ro1">
          <table:table-cell office:value-type="float" office:value="395336450" calcext:value-type="float">
            <text:p>395336450</text:p>
          </table:table-cell>
          <table:table-cell office:value-type="float" office:value="586302531.996258" calcext:value-type="float">
            <text:p>586302531.996258</text:p>
          </table:table-cell>
          <table:table-cell/>
          <table:table-cell office:value-type="string" calcext:value-type="string">
            <text:p>2018-07-31T09:48:51.9962580Z</text:p>
          </table:table-cell>
          <table:table-cell office:value-type="string" calcext:value-type="string">
            <text:p>2018-07-31-09:50:01.1802580</text:p>
          </table:table-cell>
          <table:table-cell table:number-columns-repeated="2"/>
        </table:table-row>
        <table:table-row table:style-name="ro1">
          <table:table-cell office:value-type="float" office:value="395426441" calcext:value-type="float">
            <text:p>395426441</text:p>
          </table:table-cell>
          <table:table-cell office:value-type="float" office:value="586392522.997327" calcext:value-type="float">
            <text:p>586392522.997327</text:p>
          </table:table-cell>
          <table:table-cell/>
          <table:table-cell office:value-type="string" calcext:value-type="string">
            <text:p>2018-08-01T10:48:42.9973269Z</text:p>
          </table:table-cell>
          <table:table-cell office:value-type="string" calcext:value-type="string">
            <text:p>2018-08-01-10:49:52.1813269</text:p>
          </table:table-cell>
          <table:table-cell table:number-columns-repeated="2"/>
        </table:table-row>
        <table:table-row table:style-name="ro1">
          <table:table-cell office:value-type="float" office:value="395512834" calcext:value-type="float">
            <text:p>395512834</text:p>
          </table:table-cell>
          <table:table-cell office:value-type="float" office:value="586478915.998352" calcext:value-type="float">
            <text:p>586478915.998352</text:p>
          </table:table-cell>
          <table:table-cell/>
          <table:table-cell office:value-type="string" calcext:value-type="string">
            <text:p>2018-08-02T10:48:35.9983519Z</text:p>
          </table:table-cell>
          <table:table-cell office:value-type="string" calcext:value-type="string">
            <text:p>2018-08-02-10:49:45.1823519</text:p>
          </table:table-cell>
          <table:table-cell table:number-columns-repeated="2"/>
        </table:table-row>
        <table:table-row table:style-name="ro1">
          <table:table-cell office:value-type="float" office:value="395584821" calcext:value-type="float">
            <text:p>395584821</text:p>
          </table:table-cell>
          <table:table-cell office:value-type="float" office:value="586550902.999199" calcext:value-type="float">
            <text:p>586550902.999199</text:p>
          </table:table-cell>
          <table:table-cell/>
          <table:table-cell office:value-type="string" calcext:value-type="string">
            <text:p>2018-08-03T06:48:22.9991990Z</text:p>
          </table:table-cell>
          <table:table-cell office:value-type="string" calcext:value-type="string">
            <text:p>2018-08-03-06:49:32.1831990</text:p>
          </table:table-cell>
          <table:table-cell table:number-columns-repeated="2"/>
        </table:table-row>
        <table:table-row table:style-name="ro1">
          <table:table-cell office:value-type="float" office:value="395682015" calcext:value-type="float">
            <text:p>395682015</text:p>
          </table:table-cell>
          <table:table-cell office:value-type="float" office:value="586648097.000355" calcext:value-type="float">
            <text:p>586648097.000355</text:p>
          </table:table-cell>
          <table:table-cell/>
          <table:table-cell office:value-type="string" calcext:value-type="string">
            <text:p>2018-08-04T09:48:17.0003550Z</text:p>
          </table:table-cell>
          <table:table-cell office:value-type="string" calcext:value-type="string">
            <text:p>2018-08-04-09:49:26.1843550</text:p>
          </table:table-cell>
          <table:table-cell table:number-columns-repeated="2"/>
        </table:table-row>
        <table:table-row table:style-name="ro1">
          <table:table-cell office:value-type="float" office:value="395826001" calcext:value-type="float">
            <text:p>395826001</text:p>
          </table:table-cell>
          <table:table-cell office:value-type="float" office:value="586792083.002043" calcext:value-type="float">
            <text:p>586792083.002043</text:p>
          </table:table-cell>
          <table:table-cell/>
          <table:table-cell office:value-type="string" calcext:value-type="string">
            <text:p>2018-08-06T01:48:03.0020430Z</text:p>
          </table:table-cell>
          <table:table-cell office:value-type="string" calcext:value-type="string">
            <text:p>2018-08-06-01:49:12.1860430</text:p>
          </table:table-cell>
          <table:table-cell table:number-columns-repeated="2"/>
        </table:table-row>
        <table:table-row table:style-name="ro1">
          <table:table-cell office:value-type="float" office:value="395919608" calcext:value-type="float">
            <text:p>395919608</text:p>
          </table:table-cell>
          <table:table-cell office:value-type="float" office:value="586885690.00316" calcext:value-type="float">
            <text:p>586885690.00316</text:p>
          </table:table-cell>
          <table:table-cell/>
          <table:table-cell office:value-type="string" calcext:value-type="string">
            <text:p>2018-08-07T03:48:10.0031599Z</text:p>
          </table:table-cell>
          <table:table-cell office:value-type="string" calcext:value-type="string">
            <text:p>2018-08-07-03:49:19.1871600</text:p>
          </table:table-cell>
          <table:table-cell table:number-columns-repeated="2"/>
        </table:table-row>
        <table:table-row table:style-name="ro1">
          <table:table-cell office:value-type="float" office:value="396031194" calcext:value-type="float">
            <text:p>396031194</text:p>
          </table:table-cell>
          <table:table-cell office:value-type="float" office:value="586997276.004472" calcext:value-type="float">
            <text:p>586997276.004472</text:p>
          </table:table-cell>
          <table:table-cell/>
          <table:table-cell office:value-type="string" calcext:value-type="string">
            <text:p>2018-08-08T10:47:56.0044720Z</text:p>
          </table:table-cell>
          <table:table-cell office:value-type="string" calcext:value-type="string">
            <text:p>2018-08-08-10:49:05.1884720</text:p>
          </table:table-cell>
          <table:table-cell table:number-columns-repeated="2"/>
        </table:table-row>
        <table:table-row table:style-name="ro1">
          <table:table-cell office:value-type="float" office:value="396099572" calcext:value-type="float">
            <text:p>396099572</text:p>
          </table:table-cell>
          <table:table-cell office:value-type="float" office:value="587065654.005261" calcext:value-type="float">
            <text:p>587065654.005261</text:p>
          </table:table-cell>
          <table:table-cell/>
          <table:table-cell office:value-type="string" calcext:value-type="string">
            <text:p>2018-08-09T05:47:34.0052609Z</text:p>
          </table:table-cell>
          <table:table-cell office:value-type="string" calcext:value-type="string">
            <text:p>2018-08-09-05:48:43.1892609</text:p>
          </table:table-cell>
          <table:table-cell table:number-columns-repeated="2"/>
        </table:table-row>
        <table:table-row table:style-name="ro1">
          <table:table-cell office:value-type="float" office:value="396189568" calcext:value-type="float">
            <text:p>396189568</text:p>
          </table:table-cell>
          <table:table-cell office:value-type="float" office:value="587155650.006324" calcext:value-type="float">
            <text:p>587155650.006324</text:p>
          </table:table-cell>
          <table:table-cell/>
          <table:table-cell office:value-type="string" calcext:value-type="string">
            <text:p>2018-08-10T06:47:30.0063239Z</text:p>
          </table:table-cell>
          <table:table-cell office:value-type="string" calcext:value-type="string">
            <text:p>2018-08-10-06:48:39.1903239</text:p>
          </table:table-cell>
          <table:table-cell table:number-columns-repeated="2"/>
        </table:table-row>
        <table:table-row table:style-name="ro1">
          <table:table-cell office:value-type="float" office:value="396312309" calcext:value-type="float">
            <text:p>396312309</text:p>
          </table:table-cell>
          <table:table-cell office:value-type="float" office:value="587278391.007793" calcext:value-type="float">
            <text:p>587278391.007793</text:p>
          </table:table-cell>
          <table:table-cell/>
          <table:table-cell office:value-type="string" calcext:value-type="string">
            <text:p>2018-08-11T16:53:11.0077929Z</text:p>
          </table:table-cell>
          <table:table-cell office:value-type="string" calcext:value-type="string">
            <text:p>2018-08-11-16:54:20.1917929</text:p>
          </table:table-cell>
          <table:table-cell table:number-columns-repeated="2"/>
        </table:table-row>
        <table:table-row table:style-name="ro1">
          <table:table-cell office:value-type="float" office:value="396369550" calcext:value-type="float">
            <text:p>396369550</text:p>
          </table:table-cell>
          <table:table-cell office:value-type="float" office:value="587335632.008473" calcext:value-type="float">
            <text:p>587335632.008473</text:p>
          </table:table-cell>
          <table:table-cell/>
          <table:table-cell office:value-type="string" calcext:value-type="string">
            <text:p>2018-08-12T08:47:12.0084730Z</text:p>
          </table:table-cell>
          <table:table-cell office:value-type="string" calcext:value-type="string">
            <text:p>2018-08-12-08:48:21.1924730</text:p>
          </table:table-cell>
          <table:table-cell table:number-columns-repeated="2"/>
        </table:table-row>
        <table:table-row table:style-name="ro1">
          <table:table-cell office:value-type="float" office:value="396452359" calcext:value-type="float">
            <text:p>396452359</text:p>
          </table:table-cell>
          <table:table-cell office:value-type="float" office:value="587418441.009434" calcext:value-type="float">
            <text:p>587418441.009434</text:p>
          </table:table-cell>
          <table:table-cell/>
          <table:table-cell office:value-type="string" calcext:value-type="string">
            <text:p>2018-08-13T07:47:21.0094339Z</text:p>
          </table:table-cell>
          <table:table-cell office:value-type="string" calcext:value-type="string">
            <text:p>2018-08-13-07:48:30.1934340</text:p>
          </table:table-cell>
          <table:table-cell table:number-columns-repeated="2"/>
        </table:table-row>
        <table:table-row table:style-name="ro1">
          <table:table-cell office:value-type="float" office:value="396549577" calcext:value-type="float">
            <text:p>396549577</text:p>
          </table:table-cell>
          <table:table-cell office:value-type="float" office:value="587515659.01059" calcext:value-type="float">
            <text:p>587515659.01059</text:p>
          </table:table-cell>
          <table:table-cell/>
          <table:table-cell office:value-type="string" calcext:value-type="string">
            <text:p>2018-08-14T10:47:39.0105899Z</text:p>
          </table:table-cell>
          <table:table-cell office:value-type="string" calcext:value-type="string">
            <text:p>2018-08-14-10:48:48.1945899</text:p>
          </table:table-cell>
          <table:table-cell table:number-columns-repeated="2"/>
        </table:table-row>
        <table:table-row table:style-name="ro1">
          <table:table-cell office:value-type="float" office:value="396718733" calcext:value-type="float">
            <text:p>396718733</text:p>
          </table:table-cell>
          <table:table-cell office:value-type="float" office:value="587684815.012571" calcext:value-type="float">
            <text:p>587684815.012571</text:p>
          </table:table-cell>
          <table:table-cell/>
          <table:table-cell office:value-type="string" calcext:value-type="string">
            <text:p>2018-08-16T09:46:55.0125709Z</text:p>
          </table:table-cell>
          <table:table-cell office:value-type="string" calcext:value-type="string">
            <text:p>2018-08-16-09:48:04.1965709</text:p>
          </table:table-cell>
          <table:table-cell table:number-columns-repeated="2"/>
        </table:table-row>
        <table:table-row table:style-name="ro1">
          <table:table-cell office:value-type="float" office:value="396920480" calcext:value-type="float">
            <text:p>396920480</text:p>
          </table:table-cell>
          <table:table-cell office:value-type="float" office:value="587886562.01493" calcext:value-type="float">
            <text:p>587886562.01493</text:p>
          </table:table-cell>
          <table:table-cell/>
          <table:table-cell office:value-type="string" calcext:value-type="string">
            <text:p>2018-08-18T17:49:22.0149300Z</text:p>
          </table:table-cell>
          <table:table-cell office:value-type="string" calcext:value-type="string">
            <text:p>2018-08-18-17:50:31.1989300</text:p>
          </table:table-cell>
          <table:table-cell table:number-columns-repeated="2"/>
        </table:table-row>
        <table:table-row table:style-name="ro1">
          <table:table-cell office:value-type="float" office:value="396941900" calcext:value-type="float">
            <text:p>396941900</text:p>
          </table:table-cell>
          <table:table-cell office:value-type="float" office:value="587907982.015183" calcext:value-type="float">
            <text:p>587907982.015183</text:p>
          </table:table-cell>
          <table:table-cell/>
          <table:table-cell office:value-type="string" calcext:value-type="string">
            <text:p>2018-08-18T23:46:22.0151829Z</text:p>
          </table:table-cell>
          <table:table-cell office:value-type="string" calcext:value-type="string">
            <text:p>2018-08-18-23:47:31.1991829</text:p>
          </table:table-cell>
          <table:table-cell table:number-columns-repeated="2"/>
        </table:table-row>
        <table:table-row table:style-name="ro1">
          <table:table-cell office:value-type="float" office:value="397125525" calcext:value-type="float">
            <text:p>397125525</text:p>
          </table:table-cell>
          <table:table-cell office:value-type="float" office:value="588091607.017367" calcext:value-type="float">
            <text:p>588091607.017367</text:p>
          </table:table-cell>
          <table:table-cell/>
          <table:table-cell office:value-type="string" calcext:value-type="string">
            <text:p>2018-08-21T02:46:47.0173670Z</text:p>
          </table:table-cell>
          <table:table-cell office:value-type="string" calcext:value-type="string">
            <text:p>2018-08-21-02:47:56.2013670</text:p>
          </table:table-cell>
          <table:table-cell table:number-columns-repeated="2"/>
        </table:table-row>
        <table:table-row table:style-name="ro1">
          <table:table-cell office:value-type="float" office:value="397323479" calcext:value-type="float">
            <text:p>397323479</text:p>
          </table:table-cell>
          <table:table-cell office:value-type="float" office:value="588289561.019687" calcext:value-type="float">
            <text:p>588289561.019687</text:p>
          </table:table-cell>
          <table:table-cell/>
          <table:table-cell office:value-type="string" calcext:value-type="string">
            <text:p>2018-08-23T09:46:01.0196869Z</text:p>
          </table:table-cell>
          <table:table-cell office:value-type="string" calcext:value-type="string">
            <text:p>2018-08-23-09:47:10.2036869</text:p>
          </table:table-cell>
          <table:table-cell table:number-columns-repeated="2"/>
        </table:table-row>
        <table:table-row table:style-name="ro1">
          <table:table-cell office:value-type="float" office:value="397409870" calcext:value-type="float">
            <text:p>397409870</text:p>
          </table:table-cell>
          <table:table-cell office:value-type="float" office:value="588375952.020712" calcext:value-type="float">
            <text:p>588375952.020712</text:p>
          </table:table-cell>
          <table:table-cell/>
          <table:table-cell office:value-type="string" calcext:value-type="string">
            <text:p>2018-08-24T09:45:52.0207120Z</text:p>
          </table:table-cell>
          <table:table-cell office:value-type="string" calcext:value-type="string">
            <text:p>2018-08-24-09:47:01.2047120</text:p>
          </table:table-cell>
          <table:table-cell table:number-columns-repeated="2"/>
        </table:table-row>
        <table:table-row table:style-name="ro1">
          <table:table-cell office:value-type="float" office:value="397525191" calcext:value-type="float">
            <text:p>397525191</text:p>
          </table:table-cell>
          <table:table-cell office:value-type="float" office:value="588491273.022062" calcext:value-type="float">
            <text:p>588491273.022062</text:p>
          </table:table-cell>
          <table:table-cell/>
          <table:table-cell office:value-type="string" calcext:value-type="string">
            <text:p>2018-08-25T17:47:53.0220619Z</text:p>
          </table:table-cell>
          <table:table-cell office:value-type="string" calcext:value-type="string">
            <text:p>2018-08-25-17:49:02.2060619</text:p>
          </table:table-cell>
          <table:table-cell table:number-columns-repeated="2"/>
        </table:table-row>
        <table:table-row table:style-name="ro1">
          <table:table-cell office:value-type="float" office:value="397582641" calcext:value-type="float">
            <text:p>397582641</text:p>
          </table:table-cell>
          <table:table-cell office:value-type="float" office:value="588548723.022746" calcext:value-type="float">
            <text:p>588548723.022746</text:p>
          </table:table-cell>
          <table:table-cell/>
          <table:table-cell office:value-type="string" calcext:value-type="string">
            <text:p>2018-08-26T09:45:23.0227459Z</text:p>
          </table:table-cell>
          <table:table-cell office:value-type="string" calcext:value-type="string">
            <text:p>2018-08-26-09:46:32.2067459</text:p>
          </table:table-cell>
          <table:table-cell table:number-columns-repeated="2"/>
        </table:table-row>
        <table:table-row table:style-name="ro1">
          <table:table-cell office:value-type="float" office:value="397647423" calcext:value-type="float">
            <text:p>397647423</text:p>
          </table:table-cell>
          <table:table-cell office:value-type="float" office:value="588613505.023484" calcext:value-type="float">
            <text:p>588613505.023484</text:p>
          </table:table-cell>
          <table:table-cell/>
          <table:table-cell office:value-type="string" calcext:value-type="string">
            <text:p>2018-08-27T03:45:05.0234839Z</text:p>
          </table:table-cell>
          <table:table-cell office:value-type="string" calcext:value-type="string">
            <text:p>2018-08-27-03:46:14.2074840</text:p>
          </table:table-cell>
          <table:table-cell table:number-columns-repeated="2"/>
        </table:table-row>
        <table:table-row table:style-name="ro1">
          <table:table-cell office:value-type="float" office:value="398129934" calcext:value-type="float">
            <text:p>398129934</text:p>
          </table:table-cell>
          <table:table-cell office:value-type="float" office:value="589096016.029196" calcext:value-type="float">
            <text:p>589096016.029196</text:p>
          </table:table-cell>
          <table:table-cell/>
          <table:table-cell office:value-type="string" calcext:value-type="string">
            <text:p>2018-09-01T17:46:56.0291960Z</text:p>
          </table:table-cell>
          <table:table-cell office:value-type="string" calcext:value-type="string">
            <text:p>2018-09-01-17:48:05.2131960</text:p>
          </table:table-cell>
          <table:table-cell table:number-columns-repeated="2"/>
        </table:table-row>
        <table:table-row table:style-name="ro1">
          <table:table-cell office:value-type="float" office:value="398187388" calcext:value-type="float">
            <text:p>398187388</text:p>
          </table:table-cell>
          <table:table-cell office:value-type="float" office:value="589153470.029835" calcext:value-type="float">
            <text:p>589153470.029835</text:p>
          </table:table-cell>
          <table:table-cell/>
          <table:table-cell office:value-type="string" calcext:value-type="string">
            <text:p>2018-09-02T09:44:30.0298349Z</text:p>
          </table:table-cell>
          <table:table-cell office:value-type="string" calcext:value-type="string">
            <text:p>2018-09-02-09:45:39.2138350</text:p>
          </table:table-cell>
          <table:table-cell table:number-columns-repeated="2"/>
        </table:table-row>
        <table:table-row table:style-name="ro1">
          <table:table-cell office:value-type="float" office:value="398273780" calcext:value-type="float">
            <text:p>398273780</text:p>
          </table:table-cell>
          <table:table-cell office:value-type="float" office:value="589239862.030861" calcext:value-type="float">
            <text:p>589239862.030861</text:p>
          </table:table-cell>
          <table:table-cell/>
          <table:table-cell office:value-type="string" calcext:value-type="string">
            <text:p>2018-09-03T09:44:22.0308610Z</text:p>
          </table:table-cell>
          <table:table-cell office:value-type="string" calcext:value-type="string">
            <text:p>2018-09-03-09:45:31.2148610</text:p>
          </table:table-cell>
          <table:table-cell table:number-columns-repeated="2"/>
        </table:table-row>
        <table:table-row table:style-name="ro1">
          <table:table-cell office:value-type="float" office:value="398360170" calcext:value-type="float">
            <text:p>398360170</text:p>
          </table:table-cell>
          <table:table-cell office:value-type="float" office:value="589326252.031859" calcext:value-type="float">
            <text:p>589326252.031859</text:p>
          </table:table-cell>
          <table:table-cell/>
          <table:table-cell office:value-type="string" calcext:value-type="string">
            <text:p>2018-09-04T09:44:12.0318590Z</text:p>
          </table:table-cell>
          <table:table-cell office:value-type="string" calcext:value-type="string">
            <text:p>2018-09-04-09:45:21.2158590</text:p>
          </table:table-cell>
          <table:table-cell table:number-columns-repeated="2"/>
        </table:table-row>
        <table:table-row table:style-name="ro1">
          <table:table-cell office:value-type="float" office:value="398702104" calcext:value-type="float">
            <text:p>398702104</text:p>
          </table:table-cell>
          <table:table-cell office:value-type="float" office:value="589668186.035859" calcext:value-type="float">
            <text:p>589668186.035859</text:p>
          </table:table-cell>
          <table:table-cell/>
          <table:table-cell office:value-type="string" calcext:value-type="string">
            <text:p>2018-09-08T08:43:06.0358589Z</text:p>
          </table:table-cell>
          <table:table-cell office:value-type="string" calcext:value-type="string">
            <text:p>2018-09-08-08:44:15.2198590</text:p>
          </table:table-cell>
          <table:table-cell table:number-columns-repeated="2"/>
        </table:table-row>
        <table:table-row table:style-name="ro1">
          <table:table-cell office:value-type="float" office:value="398763323" calcext:value-type="float">
            <text:p>398763323</text:p>
          </table:table-cell>
          <table:table-cell office:value-type="float" office:value="589729405.036573" calcext:value-type="float">
            <text:p>589729405.036573</text:p>
          </table:table-cell>
          <table:table-cell/>
          <table:table-cell office:value-type="string" calcext:value-type="string">
            <text:p>2018-09-09T01:43:25.0365729Z</text:p>
          </table:table-cell>
          <table:table-cell office:value-type="string" calcext:value-type="string">
            <text:p>2018-09-09-01:44:34.2205729</text:p>
          </table:table-cell>
          <table:table-cell table:number-columns-repeated="2"/>
        </table:table-row>
        <table:table-row table:style-name="ro1">
          <table:table-cell office:value-type="float" office:value="398849711" calcext:value-type="float">
            <text:p>398849711</text:p>
          </table:table-cell>
          <table:table-cell office:value-type="float" office:value="589815793.03758" calcext:value-type="float">
            <text:p>589815793.03758</text:p>
          </table:table-cell>
          <table:table-cell/>
          <table:table-cell office:value-type="string" calcext:value-type="string">
            <text:p>2018-09-10T01:43:13.0375800Z</text:p>
          </table:table-cell>
          <table:table-cell office:value-type="string" calcext:value-type="string">
            <text:p>2018-09-10-01:44:22.2215800</text:p>
          </table:table-cell>
          <table:table-cell table:number-columns-repeated="2"/>
        </table:table-row>
        <table:table-row table:style-name="ro1">
          <table:table-cell office:value-type="float" office:value="398932500" calcext:value-type="float">
            <text:p>398932500</text:p>
          </table:table-cell>
          <table:table-cell office:value-type="float" office:value="589898582.038543" calcext:value-type="float">
            <text:p>589898582.038543</text:p>
          </table:table-cell>
          <table:table-cell/>
          <table:table-cell office:value-type="string" calcext:value-type="string">
            <text:p>2018-09-11T00:43:02.0385429Z</text:p>
          </table:table-cell>
          <table:table-cell office:value-type="string" calcext:value-type="string">
            <text:p>2018-09-11-00:44:11.2225430</text:p>
          </table:table-cell>
          <table:table-cell table:number-columns-repeated="2"/>
        </table:table-row>
        <table:table-row table:style-name="ro1">
          <table:table-cell office:value-type="float" office:value="399134053" calcext:value-type="float">
            <text:p>399134053</text:p>
          </table:table-cell>
          <table:table-cell office:value-type="float" office:value="590100135.040921" calcext:value-type="float">
            <text:p>590100135.040921</text:p>
          </table:table-cell>
          <table:table-cell/>
          <table:table-cell office:value-type="string" calcext:value-type="string">
            <text:p>2018-09-13T08:42:15.0409209Z</text:p>
          </table:table-cell>
          <table:table-cell office:value-type="string" calcext:value-type="string">
            <text:p>2018-09-13-08:43:24.2249209</text:p>
          </table:table-cell>
          <table:table-cell table:number-columns-repeated="2"/>
        </table:table-row>
        <table:table-row table:style-name="ro1">
          <table:table-cell office:value-type="float" office:value="399224060" calcext:value-type="float">
            <text:p>399224060</text:p>
          </table:table-cell>
          <table:table-cell office:value-type="float" office:value="590190142.041963" calcext:value-type="float">
            <text:p>590190142.041963</text:p>
          </table:table-cell>
          <table:table-cell/>
          <table:table-cell office:value-type="string" calcext:value-type="string">
            <text:p>2018-09-14T09:42:22.0419629Z</text:p>
          </table:table-cell>
          <table:table-cell office:value-type="string" calcext:value-type="string">
            <text:p>2018-09-14-09:43:31.2259629</text:p>
          </table:table-cell>
          <table:table-cell table:number-columns-repeated="2"/>
        </table:table-row>
        <table:table-row table:style-name="ro1">
          <table:table-cell office:value-type="float" office:value="399306822" calcext:value-type="float">
            <text:p>399306822</text:p>
          </table:table-cell>
          <table:table-cell office:value-type="float" office:value="590272904.042942" calcext:value-type="float">
            <text:p>590272904.042942</text:p>
          </table:table-cell>
          <table:table-cell/>
          <table:table-cell office:value-type="string" calcext:value-type="string">
            <text:p>2018-09-15T08:41:44.0429419Z</text:p>
          </table:table-cell>
          <table:table-cell office:value-type="string" calcext:value-type="string">
            <text:p>2018-09-15-08:42:53.2269419</text:p>
          </table:table-cell>
          <table:table-cell table:number-columns-repeated="2"/>
        </table:table-row>
        <table:table-row table:style-name="ro1">
          <table:table-cell office:value-type="float" office:value="399479602" calcext:value-type="float">
            <text:p>399479602</text:p>
          </table:table-cell>
          <table:table-cell office:value-type="float" office:value="590445684.04495" calcext:value-type="float">
            <text:p>590445684.04495</text:p>
          </table:table-cell>
          <table:table-cell/>
          <table:table-cell office:value-type="string" calcext:value-type="string">
            <text:p>2018-09-17T08:41:24.0449500Z</text:p>
          </table:table-cell>
          <table:table-cell office:value-type="string" calcext:value-type="string">
            <text:p>2018-09-17-08:42:33.2289500</text:p>
          </table:table-cell>
          <table:table-cell table:number-columns-repeated="2"/>
        </table:table-row>
        <table:table-row table:style-name="ro1">
          <table:table-cell office:value-type="float" office:value="399558777" calcext:value-type="float">
            <text:p>399558777</text:p>
          </table:table-cell>
          <table:table-cell office:value-type="float" office:value="590524859.045874" calcext:value-type="float">
            <text:p>590524859.045874</text:p>
          </table:table-cell>
          <table:table-cell/>
          <table:table-cell office:value-type="string" calcext:value-type="string">
            <text:p>2018-09-18T06:40:59.0458739Z</text:p>
          </table:table-cell>
          <table:table-cell office:value-type="string" calcext:value-type="string">
            <text:p>2018-09-18-06:42:08.2298740</text:p>
          </table:table-cell>
          <table:table-cell table:number-columns-repeated="2"/>
        </table:table-row>
        <table:table-row table:style-name="ro1">
          <table:table-cell office:value-type="float" office:value="399652390" calcext:value-type="float">
            <text:p>399652390</text:p>
          </table:table-cell>
          <table:table-cell office:value-type="float" office:value="590618472.046978" calcext:value-type="float">
            <text:p>590618472.046978</text:p>
          </table:table-cell>
          <table:table-cell/>
          <table:table-cell office:value-type="string" calcext:value-type="string">
            <text:p>2018-09-19T08:41:12.0469779Z</text:p>
          </table:table-cell>
          <table:table-cell office:value-type="string" calcext:value-type="string">
            <text:p>2018-09-19-08:42:21.2309780</text:p>
          </table:table-cell>
          <table:table-cell table:number-columns-repeated="2"/>
        </table:table-row>
        <table:table-row table:style-name="ro1">
          <table:table-cell office:value-type="float" office:value="399767605" calcext:value-type="float">
            <text:p>399767605</text:p>
          </table:table-cell>
          <table:table-cell office:value-type="float" office:value="590733687.048309" calcext:value-type="float">
            <text:p>590733687.048309</text:p>
          </table:table-cell>
          <table:table-cell/>
          <table:table-cell office:value-type="string" calcext:value-type="string">
            <text:p>2018-09-20T16:41:27.0483089Z</text:p>
          </table:table-cell>
          <table:table-cell office:value-type="string" calcext:value-type="string">
            <text:p>2018-09-20-16:42:36.2323089</text:p>
          </table:table-cell>
          <table:table-cell table:number-columns-repeated="2"/>
        </table:table-row>
        <table:table-row table:style-name="ro1">
          <table:table-cell office:value-type="float" office:value="399817938" calcext:value-type="float">
            <text:p>399817938</text:p>
          </table:table-cell>
          <table:table-cell office:value-type="float" office:value="590784020.048909" calcext:value-type="float">
            <text:p>590784020.048909</text:p>
          </table:table-cell>
          <table:table-cell/>
          <table:table-cell office:value-type="string" calcext:value-type="string">
            <text:p>2018-09-21T06:40:20.0489089Z</text:p>
          </table:table-cell>
          <table:table-cell office:value-type="string" calcext:value-type="string">
            <text:p>2018-09-21-06:41:29.2329089</text:p>
          </table:table-cell>
          <table:table-cell table:number-columns-repeated="2"/>
        </table:table-row>
        <table:table-row table:style-name="ro1">
          <table:table-cell office:value-type="float" office:value="399943973" calcext:value-type="float">
            <text:p>399943973</text:p>
          </table:table-cell>
          <table:table-cell office:value-type="float" office:value="590910055.050337" calcext:value-type="float">
            <text:p>590910055.050337</text:p>
          </table:table-cell>
          <table:table-cell/>
          <table:table-cell office:value-type="string" calcext:value-type="string">
            <text:p>2018-09-22T17:40:55.0503369Z</text:p>
          </table:table-cell>
          <table:table-cell office:value-type="string" calcext:value-type="string">
            <text:p>2018-09-22-17:42:04.2343369</text:p>
          </table:table-cell>
          <table:table-cell table:number-columns-repeated="2"/>
        </table:table-row>
        <table:table-row table:style-name="ro1">
          <table:table-cell office:value-type="float" office:value="399990709" calcext:value-type="float">
            <text:p>399990709</text:p>
          </table:table-cell>
          <table:table-cell office:value-type="float" office:value="590956791.050917" calcext:value-type="float">
            <text:p>590956791.050917</text:p>
          </table:table-cell>
          <table:table-cell/>
          <table:table-cell office:value-type="string" calcext:value-type="string">
            <text:p>2018-09-23T06:39:51.0509170Z</text:p>
          </table:table-cell>
          <table:table-cell office:value-type="string" calcext:value-type="string">
            <text:p>2018-09-23-06:41:00.2349170</text:p>
          </table:table-cell>
          <table:table-cell table:number-columns-repeated="2"/>
        </table:table-row>
        <table:table-row table:style-name="ro1">
          <table:table-cell office:value-type="float" office:value="400055541" calcext:value-type="float">
            <text:p>400055541</text:p>
          </table:table-cell>
          <table:table-cell office:value-type="float" office:value="591021623.051669" calcext:value-type="float">
            <text:p>591021623.051669</text:p>
          </table:table-cell>
          <table:table-cell/>
          <table:table-cell office:value-type="string" calcext:value-type="string">
            <text:p>2018-09-24T00:40:23.0516690Z</text:p>
          </table:table-cell>
          <table:table-cell office:value-type="string" calcext:value-type="string">
            <text:p>2018-09-24-00:41:32.2356690</text:p>
          </table:table-cell>
          <table:table-cell table:number-columns-repeated="2"/>
        </table:table-row>
        <table:table-row table:style-name="ro1">
          <table:table-cell office:value-type="float" office:value="400149083" calcext:value-type="float">
            <text:p>400149083</text:p>
          </table:table-cell>
          <table:table-cell office:value-type="float" office:value="591115165.052757" calcext:value-type="float">
            <text:p>591115165.052757</text:p>
          </table:table-cell>
          <table:table-cell/>
          <table:table-cell office:value-type="string" calcext:value-type="string">
            <text:p>2018-09-25T02:39:25.0527570Z</text:p>
          </table:table-cell>
          <table:table-cell office:value-type="string" calcext:value-type="string">
            <text:p>2018-09-25-02:40:34.2367570</text:p>
          </table:table-cell>
          <table:table-cell table:number-columns-repeated="2"/>
        </table:table-row>
        <table:table-row table:style-name="ro1">
          <table:table-cell office:value-type="float" office:value="400224719" calcext:value-type="float">
            <text:p>400224719</text:p>
          </table:table-cell>
          <table:table-cell office:value-type="float" office:value="591190801.053648" calcext:value-type="float">
            <text:p>591190801.053648</text:p>
          </table:table-cell>
          <table:table-cell/>
          <table:table-cell office:value-type="string" calcext:value-type="string">
            <text:p>2018-09-25T23:40:01.0536479Z</text:p>
          </table:table-cell>
          <table:table-cell office:value-type="string" calcext:value-type="string">
            <text:p>2018-09-25-23:41:10.2376480</text:p>
          </table:table-cell>
          <table:table-cell table:number-columns-repeated="2"/>
        </table:table-row>
        <table:table-row table:style-name="ro1">
          <table:table-cell office:value-type="float" office:value="400336263" calcext:value-type="float">
            <text:p>400336263</text:p>
          </table:table-cell>
          <table:table-cell office:value-type="float" office:value="591302345.054937" calcext:value-type="float">
            <text:p>591302345.054937</text:p>
          </table:table-cell>
          <table:table-cell/>
          <table:table-cell office:value-type="string" calcext:value-type="string">
            <text:p>2018-09-27T06:39:05.0549370Z</text:p>
          </table:table-cell>
          <table:table-cell office:value-type="string" calcext:value-type="string">
            <text:p>2018-09-27-06:40:14.2389370</text:p>
          </table:table-cell>
          <table:table-cell table:number-columns-repeated="2"/>
        </table:table-row>
        <table:table-row table:style-name="ro1">
          <table:table-cell office:value-type="float" office:value="400422654" calcext:value-type="float">
            <text:p>400422654</text:p>
          </table:table-cell>
          <table:table-cell office:value-type="float" office:value="591388736.055953" calcext:value-type="float">
            <text:p>591388736.055953</text:p>
          </table:table-cell>
          <table:table-cell/>
          <table:table-cell office:value-type="string" calcext:value-type="string">
            <text:p>2018-09-28T06:38:56.0559530Z</text:p>
          </table:table-cell>
          <table:table-cell office:value-type="string" calcext:value-type="string">
            <text:p>2018-09-28-06:40:05.2399530</text:p>
          </table:table-cell>
          <table:table-cell table:number-columns-repeated="2"/>
        </table:table-row>
        <table:table-row table:style-name="ro1">
          <table:table-cell office:value-type="float" office:value="400541490" calcext:value-type="float">
            <text:p>400541490</text:p>
          </table:table-cell>
          <table:table-cell office:value-type="float" office:value="591507572.057332" calcext:value-type="float">
            <text:p>591507572.057332</text:p>
          </table:table-cell>
          <table:table-cell/>
          <table:table-cell office:value-type="string" calcext:value-type="string">
            <text:p>2018-09-29T15:39:32.0573320Z</text:p>
          </table:table-cell>
          <table:table-cell office:value-type="string" calcext:value-type="string">
            <text:p>2018-09-29-15:40:41.2413320</text:p>
          </table:table-cell>
          <table:table-cell table:number-columns-repeated="2"/>
        </table:table-row>
        <table:table-row table:style-name="ro1">
          <table:table-cell office:value-type="float" office:value="400627880" calcext:value-type="float">
            <text:p>400627880</text:p>
          </table:table-cell>
          <table:table-cell office:value-type="float" office:value="591593962.058327" calcext:value-type="float">
            <text:p>591593962.058327</text:p>
          </table:table-cell>
          <table:table-cell/>
          <table:table-cell office:value-type="string" calcext:value-type="string">
            <text:p>2018-09-30T15:39:22.0583269Z</text:p>
          </table:table-cell>
          <table:table-cell office:value-type="string" calcext:value-type="string">
            <text:p>2018-09-30-15:40:31.2423269</text:p>
          </table:table-cell>
          <table:table-cell table:number-columns-repeated="2"/>
        </table:table-row>
        <table:table-row table:style-name="ro1">
          <table:table-cell office:value-type="float" office:value="400721432" calcext:value-type="float">
            <text:p>400721432</text:p>
          </table:table-cell>
          <table:table-cell office:value-type="float" office:value="591687514.059404" calcext:value-type="float">
            <text:p>591687514.059404</text:p>
          </table:table-cell>
          <table:table-cell/>
          <table:table-cell office:value-type="string" calcext:value-type="string">
            <text:p>2018-10-01T17:38:34.0594040Z</text:p>
          </table:table-cell>
          <table:table-cell office:value-type="string" calcext:value-type="string">
            <text:p>2018-10-01-17:39:43.2434040</text:p>
          </table:table-cell>
          <table:table-cell table:number-columns-repeated="2"/>
        </table:table-row>
        <table:table-row table:style-name="ro1">
          <table:table-cell office:value-type="float" office:value="400789815" calcext:value-type="float">
            <text:p>400789815</text:p>
          </table:table-cell>
          <table:table-cell office:value-type="float" office:value="591755897.060016" calcext:value-type="float">
            <text:p>591755897.060016</text:p>
          </table:table-cell>
          <table:table-cell/>
          <table:table-cell office:value-type="string" calcext:value-type="string">
            <text:p>2018-10-02T12:38:17.0600160Z</text:p>
          </table:table-cell>
          <table:table-cell office:value-type="string" calcext:value-type="string">
            <text:p>2018-10-02-12:39:26.2440160</text:p>
          </table:table-cell>
          <table:table-cell table:number-columns-repeated="2"/>
        </table:table-row>
        <table:table-row table:style-name="ro1">
          <table:table-cell office:value-type="float" office:value="400836581" calcext:value-type="float">
            <text:p>400836581</text:p>
          </table:table-cell>
          <table:table-cell office:value-type="float" office:value="591802663.06056" calcext:value-type="float">
            <text:p>591802663.06056</text:p>
          </table:table-cell>
          <table:table-cell/>
          <table:table-cell office:value-type="string" calcext:value-type="string">
            <text:p>2018-10-03T01:37:43.0605599Z</text:p>
          </table:table-cell>
          <table:table-cell office:value-type="string" calcext:value-type="string">
            <text:p>2018-10-03-01:38:52.2445600</text:p>
          </table:table-cell>
          <table:table-cell table:number-columns-repeated="2"/>
        </table:table-row>
        <table:table-row table:style-name="ro1">
          <table:table-cell office:value-type="float" office:value="400962592" calcext:value-type="float">
            <text:p>400962592</text:p>
          </table:table-cell>
          <table:table-cell office:value-type="float" office:value="591928674.062011" calcext:value-type="float">
            <text:p>591928674.062011</text:p>
          </table:table-cell>
          <table:table-cell/>
          <table:table-cell office:value-type="string" calcext:value-type="string">
            <text:p>2018-10-04T12:37:54.0620110Z</text:p>
          </table:table-cell>
          <table:table-cell office:value-type="string" calcext:value-type="string">
            <text:p>2018-10-04-12:39:03.2460110</text:p>
          </table:table-cell>
          <table:table-cell table:number-columns-repeated="2"/>
        </table:table-row>
        <table:table-row table:style-name="ro1">
          <table:table-cell office:value-type="float" office:value="401012960" calcext:value-type="float">
            <text:p>401012960</text:p>
          </table:table-cell>
          <table:table-cell office:value-type="float" office:value="591979042.062598" calcext:value-type="float">
            <text:p>591979042.062598</text:p>
          </table:table-cell>
          <table:table-cell/>
          <table:table-cell office:value-type="string" calcext:value-type="string">
            <text:p>2018-10-05T02:37:22.0625979Z</text:p>
          </table:table-cell>
          <table:table-cell office:value-type="string" calcext:value-type="string">
            <text:p>2018-10-05-02:38:31.2465980</text:p>
          </table:table-cell>
          <table:table-cell table:number-columns-repeated="2"/>
        </table:table-row>
        <table:table-row table:style-name="ro1">
          <table:table-cell office:value-type="float" office:value="401146205" calcext:value-type="float">
            <text:p>401146205</text:p>
          </table:table-cell>
          <table:table-cell office:value-type="float" office:value="592112287.064149" calcext:value-type="float">
            <text:p>592112287.064149</text:p>
          </table:table-cell>
          <table:table-cell/>
          <table:table-cell office:value-type="string" calcext:value-type="string">
            <text:p>2018-10-06T15:38:07.0641490Z</text:p>
          </table:table-cell>
          <table:table-cell office:value-type="string" calcext:value-type="string">
            <text:p>2018-10-06-15:39:16.2481490</text:p>
          </table:table-cell>
          <table:table-cell table:number-columns-repeated="2"/>
        </table:table-row>
        <table:table-row table:style-name="ro1">
          <table:table-cell office:value-type="float" office:value="401239766" calcext:value-type="float">
            <text:p>401239766</text:p>
          </table:table-cell>
          <table:table-cell office:value-type="float" office:value="592205848.065207" calcext:value-type="float">
            <text:p>592205848.065207</text:p>
          </table:table-cell>
          <table:table-cell/>
          <table:table-cell office:value-type="string" calcext:value-type="string">
            <text:p>2018-10-07T17:37:28.0652070Z</text:p>
          </table:table-cell>
          <table:table-cell office:value-type="string" calcext:value-type="string">
            <text:p>2018-10-07-17:38:37.2492070</text:p>
          </table:table-cell>
          <table:table-cell table:number-columns-repeated="2"/>
        </table:table-row>
        <table:table-row table:style-name="ro1">
          <table:table-cell office:value-type="float" office:value="401315347" calcext:value-type="float">
            <text:p>401315347</text:p>
          </table:table-cell>
          <table:table-cell office:value-type="float" office:value="592281429.066102" calcext:value-type="float">
            <text:p>592281429.066102</text:p>
          </table:table-cell>
          <table:table-cell/>
          <table:table-cell office:value-type="string" calcext:value-type="string">
            <text:p>2018-10-08T14:37:09.0661020Z</text:p>
          </table:table-cell>
          <table:table-cell office:value-type="string" calcext:value-type="string">
            <text:p>2018-10-08-14:38:18.2501020</text:p>
          </table:table-cell>
          <table:table-cell table:number-columns-repeated="2"/>
        </table:table-row>
        <table:table-row table:style-name="ro1">
          <table:table-cell office:value-type="float" office:value="401434134" calcext:value-type="float">
            <text:p>401434134</text:p>
          </table:table-cell>
          <table:table-cell office:value-type="float" office:value="592400216.067471" calcext:value-type="float">
            <text:p>592400216.067471</text:p>
          </table:table-cell>
          <table:table-cell/>
          <table:table-cell office:value-type="string" calcext:value-type="string">
            <text:p>2018-10-09T23:36:56.0674710Z</text:p>
          </table:table-cell>
          <table:table-cell office:value-type="string" calcext:value-type="string">
            <text:p>2018-10-09-23:38:05.2514710</text:p>
          </table:table-cell>
          <table:table-cell table:number-columns-repeated="2"/>
        </table:table-row>
        <table:table-row table:style-name="ro1">
          <table:table-cell office:value-type="float" office:value="401570899" calcext:value-type="float">
            <text:p>401570899</text:p>
          </table:table-cell>
          <table:table-cell office:value-type="float" office:value="592536981.06905" calcext:value-type="float">
            <text:p>592536981.06905</text:p>
          </table:table-cell>
          <table:table-cell/>
          <table:table-cell office:value-type="string" calcext:value-type="string">
            <text:p>2018-10-11T13:36:21.0690499Z</text:p>
          </table:table-cell>
          <table:table-cell office:value-type="string" calcext:value-type="string">
            <text:p>2018-10-11-13:37:30.2530499</text:p>
          </table:table-cell>
          <table:table-cell table:number-columns-repeated="2"/>
        </table:table-row>
        <table:table-row table:style-name="ro1">
          <table:table-cell office:value-type="float" office:value="401668099" calcext:value-type="float">
            <text:p>401668099</text:p>
          </table:table-cell>
          <table:table-cell office:value-type="float" office:value="592634181.070151" calcext:value-type="float">
            <text:p>592634181.070151</text:p>
          </table:table-cell>
          <table:table-cell/>
          <table:table-cell office:value-type="string" calcext:value-type="string">
            <text:p>2018-10-12T16:36:21.0701509Z</text:p>
          </table:table-cell>
          <table:table-cell office:value-type="string" calcext:value-type="string">
            <text:p>2018-10-12-16:37:30.2541509</text:p>
          </table:table-cell>
          <table:table-cell table:number-columns-repeated="2"/>
        </table:table-row>
        <table:table-row table:style-name="ro1">
          <table:table-cell office:value-type="float" office:value="401758075" calcext:value-type="float">
            <text:p>401758075</text:p>
          </table:table-cell>
          <table:table-cell office:value-type="float" office:value="592724157.071189" calcext:value-type="float">
            <text:p>592724157.071189</text:p>
          </table:table-cell>
          <table:table-cell/>
          <table:table-cell office:value-type="string" calcext:value-type="string">
            <text:p>2018-10-13T17:35:57.0711889Z</text:p>
          </table:table-cell>
          <table:table-cell office:value-type="string" calcext:value-type="string">
            <text:p>2018-10-13-17:37:06.2551889</text:p>
          </table:table-cell>
          <table:table-cell table:number-columns-repeated="2"/>
        </table:table-row>
        <table:table-row table:style-name="ro1">
          <table:table-cell office:value-type="float" office:value="401844464" calcext:value-type="float">
            <text:p>401844464</text:p>
          </table:table-cell>
          <table:table-cell office:value-type="float" office:value="592810546.072187" calcext:value-type="float">
            <text:p>592810546.072187</text:p>
          </table:table-cell>
          <table:table-cell/>
          <table:table-cell office:value-type="string" calcext:value-type="string">
            <text:p>2018-10-14T17:35:46.0721869Z</text:p>
          </table:table-cell>
          <table:table-cell office:value-type="string" calcext:value-type="string">
            <text:p>2018-10-14-17:36:55.2561869</text:p>
          </table:table-cell>
          <table:table-cell table:number-columns-repeated="2"/>
        </table:table-row>
        <table:table-row table:style-name="ro1">
          <table:table-cell office:value-type="float" office:value="401869632" calcext:value-type="float">
            <text:p>401869632</text:p>
          </table:table-cell>
          <table:table-cell office:value-type="float" office:value="592835714.072485" calcext:value-type="float">
            <text:p>592835714.072485</text:p>
          </table:table-cell>
          <table:table-cell/>
          <table:table-cell office:value-type="string" calcext:value-type="string">
            <text:p>2018-10-15T00:35:14.0724849Z</text:p>
          </table:table-cell>
          <table:table-cell office:value-type="string" calcext:value-type="string">
            <text:p>2018-10-15-00:36:23.2564849</text:p>
          </table:table-cell>
          <table:table-cell table:number-columns-repeated="2"/>
        </table:table-row>
        <table:table-row table:style-name="ro1">
          <table:table-cell office:value-type="float" office:value="401999244" calcext:value-type="float">
            <text:p>401999244</text:p>
          </table:table-cell>
          <table:table-cell office:value-type="float" office:value="592965326.073977" calcext:value-type="float">
            <text:p>592965326.073977</text:p>
          </table:table-cell>
          <table:table-cell/>
          <table:table-cell office:value-type="string" calcext:value-type="string">
            <text:p>2018-10-16T12:35:26.0739769Z</text:p>
          </table:table-cell>
          <table:table-cell office:value-type="string" calcext:value-type="string">
            <text:p>2018-10-16-12:36:35.2579770</text:p>
          </table:table-cell>
          <table:table-cell table:number-columns-repeated="2"/>
        </table:table-row>
        <table:table-row table:style-name="ro1">
          <table:table-cell office:value-type="float" office:value="402089250" calcext:value-type="float">
            <text:p>402089250</text:p>
          </table:table-cell>
          <table:table-cell office:value-type="float" office:value="593055332.075031" calcext:value-type="float">
            <text:p>593055332.075031</text:p>
          </table:table-cell>
          <table:table-cell/>
          <table:table-cell office:value-type="string" calcext:value-type="string">
            <text:p>2018-10-17T13:35:32.0750310Z</text:p>
          </table:table-cell>
          <table:table-cell office:value-type="string" calcext:value-type="string">
            <text:p>2018-10-17-13:36:41.2590310</text:p>
          </table:table-cell>
          <table:table-cell table:number-columns-repeated="2"/>
        </table:table-row>
        <table:table-row table:style-name="ro1">
          <table:table-cell office:value-type="float" office:value="402146805" calcext:value-type="float">
            <text:p>402146805</text:p>
          </table:table-cell>
          <table:table-cell office:value-type="float" office:value="593112887.0757" calcext:value-type="float">
            <text:p>593112887.0757</text:p>
          </table:table-cell>
          <table:table-cell/>
          <table:table-cell office:value-type="string" calcext:value-type="string">
            <text:p>2018-10-18T05:34:47.0756999Z</text:p>
          </table:table-cell>
          <table:table-cell office:value-type="string" calcext:value-type="string">
            <text:p>2018-10-18-05:35:56.2596999</text:p>
          </table:table-cell>
          <table:table-cell table:number-columns-repeated="2"/>
        </table:table-row>
        <table:table-row table:style-name="ro1">
          <table:table-cell office:value-type="float" office:value="402236801" calcext:value-type="float">
            <text:p>402236801</text:p>
          </table:table-cell>
          <table:table-cell office:value-type="float" office:value="593202883.076742" calcext:value-type="float">
            <text:p>593202883.076742</text:p>
          </table:table-cell>
          <table:table-cell/>
          <table:table-cell office:value-type="string" calcext:value-type="string">
            <text:p>2018-10-19T06:34:43.0767419Z</text:p>
          </table:table-cell>
          <table:table-cell office:value-type="string" calcext:value-type="string">
            <text:p>2018-10-19-06:35:52.2607419</text:p>
          </table:table-cell>
          <table:table-cell table:number-columns-repeated="2"/>
        </table:table-row>
        <table:table-row table:style-name="ro1">
          <table:table-cell office:value-type="float" office:value="402362784" calcext:value-type="float">
            <text:p>402362784</text:p>
          </table:table-cell>
          <table:table-cell office:value-type="float" office:value="593328866.078158" calcext:value-type="float">
            <text:p>593328866.078158</text:p>
          </table:table-cell>
          <table:table-cell/>
          <table:table-cell office:value-type="string" calcext:value-type="string">
            <text:p>2018-10-20T17:34:26.0781580Z</text:p>
          </table:table-cell>
          <table:table-cell office:value-type="string" calcext:value-type="string">
            <text:p>2018-10-20-17:35:35.2621580</text:p>
          </table:table-cell>
          <table:table-cell table:number-columns-repeated="2"/>
        </table:table-row>
        <table:table-row table:style-name="ro1">
          <table:table-cell office:value-type="float" office:value="402449174" calcext:value-type="float">
            <text:p>402449174</text:p>
          </table:table-cell>
          <table:table-cell office:value-type="float" office:value="593415256.079158" calcext:value-type="float">
            <text:p>593415256.079158</text:p>
          </table:table-cell>
          <table:table-cell/>
          <table:table-cell office:value-type="string" calcext:value-type="string">
            <text:p>2018-10-21T17:34:16.0791579Z</text:p>
          </table:table-cell>
          <table:table-cell office:value-type="string" calcext:value-type="string">
            <text:p>2018-10-21-17:35:25.2631579</text:p>
          </table:table-cell>
          <table:table-cell table:number-columns-repeated="2"/>
        </table:table-row>
        <table:table-row table:style-name="ro1">
          <table:table-cell office:value-type="float" office:value="402513967" calcext:value-type="float">
            <text:p>402513967</text:p>
          </table:table-cell>
          <table:table-cell office:value-type="float" office:value="593480049.079904" calcext:value-type="float">
            <text:p>593480049.079904</text:p>
          </table:table-cell>
          <table:table-cell/>
          <table:table-cell office:value-type="string" calcext:value-type="string">
            <text:p>2018-10-22T11:34:09.0799039Z</text:p>
          </table:table-cell>
          <table:table-cell office:value-type="string" calcext:value-type="string">
            <text:p>2018-10-22-11:35:18.2639039</text:p>
          </table:table-cell>
          <table:table-cell table:number-columns-repeated="2"/>
        </table:table-row>
        <table:table-row table:style-name="ro1">
          <table:table-cell office:value-type="float" office:value="402557133" calcext:value-type="float">
            <text:p>402557133</text:p>
          </table:table-cell>
          <table:table-cell office:value-type="float" office:value="593523215.080399" calcext:value-type="float">
            <text:p>593523215.080399</text:p>
          </table:table-cell>
          <table:table-cell/>
          <table:table-cell office:value-type="string" calcext:value-type="string">
            <text:p>2018-10-22T23:33:35.0803990Z</text:p>
          </table:table-cell>
          <table:table-cell office:value-type="string" calcext:value-type="string">
            <text:p>2018-10-22-23:34:44.2643990</text:p>
          </table:table-cell>
          <table:table-cell table:number-columns-repeated="2"/>
        </table:table-row>
        <table:table-row table:style-name="ro1">
          <table:table-cell office:value-type="float" office:value="402668780" calcext:value-type="float">
            <text:p>402668780</text:p>
          </table:table-cell>
          <table:table-cell office:value-type="float" office:value="593634862.081709" calcext:value-type="float">
            <text:p>593634862.081709</text:p>
          </table:table-cell>
          <table:table-cell/>
          <table:table-cell office:value-type="string" calcext:value-type="string">
            <text:p>2018-10-24T06:34:22.0817090Z</text:p>
          </table:table-cell>
          <table:table-cell office:value-type="string" calcext:value-type="string">
            <text:p>2018-10-24-06:35:31.2657090</text:p>
          </table:table-cell>
          <table:table-cell table:number-columns-repeated="2"/>
        </table:table-row>
        <table:table-row table:style-name="ro1">
          <table:table-cell office:value-type="float" office:value="402755154" calcext:value-type="float">
            <text:p>402755154</text:p>
          </table:table-cell>
          <table:table-cell office:value-type="float" office:value="593721236.082682" calcext:value-type="float">
            <text:p>593721236.082682</text:p>
          </table:table-cell>
          <table:table-cell/>
          <table:table-cell office:value-type="string" calcext:value-type="string">
            <text:p>2018-10-25T06:33:56.0826820Z</text:p>
          </table:table-cell>
          <table:table-cell office:value-type="string" calcext:value-type="string">
            <text:p>2018-10-25-06:35:05.2666820</text:p>
          </table:table-cell>
          <table:table-cell table:number-columns-repeated="2"/>
        </table:table-row>
        <table:table-row table:style-name="ro1">
          <table:table-cell office:value-type="float" office:value="402881109" calcext:value-type="float">
            <text:p>402881109</text:p>
          </table:table-cell>
          <table:table-cell office:value-type="float" office:value="593847191.084096" calcext:value-type="float">
            <text:p>593847191.084096</text:p>
          </table:table-cell>
          <table:table-cell/>
          <table:table-cell office:value-type="string" calcext:value-type="string">
            <text:p>2018-10-26T17:33:11.0840959Z</text:p>
          </table:table-cell>
          <table:table-cell office:value-type="string" calcext:value-type="string">
            <text:p>2018-10-26-17:34:20.2680959</text:p>
          </table:table-cell>
          <table:table-cell table:number-columns-repeated="2"/>
        </table:table-row>
        <table:table-row table:style-name="ro1">
          <table:table-cell office:value-type="float" office:value="402953117" calcext:value-type="float">
            <text:p>402953117</text:p>
          </table:table-cell>
          <table:table-cell office:value-type="float" office:value="593919199.084943" calcext:value-type="float">
            <text:p>593919199.084943</text:p>
          </table:table-cell>
          <table:table-cell/>
          <table:table-cell office:value-type="string" calcext:value-type="string">
            <text:p>2018-10-27T13:33:19.0849429Z</text:p>
          </table:table-cell>
          <table:table-cell office:value-type="string" calcext:value-type="string">
            <text:p>2018-10-27-13:34:28.2689429</text:p>
          </table:table-cell>
          <table:table-cell table:number-columns-repeated="2"/>
        </table:table-row>
        <table:table-row table:style-name="ro1">
          <table:table-cell office:value-type="float" office:value="403115073" calcext:value-type="float">
            <text:p>403115073</text:p>
          </table:table-cell>
          <table:table-cell office:value-type="float" office:value="594081155.086789" calcext:value-type="float">
            <text:p>594081155.086789</text:p>
          </table:table-cell>
          <table:table-cell/>
          <table:table-cell office:value-type="string" calcext:value-type="string">
            <text:p>2018-10-29T10:32:35.0867890Z</text:p>
          </table:table-cell>
          <table:table-cell office:value-type="string" calcext:value-type="string">
            <text:p>2018-10-29-10:33:44.2707890</text:p>
          </table:table-cell>
          <table:table-cell table:number-columns-repeated="2"/>
        </table:table-row>
        <table:table-row table:style-name="ro1">
          <table:table-cell office:value-type="float" office:value="403183469" calcext:value-type="float">
            <text:p>403183469</text:p>
          </table:table-cell>
          <table:table-cell office:value-type="float" office:value="594149551.087594" calcext:value-type="float">
            <text:p>594149551.087594</text:p>
          </table:table-cell>
          <table:table-cell/>
          <table:table-cell office:value-type="string" calcext:value-type="string">
            <text:p>2018-10-30T05:32:31.0875940Z</text:p>
          </table:table-cell>
          <table:table-cell office:value-type="string" calcext:value-type="string">
            <text:p>2018-10-30-05:33:40.2715940</text:p>
          </table:table-cell>
          <table:table-cell table:number-columns-repeated="2"/>
        </table:table-row>
        <table:table-row table:style-name="ro1">
          <table:table-cell office:value-type="float" office:value="403269869" calcext:value-type="float">
            <text:p>403269869</text:p>
          </table:table-cell>
          <table:table-cell office:value-type="float" office:value="594235951.088587" calcext:value-type="float">
            <text:p>594235951.088587</text:p>
          </table:table-cell>
          <table:table-cell/>
          <table:table-cell office:value-type="string" calcext:value-type="string">
            <text:p>2018-10-31T05:32:31.0885869Z</text:p>
          </table:table-cell>
          <table:table-cell office:value-type="string" calcext:value-type="string">
            <text:p>2018-10-31-05:33:40.2725869</text:p>
          </table:table-cell>
          <table:table-cell table:number-columns-repeated="2"/>
        </table:table-row>
        <table:table-row table:style-name="ro1">
          <table:table-cell office:value-type="float" office:value="403374240" calcext:value-type="float">
            <text:p>403374240</text:p>
          </table:table-cell>
          <table:table-cell office:value-type="float" office:value="594340322.089743" calcext:value-type="float">
            <text:p>594340322.089743</text:p>
          </table:table-cell>
          <table:table-cell/>
          <table:table-cell office:value-type="string" calcext:value-type="string">
            <text:p>2018-11-01T10:32:02.0897430Z</text:p>
          </table:table-cell>
          <table:table-cell office:value-type="string" calcext:value-type="string">
            <text:p>2018-11-01-10:33:11.2737430</text:p>
          </table:table-cell>
          <table:table-cell table:number-columns-repeated="2"/>
        </table:table-row>
        <table:table-row table:style-name="ro1">
          <table:table-cell office:value-type="float" office:value="403442633" calcext:value-type="float">
            <text:p>403442633</text:p>
          </table:table-cell>
          <table:table-cell office:value-type="float" office:value="594408715.090547" calcext:value-type="float">
            <text:p>594408715.090547</text:p>
          </table:table-cell>
          <table:table-cell/>
          <table:table-cell office:value-type="string" calcext:value-type="string">
            <text:p>2018-11-02T05:31:55.0905469Z</text:p>
          </table:table-cell>
          <table:table-cell office:value-type="string" calcext:value-type="string">
            <text:p>2018-11-02-05:33:04.2745469</text:p>
          </table:table-cell>
          <table:table-cell table:number-columns-repeated="2"/>
        </table:table-row>
        <table:table-row table:style-name="ro1">
          <table:table-cell office:value-type="float" office:value="403557838" calcext:value-type="float">
            <text:p>403557838</text:p>
          </table:table-cell>
          <table:table-cell office:value-type="float" office:value="594523920.091868" calcext:value-type="float">
            <text:p>594523920.091868</text:p>
          </table:table-cell>
          <table:table-cell/>
          <table:table-cell office:value-type="string" calcext:value-type="string">
            <text:p>2018-11-03T13:32:00.0918680Z</text:p>
          </table:table-cell>
          <table:table-cell office:value-type="string" calcext:value-type="string">
            <text:p>2018-11-03-13:33:09.2758680</text:p>
          </table:table-cell>
          <table:table-cell table:number-columns-repeated="2"/>
        </table:table-row>
        <table:table-row table:style-name="ro1">
          <table:table-cell office:value-type="float" office:value="403644237" calcext:value-type="float">
            <text:p>403644237</text:p>
          </table:table-cell>
          <table:table-cell office:value-type="float" office:value="594610319.092851" calcext:value-type="float">
            <text:p>594610319.092851</text:p>
          </table:table-cell>
          <table:table-cell/>
          <table:table-cell office:value-type="string" calcext:value-type="string">
            <text:p>2018-11-04T13:31:59.0928510Z</text:p>
          </table:table-cell>
          <table:table-cell office:value-type="string" calcext:value-type="string">
            <text:p>2018-11-04-13:33:08.2768510</text:p>
          </table:table-cell>
          <table:table-cell table:number-columns-repeated="2"/>
        </table:table-row>
        <table:table-row table:style-name="ro1">
          <table:table-cell office:value-type="float" office:value="403723397" calcext:value-type="float">
            <text:p>403723397</text:p>
          </table:table-cell>
          <table:table-cell office:value-type="float" office:value="594689479.093745" calcext:value-type="float">
            <text:p>594689479.093745</text:p>
          </table:table-cell>
          <table:table-cell/>
          <table:table-cell office:value-type="string" calcext:value-type="string">
            <text:p>2018-11-05T11:31:19.0937449Z</text:p>
          </table:table-cell>
          <table:table-cell office:value-type="string" calcext:value-type="string">
            <text:p>2018-11-05-11:32:28.2777450</text:p>
          </table:table-cell>
          <table:table-cell table:number-columns-repeated="2"/>
        </table:table-row>
        <table:table-row table:style-name="ro1">
          <table:table-cell office:value-type="float" office:value="403817021" calcext:value-type="float">
            <text:p>403817021</text:p>
          </table:table-cell>
          <table:table-cell office:value-type="float" office:value="594783103.09481" calcext:value-type="float">
            <text:p>594783103.09481</text:p>
          </table:table-cell>
          <table:table-cell/>
          <table:table-cell office:value-type="string" calcext:value-type="string">
            <text:p>2018-11-06T13:31:43.0948100Z</text:p>
          </table:table-cell>
          <table:table-cell office:value-type="string" calcext:value-type="string">
            <text:p>2018-11-06-13:32:52.2788100</text:p>
          </table:table-cell>
          <table:table-cell table:number-columns-repeated="2"/>
        </table:table-row>
        <table:table-row table:style-name="ro1">
          <table:table-cell office:value-type="float" office:value="403917775" calcext:value-type="float">
            <text:p>403917775</text:p>
          </table:table-cell>
          <table:table-cell office:value-type="float" office:value="594883857.095955" calcext:value-type="float">
            <text:p>594883857.095955</text:p>
          </table:table-cell>
          <table:table-cell/>
          <table:table-cell office:value-type="string" calcext:value-type="string">
            <text:p>2018-11-07T17:30:57.0959550Z</text:p>
          </table:table-cell>
          <table:table-cell office:value-type="string" calcext:value-type="string">
            <text:p>2018-11-07-17:32:06.2799550</text:p>
          </table:table-cell>
          <table:table-cell table:number-columns-repeated="2"/>
        </table:table-row>
        <table:table-row table:style-name="ro1">
          <table:table-cell office:value-type="float" office:value="403989804" calcext:value-type="float">
            <text:p>403989804</text:p>
          </table:table-cell>
          <table:table-cell office:value-type="float" office:value="594955886.096781" calcext:value-type="float">
            <text:p>594955886.096781</text:p>
          </table:table-cell>
          <table:table-cell/>
          <table:table-cell office:value-type="string" calcext:value-type="string">
            <text:p>2018-11-08T13:31:26.0967810Z</text:p>
          </table:table-cell>
          <table:table-cell office:value-type="string" calcext:value-type="string">
            <text:p>2018-11-08-13:32:35.2807810</text:p>
          </table:table-cell>
          <table:table-cell table:number-columns-repeated="2"/>
        </table:table-row>
        <table:table-row table:style-name="ro1">
          <table:table-cell office:value-type="float" office:value="404076183" calcext:value-type="float">
            <text:p>404076183</text:p>
          </table:table-cell>
          <table:table-cell office:value-type="float" office:value="595042265.097756" calcext:value-type="float">
            <text:p>595042265.097756</text:p>
          </table:table-cell>
          <table:table-cell/>
          <table:table-cell office:value-type="string" calcext:value-type="string">
            <text:p>2018-11-09T13:31:05.0977560Z</text:p>
          </table:table-cell>
          <table:table-cell office:value-type="string" calcext:value-type="string">
            <text:p>2018-11-09-13:32:14.2817560</text:p>
          </table:table-cell>
          <table:table-cell table:number-columns-repeated="2"/>
        </table:table-row>
        <table:table-row table:style-name="ro1">
          <table:table-cell office:value-type="float" office:value="404162574" calcext:value-type="float">
            <text:p>404162574</text:p>
          </table:table-cell>
          <table:table-cell office:value-type="float" office:value="595128656.09874" calcext:value-type="float">
            <text:p>595128656.09874</text:p>
          </table:table-cell>
          <table:table-cell/>
          <table:table-cell office:value-type="string" calcext:value-type="string">
            <text:p>2018-11-10T13:30:56.0987399Z</text:p>
          </table:table-cell>
          <table:table-cell office:value-type="string" calcext:value-type="string">
            <text:p>2018-11-10-13:32:05.2827399</text:p>
          </table:table-cell>
          <table:table-cell table:number-columns-repeated="2"/>
        </table:table-row>
        <table:table-row table:style-name="ro1">
          <table:table-cell office:value-type="float" office:value="404263322" calcext:value-type="float">
            <text:p>404263322</text:p>
          </table:table-cell>
          <table:table-cell office:value-type="float" office:value="595229404.099867" calcext:value-type="float">
            <text:p>595229404.099867</text:p>
          </table:table-cell>
          <table:table-cell/>
          <table:table-cell office:value-type="string" calcext:value-type="string">
            <text:p>2018-11-11T17:30:04.0998669Z</text:p>
          </table:table-cell>
          <table:table-cell office:value-type="string" calcext:value-type="string">
            <text:p>2018-11-11-17:31:13.2838670</text:p>
          </table:table-cell>
          <table:table-cell table:number-columns-repeated="2"/>
        </table:table-row>
        <table:table-row table:style-name="ro1">
          <table:table-cell office:value-type="float" office:value="404324514" calcext:value-type="float">
            <text:p>404324514</text:p>
          </table:table-cell>
          <table:table-cell office:value-type="float" office:value="595290596.100573" calcext:value-type="float">
            <text:p>595290596.100573</text:p>
          </table:table-cell>
          <table:table-cell/>
          <table:table-cell office:value-type="string" calcext:value-type="string">
            <text:p>2018-11-12T10:29:56.1005729Z</text:p>
          </table:table-cell>
          <table:table-cell office:value-type="string" calcext:value-type="string">
            <text:p>2018-11-12-10:31:05.2845729</text:p>
          </table:table-cell>
          <table:table-cell table:number-columns-repeated="2"/>
        </table:table-row>
        <table:table-row table:style-name="ro1">
          <table:table-cell office:value-type="float" office:value="404522490" calcext:value-type="float">
            <text:p>404522490</text:p>
          </table:table-cell>
          <table:table-cell office:value-type="float" office:value="595488572.102811" calcext:value-type="float">
            <text:p>595488572.102811</text:p>
          </table:table-cell>
          <table:table-cell/>
          <table:table-cell office:value-type="string" calcext:value-type="string">
            <text:p>2018-11-14T17:29:32.1028109Z</text:p>
          </table:table-cell>
          <table:table-cell office:value-type="string" calcext:value-type="string">
            <text:p>2018-11-14-17:30:41.2868109</text:p>
          </table:table-cell>
          <table:table-cell table:number-columns-repeated="2"/>
        </table:table-row>
        <table:table-row table:style-name="ro1">
          <table:table-cell office:value-type="float" office:value="404533292" calcext:value-type="float">
            <text:p>404533292</text:p>
          </table:table-cell>
          <table:table-cell office:value-type="float" office:value="595499374.102943" calcext:value-type="float">
            <text:p>595499374.102943</text:p>
          </table:table-cell>
          <table:table-cell/>
          <table:table-cell office:value-type="string" calcext:value-type="string">
            <text:p>2018-11-14T20:29:34.1029429Z</text:p>
          </table:table-cell>
          <table:table-cell office:value-type="string" calcext:value-type="string">
            <text:p>2018-11-14-20:30:43.2869429</text:p>
          </table:table-cell>
          <table:table-cell table:number-columns-repeated="2"/>
        </table:table-row>
        <table:table-row table:style-name="ro1">
          <table:table-cell office:value-type="float" office:value="404663104" calcext:value-type="float">
            <text:p>404663104</text:p>
          </table:table-cell>
          <table:table-cell office:value-type="float" office:value="595629186.104411" calcext:value-type="float">
            <text:p>595629186.104411</text:p>
          </table:table-cell>
          <table:table-cell/>
          <table:table-cell office:value-type="string" calcext:value-type="string">
            <text:p>2018-11-16T08:33:06.1044110Z</text:p>
          </table:table-cell>
          <table:table-cell office:value-type="string" calcext:value-type="string">
            <text:p>2018-11-16-08:34:15.2884110</text:p>
          </table:table-cell>
          <table:table-cell table:number-columns-repeated="2"/>
        </table:table-row>
        <table:table-row table:style-name="ro1">
          <table:table-cell office:value-type="float" office:value="404781656" calcext:value-type="float">
            <text:p>404781656</text:p>
          </table:table-cell>
          <table:table-cell office:value-type="float" office:value="595747738.105763" calcext:value-type="float">
            <text:p>595747738.105763</text:p>
          </table:table-cell>
          <table:table-cell/>
          <table:table-cell office:value-type="string" calcext:value-type="string">
            <text:p>2018-11-17T17:28:58.1057629Z</text:p>
          </table:table-cell>
          <table:table-cell office:value-type="string" calcext:value-type="string">
            <text:p>2018-11-17-17:30:07.2897629</text:p>
          </table:table-cell>
          <table:table-cell table:number-columns-repeated="2"/>
        </table:table-row>
        <table:table-row table:style-name="ro1">
          <table:table-cell office:value-type="float" office:value="404868088" calcext:value-type="float">
            <text:p>404868088</text:p>
          </table:table-cell>
          <table:table-cell office:value-type="float" office:value="595834170.106707" calcext:value-type="float">
            <text:p>595834170.106707</text:p>
          </table:table-cell>
          <table:table-cell/>
          <table:table-cell office:value-type="string" calcext:value-type="string">
            <text:p>2018-11-18T17:29:30.1067069Z</text:p>
          </table:table-cell>
          <table:table-cell office:value-type="string" calcext:value-type="string">
            <text:p>2018-11-18-17:30:39.2907069</text:p>
          </table:table-cell>
          <table:table-cell table:number-columns-repeated="2"/>
        </table:table-row>
        <table:table-row table:style-name="ro1">
          <table:table-cell office:value-type="float" office:value="404925639" calcext:value-type="float">
            <text:p>404925639</text:p>
          </table:table-cell>
          <table:table-cell office:value-type="float" office:value="595891721.107393" calcext:value-type="float">
            <text:p>595891721.107393</text:p>
          </table:table-cell>
          <table:table-cell/>
          <table:table-cell office:value-type="string" calcext:value-type="string">
            <text:p>2018-11-19T09:28:41.1073930Z</text:p>
          </table:table-cell>
          <table:table-cell office:value-type="string" calcext:value-type="string">
            <text:p>2018-11-19-09:29:50.2913930</text:p>
          </table:table-cell>
          <table:table-cell table:number-columns-repeated="2"/>
        </table:table-row>
        <table:table-row table:style-name="ro1">
          <table:table-cell office:value-type="float" office:value="405040875" calcext:value-type="float">
            <text:p>405040875</text:p>
          </table:table-cell>
          <table:table-cell office:value-type="float" office:value="596006957.108678" calcext:value-type="float">
            <text:p>596006957.108678</text:p>
          </table:table-cell>
          <table:table-cell/>
          <table:table-cell office:value-type="string" calcext:value-type="string">
            <text:p>2018-11-20T17:29:17.1086779Z</text:p>
          </table:table-cell>
          <table:table-cell office:value-type="string" calcext:value-type="string">
            <text:p>2018-11-20-17:30:26.2926779</text:p>
          </table:table-cell>
          <table:table-cell table:number-columns-repeated="2"/>
        </table:table-row>
        <table:table-row table:style-name="ro1">
          <table:table-cell office:value-type="float" office:value="405109251" calcext:value-type="float">
            <text:p>405109251</text:p>
          </table:table-cell>
          <table:table-cell office:value-type="float" office:value="596075333.109475" calcext:value-type="float">
            <text:p>596075333.109475</text:p>
          </table:table-cell>
          <table:table-cell/>
          <table:table-cell office:value-type="string" calcext:value-type="string">
            <text:p>2018-11-21T12:28:53.1094750Z</text:p>
          </table:table-cell>
          <table:table-cell office:value-type="string" calcext:value-type="string">
            <text:p>2018-11-21-12:30:02.2934750</text:p>
          </table:table-cell>
          <table:table-cell table:number-columns-repeated="2"/>
        </table:table-row>
        <table:table-row table:style-name="ro1">
          <table:table-cell office:value-type="float" office:value="405300018" calcext:value-type="float">
            <text:p>405300018</text:p>
          </table:table-cell>
          <table:table-cell office:value-type="float" office:value="596266100.111598" calcext:value-type="float">
            <text:p>596266100.111598</text:p>
          </table:table-cell>
          <table:table-cell/>
          <table:table-cell office:value-type="string" calcext:value-type="string">
            <text:p>2018-11-23T17:28:20.1115980Z</text:p>
          </table:table-cell>
          <table:table-cell office:value-type="string" calcext:value-type="string">
            <text:p>2018-11-23-17:29:29.2955980</text:p>
          </table:table-cell>
          <table:table-cell table:number-columns-repeated="2"/>
        </table:table-row>
        <table:table-row table:style-name="ro1">
          <table:table-cell office:value-type="float" office:value="405386405" calcext:value-type="float">
            <text:p>405386405</text:p>
          </table:table-cell>
          <table:table-cell office:value-type="float" office:value="596352487.112584" calcext:value-type="float">
            <text:p>596352487.112584</text:p>
          </table:table-cell>
          <table:table-cell/>
          <table:table-cell office:value-type="string" calcext:value-type="string">
            <text:p>2018-11-24T17:28:07.1125839Z</text:p>
          </table:table-cell>
          <table:table-cell office:value-type="string" calcext:value-type="string">
            <text:p>2018-11-24-17:29:16.2965840</text:p>
          </table:table-cell>
          <table:table-cell table:number-columns-repeated="2"/>
        </table:table-row>
        <table:table-row table:style-name="ro1">
          <table:table-cell office:value-type="float" office:value="405472805" calcext:value-type="float">
            <text:p>405472805</text:p>
          </table:table-cell>
          <table:table-cell office:value-type="float" office:value="596438887.113554" calcext:value-type="float">
            <text:p>596438887.113554</text:p>
          </table:table-cell>
          <table:table-cell/>
          <table:table-cell office:value-type="string" calcext:value-type="string">
            <text:p>2018-11-25T17:28:07.1135540Z</text:p>
          </table:table-cell>
          <table:table-cell office:value-type="string" calcext:value-type="string">
            <text:p>2018-11-25-17:29:16.2975540</text:p>
          </table:table-cell>
          <table:table-cell table:number-columns-repeated="2"/>
        </table:table-row>
        <table:table-row table:style-name="ro1">
          <table:table-cell office:value-type="float" office:value="405559168" calcext:value-type="float">
            <text:p>405559168</text:p>
          </table:table-cell>
          <table:table-cell office:value-type="float" office:value="596525250.114557" calcext:value-type="float">
            <text:p>596525250.114557</text:p>
          </table:table-cell>
          <table:table-cell/>
          <table:table-cell office:value-type="string" calcext:value-type="string">
            <text:p>2018-11-26T17:27:30.1145570Z</text:p>
          </table:table-cell>
          <table:table-cell office:value-type="string" calcext:value-type="string">
            <text:p>2018-11-26-17:28:39.2985570</text:p>
          </table:table-cell>
          <table:table-cell table:number-columns-repeated="2"/>
        </table:table-row>
        <table:table-row table:style-name="ro1">
          <table:table-cell office:value-type="float" office:value="405616766" calcext:value-type="float">
            <text:p>405616766</text:p>
          </table:table-cell>
          <table:table-cell office:value-type="float" office:value="596582848.115197" calcext:value-type="float">
            <text:p>596582848.115197</text:p>
          </table:table-cell>
          <table:table-cell/>
          <table:table-cell office:value-type="string" calcext:value-type="string">
            <text:p>2018-11-27T09:27:28.1151969Z</text:p>
          </table:table-cell>
          <table:table-cell office:value-type="string" calcext:value-type="string">
            <text:p>2018-11-27-09:28:37.2991969</text:p>
          </table:table-cell>
          <table:table-cell table:number-columns-repeated="2"/>
        </table:table-row>
        <table:table-row table:style-name="ro1">
          <table:table-cell office:value-type="float" office:value="405731950" calcext:value-type="float">
            <text:p>405731950</text:p>
          </table:table-cell>
          <table:table-cell office:value-type="float" office:value="596698032.116496" calcext:value-type="float">
            <text:p>596698032.116496</text:p>
          </table:table-cell>
          <table:table-cell/>
          <table:table-cell office:value-type="string" calcext:value-type="string">
            <text:p>2018-11-28T17:27:12.1164959Z</text:p>
          </table:table-cell>
          <table:table-cell office:value-type="string" calcext:value-type="string">
            <text:p>2018-11-28-17:28:21.3004959</text:p>
          </table:table-cell>
          <table:table-cell table:number-columns-repeated="2"/>
        </table:table-row>
        <table:table-row table:style-name="ro1">
          <table:table-cell office:value-type="float" office:value="405818345" calcext:value-type="float">
            <text:p>405818345</text:p>
          </table:table-cell>
          <table:table-cell office:value-type="float" office:value="596784427.117464" calcext:value-type="float">
            <text:p>596784427.117464</text:p>
          </table:table-cell>
          <table:table-cell/>
          <table:table-cell office:value-type="string" calcext:value-type="string">
            <text:p>2018-11-29T17:27:07.1174639Z</text:p>
          </table:table-cell>
          <table:table-cell office:value-type="string" calcext:value-type="string">
            <text:p>2018-11-29-17:28:16.3014639</text:p>
          </table:table-cell>
          <table:table-cell table:number-columns-repeated="2"/>
        </table:table-row>
        <table:table-row table:style-name="ro1">
          <table:table-cell office:value-type="float" office:value="405904731" calcext:value-type="float">
            <text:p>405904731</text:p>
          </table:table-cell>
          <table:table-cell office:value-type="float" office:value="596870813.118424" calcext:value-type="float">
            <text:p>596870813.118424</text:p>
          </table:table-cell>
          <table:table-cell/>
          <table:table-cell office:value-type="string" calcext:value-type="string">
            <text:p>2018-11-30T17:26:53.1184239Z</text:p>
          </table:table-cell>
          <table:table-cell office:value-type="string" calcext:value-type="string">
            <text:p>2018-11-30-17:28:02.3024239</text:p>
          </table:table-cell>
          <table:table-cell table:number-columns-repeated="2"/>
        </table:table-row>
        <table:table-row table:style-name="ro1">
          <table:table-cell office:value-type="float" office:value="405991138" calcext:value-type="float">
            <text:p>405991138</text:p>
          </table:table-cell>
          <table:table-cell office:value-type="float" office:value="596957220.119374" calcext:value-type="float">
            <text:p>596957220.119374</text:p>
          </table:table-cell>
          <table:table-cell/>
          <table:table-cell office:value-type="string" calcext:value-type="string">
            <text:p>2018-12-01T17:27:00.1193740Z</text:p>
          </table:table-cell>
          <table:table-cell office:value-type="string" calcext:value-type="string">
            <text:p>2018-12-01-17:28:09.3033740</text:p>
          </table:table-cell>
          <table:table-cell table:number-columns-repeated="2"/>
        </table:table-row>
        <table:table-row table:style-name="ro1">
          <table:table-cell office:value-type="float" office:value="406077533" calcext:value-type="float">
            <text:p>406077533</text:p>
          </table:table-cell>
          <table:table-cell office:value-type="float" office:value="597043615.119901" calcext:value-type="float">
            <text:p>597043615.119901</text:p>
          </table:table-cell>
          <table:table-cell/>
          <table:table-cell office:value-type="string" calcext:value-type="string">
            <text:p>2018-12-02T17:26:55.1199009Z</text:p>
          </table:table-cell>
          <table:table-cell office:value-type="string" calcext:value-type="string">
            <text:p>2018-12-02-17:28:04.3039009</text:p>
          </table:table-cell>
          <table:table-cell table:number-columns-repeated="2"/>
        </table:table-row>
        <table:table-row table:style-name="ro1">
          <table:table-cell office:value-type="float" office:value="406142346" calcext:value-type="float">
            <text:p>406142346</text:p>
          </table:table-cell>
          <table:table-cell office:value-type="float" office:value="597108428.120635" calcext:value-type="float">
            <text:p>597108428.120635</text:p>
          </table:table-cell>
          <table:table-cell/>
          <table:table-cell office:value-type="string" calcext:value-type="string">
            <text:p>2018-12-03T11:27:08.1206350Z</text:p>
          </table:table-cell>
          <table:table-cell office:value-type="string" calcext:value-type="string">
            <text:p>2018-12-03-11:28:17.3046350</text:p>
          </table:table-cell>
          <table:table-cell table:number-columns-repeated="2"/>
        </table:table-row>
        <table:table-row table:style-name="ro1">
          <table:table-cell office:value-type="float" office:value="406250307" calcext:value-type="float">
            <text:p>406250307</text:p>
          </table:table-cell>
          <table:table-cell office:value-type="float" office:value="597216389.121842" calcext:value-type="float">
            <text:p>597216389.121842</text:p>
          </table:table-cell>
          <table:table-cell/>
          <table:table-cell office:value-type="string" calcext:value-type="string">
            <text:p>2018-12-04T17:26:29.1218420Z</text:p>
          </table:table-cell>
          <table:table-cell office:value-type="string" calcext:value-type="string">
            <text:p>2018-12-04-17:27:38.3058420</text:p>
          </table:table-cell>
          <table:table-cell table:number-columns-repeated="2"/>
        </table:table-row>
        <table:table-row table:style-name="ro1">
          <table:table-cell office:value-type="float" office:value="406336696" calcext:value-type="float">
            <text:p>406336696</text:p>
          </table:table-cell>
          <table:table-cell office:value-type="float" office:value="597302778.122809" calcext:value-type="float">
            <text:p>597302778.122809</text:p>
          </table:table-cell>
          <table:table-cell/>
          <table:table-cell office:value-type="string" calcext:value-type="string">
            <text:p>2018-12-05T17:26:18.1228089Z</text:p>
          </table:table-cell>
          <table:table-cell office:value-type="string" calcext:value-type="string">
            <text:p>2018-12-05-17:27:27.3068089</text:p>
          </table:table-cell>
          <table:table-cell table:number-columns-repeated="2"/>
        </table:table-row>
        <table:table-row table:style-name="ro1">
          <table:table-cell office:value-type="float" office:value="406423090" calcext:value-type="float">
            <text:p>406423090</text:p>
          </table:table-cell>
          <table:table-cell office:value-type="float" office:value="597389172.123756" calcext:value-type="float">
            <text:p>597389172.123756</text:p>
          </table:table-cell>
          <table:table-cell/>
          <table:table-cell office:value-type="string" calcext:value-type="string">
            <text:p>2018-12-06T17:26:12.1237559Z</text:p>
          </table:table-cell>
          <table:table-cell office:value-type="string" calcext:value-type="string">
            <text:p>2018-12-06-17:27:21.3077559</text:p>
          </table:table-cell>
          <table:table-cell table:number-columns-repeated="2"/>
        </table:table-row>
        <table:table-row table:style-name="ro1">
          <table:table-cell office:value-type="float" office:value="406480673" calcext:value-type="float">
            <text:p>406480673</text:p>
          </table:table-cell>
          <table:table-cell office:value-type="float" office:value="597446755.124412" calcext:value-type="float">
            <text:p>597446755.124412</text:p>
          </table:table-cell>
          <table:table-cell/>
          <table:table-cell office:value-type="string" calcext:value-type="string">
            <text:p>2018-12-07T09:25:55.1244119Z</text:p>
          </table:table-cell>
          <table:table-cell office:value-type="string" calcext:value-type="string">
            <text:p>2018-12-07-09:27:04.3084119</text:p>
          </table:table-cell>
          <table:table-cell table:number-columns-repeated="2"/>
        </table:table-row>
        <table:table-row table:style-name="ro1">
          <table:table-cell office:value-type="float" office:value="406592261" calcext:value-type="float">
            <text:p>406592261</text:p>
          </table:table-cell>
          <table:table-cell office:value-type="float" office:value="597558343.125659" calcext:value-type="float">
            <text:p>597558343.125659</text:p>
          </table:table-cell>
          <table:table-cell/>
          <table:table-cell office:value-type="string" calcext:value-type="string">
            <text:p>2018-12-08T16:25:43.1256589Z</text:p>
          </table:table-cell>
          <table:table-cell office:value-type="string" calcext:value-type="string">
            <text:p>2018-12-08-16:26:52.3096590</text:p>
          </table:table-cell>
          <table:table-cell table:number-columns-repeated="2"/>
        </table:table-row>
        <table:table-row table:style-name="ro1">
          <table:table-cell office:value-type="float" office:value="406682260" calcext:value-type="float">
            <text:p>406682260</text:p>
          </table:table-cell>
          <table:table-cell office:value-type="float" office:value="597648342.126681" calcext:value-type="float">
            <text:p>597648342.126681</text:p>
          </table:table-cell>
          <table:table-cell/>
          <table:table-cell office:value-type="string" calcext:value-type="string">
            <text:p>2018-12-09T17:25:42.1266809Z</text:p>
          </table:table-cell>
          <table:table-cell office:value-type="string" calcext:value-type="string">
            <text:p>2018-12-09-17:26:51.3106809</text:p>
          </table:table-cell>
          <table:table-cell table:number-columns-repeated="2"/>
        </table:table-row>
        <table:table-row table:style-name="ro1">
          <table:table-cell office:value-type="float" office:value="406761445" calcext:value-type="float">
            <text:p>406761445</text:p>
          </table:table-cell>
          <table:table-cell office:value-type="float" office:value="597727527.12756" calcext:value-type="float">
            <text:p>597727527.12756</text:p>
          </table:table-cell>
          <table:table-cell/>
          <table:table-cell office:value-type="string" calcext:value-type="string">
            <text:p>2018-12-10T15:25:27.1275600Z</text:p>
          </table:table-cell>
          <table:table-cell office:value-type="string" calcext:value-type="string">
            <text:p>2018-12-10-15:26:36.3115600</text:p>
          </table:table-cell>
          <table:table-cell table:number-columns-repeated="2"/>
        </table:table-row>
        <table:table-row table:style-name="ro1">
          <table:table-cell office:value-type="float" office:value="406855042" calcext:value-type="float">
            <text:p>406855042</text:p>
          </table:table-cell>
          <table:table-cell office:value-type="float" office:value="597821124.128581" calcext:value-type="float">
            <text:p>597821124.128581</text:p>
          </table:table-cell>
          <table:table-cell/>
          <table:table-cell office:value-type="string" calcext:value-type="string">
            <text:p>2018-12-11T17:25:24.1285809Z</text:p>
          </table:table-cell>
          <table:table-cell office:value-type="string" calcext:value-type="string">
            <text:p>2018-12-11-17:26:33.3125809</text:p>
          </table:table-cell>
          <table:table-cell table:number-columns-repeated="2"/>
        </table:table-row>
        <table:table-row table:style-name="ro1">
          <table:table-cell office:value-type="float" office:value="406941441" calcext:value-type="float">
            <text:p>406941441</text:p>
          </table:table-cell>
          <table:table-cell office:value-type="float" office:value="597907523.129542" calcext:value-type="float">
            <text:p>597907523.129542</text:p>
          </table:table-cell>
          <table:table-cell/>
          <table:table-cell office:value-type="string" calcext:value-type="string">
            <text:p>2018-12-12T17:25:23.1295419Z</text:p>
          </table:table-cell>
          <table:table-cell office:value-type="string" calcext:value-type="string">
            <text:p>2018-12-12-17:26:32.3135420</text:p>
          </table:table-cell>
          <table:table-cell table:number-columns-repeated="2"/>
        </table:table-row>
        <table:table-row table:style-name="ro1">
          <table:table-cell office:value-type="float" office:value="407006261" calcext:value-type="float">
            <text:p>407006261</text:p>
          </table:table-cell>
          <table:table-cell office:value-type="float" office:value="597972343.130307" calcext:value-type="float">
            <text:p>597972343.130307</text:p>
          </table:table-cell>
          <table:table-cell/>
          <table:table-cell office:value-type="string" calcext:value-type="string">
            <text:p>2018-12-13T11:25:43.1303069Z</text:p>
          </table:table-cell>
          <table:table-cell office:value-type="string" calcext:value-type="string">
            <text:p>2018-12-13-11:26:52.3143069</text:p>
          </table:table-cell>
          <table:table-cell table:number-columns-repeated="2"/>
        </table:table-row>
        <table:table-row table:style-name="ro1">
          <table:table-cell office:value-type="float" office:value="407114215" calcext:value-type="float">
            <text:p>407114215</text:p>
          </table:table-cell>
          <table:table-cell office:value-type="float" office:value="598080297.131493" calcext:value-type="float">
            <text:p>598080297.131493</text:p>
          </table:table-cell>
          <table:table-cell/>
          <table:table-cell office:value-type="string" calcext:value-type="string">
            <text:p>2018-12-14T17:24:57.1314929Z</text:p>
          </table:table-cell>
          <table:table-cell office:value-type="string" calcext:value-type="string">
            <text:p>2018-12-14-17:26:06.3154929</text:p>
          </table:table-cell>
          <table:table-cell table:number-columns-repeated="2"/>
        </table:table-row>
        <table:table-row table:style-name="ro1">
          <table:table-cell office:value-type="float" office:value="407193404" calcext:value-type="float">
            <text:p>407193404</text:p>
          </table:table-cell>
          <table:table-cell office:value-type="float" office:value="598159486.13239" calcext:value-type="float">
            <text:p>598159486.13239</text:p>
          </table:table-cell>
          <table:table-cell/>
          <table:table-cell office:value-type="string" calcext:value-type="string">
            <text:p>2018-12-15T15:24:46.1323900Z</text:p>
          </table:table-cell>
          <table:table-cell office:value-type="string" calcext:value-type="string">
            <text:p>2018-12-15-15:25:55.3163900</text:p>
          </table:table-cell>
          <table:table-cell table:number-columns-repeated="2"/>
        </table:table-row>
        <table:table-row table:style-name="ro1">
          <table:table-cell office:value-type="float" office:value="407279802" calcext:value-type="float">
            <text:p>407279802</text:p>
          </table:table-cell>
          <table:table-cell office:value-type="float" office:value="598245884.133346" calcext:value-type="float">
            <text:p>598245884.133346</text:p>
          </table:table-cell>
          <table:table-cell/>
          <table:table-cell office:value-type="string" calcext:value-type="string">
            <text:p>2018-12-16T15:24:44.1333459Z</text:p>
          </table:table-cell>
          <table:table-cell office:value-type="string" calcext:value-type="string">
            <text:p>2018-12-16-15:25:53.3173459</text:p>
          </table:table-cell>
          <table:table-cell table:number-columns-repeated="2"/>
        </table:table-row>
        <table:table-row table:style-name="ro1">
          <table:table-cell office:value-type="float" office:value="407366190" calcext:value-type="float">
            <text:p>407366190</text:p>
          </table:table-cell>
          <table:table-cell office:value-type="float" office:value="598332272.134324" calcext:value-type="float">
            <text:p>598332272.134324</text:p>
          </table:table-cell>
          <table:table-cell/>
          <table:table-cell office:value-type="string" calcext:value-type="string">
            <text:p>2018-12-17T15:24:32.1343239Z</text:p>
          </table:table-cell>
          <table:table-cell office:value-type="string" calcext:value-type="string">
            <text:p>2018-12-17-15:25:41.3183239</text:p>
          </table:table-cell>
          <table:table-cell table:number-columns-repeated="2"/>
        </table:table-row>
        <table:table-row table:style-name="ro1">
          <table:table-cell office:value-type="float" office:value="407459800" calcext:value-type="float">
            <text:p>407459800</text:p>
          </table:table-cell>
          <table:table-cell office:value-type="float" office:value="598425882.135364" calcext:value-type="float">
            <text:p>598425882.135364</text:p>
          </table:table-cell>
          <table:table-cell/>
          <table:table-cell office:value-type="string" calcext:value-type="string">
            <text:p>2018-12-18T17:24:42.1353639Z</text:p>
          </table:table-cell>
          <table:table-cell office:value-type="string" calcext:value-type="string">
            <text:p>2018-12-18-17:25:51.3193639</text:p>
          </table:table-cell>
          <table:table-cell table:number-columns-repeated="2"/>
        </table:table-row>
        <table:table-row table:style-name="ro1">
          <table:table-cell office:value-type="float" office:value="407521028" calcext:value-type="float">
            <text:p>407521028</text:p>
          </table:table-cell>
          <table:table-cell office:value-type="float" office:value="598487110.136067" calcext:value-type="float">
            <text:p>598487110.136067</text:p>
          </table:table-cell>
          <table:table-cell/>
          <table:table-cell office:value-type="string" calcext:value-type="string">
            <text:p>2018-12-19T10:25:10.1360670Z</text:p>
          </table:table-cell>
          <table:table-cell office:value-type="string" calcext:value-type="string">
            <text:p>2018-12-19-10:26:19.3200670</text:p>
          </table:table-cell>
          <table:table-cell table:number-columns-repeated="2"/>
        </table:table-row>
        <table:table-row table:style-name="ro1">
          <table:table-cell office:value-type="float" office:value="407632592" calcext:value-type="float">
            <text:p>407632592</text:p>
          </table:table-cell>
          <table:table-cell office:value-type="float" office:value="598598674.137307" calcext:value-type="float">
            <text:p>598598674.137307</text:p>
          </table:table-cell>
          <table:table-cell/>
          <table:table-cell office:value-type="string" calcext:value-type="string">
            <text:p>2018-12-20T17:24:34.1373069Z</text:p>
          </table:table-cell>
          <table:table-cell office:value-type="string" calcext:value-type="string">
            <text:p>2018-12-20-17:25:43.3213069</text:p>
          </table:table-cell>
          <table:table-cell table:number-columns-repeated="2"/>
        </table:table-row>
        <table:table-row table:style-name="ro1">
          <table:table-cell office:value-type="float" office:value="407715378" calcext:value-type="float">
            <text:p>407715378</text:p>
          </table:table-cell>
          <table:table-cell office:value-type="float" office:value="598681460.138217" calcext:value-type="float">
            <text:p>598681460.138217</text:p>
          </table:table-cell>
          <table:table-cell/>
          <table:table-cell office:value-type="string" calcext:value-type="string">
            <text:p>2018-12-21T16:24:20.1382169Z</text:p>
          </table:table-cell>
          <table:table-cell office:value-type="string" calcext:value-type="string">
            <text:p>2018-12-21-16:25:29.3222169</text:p>
          </table:table-cell>
          <table:table-cell table:number-columns-repeated="2"/>
        </table:table-row>
        <table:table-row table:style-name="ro1">
          <table:table-cell office:value-type="float" office:value="407805378" calcext:value-type="float">
            <text:p>407805378</text:p>
          </table:table-cell>
          <table:table-cell office:value-type="float" office:value="598771460.139218" calcext:value-type="float">
            <text:p>598771460.139218</text:p>
          </table:table-cell>
          <table:table-cell/>
          <table:table-cell office:value-type="string" calcext:value-type="string">
            <text:p>2018-12-22T17:24:20.1392179Z</text:p>
          </table:table-cell>
          <table:table-cell office:value-type="string" calcext:value-type="string">
            <text:p>2018-12-22-17:25:29.3232179</text:p>
          </table:table-cell>
          <table:table-cell table:number-columns-repeated="2"/>
        </table:table-row>
        <table:table-row table:style-name="ro1">
          <table:table-cell office:value-type="float" office:value="407873755" calcext:value-type="float">
            <text:p>407873755</text:p>
          </table:table-cell>
          <table:table-cell office:value-type="float" office:value="598839837.139979" calcext:value-type="float">
            <text:p>598839837.139979</text:p>
          </table:table-cell>
          <table:table-cell/>
          <table:table-cell office:value-type="string" calcext:value-type="string">
            <text:p>2018-12-23T12:23:57.1399790Z</text:p>
          </table:table-cell>
          <table:table-cell office:value-type="string" calcext:value-type="string">
            <text:p>2018-12-23-12:25:06.3239790</text:p>
          </table:table-cell>
          <table:table-cell table:number-columns-repeated="2"/>
        </table:table-row>
        <table:table-row table:style-name="ro1">
          <table:table-cell office:value-type="float" office:value="407967351" calcext:value-type="float">
            <text:p>407967351</text:p>
          </table:table-cell>
          <table:table-cell office:value-type="float" office:value="598933433.141043" calcext:value-type="float">
            <text:p>598933433.141043</text:p>
          </table:table-cell>
          <table:table-cell/>
          <table:table-cell office:value-type="string" calcext:value-type="string">
            <text:p>2018-12-24T14:23:53.1410429Z</text:p>
          </table:table-cell>
          <table:table-cell office:value-type="string" calcext:value-type="string">
            <text:p>2018-12-24-14:25:02.3250429</text:p>
          </table:table-cell>
          <table:table-cell table:number-columns-repeated="2"/>
        </table:table-row>
        <table:table-row table:style-name="ro1">
          <table:table-cell office:value-type="float" office:value="408064552" calcext:value-type="float">
            <text:p>408064552</text:p>
          </table:table-cell>
          <table:table-cell office:value-type="float" office:value="599030634.142146" calcext:value-type="float">
            <text:p>599030634.142146</text:p>
          </table:table-cell>
          <table:table-cell/>
          <table:table-cell office:value-type="string" calcext:value-type="string">
            <text:p>2018-12-25T17:23:54.1421459Z</text:p>
          </table:table-cell>
          <table:table-cell office:value-type="string" calcext:value-type="string">
            <text:p>2018-12-25-17:25:03.3261460</text:p>
          </table:table-cell>
          <table:table-cell table:number-columns-repeated="2"/>
        </table:table-row>
        <table:table-row table:style-name="ro1">
          <table:table-cell office:value-type="float" office:value="408150941" calcext:value-type="float">
            <text:p>408150941</text:p>
          </table:table-cell>
          <table:table-cell office:value-type="float" office:value="599117023.143075" calcext:value-type="float">
            <text:p>599117023.143075</text:p>
          </table:table-cell>
          <table:table-cell/>
          <table:table-cell office:value-type="string" calcext:value-type="string">
            <text:p>2018-12-26T17:23:43.1430749Z</text:p>
          </table:table-cell>
          <table:table-cell office:value-type="string" calcext:value-type="string">
            <text:p>2018-12-26-17:24:52.3270750</text:p>
          </table:table-cell>
          <table:table-cell table:number-columns-repeated="2"/>
        </table:table-row>
        <table:table-row table:style-name="ro1">
          <table:table-cell office:value-type="float" office:value="408237339" calcext:value-type="float">
            <text:p>408237339</text:p>
          </table:table-cell>
          <table:table-cell office:value-type="float" office:value="599203421.144038" calcext:value-type="float">
            <text:p>599203421.144038</text:p>
          </table:table-cell>
          <table:table-cell/>
          <table:table-cell office:value-type="string" calcext:value-type="string">
            <text:p>2018-12-27T17:23:41.1440379Z</text:p>
          </table:table-cell>
          <table:table-cell office:value-type="string" calcext:value-type="string">
            <text:p>2018-12-27-17:24:50.3280379</text:p>
          </table:table-cell>
          <table:table-cell table:number-columns-repeated="2"/>
        </table:table-row>
        <table:table-row table:style-name="ro1">
          <table:table-cell office:value-type="float" office:value="408323778" calcext:value-type="float">
            <text:p>408323778</text:p>
          </table:table-cell>
          <table:table-cell office:value-type="float" office:value="599289860.145013" calcext:value-type="float">
            <text:p>599289860.145013</text:p>
          </table:table-cell>
          <table:table-cell/>
          <table:table-cell office:value-type="string" calcext:value-type="string">
            <text:p>2018-12-28T17:24:20.1450129Z</text:p>
          </table:table-cell>
          <table:table-cell office:value-type="string" calcext:value-type="string">
            <text:p>2018-12-28-17:25:29.3290129</text:p>
          </table:table-cell>
          <table:table-cell table:number-columns-repeated="2"/>
        </table:table-row>
        <table:table-row table:style-name="ro1">
          <table:table-cell office:value-type="float" office:value="408410160" calcext:value-type="float">
            <text:p>408410160</text:p>
          </table:table-cell>
          <table:table-cell office:value-type="float" office:value="599376242.146013" calcext:value-type="float">
            <text:p>599376242.146013</text:p>
          </table:table-cell>
          <table:table-cell/>
          <table:table-cell office:value-type="string" calcext:value-type="string">
            <text:p>2018-12-29T17:24:02.1460130Z</text:p>
          </table:table-cell>
          <table:table-cell office:value-type="string" calcext:value-type="string">
            <text:p>2018-12-29-17:25:11.3300130</text:p>
          </table:table-cell>
          <table:table-cell table:number-columns-repeated="2"/>
        </table:table-row>
        <table:table-row table:style-name="ro1">
          <table:table-cell office:value-type="float" office:value="408471361" calcext:value-type="float">
            <text:p>408471361</text:p>
          </table:table-cell>
          <table:table-cell office:value-type="float" office:value="599437443.146688" calcext:value-type="float">
            <text:p>599437443.146688</text:p>
          </table:table-cell>
          <table:table-cell/>
          <table:table-cell office:value-type="string" calcext:value-type="string">
            <text:p>2018-12-30T10:24:03.1466879Z</text:p>
          </table:table-cell>
          <table:table-cell office:value-type="string" calcext:value-type="string">
            <text:p>2018-12-30-10:25:12.3306879</text:p>
          </table:table-cell>
          <table:table-cell table:number-columns-repeated="2"/>
        </table:table-row>
        <table:table-row table:style-name="ro1">
          <table:table-cell office:value-type="float" office:value="408572114" calcext:value-type="float">
            <text:p>408572114</text:p>
          </table:table-cell>
          <table:table-cell office:value-type="float" office:value="599538196.147806" calcext:value-type="float">
            <text:p>599538196.147806</text:p>
          </table:table-cell>
          <table:table-cell/>
          <table:table-cell office:value-type="string" calcext:value-type="string">
            <text:p>2018-12-31T14:23:16.1478059Z</text:p>
          </table:table-cell>
          <table:table-cell office:value-type="string" calcext:value-type="string">
            <text:p>2018-12-31-14:24:25.3318059</text:p>
          </table:table-cell>
          <table:table-cell table:number-columns-repeated="2"/>
        </table:table-row>
        <table:table-row table:style-name="ro1">
          <table:table-cell office:value-type="float" office:value="408665757" calcext:value-type="float">
            <text:p>408665757</text:p>
          </table:table-cell>
          <table:table-cell office:value-type="float" office:value="599631839.148862" calcext:value-type="float">
            <text:p>599631839.148862</text:p>
          </table:table-cell>
          <table:table-cell/>
          <table:table-cell office:value-type="string" calcext:value-type="string">
            <text:p>2019-01-01T16:23:59.1488620Z</text:p>
          </table:table-cell>
          <table:table-cell office:value-type="string" calcext:value-type="string">
            <text:p>2019-01-01-16:25:08.3328620</text:p>
          </table:table-cell>
          <table:table-cell table:number-columns-repeated="2"/>
        </table:table-row>
        <table:table-row table:style-name="ro1">
          <table:table-cell office:value-type="float" office:value="408755695" calcext:value-type="float">
            <text:p>408755695</text:p>
          </table:table-cell>
          <table:table-cell office:value-type="float" office:value="599721777.149844" calcext:value-type="float">
            <text:p>599721777.149844</text:p>
          </table:table-cell>
          <table:table-cell/>
          <table:table-cell office:value-type="string" calcext:value-type="string">
            <text:p>2019-01-02T17:22:57.1498439Z</text:p>
          </table:table-cell>
          <table:table-cell office:value-type="string" calcext:value-type="string">
            <text:p>2019-01-02-17:24:06.3338439</text:p>
          </table:table-cell>
          <table:table-cell table:number-columns-repeated="2"/>
        </table:table-row>
        <table:table-row table:style-name="ro1">
          <table:table-cell office:value-type="float" office:value="408842090" calcext:value-type="float">
            <text:p>408842090</text:p>
          </table:table-cell>
          <table:table-cell office:value-type="float" office:value="599808172.15085" calcext:value-type="float">
            <text:p>599808172.15085</text:p>
          </table:table-cell>
          <table:table-cell/>
          <table:table-cell office:value-type="string" calcext:value-type="string">
            <text:p>2019-01-03T17:22:52.1508499Z</text:p>
          </table:table-cell>
          <table:table-cell office:value-type="string" calcext:value-type="string">
            <text:p>2019-01-03-17:24:01.3348499</text:p>
          </table:table-cell>
          <table:table-cell table:number-columns-repeated="2"/>
        </table:table-row>
        <table:table-row table:style-name="ro1">
          <table:table-cell office:value-type="float" office:value="408899706" calcext:value-type="float">
            <text:p>408899706</text:p>
          </table:table-cell>
          <table:table-cell office:value-type="float" office:value="599865788.151476" calcext:value-type="float">
            <text:p>599865788.151476</text:p>
          </table:table-cell>
          <table:table-cell/>
          <table:table-cell office:value-type="string" calcext:value-type="string">
            <text:p>2019-01-04T09:23:08.1514760Z</text:p>
          </table:table-cell>
          <table:table-cell office:value-type="string" calcext:value-type="string">
            <text:p>2019-01-04-09:24:17.3354760</text:p>
          </table:table-cell>
          <table:table-cell table:number-columns-repeated="2"/>
        </table:table-row>
        <table:table-row table:style-name="ro1">
          <table:table-cell office:value-type="float" office:value="409266881" calcext:value-type="float">
            <text:p>409266881</text:p>
          </table:table-cell>
          <table:table-cell office:value-type="float" office:value="600232963.155569" calcext:value-type="float">
            <text:p>600232963.155569</text:p>
          </table:table-cell>
          <table:table-cell/>
          <table:table-cell office:value-type="string" calcext:value-type="string">
            <text:p>2019-01-08T15:22:43.1555689Z</text:p>
          </table:table-cell>
          <table:table-cell office:value-type="string" calcext:value-type="string">
            <text:p>2019-01-08-15:23:52.3395689</text:p>
          </table:table-cell>
          <table:table-cell table:number-columns-repeated="2"/>
        </table:table-row>
        <table:table-row table:style-name="ro1">
          <table:table-cell office:value-type="float" office:value="409360445" calcext:value-type="float">
            <text:p>409360445</text:p>
          </table:table-cell>
          <table:table-cell office:value-type="float" office:value="600326527.156595" calcext:value-type="float">
            <text:p>600326527.156595</text:p>
          </table:table-cell>
          <table:table-cell/>
          <table:table-cell office:value-type="string" calcext:value-type="string">
            <text:p>2019-01-09T17:22:07.1565949Z</text:p>
          </table:table-cell>
          <table:table-cell office:value-type="string" calcext:value-type="string">
            <text:p>2019-01-09-17:23:16.3405950</text:p>
          </table:table-cell>
          <table:table-cell table:number-columns-repeated="2"/>
        </table:table-row>
        <table:table-row table:style-name="ro1">
          <table:table-cell office:value-type="float" office:value="409446873" calcext:value-type="float">
            <text:p>409446873</text:p>
          </table:table-cell>
          <table:table-cell office:value-type="float" office:value="600412955.157574" calcext:value-type="float">
            <text:p>600412955.157574</text:p>
          </table:table-cell>
          <table:table-cell/>
          <table:table-cell office:value-type="string" calcext:value-type="string">
            <text:p>2019-01-10T17:22:35.1575739Z</text:p>
          </table:table-cell>
          <table:table-cell office:value-type="string" calcext:value-type="string">
            <text:p>2019-01-10-17:23:44.3415739</text:p>
          </table:table-cell>
          <table:table-cell table:number-columns-repeated="2"/>
        </table:table-row>
        <table:table-row table:style-name="ro1">
          <table:table-cell office:value-type="float" office:value="409533236" calcext:value-type="float">
            <text:p>409533236</text:p>
          </table:table-cell>
          <table:table-cell office:value-type="float" office:value="600499318.158492" calcext:value-type="float">
            <text:p>600499318.158492</text:p>
          </table:table-cell>
          <table:table-cell/>
          <table:table-cell office:value-type="string" calcext:value-type="string">
            <text:p>2019-01-11T17:21:58.1584919Z</text:p>
          </table:table-cell>
          <table:table-cell office:value-type="string" calcext:value-type="string">
            <text:p>2019-01-11-17:23:07.3424919</text:p>
          </table:table-cell>
          <table:table-cell table:number-columns-repeated="2"/>
        </table:table-row>
        <table:table-row table:style-name="ro1">
          <table:table-cell office:value-type="float" office:value="409619634" calcext:value-type="float">
            <text:p>409619634</text:p>
          </table:table-cell>
          <table:table-cell office:value-type="float" office:value="600585716.15946" calcext:value-type="float">
            <text:p>600585716.15946</text:p>
          </table:table-cell>
          <table:table-cell/>
          <table:table-cell office:value-type="string" calcext:value-type="string">
            <text:p>2019-01-12T17:21:56.1594599Z</text:p>
          </table:table-cell>
          <table:table-cell office:value-type="string" calcext:value-type="string">
            <text:p>2019-01-12-17:23:05.3434599</text:p>
          </table:table-cell>
          <table:table-cell table:number-columns-repeated="2"/>
        </table:table-row>
        <table:table-row table:style-name="ro1">
          <table:table-cell office:value-type="float" office:value="409706030" calcext:value-type="float">
            <text:p>409706030</text:p>
          </table:table-cell>
          <table:table-cell office:value-type="float" office:value="600672112.160397" calcext:value-type="float">
            <text:p>600672112.160397</text:p>
          </table:table-cell>
          <table:table-cell/>
          <table:table-cell office:value-type="string" calcext:value-type="string">
            <text:p>2019-01-13T17:21:52.1603969Z</text:p>
          </table:table-cell>
          <table:table-cell office:value-type="string" calcext:value-type="string">
            <text:p>2019-01-13-17:23:01.3443969</text:p>
          </table:table-cell>
          <table:table-cell table:number-columns-repeated="2"/>
        </table:table-row>
        <table:table-row table:style-name="ro1">
          <table:table-cell office:value-type="float" office:value="409785231" calcext:value-type="float">
            <text:p>409785231</text:p>
          </table:table-cell>
          <table:table-cell office:value-type="float" office:value="600751313.161308" calcext:value-type="float">
            <text:p>600751313.161308</text:p>
          </table:table-cell>
          <table:table-cell/>
          <table:table-cell office:value-type="string" calcext:value-type="string">
            <text:p>2019-01-14T15:21:53.1613079Z</text:p>
          </table:table-cell>
          <table:table-cell office:value-type="string" calcext:value-type="string">
            <text:p>2019-01-14-15:23:02.3453079</text:p>
          </table:table-cell>
          <table:table-cell table:number-columns-repeated="2"/>
        </table:table-row>
        <table:table-row table:style-name="ro1">
          <table:table-cell office:value-type="float" office:value="409846438" calcext:value-type="float">
            <text:p>409846438</text:p>
          </table:table-cell>
          <table:table-cell office:value-type="float" office:value="600812520.161993" calcext:value-type="float">
            <text:p>600812520.161993</text:p>
          </table:table-cell>
          <table:table-cell/>
          <table:table-cell office:value-type="string" calcext:value-type="string">
            <text:p>2019-01-15T08:22:00.1619930Z</text:p>
          </table:table-cell>
          <table:table-cell office:value-type="string" calcext:value-type="string">
            <text:p>2019-01-15-08:23:09.3459930</text:p>
          </table:table-cell>
          <table:table-cell table:number-columns-repeated="2"/>
        </table:table-row>
        <table:table-row table:style-name="ro1">
          <table:table-cell office:value-type="float" office:value="409943625" calcext:value-type="float">
            <text:p>409943625</text:p>
          </table:table-cell>
          <table:table-cell office:value-type="float" office:value="600909707.163048" calcext:value-type="float">
            <text:p>600909707.163048</text:p>
          </table:table-cell>
          <table:table-cell/>
          <table:table-cell office:value-type="string" calcext:value-type="string">
            <text:p>2019-01-16T11:21:47.1630480Z</text:p>
          </table:table-cell>
          <table:table-cell office:value-type="string" calcext:value-type="string">
            <text:p>2019-01-16-11:22:56.3470480</text:p>
          </table:table-cell>
          <table:table-cell table:number-columns-repeated="2"/>
        </table:table-row>
        <table:table-row table:style-name="ro1">
          <table:table-cell office:value-type="float" office:value="410138018" calcext:value-type="float">
            <text:p>410138018</text:p>
          </table:table-cell>
          <table:table-cell office:value-type="float" office:value="601104100.165203" calcext:value-type="float">
            <text:p>601104100.165203</text:p>
          </table:table-cell>
          <table:table-cell/>
          <table:table-cell office:value-type="string" calcext:value-type="string">
            <text:p>2019-01-18T17:21:40.1652029Z</text:p>
          </table:table-cell>
          <table:table-cell office:value-type="string" calcext:value-type="string">
            <text:p>2019-01-18-17:22:49.3492029</text:p>
          </table:table-cell>
          <table:table-cell table:number-columns-repeated="2"/>
        </table:table-row>
        <table:table-row table:style-name="ro1">
          <table:table-cell office:value-type="float" office:value="410224417" calcext:value-type="float">
            <text:p>410224417</text:p>
          </table:table-cell>
          <table:table-cell office:value-type="float" office:value="601190499.166145" calcext:value-type="float">
            <text:p>601190499.166145</text:p>
          </table:table-cell>
          <table:table-cell/>
          <table:table-cell office:value-type="string" calcext:value-type="string">
            <text:p>2019-01-19T17:21:39.1661449Z</text:p>
          </table:table-cell>
          <table:table-cell office:value-type="string" calcext:value-type="string">
            <text:p>2019-01-19-17:22:48.3501449</text:p>
          </table:table-cell>
          <table:table-cell table:number-columns-repeated="2"/>
        </table:table-row>
        <table:table-row table:style-name="ro1">
          <table:table-cell office:value-type="float" office:value="410310814" calcext:value-type="float">
            <text:p>410310814</text:p>
          </table:table-cell>
          <table:table-cell office:value-type="float" office:value="601276896.167113" calcext:value-type="float">
            <text:p>601276896.167113</text:p>
          </table:table-cell>
          <table:table-cell/>
          <table:table-cell office:value-type="string" calcext:value-type="string">
            <text:p>2019-01-20T17:21:36.1671129Z</text:p>
          </table:table-cell>
          <table:table-cell office:value-type="string" calcext:value-type="string">
            <text:p>2019-01-20-17:22:45.3511129</text:p>
          </table:table-cell>
          <table:table-cell table:number-columns-repeated="2"/>
        </table:table-row>
        <table:table-row table:style-name="ro1">
          <table:table-cell office:value-type="float" office:value="410386417" calcext:value-type="float">
            <text:p>410386417</text:p>
          </table:table-cell>
          <table:table-cell office:value-type="float" office:value="601352499.167974" calcext:value-type="float">
            <text:p>601352499.167974</text:p>
          </table:table-cell>
          <table:table-cell/>
          <table:table-cell office:value-type="string" calcext:value-type="string">
            <text:p>2019-01-21T14:21:39.1679739Z</text:p>
          </table:table-cell>
          <table:table-cell office:value-type="string" calcext:value-type="string">
            <text:p>2019-01-21-14:22:48.3519740</text:p>
          </table:table-cell>
          <table:table-cell table:number-columns-repeated="2"/>
        </table:table-row>
        <table:table-row table:style-name="ro1">
          <table:table-cell office:value-type="float" office:value="410483609" calcext:value-type="float">
            <text:p>410483609</text:p>
          </table:table-cell>
          <table:table-cell office:value-type="float" office:value="601449691.16904" calcext:value-type="float">
            <text:p>601449691.16904</text:p>
          </table:table-cell>
          <table:table-cell/>
          <table:table-cell office:value-type="string" calcext:value-type="string">
            <text:p>2019-01-22T17:21:31.1690399Z</text:p>
          </table:table-cell>
          <table:table-cell office:value-type="string" calcext:value-type="string">
            <text:p>2019-01-22-17:22:40.3530399</text:p>
          </table:table-cell>
          <table:table-cell table:number-columns-repeated="2"/>
        </table:table-row>
        <table:table-row table:style-name="ro1">
          <table:table-cell office:value-type="float" office:value="410570007" calcext:value-type="float">
            <text:p>410570007</text:p>
          </table:table-cell>
          <table:table-cell office:value-type="float" office:value="601536089.169994" calcext:value-type="float">
            <text:p>601536089.169994</text:p>
          </table:table-cell>
          <table:table-cell/>
          <table:table-cell office:value-type="string" calcext:value-type="string">
            <text:p>2019-01-23T17:21:29.1699939Z</text:p>
          </table:table-cell>
          <table:table-cell office:value-type="string" calcext:value-type="string">
            <text:p>2019-01-23-17:22:38.3539940</text:p>
          </table:table-cell>
          <table:table-cell table:number-columns-repeated="2"/>
        </table:table-row>
        <table:table-row table:style-name="ro1">
          <table:table-cell office:value-type="float" office:value="410656407" calcext:value-type="float">
            <text:p>410656407</text:p>
          </table:table-cell>
          <table:table-cell office:value-type="float" office:value="601622489.170956" calcext:value-type="float">
            <text:p>601622489.170956</text:p>
          </table:table-cell>
          <table:table-cell/>
          <table:table-cell office:value-type="string" calcext:value-type="string">
            <text:p>2019-01-24T17:21:29.1709560Z</text:p>
          </table:table-cell>
          <table:table-cell office:value-type="string" calcext:value-type="string">
            <text:p>2019-01-24-17:22:38.3549560</text:p>
          </table:table-cell>
          <table:table-cell table:number-columns-repeated="2"/>
        </table:table-row>
        <table:table-row table:style-name="ro1">
          <table:table-cell office:value-type="float" office:value="410742807" calcext:value-type="float">
            <text:p>410742807</text:p>
          </table:table-cell>
          <table:table-cell office:value-type="float" office:value="601708889.171909" calcext:value-type="float">
            <text:p>601708889.171909</text:p>
          </table:table-cell>
          <table:table-cell/>
          <table:table-cell office:value-type="string" calcext:value-type="string">
            <text:p>2019-01-25T17:21:29.1719089Z</text:p>
          </table:table-cell>
          <table:table-cell office:value-type="string" calcext:value-type="string">
            <text:p>2019-01-25-17:22:38.3559089</text:p>
          </table:table-cell>
          <table:table-cell table:number-columns-repeated="2"/>
        </table:table-row>
        <table:table-row table:style-name="ro1">
          <table:table-cell office:value-type="float" office:value="410829206" calcext:value-type="float">
            <text:p>410829206</text:p>
          </table:table-cell>
          <table:table-cell office:value-type="float" office:value="601795288.172876" calcext:value-type="float">
            <text:p>601795288.172876</text:p>
          </table:table-cell>
          <table:table-cell/>
          <table:table-cell office:value-type="string" calcext:value-type="string">
            <text:p>2019-01-26T17:21:28.1728760Z</text:p>
          </table:table-cell>
          <table:table-cell office:value-type="string" calcext:value-type="string">
            <text:p>2019-01-26-17:22:37.3568760</text:p>
          </table:table-cell>
          <table:table-cell table:number-columns-repeated="2"/>
        </table:table-row>
        <table:table-row table:style-name="ro1">
          <table:table-cell office:value-type="float" office:value="410915604" calcext:value-type="float">
            <text:p>410915604</text:p>
          </table:table-cell>
          <table:table-cell office:value-type="float" office:value="601881686.173841" calcext:value-type="float">
            <text:p>601881686.173841</text:p>
          </table:table-cell>
          <table:table-cell/>
          <table:table-cell office:value-type="string" calcext:value-type="string">
            <text:p>2019-01-27T17:21:26.1738409Z</text:p>
          </table:table-cell>
          <table:table-cell office:value-type="string" calcext:value-type="string">
            <text:p>2019-01-27-17:22:35.3578410</text:p>
          </table:table-cell>
          <table:table-cell table:number-columns-repeated="2"/>
        </table:table-row>
        <table:table-row table:style-name="ro1">
          <table:table-cell office:value-type="float" office:value="410994818" calcext:value-type="float">
            <text:p>410994818</text:p>
          </table:table-cell>
          <table:table-cell office:value-type="float" office:value="601960900.174737" calcext:value-type="float">
            <text:p>601960900.174737</text:p>
          </table:table-cell>
          <table:table-cell/>
          <table:table-cell office:value-type="string" calcext:value-type="string">
            <text:p>2019-01-28T15:21:40.1747369Z</text:p>
          </table:table-cell>
          <table:table-cell office:value-type="string" calcext:value-type="string">
            <text:p>2019-01-28-15:22:49.3587369</text:p>
          </table:table-cell>
          <table:table-cell table:number-columns-repeated="2"/>
        </table:table-row>
        <table:table-row table:style-name="ro1">
          <table:table-cell office:value-type="float" office:value="411077606" calcext:value-type="float">
            <text:p>411077606</text:p>
          </table:table-cell>
          <table:table-cell office:value-type="float" office:value="602043688.175655" calcext:value-type="float">
            <text:p>602043688.175655</text:p>
          </table:table-cell>
          <table:table-cell/>
          <table:table-cell office:value-type="string" calcext:value-type="string">
            <text:p>2019-01-29T14:21:28.1756550Z</text:p>
          </table:table-cell>
          <table:table-cell office:value-type="string" calcext:value-type="string">
            <text:p>2019-01-29-14:22:37.3596550</text:p>
          </table:table-cell>
          <table:table-cell table:number-columns-repeated="2"/>
        </table:table-row>
        <table:table-row table:style-name="ro1">
          <table:table-cell office:value-type="float" office:value="411138817" calcext:value-type="float">
            <text:p>411138817</text:p>
          </table:table-cell>
          <table:table-cell office:value-type="float" office:value="602104899.176334" calcext:value-type="float">
            <text:p>602104899.176334</text:p>
          </table:table-cell>
          <table:table-cell/>
          <table:table-cell office:value-type="string" calcext:value-type="string">
            <text:p>2019-01-30T07:21:39.1763340Z</text:p>
          </table:table-cell>
          <table:table-cell office:value-type="string" calcext:value-type="string">
            <text:p>2019-01-30-07:22:48.3603340</text:p>
          </table:table-cell>
          <table:table-cell table:number-columns-repeated="2"/>
        </table:table-row>
        <table:table-row table:style-name="ro1">
          <table:table-cell office:value-type="float" office:value="411347600" calcext:value-type="float">
            <text:p>411347600</text:p>
          </table:table-cell>
          <table:table-cell office:value-type="float" office:value="602313682.178644" calcext:value-type="float">
            <text:p>602313682.178644</text:p>
          </table:table-cell>
          <table:table-cell/>
          <table:table-cell office:value-type="string" calcext:value-type="string">
            <text:p>2019-02-01T17:21:22.1786439Z</text:p>
          </table:table-cell>
          <table:table-cell office:value-type="string" calcext:value-type="string">
            <text:p>2019-02-01-17:22:31.3626439</text:p>
          </table:table-cell>
          <table:table-cell table:number-columns-repeated="2"/>
        </table:table-row>
        <table:table-row table:style-name="ro1">
          <table:table-cell office:value-type="float" office:value="411434002" calcext:value-type="float">
            <text:p>411434002</text:p>
          </table:table-cell>
          <table:table-cell office:value-type="float" office:value="602400084.1796" calcext:value-type="float">
            <text:p>602400084.1796</text:p>
          </table:table-cell>
          <table:table-cell/>
          <table:table-cell office:value-type="string" calcext:value-type="string">
            <text:p>2019-02-02T17:21:24.1796000Z</text:p>
          </table:table-cell>
          <table:table-cell office:value-type="string" calcext:value-type="string">
            <text:p>2019-02-02-17:22:33.3636000</text:p>
          </table:table-cell>
          <table:table-cell table:number-columns-repeated="2"/>
        </table:table-row>
        <table:table-row table:style-name="ro1">
          <table:table-cell office:value-type="float" office:value="411520401" calcext:value-type="float">
            <text:p>411520401</text:p>
          </table:table-cell>
          <table:table-cell office:value-type="float" office:value="602486483.180561" calcext:value-type="float">
            <text:p>602486483.180561</text:p>
          </table:table-cell>
          <table:table-cell/>
          <table:table-cell office:value-type="string" calcext:value-type="string">
            <text:p>2019-02-03T17:21:23.1805609Z</text:p>
          </table:table-cell>
          <table:table-cell office:value-type="string" calcext:value-type="string">
            <text:p>2019-02-03-17:22:32.3645609</text:p>
          </table:table-cell>
          <table:table-cell table:number-columns-repeated="2"/>
        </table:table-row>
        <table:table-row table:style-name="ro1">
          <table:table-cell office:value-type="float" office:value="411567205" calcext:value-type="float">
            <text:p>411567205</text:p>
          </table:table-cell>
          <table:table-cell office:value-type="float" office:value="602533287.181096" calcext:value-type="float">
            <text:p>602533287.181096</text:p>
          </table:table-cell>
          <table:table-cell/>
          <table:table-cell office:value-type="string" calcext:value-type="string">
            <text:p>2019-02-04T06:21:27.1810959Z</text:p>
          </table:table-cell>
          <table:table-cell office:value-type="string" calcext:value-type="string">
            <text:p>2019-02-04-06:22:36.3650959</text:p>
          </table:table-cell>
          <table:table-cell table:number-columns-repeated="2"/>
        </table:table-row>
        <table:table-row table:style-name="ro1">
          <table:table-cell office:value-type="float" office:value="411686023" calcext:value-type="float">
            <text:p>411686023</text:p>
          </table:table-cell>
          <table:table-cell office:value-type="float" office:value="602652105.182432" calcext:value-type="float">
            <text:p>602652105.182432</text:p>
          </table:table-cell>
          <table:table-cell/>
          <table:table-cell office:value-type="string" calcext:value-type="string">
            <text:p>2019-02-05T15:21:45.1824319Z</text:p>
          </table:table-cell>
          <table:table-cell office:value-type="string" calcext:value-type="string">
            <text:p>2019-02-05-15:22:54.3664319</text:p>
          </table:table-cell>
          <table:table-cell table:number-columns-repeated="2"/>
        </table:table-row>
        <table:table-row table:style-name="ro1">
          <table:table-cell office:value-type="float" office:value="411768806" calcext:value-type="float">
            <text:p>411768806</text:p>
          </table:table-cell>
          <table:table-cell office:value-type="float" office:value="602734888.183341" calcext:value-type="float">
            <text:p>602734888.183341</text:p>
          </table:table-cell>
          <table:table-cell/>
          <table:table-cell office:value-type="string" calcext:value-type="string">
            <text:p>2019-02-06T14:21:28.1833410Z</text:p>
          </table:table-cell>
          <table:table-cell office:value-type="string" calcext:value-type="string">
            <text:p>2019-02-06-14:22:37.3673410</text:p>
          </table:table-cell>
          <table:table-cell table:number-columns-repeated="2"/>
        </table:table-row>
        <table:table-row table:style-name="ro1">
          <table:table-cell office:value-type="float" office:value="411866002" calcext:value-type="float">
            <text:p>411866002</text:p>
          </table:table-cell>
          <table:table-cell office:value-type="float" office:value="602832084.184416" calcext:value-type="float">
            <text:p>602832084.184416</text:p>
          </table:table-cell>
          <table:table-cell/>
          <table:table-cell office:value-type="string" calcext:value-type="string">
            <text:p>2019-02-07T17:21:24.1844159Z</text:p>
          </table:table-cell>
          <table:table-cell office:value-type="string" calcext:value-type="string">
            <text:p>2019-02-07-17:22:33.3684159</text:p>
          </table:table-cell>
          <table:table-cell table:number-columns-repeated="2"/>
        </table:table-row>
        <table:table-row table:style-name="ro1">
          <table:table-cell office:value-type="float" office:value="411952402" calcext:value-type="float">
            <text:p>411952402</text:p>
          </table:table-cell>
          <table:table-cell office:value-type="float" office:value="602918484.18545" calcext:value-type="float">
            <text:p>602918484.18545</text:p>
          </table:table-cell>
          <table:table-cell/>
          <table:table-cell office:value-type="string" calcext:value-type="string">
            <text:p>2019-02-08T17:21:24.1854499Z</text:p>
          </table:table-cell>
          <table:table-cell office:value-type="string" calcext:value-type="string">
            <text:p>2019-02-08-17:22:33.3694499</text:p>
          </table:table-cell>
          <table:table-cell table:number-columns-repeated="2"/>
        </table:table-row>
        <table:table-row table:style-name="ro1">
          <table:table-cell office:value-type="float" office:value="412038801" calcext:value-type="float">
            <text:p>412038801</text:p>
          </table:table-cell>
          <table:table-cell office:value-type="float" office:value="603004883.186416" calcext:value-type="float">
            <text:p>603004883.186416</text:p>
          </table:table-cell>
          <table:table-cell/>
          <table:table-cell office:value-type="string" calcext:value-type="string">
            <text:p>2019-02-09T17:21:23.1864160Z</text:p>
          </table:table-cell>
          <table:table-cell office:value-type="string" calcext:value-type="string">
            <text:p>2019-02-09-17:22:32.3704160</text:p>
          </table:table-cell>
          <table:table-cell table:number-columns-repeated="2"/>
        </table:table-row>
        <table:table-row table:style-name="ro1">
          <table:table-cell office:value-type="float" office:value="412125203" calcext:value-type="float">
            <text:p>412125203</text:p>
          </table:table-cell>
          <table:table-cell office:value-type="float" office:value="603091285.18738" calcext:value-type="float">
            <text:p>603091285.18738</text:p>
          </table:table-cell>
          <table:table-cell/>
          <table:table-cell office:value-type="string" calcext:value-type="string">
            <text:p>2019-02-10T17:21:25.1873799Z</text:p>
          </table:table-cell>
          <table:table-cell office:value-type="string" calcext:value-type="string">
            <text:p>2019-02-10-17:22:34.3713799</text:p>
          </table:table-cell>
          <table:table-cell table:number-columns-repeated="2"/>
        </table:table-row>
        <table:table-row table:style-name="ro1">
          <table:table-cell office:value-type="float" office:value="412208000" calcext:value-type="float">
            <text:p>412208000</text:p>
          </table:table-cell>
          <table:table-cell office:value-type="float" office:value="603174082.188303" calcext:value-type="float">
            <text:p>603174082.188303</text:p>
          </table:table-cell>
          <table:table-cell/>
          <table:table-cell office:value-type="string" calcext:value-type="string">
            <text:p>2019-02-11T16:21:22.1883029Z</text:p>
          </table:table-cell>
          <table:table-cell office:value-type="string" calcext:value-type="string">
            <text:p>2019-02-11-16:22:31.3723030</text:p>
          </table:table-cell>
          <table:table-cell table:number-columns-repeated="2"/>
        </table:table-row>
        <table:table-row table:style-name="ro1">
          <table:table-cell office:value-type="float" office:value="412258412" calcext:value-type="float">
            <text:p>412258412</text:p>
          </table:table-cell>
          <table:table-cell office:value-type="float" office:value="603224494.188884" calcext:value-type="float">
            <text:p>603224494.188884</text:p>
          </table:table-cell>
          <table:table-cell/>
          <table:table-cell office:value-type="string" calcext:value-type="string">
            <text:p>2019-02-12T06:21:34.1888840Z</text:p>
          </table:table-cell>
          <table:table-cell office:value-type="string" calcext:value-type="string">
            <text:p>2019-02-12-06:22:43.3728840</text:p>
          </table:table-cell>
          <table:table-cell table:number-columns-repeated="2"/>
        </table:table-row>
        <table:table-row table:style-name="ro1">
          <table:table-cell office:value-type="float" office:value="412359202" calcext:value-type="float">
            <text:p>412359202</text:p>
          </table:table-cell>
          <table:table-cell office:value-type="float" office:value="603325284.190004" calcext:value-type="float">
            <text:p>603325284.190004</text:p>
          </table:table-cell>
          <table:table-cell/>
          <table:table-cell office:value-type="string" calcext:value-type="string">
            <text:p>2019-02-13T10:21:24.1900039Z</text:p>
          </table:table-cell>
          <table:table-cell office:value-type="string" calcext:value-type="string">
            <text:p>2019-02-13-10:22:33.3740040</text:p>
          </table:table-cell>
          <table:table-cell table:number-columns-repeated="2"/>
        </table:table-row>
        <table:table-row table:style-name="ro1">
          <table:table-cell office:value-type="float" office:value="412470808" calcext:value-type="float">
            <text:p>412470808</text:p>
          </table:table-cell>
          <table:table-cell office:value-type="float" office:value="603436890.19125" calcext:value-type="float">
            <text:p>603436890.19125</text:p>
          </table:table-cell>
          <table:table-cell/>
          <table:table-cell office:value-type="string" calcext:value-type="string">
            <text:p>2019-02-14T17:21:30.1912499Z</text:p>
          </table:table-cell>
          <table:table-cell office:value-type="string" calcext:value-type="string">
            <text:p>2019-02-14-17:22:39.3752499</text:p>
          </table:table-cell>
          <table:table-cell table:number-columns-repeated="2"/>
        </table:table-row>
        <table:table-row table:style-name="ro1">
          <table:table-cell office:value-type="float" office:value="412553608" calcext:value-type="float">
            <text:p>412553608</text:p>
          </table:table-cell>
          <table:table-cell office:value-type="float" office:value="603519690.192175" calcext:value-type="float">
            <text:p>603519690.192175</text:p>
          </table:table-cell>
          <table:table-cell/>
          <table:table-cell office:value-type="string" calcext:value-type="string">
            <text:p>2019-02-15T16:21:30.1921750Z</text:p>
          </table:table-cell>
          <table:table-cell office:value-type="string" calcext:value-type="string">
            <text:p>2019-02-15-16:22:39.3761750</text:p>
          </table:table-cell>
          <table:table-cell table:number-columns-repeated="2"/>
        </table:table-row>
        <table:table-row table:style-name="ro1">
          <table:table-cell office:value-type="float" office:value="412643612" calcext:value-type="float">
            <text:p>412643612</text:p>
          </table:table-cell>
          <table:table-cell office:value-type="float" office:value="603609694.193192" calcext:value-type="float">
            <text:p>603609694.193192</text:p>
          </table:table-cell>
          <table:table-cell/>
          <table:table-cell office:value-type="string" calcext:value-type="string">
            <text:p>2019-02-16T17:21:34.1931920Z</text:p>
          </table:table-cell>
          <table:table-cell office:value-type="string" calcext:value-type="string">
            <text:p>2019-02-16-17:22:43.3771920</text:p>
          </table:table-cell>
          <table:table-cell table:number-columns-repeated="2"/>
        </table:table-row>
        <table:table-row table:style-name="ro1">
          <table:table-cell office:value-type="float" office:value="412730950" calcext:value-type="float">
            <text:p>412730950</text:p>
          </table:table-cell>
          <table:table-cell office:value-type="float" office:value="603697032.194171" calcext:value-type="float">
            <text:p>603697032.194171</text:p>
          </table:table-cell>
          <table:table-cell/>
          <table:table-cell office:value-type="string" calcext:value-type="string">
            <text:p>2019-02-17T17:37:12.1941709Z</text:p>
          </table:table-cell>
          <table:table-cell office:value-type="string" calcext:value-type="string">
            <text:p>2019-02-17-17:38:21.3781709</text:p>
          </table:table-cell>
          <table:table-cell table:number-columns-repeated="2"/>
        </table:table-row>
        <table:table-row table:style-name="ro1">
          <table:table-cell office:value-type="float" office:value="412791212" calcext:value-type="float">
            <text:p>412791212</text:p>
          </table:table-cell>
          <table:table-cell office:value-type="float" office:value="603757294.194849" calcext:value-type="float">
            <text:p>603757294.194849</text:p>
          </table:table-cell>
          <table:table-cell/>
          <table:table-cell office:value-type="string" calcext:value-type="string">
            <text:p>2019-02-18T10:21:34.1948490Z</text:p>
          </table:table-cell>
          <table:table-cell office:value-type="string" calcext:value-type="string">
            <text:p>2019-02-18-10:22:43.3788490</text:p>
          </table:table-cell>
          <table:table-cell table:number-columns-repeated="2"/>
        </table:table-row>
        <table:table-row table:style-name="ro1">
          <table:table-cell office:value-type="float" office:value="412877615" calcext:value-type="float">
            <text:p>412877615</text:p>
          </table:table-cell>
          <table:table-cell office:value-type="float" office:value="603843697.195815" calcext:value-type="float">
            <text:p>603843697.195815</text:p>
          </table:table-cell>
          <table:table-cell/>
          <table:table-cell office:value-type="string" calcext:value-type="string">
            <text:p>2019-02-19T10:21:37.1958149Z</text:p>
          </table:table-cell>
          <table:table-cell office:value-type="string" calcext:value-type="string">
            <text:p>2019-02-19-10:22:46.3798149</text:p>
          </table:table-cell>
          <table:table-cell table:number-columns-repeated="2"/>
        </table:table-row>
        <table:table-row table:style-name="ro1">
          <table:table-cell office:value-type="float" office:value="412964013" calcext:value-type="float">
            <text:p>412964013</text:p>
          </table:table-cell>
          <table:table-cell office:value-type="float" office:value="603930095.196792" calcext:value-type="float">
            <text:p>603930095.196792</text:p>
          </table:table-cell>
          <table:table-cell/>
          <table:table-cell office:value-type="string" calcext:value-type="string">
            <text:p>2019-02-20T10:21:35.1967920Z</text:p>
          </table:table-cell>
          <table:table-cell office:value-type="string" calcext:value-type="string">
            <text:p>2019-02-20-10:22:44.3807920</text:p>
          </table:table-cell>
          <table:table-cell table:number-columns-repeated="2"/>
        </table:table-row>
        <table:table-row table:style-name="ro1">
          <table:table-cell office:value-type="float" office:value="413075618" calcext:value-type="float">
            <text:p>413075618</text:p>
          </table:table-cell>
          <table:table-cell office:value-type="float" office:value="604041700.198053" calcext:value-type="float">
            <text:p>604041700.198053</text:p>
          </table:table-cell>
          <table:table-cell/>
          <table:table-cell office:value-type="string" calcext:value-type="string">
            <text:p>2019-02-21T17:21:40.1980530Z</text:p>
          </table:table-cell>
          <table:table-cell office:value-type="string" calcext:value-type="string">
            <text:p>2019-02-21-17:22:49.3820530</text:p>
          </table:table-cell>
          <table:table-cell table:number-columns-repeated="2"/>
        </table:table-row>
        <table:table-row table:style-name="ro1">
          <table:table-cell office:value-type="float" office:value="413162020" calcext:value-type="float">
            <text:p>413162020</text:p>
          </table:table-cell>
          <table:table-cell office:value-type="float" office:value="604128102.199024" calcext:value-type="float">
            <text:p>604128102.199024</text:p>
          </table:table-cell>
          <table:table-cell/>
          <table:table-cell office:value-type="string" calcext:value-type="string">
            <text:p>2019-02-22T17:21:42.1990239Z</text:p>
          </table:table-cell>
          <table:table-cell office:value-type="string" calcext:value-type="string">
            <text:p>2019-02-22-17:22:51.3830239</text:p>
          </table:table-cell>
          <table:table-cell table:number-columns-repeated="2"/>
        </table:table-row>
        <table:table-row table:style-name="ro1">
          <table:table-cell office:value-type="float" office:value="413248423" calcext:value-type="float">
            <text:p>413248423</text:p>
          </table:table-cell>
          <table:table-cell office:value-type="float" office:value="604214505.199991" calcext:value-type="float">
            <text:p>604214505.199991</text:p>
          </table:table-cell>
          <table:table-cell/>
          <table:table-cell office:value-type="string" calcext:value-type="string">
            <text:p>2019-02-23T17:21:45.1999909Z</text:p>
          </table:table-cell>
          <table:table-cell office:value-type="string" calcext:value-type="string">
            <text:p>2019-02-23-17:22:54.3839910</text:p>
          </table:table-cell>
          <table:table-cell table:number-columns-repeated="2"/>
        </table:table-row>
        <table:table-row table:style-name="ro1">
          <table:table-cell office:value-type="float" office:value="413334828" calcext:value-type="float">
            <text:p>413334828</text:p>
          </table:table-cell>
          <table:table-cell office:value-type="float" office:value="604300910.200958" calcext:value-type="float">
            <text:p>604300910.200958</text:p>
          </table:table-cell>
          <table:table-cell/>
          <table:table-cell office:value-type="string" calcext:value-type="string">
            <text:p>2019-02-24T17:21:50.2009580Z</text:p>
          </table:table-cell>
          <table:table-cell office:value-type="string" calcext:value-type="string">
            <text:p>2019-02-24-17:22:59.3849580</text:p>
          </table:table-cell>
          <table:table-cell table:number-columns-repeated="2"/>
        </table:table-row>
        <table:table-row table:style-name="ro1">
          <table:table-cell office:value-type="float" office:value="413421229" calcext:value-type="float">
            <text:p>413421229</text:p>
          </table:table-cell>
          <table:table-cell office:value-type="float" office:value="604387311.201926" calcext:value-type="float">
            <text:p>604387311.201926</text:p>
          </table:table-cell>
          <table:table-cell/>
          <table:table-cell office:value-type="string" calcext:value-type="string">
            <text:p>2019-02-25T17:21:51.2019259Z</text:p>
          </table:table-cell>
          <table:table-cell office:value-type="string" calcext:value-type="string">
            <text:p>2019-02-25-17:23:00.3859260</text:p>
          </table:table-cell>
          <table:table-cell table:number-columns-repeated="2"/>
        </table:table-row>
        <table:table-row table:style-name="ro1">
          <table:table-cell office:value-type="float" office:value="413453619" calcext:value-type="float">
            <text:p>413453619</text:p>
          </table:table-cell>
          <table:table-cell office:value-type="float" office:value="604419701.202292" calcext:value-type="float">
            <text:p>604419701.202292</text:p>
          </table:table-cell>
          <table:table-cell/>
          <table:table-cell office:value-type="string" calcext:value-type="string">
            <text:p>2019-02-26T02:21:41.2022919Z</text:p>
          </table:table-cell>
          <table:table-cell office:value-type="string" calcext:value-type="string">
            <text:p>2019-02-26-02:22:50.3862919</text:p>
          </table:table-cell>
          <table:table-cell table:number-columns-repeated="2"/>
        </table:table-row>
        <table:table-row table:style-name="ro1">
          <table:table-cell office:value-type="float" office:value="413594033" calcext:value-type="float">
            <text:p>413594033</text:p>
          </table:table-cell>
          <table:table-cell office:value-type="float" office:value="604560115.203875" calcext:value-type="float">
            <text:p>604560115.203875</text:p>
          </table:table-cell>
          <table:table-cell/>
          <table:table-cell office:value-type="string" calcext:value-type="string">
            <text:p>2019-02-27T17:21:55.2038749Z</text:p>
          </table:table-cell>
          <table:table-cell office:value-type="string" calcext:value-type="string">
            <text:p>2019-02-27-17:23:04.3878749</text:p>
          </table:table-cell>
          <table:table-cell table:number-columns-repeated="2"/>
        </table:table-row>
        <table:table-row table:style-name="ro1">
          <table:table-cell office:value-type="float" office:value="413673234" calcext:value-type="float">
            <text:p>413673234</text:p>
          </table:table-cell>
          <table:table-cell office:value-type="float" office:value="604639316.204754" calcext:value-type="float">
            <text:p>604639316.204754</text:p>
          </table:table-cell>
          <table:table-cell/>
          <table:table-cell office:value-type="string" calcext:value-type="string">
            <text:p>2019-02-28T15:21:56.2047539Z</text:p>
          </table:table-cell>
          <table:table-cell office:value-type="string" calcext:value-type="string">
            <text:p>2019-02-28-15:23:05.3887540</text:p>
          </table:table-cell>
          <table:table-cell table:number-columns-repeated="2"/>
        </table:table-row>
        <table:table-row table:style-name="ro1">
          <table:table-cell office:value-type="float" office:value="413766861" calcext:value-type="float">
            <text:p>413766861</text:p>
          </table:table-cell>
          <table:table-cell office:value-type="float" office:value="604732943.205833" calcext:value-type="float">
            <text:p>604732943.205833</text:p>
          </table:table-cell>
          <table:table-cell/>
          <table:table-cell office:value-type="string" calcext:value-type="string">
            <text:p>2019-03-01T17:22:23.2058329Z</text:p>
          </table:table-cell>
          <table:table-cell office:value-type="string" calcext:value-type="string">
            <text:p>2019-03-01-17:23:32.3898329</text:p>
          </table:table-cell>
          <table:table-cell table:number-columns-repeated="2"/>
        </table:table-row>
        <table:table-row table:style-name="ro1">
          <table:table-cell office:value-type="float" office:value="413824465" calcext:value-type="float">
            <text:p>413824465</text:p>
          </table:table-cell>
          <table:table-cell office:value-type="float" office:value="604790547.206461" calcext:value-type="float">
            <text:p>604790547.206461</text:p>
          </table:table-cell>
          <table:table-cell/>
          <table:table-cell office:value-type="string" calcext:value-type="string">
            <text:p>2019-03-02T09:22:27.2064609Z</text:p>
          </table:table-cell>
          <table:table-cell office:value-type="string" calcext:value-type="string">
            <text:p>2019-03-02-09:23:36.3904609</text:p>
          </table:table-cell>
          <table:table-cell table:number-columns-repeated="2"/>
        </table:table-row>
        <table:table-row table:style-name="ro1">
          <table:table-cell office:value-type="float" office:value="414113118" calcext:value-type="float">
            <text:p>414113118</text:p>
          </table:table-cell>
          <table:table-cell office:value-type="float" office:value="605079200.20974" calcext:value-type="float">
            <text:p>605079200.20974</text:p>
          </table:table-cell>
          <table:table-cell/>
          <table:table-cell office:value-type="string" calcext:value-type="string">
            <text:p>2019-03-05T17:33:20.2097400Z</text:p>
          </table:table-cell>
          <table:table-cell office:value-type="string" calcext:value-type="string">
            <text:p>2019-03-05-17:34:29.3937400</text:p>
          </table:table-cell>
          <table:table-cell table:number-columns-repeated="2"/>
        </table:table-row>
        <table:table-row table:style-name="ro1">
          <table:table-cell office:value-type="float" office:value="414170077" calcext:value-type="float">
            <text:p>414170077</text:p>
          </table:table-cell>
          <table:table-cell office:value-type="float" office:value="605136159.210355" calcext:value-type="float">
            <text:p>605136159.210355</text:p>
          </table:table-cell>
          <table:table-cell/>
          <table:table-cell office:value-type="string" calcext:value-type="string">
            <text:p>2019-03-06T09:22:39.2103550Z</text:p>
          </table:table-cell>
          <table:table-cell office:value-type="string" calcext:value-type="string">
            <text:p>2019-03-06-09:23:48.3943550</text:p>
          </table:table-cell>
          <table:table-cell table:number-columns-repeated="2"/>
        </table:table-row>
        <table:table-row table:style-name="ro1">
          <table:table-cell office:value-type="float" office:value="414447343" calcext:value-type="float">
            <text:p>414447343</text:p>
          </table:table-cell>
          <table:table-cell office:value-type="float" office:value="605413425.21349" calcext:value-type="float">
            <text:p>605413425.21349</text:p>
          </table:table-cell>
          <table:table-cell/>
          <table:table-cell office:value-type="string" calcext:value-type="string">
            <text:p>2019-03-09T14:23:45.2134900Z</text:p>
          </table:table-cell>
          <table:table-cell office:value-type="string" calcext:value-type="string">
            <text:p>2019-03-09-14:24:54.3974900</text:p>
          </table:table-cell>
          <table:table-cell table:number-columns-repeated="2"/>
        </table:table-row>
        <table:table-row table:style-name="ro1">
          <table:table-cell office:value-type="float" office:value="414497693" calcext:value-type="float">
            <text:p>414497693</text:p>
          </table:table-cell>
          <table:table-cell office:value-type="float" office:value="605463775.214063" calcext:value-type="float">
            <text:p>605463775.214063</text:p>
          </table:table-cell>
          <table:table-cell/>
          <table:table-cell office:value-type="string" calcext:value-type="string">
            <text:p>2019-03-10T04:22:55.2140629Z</text:p>
          </table:table-cell>
          <table:table-cell office:value-type="string" calcext:value-type="string">
            <text:p>2019-03-10-04:24:04.3980629</text:p>
          </table:table-cell>
          <table:table-cell table:number-columns-repeated="2"/>
        </table:table-row>
        <table:table-row table:style-name="ro1">
          <table:table-cell office:value-type="float" office:value="414630949" calcext:value-type="float">
            <text:p>414630949</text:p>
          </table:table-cell>
          <table:table-cell office:value-type="float" office:value="605597031.215556" calcext:value-type="float">
            <text:p>605597031.215556</text:p>
          </table:table-cell>
          <table:table-cell/>
          <table:table-cell office:value-type="string" calcext:value-type="string">
            <text:p>2019-03-11T17:23:51.2155560Z</text:p>
          </table:table-cell>
          <table:table-cell office:value-type="string" calcext:value-type="string">
            <text:p>2019-03-11-17:25:00.3995560</text:p>
          </table:table-cell>
          <table:table-cell table:number-columns-repeated="2"/>
        </table:table-row>
        <table:table-row table:style-name="ro1">
          <table:table-cell office:value-type="float" office:value="414695706" calcext:value-type="float">
            <text:p>414695706</text:p>
          </table:table-cell>
          <table:table-cell office:value-type="float" office:value="605661788.216288" calcext:value-type="float">
            <text:p>605661788.216288</text:p>
          </table:table-cell>
          <table:table-cell/>
          <table:table-cell office:value-type="string" calcext:value-type="string">
            <text:p>2019-03-12T11:23:08.2162879Z</text:p>
          </table:table-cell>
          <table:table-cell office:value-type="string" calcext:value-type="string">
            <text:p>2019-03-12-11:24:17.4002879</text:p>
          </table:table-cell>
          <table:table-cell table:number-columns-repeated="2"/>
        </table:table-row>
        <table:table-row table:style-name="ro1">
          <table:table-cell office:value-type="float" office:value="414976504" calcext:value-type="float">
            <text:p>414976504</text:p>
          </table:table-cell>
          <table:table-cell office:value-type="float" office:value="605942586.219455" calcext:value-type="float">
            <text:p>605942586.219455</text:p>
          </table:table-cell>
          <table:table-cell/>
          <table:table-cell office:value-type="string" calcext:value-type="string">
            <text:p>2019-03-15T17:23:06.2194550Z</text:p>
          </table:table-cell>
          <table:table-cell office:value-type="string" calcext:value-type="string">
            <text:p>2019-03-15-17:24:15.4034550</text:p>
          </table:table-cell>
          <table:table-cell table:number-columns-repeated="2"/>
        </table:table-row>
        <table:table-row table:style-name="ro1">
          <table:table-cell office:value-type="float" office:value="415221366" calcext:value-type="float">
            <text:p>415221366</text:p>
          </table:table-cell>
          <table:table-cell office:value-type="float" office:value="606187448.222199" calcext:value-type="float">
            <text:p>606187448.222199</text:p>
          </table:table-cell>
          <table:table-cell/>
          <table:table-cell office:value-type="string" calcext:value-type="string">
            <text:p>2019-03-18T13:24:08.2221989Z</text:p>
          </table:table-cell>
          <table:table-cell office:value-type="string" calcext:value-type="string">
            <text:p>2019-03-18-13:25:17.4061989</text:p>
          </table:table-cell>
          <table:table-cell table:number-columns-repeated="2"/>
        </table:table-row>
        <table:table-row table:style-name="ro1">
          <table:table-cell office:value-type="float" office:value="415264522" calcext:value-type="float">
            <text:p>415264522</text:p>
          </table:table-cell>
          <table:table-cell office:value-type="float" office:value="606230604.222713" calcext:value-type="float">
            <text:p>606230604.222713</text:p>
          </table:table-cell>
          <table:table-cell/>
          <table:table-cell office:value-type="string" calcext:value-type="string">
            <text:p>2019-03-19T01:23:24.2227129Z</text:p>
          </table:table-cell>
          <table:table-cell office:value-type="string" calcext:value-type="string">
            <text:p>2019-03-19-01:24:33.4067130</text:p>
          </table:table-cell>
          <table:table-cell table:number-columns-repeated="2"/>
        </table:table-row>
        <table:table-row table:style-name="ro1">
          <table:table-cell office:value-type="float" office:value="415476906" calcext:value-type="float">
            <text:p>415476906</text:p>
          </table:table-cell>
          <table:table-cell office:value-type="float" office:value="606442988.225097" calcext:value-type="float">
            <text:p>606442988.225097</text:p>
          </table:table-cell>
          <table:table-cell/>
          <table:table-cell office:value-type="string" calcext:value-type="string">
            <text:p>2019-03-21T12:23:08.2250969Z</text:p>
          </table:table-cell>
          <table:table-cell office:value-type="string" calcext:value-type="string">
            <text:p>2019-03-21-12:24:17.4090969</text:p>
          </table:table-cell>
          <table:table-cell table:number-columns-repeated="2"/>
        </table:table-row>
        <table:table-row table:style-name="ro1">
          <table:table-cell office:value-type="float" office:value="415581313" calcext:value-type="float">
            <text:p>415581313</text:p>
          </table:table-cell>
          <table:table-cell office:value-type="float" office:value="606547395.226297" calcext:value-type="float">
            <text:p>606547395.226297</text:p>
          </table:table-cell>
          <table:table-cell/>
          <table:table-cell office:value-type="string" calcext:value-type="string">
            <text:p>2019-03-22T17:23:15.2262970Z</text:p>
          </table:table-cell>
          <table:table-cell office:value-type="string" calcext:value-type="string">
            <text:p>2019-03-22-17:24:24.4102970</text:p>
          </table:table-cell>
          <table:table-cell table:number-columns-repeated="2"/>
        </table:table-row>
        <table:table-row table:style-name="ro1">
          <table:table-cell office:value-type="float" office:value="415664117" calcext:value-type="float">
            <text:p>415664117</text:p>
          </table:table-cell>
          <table:table-cell office:value-type="float" office:value="606630199.227219" calcext:value-type="float">
            <text:p>606630199.227219</text:p>
          </table:table-cell>
          <table:table-cell/>
          <table:table-cell office:value-type="string" calcext:value-type="string">
            <text:p>2019-03-23T16:23:19.2272189Z</text:p>
          </table:table-cell>
          <table:table-cell office:value-type="string" calcext:value-type="string">
            <text:p>2019-03-23-16:24:28.4112190</text:p>
          </table:table-cell>
          <table:table-cell table:number-columns-repeated="2"/>
        </table:table-row>
        <table:table-row table:style-name="ro1">
          <table:table-cell office:value-type="float" office:value="415754125" calcext:value-type="float">
            <text:p>415754125</text:p>
          </table:table-cell>
          <table:table-cell office:value-type="float" office:value="606720207.228242" calcext:value-type="float">
            <text:p>606720207.228242</text:p>
          </table:table-cell>
          <table:table-cell/>
          <table:table-cell office:value-type="string" calcext:value-type="string">
            <text:p>2019-03-24T17:23:27.2282420Z</text:p>
          </table:table-cell>
          <table:table-cell office:value-type="string" calcext:value-type="string">
            <text:p>2019-03-24-17:24:36.4122420</text:p>
          </table:table-cell>
          <table:table-cell table:number-columns-repeated="2"/>
        </table:table-row>
        <table:table-row table:style-name="ro1">
          <table:table-cell office:value-type="float" office:value="415829726" calcext:value-type="float">
            <text:p>415829726</text:p>
          </table:table-cell>
          <table:table-cell office:value-type="float" office:value="606795808.229079" calcext:value-type="float">
            <text:p>606795808.229079</text:p>
          </table:table-cell>
          <table:table-cell/>
          <table:table-cell office:value-type="string" calcext:value-type="string">
            <text:p>2019-03-25T14:23:28.2290790Z</text:p>
          </table:table-cell>
          <table:table-cell office:value-type="string" calcext:value-type="string">
            <text:p>2019-03-25-14:24:37.4130790</text:p>
          </table:table-cell>
          <table:table-cell table:number-columns-repeated="2"/>
        </table:table-row>
        <table:table-row table:style-name="ro1">
          <table:table-cell office:value-type="float" office:value="415894527" calcext:value-type="float">
            <text:p>415894527</text:p>
          </table:table-cell>
          <table:table-cell office:value-type="float" office:value="606860609.229828" calcext:value-type="float">
            <text:p>606860609.229828</text:p>
          </table:table-cell>
          <table:table-cell/>
          <table:table-cell office:value-type="string" calcext:value-type="string">
            <text:p>2019-03-26T08:23:29.2298280Z</text:p>
          </table:table-cell>
          <table:table-cell office:value-type="string" calcext:value-type="string">
            <text:p>2019-03-26-08:24:38.4138280</text:p>
          </table:table-cell>
          <table:table-cell table:number-columns-repeated="2"/>
        </table:table-row>
        <table:table-row table:style-name="ro1">
          <table:table-cell office:value-type="float" office:value="415952125" calcext:value-type="float">
            <text:p>415952125</text:p>
          </table:table-cell>
          <table:table-cell office:value-type="float" office:value="606918207.230459" calcext:value-type="float">
            <text:p>606918207.230459</text:p>
          </table:table-cell>
          <table:table-cell/>
          <table:table-cell office:value-type="string" calcext:value-type="string">
            <text:p>2019-03-27T00:23:27.2304589Z</text:p>
          </table:table-cell>
          <table:table-cell office:value-type="string" calcext:value-type="string">
            <text:p>2019-03-27-00:24:36.4144589</text:p>
          </table:table-cell>
          <table:table-cell table:number-columns-repeated="2"/>
        </table:table-row>
        <table:table-row table:style-name="ro1">
          <table:table-cell office:value-type="float" office:value="416038525" calcext:value-type="float">
            <text:p>416038525</text:p>
          </table:table-cell>
          <table:table-cell office:value-type="float" office:value="607004607.231451" calcext:value-type="float">
            <text:p>607004607.231451</text:p>
          </table:table-cell>
          <table:table-cell/>
          <table:table-cell office:value-type="string" calcext:value-type="string">
            <text:p>2019-03-28T00:23:27.2314510Z</text:p>
          </table:table-cell>
          <table:table-cell office:value-type="string" calcext:value-type="string">
            <text:p>2019-03-28-00:24:36.4154510</text:p>
          </table:table-cell>
          <table:table-cell table:number-columns-repeated="2"/>
        </table:table-row>
        <table:table-row table:style-name="ro1">
          <table:table-cell office:value-type="float" office:value="416186144" calcext:value-type="float">
            <text:p>416186144</text:p>
          </table:table-cell>
          <table:table-cell office:value-type="float" office:value="607152226.233129" calcext:value-type="float">
            <text:p>607152226.233129</text:p>
          </table:table-cell>
          <table:table-cell/>
          <table:table-cell office:value-type="string" calcext:value-type="string">
            <text:p>2019-03-29T17:23:46.2331290Z</text:p>
          </table:table-cell>
          <table:table-cell office:value-type="string" calcext:value-type="string">
            <text:p>2019-03-29-17:24:55.4171290</text:p>
          </table:table-cell>
          <table:table-cell table:number-columns-repeated="2"/>
        </table:table-row>
        <table:table-row table:style-name="ro1">
          <table:table-cell office:value-type="float" office:value="416272549" calcext:value-type="float">
            <text:p>416272549</text:p>
          </table:table-cell>
          <table:table-cell office:value-type="float" office:value="607238631.234109" calcext:value-type="float">
            <text:p>607238631.234109</text:p>
          </table:table-cell>
          <table:table-cell/>
          <table:table-cell office:value-type="string" calcext:value-type="string">
            <text:p>2019-03-30T17:23:51.2341090Z</text:p>
          </table:table-cell>
          <table:table-cell office:value-type="string" calcext:value-type="string">
            <text:p>2019-03-30-17:25:00.4181090</text:p>
          </table:table-cell>
          <table:table-cell table:number-columns-repeated="2"/>
        </table:table-row>
        <table:table-row table:style-name="ro1">
          <table:table-cell office:value-type="float" office:value="416358953" calcext:value-type="float">
            <text:p>416358953</text:p>
          </table:table-cell>
          <table:table-cell office:value-type="float" office:value="607325035.235087" calcext:value-type="float">
            <text:p>607325035.235087</text:p>
          </table:table-cell>
          <table:table-cell/>
          <table:table-cell office:value-type="string" calcext:value-type="string">
            <text:p>2019-03-31T17:23:55.2350870Z</text:p>
          </table:table-cell>
          <table:table-cell office:value-type="string" calcext:value-type="string">
            <text:p>2019-03-31-17:25:04.4190870</text:p>
          </table:table-cell>
          <table:table-cell table:number-columns-repeated="2"/>
        </table:table-row>
        <table:table-row table:style-name="ro1">
          <table:table-cell office:value-type="float" office:value="416416553" calcext:value-type="float">
            <text:p>416416553</text:p>
          </table:table-cell>
          <table:table-cell office:value-type="float" office:value="607382635.235729" calcext:value-type="float">
            <text:p>607382635.235729</text:p>
          </table:table-cell>
          <table:table-cell/>
          <table:table-cell office:value-type="string" calcext:value-type="string">
            <text:p>2019-04-01T09:23:55.2357289Z</text:p>
          </table:table-cell>
          <table:table-cell office:value-type="string" calcext:value-type="string">
            <text:p>2019-04-01-09:25:04.4197289</text:p>
          </table:table-cell>
          <table:table-cell table:number-columns-repeated="2"/>
        </table:table-row>
        <table:table-row table:style-name="ro1">
          <table:table-cell office:value-type="float" office:value="416513755" calcext:value-type="float">
            <text:p>416513755</text:p>
          </table:table-cell>
          <table:table-cell office:value-type="float" office:value="607479837.236816" calcext:value-type="float">
            <text:p>607479837.236816</text:p>
          </table:table-cell>
          <table:table-cell/>
          <table:table-cell office:value-type="string" calcext:value-type="string">
            <text:p>2019-04-02T12:23:57.2368159Z</text:p>
          </table:table-cell>
          <table:table-cell office:value-type="string" calcext:value-type="string">
            <text:p>2019-04-02-12:25:06.4208159</text:p>
          </table:table-cell>
          <table:table-cell table:number-columns-repeated="2"/>
        </table:table-row>
        <table:table-row table:style-name="ro1">
          <table:table-cell office:value-type="float" office:value="416600163" calcext:value-type="float">
            <text:p>416600163</text:p>
          </table:table-cell>
          <table:table-cell office:value-type="float" office:value="607566245.237791" calcext:value-type="float">
            <text:p>607566245.237791</text:p>
          </table:table-cell>
          <table:table-cell/>
          <table:table-cell office:value-type="string" calcext:value-type="string">
            <text:p>2019-04-03T12:24:05.2377909Z</text:p>
          </table:table-cell>
          <table:table-cell office:value-type="string" calcext:value-type="string">
            <text:p>2019-04-03-12:25:14.4217909</text:p>
          </table:table-cell>
          <table:table-cell table:number-columns-repeated="2"/>
        </table:table-row>
        <table:table-row table:style-name="ro1">
          <table:table-cell office:value-type="float" office:value="416790976" calcext:value-type="float">
            <text:p>416790976</text:p>
          </table:table-cell>
          <table:table-cell office:value-type="float" office:value="607757058.239994" calcext:value-type="float">
            <text:p>607757058.239994</text:p>
          </table:table-cell>
          <table:table-cell/>
          <table:table-cell office:value-type="string" calcext:value-type="string">
            <text:p>2019-04-05T17:24:18.2399939Z</text:p>
          </table:table-cell>
          <table:table-cell office:value-type="string" calcext:value-type="string">
            <text:p>2019-04-05-17:25:27.4239939</text:p>
          </table:table-cell>
          <table:table-cell table:number-columns-repeated="2"/>
        </table:table-row>
        <table:table-row table:style-name="ro1">
          <table:table-cell office:value-type="float" office:value="416798165" calcext:value-type="float">
            <text:p>416798165</text:p>
          </table:table-cell>
          <table:table-cell office:value-type="float" office:value="607764247.240074" calcext:value-type="float">
            <text:p>607764247.240074</text:p>
          </table:table-cell>
          <table:table-cell/>
          <table:table-cell office:value-type="string" calcext:value-type="string">
            <text:p>2019-04-05T19:24:07.2400740Z</text:p>
          </table:table-cell>
          <table:table-cell office:value-type="string" calcext:value-type="string">
            <text:p>2019-04-05-19:25:16.4240740</text:p>
          </table:table-cell>
          <table:table-cell table:number-columns-repeated="2"/>
        </table:table-row>
        <table:table-row table:style-name="ro1">
          <table:table-cell office:value-type="float" office:value="416960183" calcext:value-type="float">
            <text:p>416960183</text:p>
          </table:table-cell>
          <table:table-cell office:value-type="float" office:value="607926265.241906" calcext:value-type="float">
            <text:p>607926265.241906</text:p>
          </table:table-cell>
          <table:table-cell/>
          <table:table-cell office:value-type="string" calcext:value-type="string">
            <text:p>2019-04-07T16:24:25.2419059Z</text:p>
          </table:table-cell>
          <table:table-cell office:value-type="string" calcext:value-type="string">
            <text:p>2019-04-07-16:25:34.4259059</text:p>
          </table:table-cell>
          <table:table-cell table:number-columns-repeated="2"/>
        </table:table-row>
        <table:table-row table:style-name="ro1">
          <table:table-cell office:value-type="float" office:value="417042988" calcext:value-type="float">
            <text:p>417042988</text:p>
          </table:table-cell>
          <table:table-cell office:value-type="float" office:value="608009070.242842" calcext:value-type="float">
            <text:p>608009070.242842</text:p>
          </table:table-cell>
          <table:table-cell/>
          <table:table-cell office:value-type="string" calcext:value-type="string">
            <text:p>2019-04-08T15:24:30.2428419Z</text:p>
          </table:table-cell>
          <table:table-cell office:value-type="string" calcext:value-type="string">
            <text:p>2019-04-08-15:25:39.4268419</text:p>
          </table:table-cell>
          <table:table-cell table:number-columns-repeated="2"/>
        </table:table-row>
        <table:table-row table:style-name="ro1">
          <table:table-cell office:value-type="float" office:value="417132992" calcext:value-type="float">
            <text:p>417132992</text:p>
          </table:table-cell>
          <table:table-cell office:value-type="float" office:value="608099074.243881" calcext:value-type="float">
            <text:p>608099074.243881</text:p>
          </table:table-cell>
          <table:table-cell/>
          <table:table-cell office:value-type="string" calcext:value-type="string">
            <text:p>2019-04-09T16:24:34.2438809Z</text:p>
          </table:table-cell>
          <table:table-cell office:value-type="string" calcext:value-type="string">
            <text:p>2019-04-09-16:25:43.4278810</text:p>
          </table:table-cell>
          <table:table-cell table:number-columns-repeated="2"/>
        </table:table-row>
        <table:table-row table:style-name="ro1">
          <table:table-cell office:value-type="float" office:value="417208595" calcext:value-type="float">
            <text:p>417208595</text:p>
          </table:table-cell>
          <table:table-cell office:value-type="float" office:value="608174677.244725" calcext:value-type="float">
            <text:p>608174677.244725</text:p>
          </table:table-cell>
          <table:table-cell/>
          <table:table-cell office:value-type="string" calcext:value-type="string">
            <text:p>2019-04-10T13:24:37.2447249Z</text:p>
          </table:table-cell>
          <table:table-cell office:value-type="string" calcext:value-type="string">
            <text:p>2019-04-10-13:25:46.4287250</text:p>
          </table:table-cell>
          <table:table-cell table:number-columns-repeated="2"/>
        </table:table-row>
        <table:table-row table:style-name="ro1">
          <table:table-cell office:value-type="float" office:value="417298601" calcext:value-type="float">
            <text:p>417298601</text:p>
          </table:table-cell>
          <table:table-cell office:value-type="float" office:value="608264683.245749" calcext:value-type="float">
            <text:p>608264683.245749</text:p>
          </table:table-cell>
          <table:table-cell/>
          <table:table-cell office:value-type="string" calcext:value-type="string">
            <text:p>2019-04-11T14:24:43.2457489Z</text:p>
          </table:table-cell>
          <table:table-cell office:value-type="string" calcext:value-type="string">
            <text:p>2019-04-11-14:25:52.4297490</text:p>
          </table:table-cell>
          <table:table-cell table:number-columns-repeated="2"/>
        </table:table-row>
        <table:table-row table:style-name="ro1">
          <table:table-cell office:value-type="float" office:value="417395808" calcext:value-type="float">
            <text:p>417395808</text:p>
          </table:table-cell>
          <table:table-cell office:value-type="float" office:value="608361890.246874" calcext:value-type="float">
            <text:p>608361890.246874</text:p>
          </table:table-cell>
          <table:table-cell/>
          <table:table-cell office:value-type="string" calcext:value-type="string">
            <text:p>2019-04-12T17:24:50.2468739Z</text:p>
          </table:table-cell>
          <table:table-cell office:value-type="string" calcext:value-type="string">
            <text:p>2019-04-12-17:25:59.4308739</text:p>
          </table:table-cell>
          <table:table-cell table:number-columns-repeated="2"/>
        </table:table-row>
        <table:table-row table:style-name="ro1">
          <table:table-cell office:value-type="float" office:value="417475012" calcext:value-type="float">
            <text:p>417475012</text:p>
          </table:table-cell>
          <table:table-cell office:value-type="float" office:value="608441094.24776" calcext:value-type="float">
            <text:p>608441094.24776</text:p>
          </table:table-cell>
          <table:table-cell/>
          <table:table-cell office:value-type="string" calcext:value-type="string">
            <text:p>2019-04-13T15:24:54.2477599Z</text:p>
          </table:table-cell>
          <table:table-cell office:value-type="string" calcext:value-type="string">
            <text:p>2019-04-13-15:26:03.4317599</text:p>
          </table:table-cell>
          <table:table-cell table:number-columns-repeated="2"/>
        </table:table-row>
        <table:table-row table:style-name="ro1">
          <table:table-cell office:value-type="float" office:value="417554212" calcext:value-type="float">
            <text:p>417554212</text:p>
          </table:table-cell>
          <table:table-cell office:value-type="float" office:value="608520294.248657" calcext:value-type="float">
            <text:p>608520294.248657</text:p>
          </table:table-cell>
          <table:table-cell/>
          <table:table-cell office:value-type="string" calcext:value-type="string">
            <text:p>2019-04-14T13:24:54.2486569Z</text:p>
          </table:table-cell>
          <table:table-cell office:value-type="string" calcext:value-type="string">
            <text:p>2019-04-14-13:26:03.4326570</text:p>
          </table:table-cell>
          <table:table-cell table:number-columns-repeated="2"/>
        </table:table-row>
        <table:table-row table:style-name="ro1">
          <table:table-cell office:value-type="float" office:value="417622612" calcext:value-type="float">
            <text:p>417622612</text:p>
          </table:table-cell>
          <table:table-cell office:value-type="float" office:value="608588694.249452" calcext:value-type="float">
            <text:p>608588694.249452</text:p>
          </table:table-cell>
          <table:table-cell/>
          <table:table-cell office:value-type="string" calcext:value-type="string">
            <text:p>2019-04-15T08:24:54.2494519Z</text:p>
          </table:table-cell>
          <table:table-cell office:value-type="string" calcext:value-type="string">
            <text:p>2019-04-15-08:26:03.4334520</text:p>
          </table:table-cell>
          <table:table-cell table:number-columns-repeated="2"/>
        </table:table-row>
        <table:table-row table:style-name="ro1">
          <table:table-cell office:value-type="float" office:value="417734225" calcext:value-type="float">
            <text:p>417734225</text:p>
          </table:table-cell>
          <table:table-cell office:value-type="float" office:value="608700307.250733" calcext:value-type="float">
            <text:p>608700307.250733</text:p>
          </table:table-cell>
          <table:table-cell/>
          <table:table-cell office:value-type="string" calcext:value-type="string">
            <text:p>2019-04-16T15:25:07.2507330Z</text:p>
          </table:table-cell>
          <table:table-cell office:value-type="string" calcext:value-type="string">
            <text:p>2019-04-16-15:26:16.4347330</text:p>
          </table:table-cell>
          <table:table-cell table:number-columns-repeated="2"/>
        </table:table-row>
        <table:table-row table:style-name="ro1">
          <table:table-cell office:value-type="float" office:value="417813428" calcext:value-type="float">
            <text:p>417813428</text:p>
          </table:table-cell>
          <table:table-cell office:value-type="float" office:value="608779510.251627" calcext:value-type="float">
            <text:p>608779510.251627</text:p>
          </table:table-cell>
          <table:table-cell/>
          <table:table-cell office:value-type="string" calcext:value-type="string">
            <text:p>2019-04-17T13:25:10.2516269Z</text:p>
          </table:table-cell>
          <table:table-cell office:value-type="string" calcext:value-type="string">
            <text:p>2019-04-17-13:26:19.4356269</text:p>
          </table:table-cell>
          <table:table-cell table:number-columns-repeated="2"/>
        </table:table-row>
        <table:table-row table:style-name="ro1">
          <table:table-cell office:value-type="float" office:value="417910631" calcext:value-type="float">
            <text:p>417910631</text:p>
          </table:table-cell>
          <table:table-cell office:value-type="float" office:value="608876713.252748" calcext:value-type="float">
            <text:p>608876713.252748</text:p>
          </table:table-cell>
          <table:table-cell/>
          <table:table-cell office:value-type="string" calcext:value-type="string">
            <text:p>2019-04-18T16:25:13.2527480Z</text:p>
          </table:table-cell>
          <table:table-cell office:value-type="string" calcext:value-type="string">
            <text:p>2019-04-18-16:26:22.4367480</text:p>
          </table:table-cell>
          <table:table-cell table:number-columns-repeated="2"/>
        </table:table-row>
        <table:table-row table:style-name="ro1">
          <table:table-cell office:value-type="float" office:value="417989834" calcext:value-type="float">
            <text:p>417989834</text:p>
          </table:table-cell>
          <table:table-cell office:value-type="float" office:value="608955916.25365" calcext:value-type="float">
            <text:p>608955916.25365</text:p>
          </table:table-cell>
          <table:table-cell/>
          <table:table-cell office:value-type="string" calcext:value-type="string">
            <text:p>2019-04-19T14:25:16.2536499Z</text:p>
          </table:table-cell>
          <table:table-cell office:value-type="string" calcext:value-type="string">
            <text:p>2019-04-19-14:26:25.4376499</text:p>
          </table:table-cell>
          <table:table-cell table:number-columns-repeated="2"/>
        </table:table-row>
        <table:table-row table:style-name="ro1">
          <table:table-cell office:value-type="float" office:value="418083444" calcext:value-type="float">
            <text:p>418083444</text:p>
          </table:table-cell>
          <table:table-cell office:value-type="float" office:value="609049526.254728" calcext:value-type="float">
            <text:p>609049526.254728</text:p>
          </table:table-cell>
          <table:table-cell/>
          <table:table-cell office:value-type="string" calcext:value-type="string">
            <text:p>2019-04-20T16:25:26.2547279Z</text:p>
          </table:table-cell>
          <table:table-cell office:value-type="string" calcext:value-type="string">
            <text:p>2019-04-20-16:26:35.4387279</text:p>
          </table:table-cell>
          <table:table-cell table:number-columns-repeated="2"/>
        </table:table-row>
        <table:table-row table:style-name="ro1">
          <table:table-cell office:value-type="float" office:value="418173451" calcext:value-type="float">
            <text:p>418173451</text:p>
          </table:table-cell>
          <table:table-cell office:value-type="float" office:value="609139533.255759" calcext:value-type="float">
            <text:p>609139533.255759</text:p>
          </table:table-cell>
          <table:table-cell/>
          <table:table-cell office:value-type="string" calcext:value-type="string">
            <text:p>2019-04-21T17:25:33.2557590Z</text:p>
          </table:table-cell>
          <table:table-cell office:value-type="string" calcext:value-type="string">
            <text:p>2019-04-21-17:26:42.4397590</text:p>
          </table:table-cell>
          <table:table-cell table:number-columns-repeated="2"/>
        </table:table-row>
        <table:table-row table:style-name="ro1">
          <table:table-cell office:value-type="float" office:value="418252649" calcext:value-type="float">
            <text:p>418252649</text:p>
          </table:table-cell>
          <table:table-cell office:value-type="float" office:value="609218731.256673" calcext:value-type="float">
            <text:p>609218731.256673</text:p>
          </table:table-cell>
          <table:table-cell/>
          <table:table-cell office:value-type="string" calcext:value-type="string">
            <text:p>2019-04-22T15:25:31.2566729Z</text:p>
          </table:table-cell>
          <table:table-cell office:value-type="string" calcext:value-type="string">
            <text:p>2019-04-22-15:26:40.4406729</text:p>
          </table:table-cell>
          <table:table-cell table:number-columns-repeated="2"/>
        </table:table-row>
        <table:table-row table:style-name="ro1">
          <table:table-cell office:value-type="float" office:value="418335454" calcext:value-type="float">
            <text:p>418335454</text:p>
          </table:table-cell>
          <table:table-cell office:value-type="float" office:value="609301536.257607" calcext:value-type="float">
            <text:p>609301536.257607</text:p>
          </table:table-cell>
          <table:table-cell/>
          <table:table-cell office:value-type="string" calcext:value-type="string">
            <text:p>2019-04-23T14:25:36.2576069Z</text:p>
          </table:table-cell>
          <table:table-cell office:value-type="string" calcext:value-type="string">
            <text:p>2019-04-23-14:26:45.4416069</text:p>
          </table:table-cell>
          <table:table-cell table:number-columns-repeated="2"/>
        </table:table-row>
        <table:table-row table:style-name="ro1">
          <table:table-cell office:value-type="float" office:value="418429061" calcext:value-type="float">
            <text:p>418429061</text:p>
          </table:table-cell>
          <table:table-cell office:value-type="float" office:value="609395143.258693" calcext:value-type="float">
            <text:p>609395143.258693</text:p>
          </table:table-cell>
          <table:table-cell/>
          <table:table-cell office:value-type="string" calcext:value-type="string">
            <text:p>2019-04-24T16:25:43.2586929Z</text:p>
          </table:table-cell>
          <table:table-cell office:value-type="string" calcext:value-type="string">
            <text:p>2019-04-24-16:26:52.4426929</text:p>
          </table:table-cell>
          <table:table-cell table:number-columns-repeated="2"/>
        </table:table-row>
        <table:table-row table:style-name="ro1">
          <table:table-cell office:value-type="float" office:value="418508262" calcext:value-type="float">
            <text:p>418508262</text:p>
          </table:table-cell>
          <table:table-cell office:value-type="float" office:value="609474344.259594" calcext:value-type="float">
            <text:p>609474344.259594</text:p>
          </table:table-cell>
          <table:table-cell/>
          <table:table-cell office:value-type="string" calcext:value-type="string">
            <text:p>2019-04-25T14:25:44.2595939Z</text:p>
          </table:table-cell>
          <table:table-cell office:value-type="string" calcext:value-type="string">
            <text:p>2019-04-25-14:26:53.4435939</text:p>
          </table:table-cell>
          <table:table-cell table:number-columns-repeated="2"/>
        </table:table-row>
        <table:table-row table:style-name="ro1">
          <table:table-cell office:value-type="float" office:value="418601867" calcext:value-type="float">
            <text:p>418601867</text:p>
          </table:table-cell>
          <table:table-cell office:value-type="float" office:value="609567949.260668" calcext:value-type="float">
            <text:p>609567949.260668</text:p>
          </table:table-cell>
          <table:table-cell/>
          <table:table-cell office:value-type="string" calcext:value-type="string">
            <text:p>2019-04-26T16:25:49.2606680Z</text:p>
          </table:table-cell>
          <table:table-cell office:value-type="string" calcext:value-type="string">
            <text:p>2019-04-26-16:26:58.4446680</text:p>
          </table:table-cell>
          <table:table-cell table:number-columns-repeated="2"/>
        </table:table-row>
        <table:table-row table:style-name="ro1">
          <table:table-cell office:value-type="float" office:value="418673868" calcext:value-type="float">
            <text:p>418673868</text:p>
          </table:table-cell>
          <table:table-cell office:value-type="float" office:value="609639950.261481" calcext:value-type="float">
            <text:p>609639950.261481</text:p>
          </table:table-cell>
          <table:table-cell/>
          <table:table-cell office:value-type="string" calcext:value-type="string">
            <text:p>2019-04-27T12:25:50.2614809Z</text:p>
          </table:table-cell>
          <table:table-cell office:value-type="string" calcext:value-type="string">
            <text:p>2019-04-27-12:26:59.4454809</text:p>
          </table:table-cell>
          <table:table-cell table:number-columns-repeated="2"/>
        </table:table-row>
        <table:table-row table:style-name="ro1">
          <table:table-cell office:value-type="float" office:value="418771076" calcext:value-type="float">
            <text:p>418771076</text:p>
          </table:table-cell>
          <table:table-cell office:value-type="float" office:value="609737158.262605" calcext:value-type="float">
            <text:p>609737158.262605</text:p>
          </table:table-cell>
          <table:table-cell/>
          <table:table-cell office:value-type="string" calcext:value-type="string">
            <text:p>2019-04-28T15:25:58.2626049Z</text:p>
          </table:table-cell>
          <table:table-cell office:value-type="string" calcext:value-type="string">
            <text:p>2019-04-28-15:27:07.4466049</text:p>
          </table:table-cell>
          <table:table-cell table:number-columns-repeated="2"/>
        </table:table-row>
        <table:table-row table:style-name="ro1">
          <table:table-cell office:value-type="float" office:value="418857479" calcext:value-type="float">
            <text:p>418857479</text:p>
          </table:table-cell>
          <table:table-cell office:value-type="float" office:value="609823561.263604" calcext:value-type="float">
            <text:p>609823561.263604</text:p>
          </table:table-cell>
          <table:table-cell/>
          <table:table-cell office:value-type="string" calcext:value-type="string">
            <text:p>2019-04-29T15:26:01.2636039Z</text:p>
          </table:table-cell>
          <table:table-cell office:value-type="string" calcext:value-type="string">
            <text:p>2019-04-29-15:27:10.4476039</text:p>
          </table:table-cell>
          <table:table-cell table:number-columns-repeated="2"/>
        </table:table-row>
        <table:table-row table:style-name="ro1">
          <table:table-cell office:value-type="float" office:value="418918687" calcext:value-type="float">
            <text:p>418918687</text:p>
          </table:table-cell>
          <table:table-cell office:value-type="float" office:value="609884769.264295" calcext:value-type="float">
            <text:p>609884769.264295</text:p>
          </table:table-cell>
          <table:table-cell/>
          <table:table-cell office:value-type="string" calcext:value-type="string">
            <text:p>2019-04-30T08:26:09.2642949Z</text:p>
          </table:table-cell>
          <table:table-cell office:value-type="string" calcext:value-type="string">
            <text:p>2019-04-30-08:27:18.4482949</text:p>
          </table:table-cell>
          <table:table-cell table:number-columns-repeated="2"/>
        </table:table-row>
        <table:table-row table:style-name="ro1">
          <table:table-cell office:value-type="float" office:value="419001482" calcext:value-type="float">
            <text:p>419001482</text:p>
          </table:table-cell>
          <table:table-cell office:value-type="float" office:value="609967564.265242" calcext:value-type="float">
            <text:p>609967564.265242</text:p>
          </table:table-cell>
          <table:table-cell/>
          <table:table-cell office:value-type="string" calcext:value-type="string">
            <text:p>2019-05-01T07:26:04.2652419Z</text:p>
          </table:table-cell>
          <table:table-cell office:value-type="string" calcext:value-type="string">
            <text:p>2019-05-01-07:27:13.4492419</text:p>
          </table:table-cell>
          <table:table-cell table:number-columns-repeated="2"/>
        </table:table-row>
        <table:table-row table:style-name="ro1">
          <table:table-cell office:value-type="float" office:value="419116692" calcext:value-type="float">
            <text:p>419116692</text:p>
          </table:table-cell>
          <table:table-cell office:value-type="float" office:value="610082774.266583" calcext:value-type="float">
            <text:p>610082774.266583</text:p>
          </table:table-cell>
          <table:table-cell/>
          <table:table-cell office:value-type="string" calcext:value-type="string">
            <text:p>2019-05-02T15:26:14.2665829Z</text:p>
          </table:table-cell>
          <table:table-cell office:value-type="string" calcext:value-type="string">
            <text:p>2019-05-02-15:27:23.4505829</text:p>
          </table:table-cell>
          <table:table-cell table:number-columns-repeated="2"/>
        </table:table-row>
        <table:table-row table:style-name="ro1">
          <table:table-cell office:value-type="float" office:value="419296709" calcext:value-type="float">
            <text:p>419296709</text:p>
          </table:table-cell>
          <table:table-cell office:value-type="float" office:value="610262791.268652" calcext:value-type="float">
            <text:p>610262791.268652</text:p>
          </table:table-cell>
          <table:table-cell/>
          <table:table-cell office:value-type="string" calcext:value-type="string">
            <text:p>2019-05-04T17:26:31.2686519Z</text:p>
          </table:table-cell>
          <table:table-cell office:value-type="string" calcext:value-type="string">
            <text:p>2019-05-04-17:27:40.4526519</text:p>
          </table:table-cell>
          <table:table-cell table:number-columns-repeated="2"/>
        </table:table-row>
        <table:table-row table:style-name="ro1">
          <table:table-cell office:value-type="float" office:value="419361497" calcext:value-type="float">
            <text:p>419361497</text:p>
          </table:table-cell>
          <table:table-cell office:value-type="float" office:value="610327579.269387" calcext:value-type="float">
            <text:p>610327579.269387</text:p>
          </table:table-cell>
          <table:table-cell/>
          <table:table-cell office:value-type="string" calcext:value-type="string">
            <text:p>2019-05-05T11:26:19.2693870Z</text:p>
          </table:table-cell>
          <table:table-cell office:value-type="string" calcext:value-type="string">
            <text:p>2019-05-05-11:27:28.4533870</text:p>
          </table:table-cell>
          <table:table-cell table:number-columns-repeated="2"/>
        </table:table-row>
        <table:table-row table:style-name="ro1">
          <table:table-cell office:value-type="float" office:value="419462305" calcext:value-type="float">
            <text:p>419462305</text:p>
          </table:table-cell>
          <table:table-cell office:value-type="float" office:value="610428387.27057" calcext:value-type="float">
            <text:p>610428387.27057</text:p>
          </table:table-cell>
          <table:table-cell/>
          <table:table-cell office:value-type="string" calcext:value-type="string">
            <text:p>2019-05-06T15:26:27.2705700Z</text:p>
          </table:table-cell>
          <table:table-cell office:value-type="string" calcext:value-type="string">
            <text:p>2019-05-06-15:27:36.4545700</text:p>
          </table:table-cell>
          <table:table-cell table:number-columns-repeated="2"/>
        </table:table-row>
        <table:table-row table:style-name="ro1">
          <table:table-cell office:value-type="float" office:value="419537905" calcext:value-type="float">
            <text:p>419537905</text:p>
          </table:table-cell>
          <table:table-cell office:value-type="float" office:value="610503987.271426" calcext:value-type="float">
            <text:p>610503987.271426</text:p>
          </table:table-cell>
          <table:table-cell/>
          <table:table-cell office:value-type="string" calcext:value-type="string">
            <text:p>2019-05-07T12:26:27.2714259Z</text:p>
          </table:table-cell>
          <table:table-cell office:value-type="string" calcext:value-type="string">
            <text:p>2019-05-07-12:27:36.4554259</text:p>
          </table:table-cell>
          <table:table-cell table:number-columns-repeated="2"/>
        </table:table-row>
        <table:table-row table:style-name="ro1">
          <table:table-cell office:value-type="float" office:value="419728739" calcext:value-type="float">
            <text:p>419728739</text:p>
          </table:table-cell>
          <table:table-cell office:value-type="float" office:value="610694821.273636" calcext:value-type="float">
            <text:p>610694821.273636</text:p>
          </table:table-cell>
          <table:table-cell/>
          <table:table-cell office:value-type="string" calcext:value-type="string">
            <text:p>2019-05-09T17:27:01.2736359Z</text:p>
          </table:table-cell>
          <table:table-cell office:value-type="string" calcext:value-type="string">
            <text:p>2019-05-09-17:28:10.4576359</text:p>
          </table:table-cell>
          <table:table-cell table:number-columns-repeated="2"/>
        </table:table-row>
        <table:table-row table:style-name="ro1">
          <table:table-cell office:value-type="float" office:value="419815146" calcext:value-type="float">
            <text:p>419815146</text:p>
          </table:table-cell>
          <table:table-cell office:value-type="float" office:value="610781228.274634" calcext:value-type="float">
            <text:p>610781228.274634</text:p>
          </table:table-cell>
          <table:table-cell/>
          <table:table-cell office:value-type="string" calcext:value-type="string">
            <text:p>2019-05-10T17:27:08.2746340Z</text:p>
          </table:table-cell>
          <table:table-cell office:value-type="string" calcext:value-type="string">
            <text:p>2019-05-10-17:28:17.4586340</text:p>
          </table:table-cell>
          <table:table-cell table:number-columns-repeated="2"/>
        </table:table-row>
        <table:table-row table:style-name="ro1">
          <table:table-cell office:value-type="float" office:value="419872736" calcext:value-type="float">
            <text:p>419872736</text:p>
          </table:table-cell>
          <table:table-cell office:value-type="float" office:value="610838818.275298" calcext:value-type="float">
            <text:p>610838818.275298</text:p>
          </table:table-cell>
          <table:table-cell/>
          <table:table-cell office:value-type="string" calcext:value-type="string">
            <text:p>2019-05-11T09:26:58.2752979Z</text:p>
          </table:table-cell>
          <table:table-cell office:value-type="string" calcext:value-type="string">
            <text:p>2019-05-11-09:28:07.4592980</text:p>
          </table:table-cell>
          <table:table-cell table:number-columns-repeated="2"/>
        </table:table-row>
        <table:table-row table:style-name="ro1">
          <table:table-cell office:value-type="float" office:value="419987951" calcext:value-type="float">
            <text:p>419987951</text:p>
          </table:table-cell>
          <table:table-cell office:value-type="float" office:value="610954033.276624" calcext:value-type="float">
            <text:p>610954033.276624</text:p>
          </table:table-cell>
          <table:table-cell/>
          <table:table-cell office:value-type="string" calcext:value-type="string">
            <text:p>2019-05-12T17:27:13.2766239Z</text:p>
          </table:table-cell>
          <table:table-cell office:value-type="string" calcext:value-type="string">
            <text:p>2019-05-12-17:28:22.4606239</text:p>
          </table:table-cell>
          <table:table-cell table:number-columns-repeated="2"/>
        </table:table-row>
        <table:table-row table:style-name="ro1">
          <table:table-cell office:value-type="float" office:value="420074357" calcext:value-type="float">
            <text:p>420074357</text:p>
          </table:table-cell>
          <table:table-cell office:value-type="float" office:value="611040439.277632" calcext:value-type="float">
            <text:p>611040439.277632</text:p>
          </table:table-cell>
          <table:table-cell/>
          <table:table-cell office:value-type="string" calcext:value-type="string">
            <text:p>2019-05-13T17:27:19.2776319Z</text:p>
          </table:table-cell>
          <table:table-cell office:value-type="string" calcext:value-type="string">
            <text:p>2019-05-13-17:28:28.4616320</text:p>
          </table:table-cell>
          <table:table-cell table:number-columns-repeated="2"/>
        </table:table-row>
        <table:table-row table:style-name="ro1">
          <table:table-cell office:value-type="float" office:value="420146328" calcext:value-type="float">
            <text:p>420146328</text:p>
          </table:table-cell>
          <table:table-cell office:value-type="float" office:value="611112410.278444" calcext:value-type="float">
            <text:p>611112410.278444</text:p>
          </table:table-cell>
          <table:table-cell/>
          <table:table-cell office:value-type="string" calcext:value-type="string">
            <text:p>2019-05-14T13:26:50.2784439Z</text:p>
          </table:table-cell>
          <table:table-cell office:value-type="string" calcext:value-type="string">
            <text:p>2019-05-14-13:27:59.4624439</text:p>
          </table:table-cell>
          <table:table-cell table:number-columns-repeated="2"/>
        </table:table-row>
        <table:table-row table:style-name="ro1">
          <table:table-cell office:value-type="float" office:value="420239933" calcext:value-type="float">
            <text:p>420239933</text:p>
          </table:table-cell>
          <table:table-cell office:value-type="float" office:value="611206015.279528" calcext:value-type="float">
            <text:p>611206015.279528</text:p>
          </table:table-cell>
          <table:table-cell/>
          <table:table-cell office:value-type="string" calcext:value-type="string">
            <text:p>2019-05-15T15:26:55.2795280Z</text:p>
          </table:table-cell>
          <table:table-cell office:value-type="string" calcext:value-type="string">
            <text:p>2019-05-15-15:28:04.4635280</text:p>
          </table:table-cell>
          <table:table-cell table:number-columns-repeated="2"/>
        </table:table-row>
        <table:table-row table:style-name="ro1">
          <table:table-cell office:value-type="float" office:value="420333566" calcext:value-type="float">
            <text:p>420333566</text:p>
          </table:table-cell>
          <table:table-cell office:value-type="float" office:value="611299648.280628" calcext:value-type="float">
            <text:p>611299648.280628</text:p>
          </table:table-cell>
          <table:table-cell/>
          <table:table-cell office:value-type="string" calcext:value-type="string">
            <text:p>2019-05-16T17:27:28.2806279Z</text:p>
          </table:table-cell>
          <table:table-cell office:value-type="string" calcext:value-type="string">
            <text:p>2019-05-16-17:28:37.4646279</text:p>
          </table:table-cell>
          <table:table-cell table:number-columns-repeated="2"/>
        </table:table-row>
        <table:table-row table:style-name="ro1">
          <table:table-cell office:value-type="float" office:value="420416352" calcext:value-type="float">
            <text:p>420416352</text:p>
          </table:table-cell>
          <table:table-cell office:value-type="float" office:value="611382434.281576" calcext:value-type="float">
            <text:p>611382434.281576</text:p>
          </table:table-cell>
          <table:table-cell/>
          <table:table-cell office:value-type="string" calcext:value-type="string">
            <text:p>2019-05-17T16:27:14.2815760Z</text:p>
          </table:table-cell>
          <table:table-cell office:value-type="string" calcext:value-type="string">
            <text:p>2019-05-17-16:28:23.4655760</text:p>
          </table:table-cell>
          <table:table-cell table:number-columns-repeated="2"/>
        </table:table-row>
        <table:table-row table:style-name="ro1">
          <table:table-cell office:value-type="float" office:value="420488336" calcext:value-type="float">
            <text:p>420488336</text:p>
          </table:table-cell>
          <table:table-cell office:value-type="float" office:value="611454418.282393" calcext:value-type="float">
            <text:p>611454418.282393</text:p>
          </table:table-cell>
          <table:table-cell/>
          <table:table-cell office:value-type="string" calcext:value-type="string">
            <text:p>2019-05-18T12:26:58.2823929Z</text:p>
          </table:table-cell>
          <table:table-cell office:value-type="string" calcext:value-type="string">
            <text:p>2019-05-18-12:28:07.4663929</text:p>
          </table:table-cell>
          <table:table-cell table:number-columns-repeated="2"/>
        </table:table-row>
        <table:table-row table:style-name="ro1">
          <table:table-cell office:value-type="float" office:value="420581942" calcext:value-type="float">
            <text:p>420581942</text:p>
          </table:table-cell>
          <table:table-cell office:value-type="float" office:value="611548024.283503" calcext:value-type="float">
            <text:p>611548024.283503</text:p>
          </table:table-cell>
          <table:table-cell/>
          <table:table-cell office:value-type="string" calcext:value-type="string">
            <text:p>2019-05-19T14:27:04.2835029Z</text:p>
          </table:table-cell>
          <table:table-cell office:value-type="string" calcext:value-type="string">
            <text:p>2019-05-19-14:28:13.4675029</text:p>
          </table:table-cell>
          <table:table-cell table:number-columns-repeated="2"/>
        </table:table-row>
        <table:table-row table:style-name="ro1">
          <table:table-cell office:value-type="float" office:value="420671949" calcext:value-type="float">
            <text:p>420671949</text:p>
          </table:table-cell>
          <table:table-cell office:value-type="float" office:value="611638031.28454" calcext:value-type="float">
            <text:p>611638031.28454</text:p>
          </table:table-cell>
          <table:table-cell/>
          <table:table-cell office:value-type="string" calcext:value-type="string">
            <text:p>2019-05-20T15:27:11.2845399Z</text:p>
          </table:table-cell>
          <table:table-cell office:value-type="string" calcext:value-type="string">
            <text:p>2019-05-20-15:28:20.4685399</text:p>
          </table:table-cell>
          <table:table-cell table:number-columns-repeated="2"/>
        </table:table-row>
        <table:table-row table:style-name="ro1">
          <table:table-cell office:value-type="float" office:value="420743945" calcext:value-type="float">
            <text:p>420743945</text:p>
          </table:table-cell>
          <table:table-cell office:value-type="float" office:value="611710027.285355" calcext:value-type="float">
            <text:p>611710027.285355</text:p>
          </table:table-cell>
          <table:table-cell/>
          <table:table-cell office:value-type="string" calcext:value-type="string">
            <text:p>2019-05-21T11:27:07.2853549Z</text:p>
          </table:table-cell>
          <table:table-cell office:value-type="string" calcext:value-type="string">
            <text:p>2019-05-21-11:28:16.4693549</text:p>
          </table:table-cell>
          <table:table-cell table:number-columns-repeated="2"/>
        </table:table-row>
        <table:table-row table:style-name="ro1">
          <table:table-cell office:value-type="float" office:value="420833949" calcext:value-type="float">
            <text:p>420833949</text:p>
          </table:table-cell>
          <table:table-cell office:value-type="float" office:value="611800031.286402" calcext:value-type="float">
            <text:p>611800031.286402</text:p>
          </table:table-cell>
          <table:table-cell/>
          <table:table-cell office:value-type="string" calcext:value-type="string">
            <text:p>2019-05-22T12:27:11.2864019Z</text:p>
          </table:table-cell>
          <table:table-cell office:value-type="string" calcext:value-type="string">
            <text:p>2019-05-22-12:28:20.4704020</text:p>
          </table:table-cell>
          <table:table-cell table:number-columns-repeated="2"/>
        </table:table-row>
        <table:table-row table:style-name="ro1">
          <table:table-cell office:value-type="float" office:value="420934782" calcext:value-type="float">
            <text:p>420934782</text:p>
          </table:table-cell>
          <table:table-cell office:value-type="float" office:value="611900864.287582" calcext:value-type="float">
            <text:p>611900864.287582</text:p>
          </table:table-cell>
          <table:table-cell/>
          <table:table-cell office:value-type="string" calcext:value-type="string">
            <text:p>2019-05-23T16:27:44.2875820Z</text:p>
          </table:table-cell>
          <table:table-cell office:value-type="string" calcext:value-type="string">
            <text:p>2019-05-23-16:28:53.4715820</text:p>
          </table:table-cell>
          <table:table-cell table:number-columns-repeated="2"/>
        </table:table-row>
        <table:table-row table:style-name="ro1">
          <table:table-cell office:value-type="float" office:value="421021176" calcext:value-type="float">
            <text:p>421021176</text:p>
          </table:table-cell>
          <table:table-cell office:value-type="float" office:value="611987258.288588" calcext:value-type="float">
            <text:p>611987258.288588</text:p>
          </table:table-cell>
          <table:table-cell/>
          <table:table-cell office:value-type="string" calcext:value-type="string">
            <text:p>2019-05-24T16:27:38.2885879Z</text:p>
          </table:table-cell>
          <table:table-cell office:value-type="string" calcext:value-type="string">
            <text:p>2019-05-24-16:28:47.4725879</text:p>
          </table:table-cell>
          <table:table-cell table:number-columns-repeated="2"/>
        </table:table-row>
        <table:table-row table:style-name="ro1">
          <table:table-cell office:value-type="float" office:value="421078771" calcext:value-type="float">
            <text:p>421078771</text:p>
          </table:table-cell>
          <table:table-cell office:value-type="float" office:value="612044853.28925" calcext:value-type="float">
            <text:p>612044853.28925</text:p>
          </table:table-cell>
          <table:table-cell/>
          <table:table-cell office:value-type="string" calcext:value-type="string">
            <text:p>2019-05-25T08:27:33.2892500Z</text:p>
          </table:table-cell>
          <table:table-cell office:value-type="string" calcext:value-type="string">
            <text:p>2019-05-25-08:28:42.4732500</text:p>
          </table:table-cell>
          <table:table-cell table:number-columns-repeated="2"/>
        </table:table-row>
        <table:table-row table:style-name="ro1">
          <table:table-cell office:value-type="float" office:value="421193985" calcext:value-type="float">
            <text:p>421193985</text:p>
          </table:table-cell>
          <table:table-cell office:value-type="float" office:value="612160067.290601" calcext:value-type="float">
            <text:p>612160067.290601</text:p>
          </table:table-cell>
          <table:table-cell/>
          <table:table-cell office:value-type="string" calcext:value-type="string">
            <text:p>2019-05-26T16:27:47.2906010Z</text:p>
          </table:table-cell>
          <table:table-cell office:value-type="string" calcext:value-type="string">
            <text:p>2019-05-26-16:28:56.4746010</text:p>
          </table:table-cell>
          <table:table-cell table:number-columns-repeated="2"/>
        </table:table-row>
        <table:table-row table:style-name="ro1">
          <table:table-cell office:value-type="float" office:value="421276768" calcext:value-type="float">
            <text:p>421276768</text:p>
          </table:table-cell>
          <table:table-cell office:value-type="float" office:value="612242850.291554" calcext:value-type="float">
            <text:p>612242850.291554</text:p>
          </table:table-cell>
          <table:table-cell/>
          <table:table-cell office:value-type="string" calcext:value-type="string">
            <text:p>2019-05-27T15:27:30.2915539Z</text:p>
          </table:table-cell>
          <table:table-cell office:value-type="string" calcext:value-type="string">
            <text:p>2019-05-27-15:28:39.4755539</text:p>
          </table:table-cell>
          <table:table-cell table:number-columns-repeated="2"/>
        </table:table-row>
        <table:table-row table:style-name="ro1">
          <table:table-cell office:value-type="float" office:value="421366784" calcext:value-type="float">
            <text:p>421366784</text:p>
          </table:table-cell>
          <table:table-cell office:value-type="float" office:value="612332866.292593" calcext:value-type="float">
            <text:p>612332866.292593</text:p>
          </table:table-cell>
          <table:table-cell/>
          <table:table-cell office:value-type="string" calcext:value-type="string">
            <text:p>2019-05-28T16:27:46.2925930Z</text:p>
          </table:table-cell>
          <table:table-cell office:value-type="string" calcext:value-type="string">
            <text:p>2019-05-28-16:28:55.4765930</text:p>
          </table:table-cell>
          <table:table-cell table:number-columns-repeated="2"/>
        </table:table-row>
        <table:table-row table:style-name="ro1">
          <table:table-cell office:value-type="float" office:value="421539587" calcext:value-type="float">
            <text:p>421539587</text:p>
          </table:table-cell>
          <table:table-cell office:value-type="float" office:value="612505669.294613" calcext:value-type="float">
            <text:p>612505669.294613</text:p>
          </table:table-cell>
          <table:table-cell/>
          <table:table-cell office:value-type="string" calcext:value-type="string">
            <text:p>2019-05-30T16:27:49.2946130Z</text:p>
          </table:table-cell>
          <table:table-cell office:value-type="string" calcext:value-type="string">
            <text:p>2019-05-30-16:28:58.4786130</text:p>
          </table:table-cell>
          <table:table-cell table:number-columns-repeated="2"/>
        </table:table-row>
        <table:table-row table:style-name="ro1">
          <table:table-cell office:value-type="float" office:value="421625995" calcext:value-type="float">
            <text:p>421625995</text:p>
          </table:table-cell>
          <table:table-cell office:value-type="float" office:value="612592077.295613" calcext:value-type="float">
            <text:p>612592077.295613</text:p>
          </table:table-cell>
          <table:table-cell/>
          <table:table-cell office:value-type="string" calcext:value-type="string">
            <text:p>2019-05-31T16:27:57.2956129Z</text:p>
          </table:table-cell>
          <table:table-cell office:value-type="string" calcext:value-type="string">
            <text:p>2019-05-31-16:29:06.4796129</text:p>
          </table:table-cell>
          <table:table-cell table:number-columns-repeated="2"/>
        </table:table-row>
        <table:table-row table:style-name="ro1">
          <table:table-cell office:value-type="float" office:value="421701565" calcext:value-type="float">
            <text:p>421701565</text:p>
          </table:table-cell>
          <table:table-cell office:value-type="float" office:value="612667647.296484" calcext:value-type="float">
            <text:p>612667647.296484</text:p>
          </table:table-cell>
          <table:table-cell/>
          <table:table-cell office:value-type="string" calcext:value-type="string">
            <text:p>2019-06-01T13:27:27.2964839Z</text:p>
          </table:table-cell>
          <table:table-cell office:value-type="string" calcext:value-type="string">
            <text:p>2019-06-01-13:28:36.4804840</text:p>
          </table:table-cell>
          <table:table-cell table:number-columns-repeated="2"/>
        </table:table-row>
        <table:table-row table:style-name="ro1">
          <table:table-cell office:value-type="float" office:value="421798792" calcext:value-type="float">
            <text:p>421798792</text:p>
          </table:table-cell>
          <table:table-cell office:value-type="float" office:value="612764874.297611" calcext:value-type="float">
            <text:p>612764874.297611</text:p>
          </table:table-cell>
          <table:table-cell/>
          <table:table-cell office:value-type="string" calcext:value-type="string">
            <text:p>2019-06-02T16:27:54.2976109Z</text:p>
          </table:table-cell>
          <table:table-cell office:value-type="string" calcext:value-type="string">
            <text:p>2019-06-02-16:29:03.4816110</text:p>
          </table:table-cell>
          <table:table-cell table:number-columns-repeated="2"/>
        </table:table-row>
        <table:table-row table:style-name="ro1">
          <table:table-cell office:value-type="float" office:value="421881576" calcext:value-type="float">
            <text:p>421881576</text:p>
          </table:table-cell>
          <table:table-cell office:value-type="float" office:value="612847658.298586" calcext:value-type="float">
            <text:p>612847658.298586</text:p>
          </table:table-cell>
          <table:table-cell/>
          <table:table-cell office:value-type="string" calcext:value-type="string">
            <text:p>2019-06-03T15:27:38.2985860Z</text:p>
          </table:table-cell>
          <table:table-cell office:value-type="string" calcext:value-type="string">
            <text:p>2019-06-03-15:28:47.4825860</text:p>
          </table:table-cell>
          <table:table-cell table:number-columns-repeated="2"/>
        </table:table-row>
        <table:table-row table:style-name="ro1">
          <table:table-cell office:value-type="float" office:value="421967976" calcext:value-type="float">
            <text:p>421967976</text:p>
          </table:table-cell>
          <table:table-cell office:value-type="float" office:value="612934058.299584" calcext:value-type="float">
            <text:p>612934058.299584</text:p>
          </table:table-cell>
          <table:table-cell/>
          <table:table-cell office:value-type="string" calcext:value-type="string">
            <text:p>2019-06-04T15:27:38.2995840Z</text:p>
          </table:table-cell>
          <table:table-cell office:value-type="string" calcext:value-type="string">
            <text:p>2019-06-04-15:28:47.4835840</text:p>
          </table:table-cell>
          <table:table-cell table:number-columns-repeated="2"/>
        </table:table-row>
        <table:table-row table:style-name="ro1">
          <table:table-cell office:value-type="float" office:value="422025588" calcext:value-type="float">
            <text:p>422025588</text:p>
          </table:table-cell>
          <table:table-cell office:value-type="float" office:value="612991670.300248" calcext:value-type="float">
            <text:p>612991670.300248</text:p>
          </table:table-cell>
          <table:table-cell/>
          <table:table-cell office:value-type="string" calcext:value-type="string">
            <text:p>2019-06-05T07:27:50.3002480Z</text:p>
          </table:table-cell>
          <table:table-cell office:value-type="string" calcext:value-type="string">
            <text:p>2019-06-05-07:28:59.4842480</text:p>
          </table:table-cell>
          <table:table-cell table:number-columns-repeated="2"/>
        </table:table-row>
        <table:table-row table:style-name="ro1">
          <table:table-cell office:value-type="float" office:value="422140781" calcext:value-type="float">
            <text:p>422140781</text:p>
          </table:table-cell>
          <table:table-cell office:value-type="float" office:value="613106863.301601" calcext:value-type="float">
            <text:p>613106863.301601</text:p>
          </table:table-cell>
          <table:table-cell/>
          <table:table-cell office:value-type="string" calcext:value-type="string">
            <text:p>2019-06-06T15:27:43.3016009Z</text:p>
          </table:table-cell>
          <table:table-cell office:value-type="string" calcext:value-type="string">
            <text:p>2019-06-06-15:28:52.4856009</text:p>
          </table:table-cell>
          <table:table-cell table:number-columns-repeated="2"/>
        </table:table-row>
        <table:table-row table:style-name="ro1">
          <table:table-cell office:value-type="float" office:value="422198391" calcext:value-type="float">
            <text:p>422198391</text:p>
          </table:table-cell>
          <table:table-cell office:value-type="float" office:value="613164473.30226" calcext:value-type="float">
            <text:p>613164473.30226</text:p>
          </table:table-cell>
          <table:table-cell/>
          <table:table-cell office:value-type="string" calcext:value-type="string">
            <text:p>2019-06-07T07:27:53.3022600Z</text:p>
          </table:table-cell>
          <table:table-cell office:value-type="string" calcext:value-type="string">
            <text:p>2019-06-07-07:29:02.4862600</text:p>
          </table:table-cell>
          <table:table-cell table:number-columns-repeated="2"/>
        </table:table-row>
        <table:table-row table:style-name="ro1">
          <table:table-cell office:value-type="float" office:value="422320857" calcext:value-type="float">
            <text:p>422320857</text:p>
          </table:table-cell>
          <table:table-cell office:value-type="float" office:value="613286939.303673" calcext:value-type="float">
            <text:p>613286939.303673</text:p>
          </table:table-cell>
          <table:table-cell/>
          <table:table-cell office:value-type="string" calcext:value-type="string">
            <text:p>2019-06-08T17:28:59.3036730Z</text:p>
          </table:table-cell>
          <table:table-cell office:value-type="string" calcext:value-type="string">
            <text:p>2019-06-08-17:30:08.4876730</text:p>
          </table:table-cell>
          <table:table-cell table:number-columns-repeated="2"/>
        </table:table-row>
        <table:table-row table:style-name="ro1">
          <table:table-cell office:value-type="float" office:value="422385566" calcext:value-type="float">
            <text:p>422385566</text:p>
          </table:table-cell>
          <table:table-cell office:value-type="float" office:value="613351648.304441" calcext:value-type="float">
            <text:p>613351648.304441</text:p>
          </table:table-cell>
          <table:table-cell/>
          <table:table-cell office:value-type="string" calcext:value-type="string">
            <text:p>2019-06-09T11:27:28.3044409Z</text:p>
          </table:table-cell>
          <table:table-cell office:value-type="string" calcext:value-type="string">
            <text:p>2019-06-09-11:28:37.4884409</text:p>
          </table:table-cell>
          <table:table-cell table:number-columns-repeated="2"/>
        </table:table-row>
        <table:table-row table:style-name="ro1">
          <table:table-cell office:value-type="float" office:value="422468367" calcext:value-type="float">
            <text:p>422468367</text:p>
          </table:table-cell>
          <table:table-cell office:value-type="float" office:value="613434449.305388" calcext:value-type="float">
            <text:p>613434449.305388</text:p>
          </table:table-cell>
          <table:table-cell/>
          <table:table-cell office:value-type="string" calcext:value-type="string">
            <text:p>2019-06-10T10:27:29.3053879Z</text:p>
          </table:table-cell>
          <table:table-cell office:value-type="string" calcext:value-type="string">
            <text:p>2019-06-10-10:28:38.4893879</text:p>
          </table:table-cell>
          <table:table-cell table:number-columns-repeated="2"/>
        </table:table-row>
        <table:table-row table:style-name="ro1">
          <table:table-cell office:value-type="float" office:value="422572792" calcext:value-type="float">
            <text:p>422572792</text:p>
          </table:table-cell>
          <table:table-cell office:value-type="float" office:value="613538874.306631" calcext:value-type="float">
            <text:p>613538874.306631</text:p>
          </table:table-cell>
          <table:table-cell/>
          <table:table-cell office:value-type="string" calcext:value-type="string">
            <text:p>2019-06-11T15:27:54.3066309Z</text:p>
          </table:table-cell>
          <table:table-cell office:value-type="string" calcext:value-type="string">
            <text:p>2019-06-11-15:29:03.4906309</text:p>
          </table:table-cell>
          <table:table-cell table:number-columns-repeated="2"/>
        </table:table-row>
        <table:table-row table:style-name="ro1">
          <table:table-cell office:value-type="float" office:value="422641166" calcext:value-type="float">
            <text:p>422641166</text:p>
          </table:table-cell>
          <table:table-cell office:value-type="float" office:value="613607248.307415" calcext:value-type="float">
            <text:p>613607248.307415</text:p>
          </table:table-cell>
          <table:table-cell/>
          <table:table-cell office:value-type="string" calcext:value-type="string">
            <text:p>2019-06-12T10:27:28.3074150Z</text:p>
          </table:table-cell>
          <table:table-cell office:value-type="string" calcext:value-type="string">
            <text:p>2019-06-12-10:28:37.4914150</text:p>
          </table:table-cell>
          <table:table-cell table:number-columns-repeated="2"/>
        </table:table-row>
        <table:table-row table:style-name="ro1">
          <table:table-cell office:value-type="float" office:value="422745594" calcext:value-type="float">
            <text:p>422745594</text:p>
          </table:table-cell>
          <table:table-cell office:value-type="float" office:value="613711676.308647" calcext:value-type="float">
            <text:p>613711676.308647</text:p>
          </table:table-cell>
          <table:table-cell/>
          <table:table-cell office:value-type="string" calcext:value-type="string">
            <text:p>2019-06-13T15:27:56.3086470Z</text:p>
          </table:table-cell>
          <table:table-cell office:value-type="string" calcext:value-type="string">
            <text:p>2019-06-13-15:29:05.4926470</text:p>
          </table:table-cell>
          <table:table-cell table:number-columns-repeated="2"/>
        </table:table-row>
        <table:table-row table:style-name="ro1">
          <table:table-cell office:value-type="float" office:value="422792364" calcext:value-type="float">
            <text:p>422792364</text:p>
          </table:table-cell>
          <table:table-cell office:value-type="float" office:value="613758446.309166" calcext:value-type="float">
            <text:p>613758446.309166</text:p>
          </table:table-cell>
          <table:table-cell/>
          <table:table-cell office:value-type="string" calcext:value-type="string">
            <text:p>2019-06-14T04:27:26.3091659Z</text:p>
          </table:table-cell>
          <table:table-cell office:value-type="string" calcext:value-type="string">
            <text:p>2019-06-14-04:28:35.4931659</text:p>
          </table:table-cell>
          <table:table-cell table:number-columns-repeated="2"/>
        </table:table-row>
        <table:table-row table:style-name="ro1">
          <table:table-cell office:value-type="float" office:value="422918397" calcext:value-type="float">
            <text:p>422918397</text:p>
          </table:table-cell>
          <table:table-cell office:value-type="float" office:value="613884479.310654" calcext:value-type="float">
            <text:p>613884479.310654</text:p>
          </table:table-cell>
          <table:table-cell/>
          <table:table-cell office:value-type="string" calcext:value-type="string">
            <text:p>2019-06-15T15:27:59.3106540Z</text:p>
          </table:table-cell>
          <table:table-cell office:value-type="string" calcext:value-type="string">
            <text:p>2019-06-15-15:29:08.4946540</text:p>
          </table:table-cell>
          <table:table-cell table:number-columns-repeated="2"/>
        </table:table-row>
        <table:table-row table:style-name="ro1">
          <table:table-cell office:value-type="float" office:value="422972384" calcext:value-type="float">
            <text:p>422972384</text:p>
          </table:table-cell>
          <table:table-cell office:value-type="float" office:value="613938466.311288" calcext:value-type="float">
            <text:p>613938466.311288</text:p>
          </table:table-cell>
          <table:table-cell/>
          <table:table-cell office:value-type="string" calcext:value-type="string">
            <text:p>2019-06-16T06:27:46.3112879Z</text:p>
          </table:table-cell>
          <table:table-cell office:value-type="string" calcext:value-type="string">
            <text:p>2019-06-16-06:28:55.4952880</text:p>
          </table:table-cell>
          <table:table-cell table:number-columns-repeated="2"/>
        </table:table-row>
        <table:table-row table:style-name="ro1">
          <table:table-cell office:value-type="float" office:value="423058783" calcext:value-type="float">
            <text:p>423058783</text:p>
          </table:table-cell>
          <table:table-cell office:value-type="float" office:value="614024865.312285" calcext:value-type="float">
            <text:p>614024865.312285</text:p>
          </table:table-cell>
          <table:table-cell/>
          <table:table-cell office:value-type="string" calcext:value-type="string">
            <text:p>2019-06-17T06:27:45.3122849Z</text:p>
          </table:table-cell>
          <table:table-cell office:value-type="string" calcext:value-type="string">
            <text:p>2019-06-17-06:28:54.4962849</text:p>
          </table:table-cell>
          <table:table-cell table:number-columns-repeated="2"/>
        </table:table-row>
        <table:table-row table:style-name="ro1">
          <table:table-cell office:value-type="float" office:value="423177589" calcext:value-type="float">
            <text:p>423177589</text:p>
          </table:table-cell>
          <table:table-cell office:value-type="float" office:value="614143671.313673" calcext:value-type="float">
            <text:p>614143671.313673</text:p>
          </table:table-cell>
          <table:table-cell/>
          <table:table-cell office:value-type="string" calcext:value-type="string">
            <text:p>2019-06-18T15:27:51.3136730Z</text:p>
          </table:table-cell>
          <table:table-cell office:value-type="string" calcext:value-type="string">
            <text:p>2019-06-18-15:29:00.4976730</text:p>
          </table:table-cell>
          <table:table-cell table:number-columns-repeated="2"/>
        </table:table-row>
        <table:table-row table:style-name="ro1">
          <table:table-cell office:value-type="float" office:value="423231582" calcext:value-type="float">
            <text:p>423231582</text:p>
          </table:table-cell>
          <table:table-cell office:value-type="float" office:value="614197664.314301" calcext:value-type="float">
            <text:p>614197664.314301</text:p>
          </table:table-cell>
          <table:table-cell/>
          <table:table-cell office:value-type="string" calcext:value-type="string">
            <text:p>2019-06-19T06:27:44.3143010Z</text:p>
          </table:table-cell>
          <table:table-cell office:value-type="string" calcext:value-type="string">
            <text:p>2019-06-19-06:28:53.4983010</text:p>
          </table:table-cell>
          <table:table-cell table:number-columns-repeated="2"/>
        </table:table-row>
        <table:table-row table:style-name="ro1">
          <table:table-cell office:value-type="float" office:value="423317978" calcext:value-type="float">
            <text:p>423317978</text:p>
          </table:table-cell>
          <table:table-cell office:value-type="float" office:value="614284060.315312" calcext:value-type="float">
            <text:p>614284060.315312</text:p>
          </table:table-cell>
          <table:table-cell/>
          <table:table-cell office:value-type="string" calcext:value-type="string">
            <text:p>2019-06-20T06:27:40.3153120Z</text:p>
          </table:table-cell>
          <table:table-cell office:value-type="string" calcext:value-type="string">
            <text:p>2019-06-20-06:28:49.4993120</text:p>
          </table:table-cell>
          <table:table-cell table:number-columns-repeated="2"/>
        </table:table-row>
        <table:table-row table:style-name="ro1">
          <table:table-cell office:value-type="float" office:value="423422358" calcext:value-type="float">
            <text:p>423422358</text:p>
          </table:table-cell>
          <table:table-cell office:value-type="float" office:value="614388440.316531" calcext:value-type="float">
            <text:p>614388440.316531</text:p>
          </table:table-cell>
          <table:table-cell/>
          <table:table-cell office:value-type="string" calcext:value-type="string">
            <text:p>2019-06-21T11:27:20.3165309Z</text:p>
          </table:table-cell>
          <table:table-cell office:value-type="string" calcext:value-type="string">
            <text:p>2019-06-21-11:28:29.5005309</text:p>
          </table:table-cell>
          <table:table-cell table:number-columns-repeated="2"/>
        </table:table-row>
        <table:table-row table:style-name="ro1">
          <table:table-cell office:value-type="float" office:value="423508756" calcext:value-type="float">
            <text:p>423508756</text:p>
          </table:table-cell>
          <table:table-cell office:value-type="float" office:value="614474838.317527" calcext:value-type="float">
            <text:p>614474838.317527</text:p>
          </table:table-cell>
          <table:table-cell/>
          <table:table-cell office:value-type="string" calcext:value-type="string">
            <text:p>2019-06-22T11:27:18.3175269Z</text:p>
          </table:table-cell>
          <table:table-cell office:value-type="string" calcext:value-type="string">
            <text:p>2019-06-22-11:28:27.5015269</text:p>
          </table:table-cell>
          <table:table-cell table:number-columns-repeated="2"/>
        </table:table-row>
        <table:table-row table:style-name="ro1">
          <table:table-cell office:value-type="float" office:value="423606027" calcext:value-type="float">
            <text:p>423606027</text:p>
          </table:table-cell>
          <table:table-cell office:value-type="float" office:value="614572109.318682" calcext:value-type="float">
            <text:p>614572109.318682</text:p>
          </table:table-cell>
          <table:table-cell/>
          <table:table-cell office:value-type="string" calcext:value-type="string">
            <text:p>2019-06-23T14:28:29.3186819Z</text:p>
          </table:table-cell>
          <table:table-cell office:value-type="string" calcext:value-type="string">
            <text:p>2019-06-23-14:29:38.5026819</text:p>
          </table:table-cell>
          <table:table-cell table:number-columns-repeated="2"/>
        </table:table-row>
        <table:table-row table:style-name="ro1">
          <table:table-cell office:value-type="float" office:value="423692376" calcext:value-type="float">
            <text:p>423692376</text:p>
          </table:table-cell>
          <table:table-cell office:value-type="float" office:value="614658458.319674" calcext:value-type="float">
            <text:p>614658458.319674</text:p>
          </table:table-cell>
          <table:table-cell/>
          <table:table-cell office:value-type="string" calcext:value-type="string">
            <text:p>2019-06-24T14:27:38.3196740Z</text:p>
          </table:table-cell>
          <table:table-cell office:value-type="string" calcext:value-type="string">
            <text:p>2019-06-24-14:28:47.5036740</text:p>
          </table:table-cell>
          <table:table-cell table:number-columns-repeated="2"/>
        </table:table-row>
        <table:table-row table:style-name="ro1">
          <table:table-cell office:value-type="float" office:value="423749974" calcext:value-type="float">
            <text:p>423749974</text:p>
          </table:table-cell>
          <table:table-cell office:value-type="float" office:value="614716056.320361" calcext:value-type="float">
            <text:p>614716056.320361</text:p>
          </table:table-cell>
          <table:table-cell/>
          <table:table-cell office:value-type="string" calcext:value-type="string">
            <text:p>2019-06-25T06:27:36.3203610Z</text:p>
          </table:table-cell>
          <table:table-cell office:value-type="string" calcext:value-type="string">
            <text:p>2019-06-25-06:28:45.5043610</text:p>
          </table:table-cell>
          <table:table-cell table:number-columns-repeated="2"/>
        </table:table-row>
        <table:table-row table:style-name="ro1">
          <table:table-cell office:value-type="float" office:value="423865175" calcext:value-type="float">
            <text:p>423865175</text:p>
          </table:table-cell>
          <table:table-cell office:value-type="float" office:value="614831257.321709" calcext:value-type="float">
            <text:p>614831257.321709</text:p>
          </table:table-cell>
          <table:table-cell/>
          <table:table-cell office:value-type="string" calcext:value-type="string">
            <text:p>2019-06-26T14:27:37.3217090Z</text:p>
          </table:table-cell>
          <table:table-cell office:value-type="string" calcext:value-type="string">
            <text:p>2019-06-26-14:28:46.5057090</text:p>
          </table:table-cell>
          <table:table-cell table:number-columns-repeated="2"/>
        </table:table-row>
        <table:table-row table:style-name="ro1">
          <table:table-cell office:value-type="float" office:value="424037973" calcext:value-type="float">
            <text:p>424037973</text:p>
          </table:table-cell>
          <table:table-cell office:value-type="float" office:value="615004055.323714" calcext:value-type="float">
            <text:p>615004055.323714</text:p>
          </table:table-cell>
          <table:table-cell/>
          <table:table-cell office:value-type="string" calcext:value-type="string">
            <text:p>2019-06-28T14:27:35.3237140Z</text:p>
          </table:table-cell>
          <table:table-cell office:value-type="string" calcext:value-type="string">
            <text:p>2019-06-28-14:28:44.5077140</text:p>
          </table:table-cell>
          <table:table-cell table:number-columns-repeated="2"/>
        </table:table-row>
        <table:table-row table:style-name="ro1">
          <table:table-cell office:value-type="float" office:value="424091962" calcext:value-type="float">
            <text:p>424091962</text:p>
          </table:table-cell>
          <table:table-cell office:value-type="float" office:value="615058044.324347" calcext:value-type="float">
            <text:p>615058044.324347</text:p>
          </table:table-cell>
          <table:table-cell/>
          <table:table-cell office:value-type="string" calcext:value-type="string">
            <text:p>2019-06-29T05:27:24.3243470Z</text:p>
          </table:table-cell>
          <table:table-cell office:value-type="string" calcext:value-type="string">
            <text:p>2019-06-29-05:28:33.5083470</text:p>
          </table:table-cell>
          <table:table-cell table:number-columns-repeated="2"/>
        </table:table-row>
        <table:table-row table:style-name="ro1">
          <table:table-cell office:value-type="float" office:value="424210769" calcext:value-type="float">
            <text:p>424210769</text:p>
          </table:table-cell>
          <table:table-cell office:value-type="float" office:value="615176851.32573" calcext:value-type="float">
            <text:p>615176851.32573</text:p>
          </table:table-cell>
          <table:table-cell/>
          <table:table-cell office:value-type="string" calcext:value-type="string">
            <text:p>2019-06-30T14:27:31.3257299Z</text:p>
          </table:table-cell>
          <table:table-cell office:value-type="string" calcext:value-type="string">
            <text:p>2019-06-30-14:28:40.5097299</text:p>
          </table:table-cell>
          <table:table-cell table:number-columns-repeated="2"/>
        </table:table-row>
        <table:table-row table:style-name="ro1">
          <table:table-cell office:value-type="float" office:value="424289941" calcext:value-type="float">
            <text:p>424289941</text:p>
          </table:table-cell>
          <table:table-cell office:value-type="float" office:value="615256023.326653" calcext:value-type="float">
            <text:p>615256023.326653</text:p>
          </table:table-cell>
          <table:table-cell/>
          <table:table-cell office:value-type="string" calcext:value-type="string">
            <text:p>2019-07-01T12:27:03.3266530Z</text:p>
          </table:table-cell>
          <table:table-cell office:value-type="string" calcext:value-type="string">
            <text:p>2019-07-01-12:28:12.5106530</text:p>
          </table:table-cell>
          <table:table-cell table:number-columns-repeated="2"/>
        </table:table-row>
        <table:table-row table:style-name="ro1">
          <table:table-cell office:value-type="float" office:value="424379943" calcext:value-type="float">
            <text:p>424379943</text:p>
          </table:table-cell>
          <table:table-cell office:value-type="float" office:value="615346025.327715" calcext:value-type="float">
            <text:p>615346025.327715</text:p>
          </table:table-cell>
          <table:table-cell/>
          <table:table-cell office:value-type="string" calcext:value-type="string">
            <text:p>2019-07-02T13:27:05.3277150Z</text:p>
          </table:table-cell>
          <table:table-cell office:value-type="string" calcext:value-type="string">
            <text:p>2019-07-02-13:28:14.5117150</text:p>
          </table:table-cell>
          <table:table-cell table:number-columns-repeated="2"/>
        </table:table-row>
        <table:table-row table:style-name="ro1">
          <table:table-cell office:value-type="float" office:value="424459130" calcext:value-type="float">
            <text:p>424459130</text:p>
          </table:table-cell>
          <table:table-cell office:value-type="float" office:value="615425212.328635" calcext:value-type="float">
            <text:p>615425212.328635</text:p>
          </table:table-cell>
          <table:table-cell/>
          <table:table-cell office:value-type="string" calcext:value-type="string">
            <text:p>2019-07-03T11:26:52.3286349Z</text:p>
          </table:table-cell>
          <table:table-cell office:value-type="string" calcext:value-type="string">
            <text:p>2019-07-03-11:28:01.5126349</text:p>
          </table:table-cell>
          <table:table-cell table:number-columns-repeated="2"/>
        </table:table-row>
        <table:table-row table:style-name="ro1">
          <table:table-cell office:value-type="float" office:value="424523947" calcext:value-type="float">
            <text:p>424523947</text:p>
          </table:table-cell>
          <table:table-cell office:value-type="float" office:value="615490029.329375" calcext:value-type="float">
            <text:p>615490029.329375</text:p>
          </table:table-cell>
          <table:table-cell/>
          <table:table-cell office:value-type="string" calcext:value-type="string">
            <text:p>2019-07-04T05:27:09.3293750Z</text:p>
          </table:table-cell>
          <table:table-cell office:value-type="string" calcext:value-type="string">
            <text:p>2019-07-04-05:28:18.5133750</text:p>
          </table:table-cell>
          <table:table-cell table:number-columns-repeated="2"/>
        </table:table-row>
        <table:table-row table:style-name="ro1">
          <table:table-cell office:value-type="float" office:value="424653602" calcext:value-type="float">
            <text:p>424653602</text:p>
          </table:table-cell>
          <table:table-cell office:value-type="float" office:value="615619684.330896" calcext:value-type="float">
            <text:p>615619684.330896</text:p>
          </table:table-cell>
          <table:table-cell/>
          <table:table-cell office:value-type="string" calcext:value-type="string">
            <text:p>2019-07-05T17:28:04.3308960Z</text:p>
          </table:table-cell>
          <table:table-cell office:value-type="string" calcext:value-type="string">
            <text:p>2019-07-05-17:29:13.5148960</text:p>
          </table:table-cell>
          <table:table-cell table:number-columns-repeated="2"/>
        </table:table-row>
        <table:table-row table:style-name="ro1">
          <table:table-cell office:value-type="float" office:value="424718318" calcext:value-type="float">
            <text:p>424718318</text:p>
          </table:table-cell>
          <table:table-cell office:value-type="float" office:value="615684400.331652" calcext:value-type="float">
            <text:p>615684400.331652</text:p>
          </table:table-cell>
          <table:table-cell/>
          <table:table-cell office:value-type="string" calcext:value-type="string">
            <text:p>2019-07-06T11:26:40.3316519Z</text:p>
          </table:table-cell>
          <table:table-cell office:value-type="string" calcext:value-type="string">
            <text:p>2019-07-06-11:27:49.5156519</text:p>
          </table:table-cell>
          <table:table-cell table:number-columns-repeated="2"/>
        </table:table-row>
        <table:table-row table:style-name="ro1">
          <table:table-cell office:value-type="float" office:value="424811942" calcext:value-type="float">
            <text:p>424811942</text:p>
          </table:table-cell>
          <table:table-cell office:value-type="float" office:value="615778024.332756" calcext:value-type="float">
            <text:p>615778024.332756</text:p>
          </table:table-cell>
          <table:table-cell/>
          <table:table-cell office:value-type="string" calcext:value-type="string">
            <text:p>2019-07-07T13:27:04.3327560Z</text:p>
          </table:table-cell>
          <table:table-cell office:value-type="string" calcext:value-type="string">
            <text:p>2019-07-07-13:28:13.5167560</text:p>
          </table:table-cell>
          <table:table-cell table:number-columns-repeated="2"/>
        </table:table-row>
        <table:table-row table:style-name="ro1">
          <table:table-cell office:value-type="float" office:value="424912784" calcext:value-type="float">
            <text:p>424912784</text:p>
          </table:table-cell>
          <table:table-cell office:value-type="float" office:value="615878866.333884" calcext:value-type="float">
            <text:p>615878866.333884</text:p>
          </table:table-cell>
          <table:table-cell/>
          <table:table-cell office:value-type="string" calcext:value-type="string">
            <text:p>2019-07-08T17:27:46.3338840Z</text:p>
          </table:table-cell>
          <table:table-cell office:value-type="string" calcext:value-type="string">
            <text:p>2019-07-08-17:28:55.5178840</text:p>
          </table:table-cell>
          <table:table-cell table:number-columns-repeated="2"/>
        </table:table-row>
        <table:table-row table:style-name="ro1">
          <table:table-cell office:value-type="float" office:value="424955929" calcext:value-type="float">
            <text:p>424955929</text:p>
          </table:table-cell>
          <table:table-cell office:value-type="float" office:value="615922011.334431" calcext:value-type="float">
            <text:p>615922011.334431</text:p>
          </table:table-cell>
          <table:table-cell/>
          <table:table-cell office:value-type="string" calcext:value-type="string">
            <text:p>2019-07-09T05:26:51.3344309Z</text:p>
          </table:table-cell>
          <table:table-cell office:value-type="string" calcext:value-type="string">
            <text:p>2019-07-09-05:28:00.5184309</text:p>
          </table:table-cell>
          <table:table-cell table:number-columns-repeated="2"/>
        </table:table-row>
        <table:table-row table:style-name="ro1">
          <table:table-cell office:value-type="float" office:value="425067514" calcext:value-type="float">
            <text:p>425067514</text:p>
          </table:table-cell>
          <table:table-cell office:value-type="float" office:value="616033596.335725" calcext:value-type="float">
            <text:p>616033596.335725</text:p>
          </table:table-cell>
          <table:table-cell/>
          <table:table-cell office:value-type="string" calcext:value-type="string">
            <text:p>2019-07-10T12:26:36.3357249Z</text:p>
          </table:table-cell>
          <table:table-cell office:value-type="string" calcext:value-type="string">
            <text:p>2019-07-10-12:27:45.5197249</text:p>
          </table:table-cell>
          <table:table-cell table:number-columns-repeated="2"/>
        </table:table-row>
        <table:table-row table:style-name="ro1">
          <table:table-cell office:value-type="float" office:value="425171978" calcext:value-type="float">
            <text:p>425171978</text:p>
          </table:table-cell>
          <table:table-cell office:value-type="float" office:value="616138060.336941" calcext:value-type="float">
            <text:p>616138060.336941</text:p>
          </table:table-cell>
          <table:table-cell/>
          <table:table-cell office:value-type="string" calcext:value-type="string">
            <text:p>2019-07-11T17:27:40.3369410Z</text:p>
          </table:table-cell>
          <table:table-cell office:value-type="string" calcext:value-type="string">
            <text:p>2019-07-11-17:28:49.5209410</text:p>
          </table:table-cell>
          <table:table-cell table:number-columns-repeated="2"/>
        </table:table-row>
        <table:table-row table:style-name="ro1">
          <table:table-cell office:value-type="float" office:value="425243910" calcext:value-type="float">
            <text:p>425243910</text:p>
          </table:table-cell>
          <table:table-cell office:value-type="float" office:value="616209992.337792" calcext:value-type="float">
            <text:p>616209992.337792</text:p>
          </table:table-cell>
          <table:table-cell/>
          <table:table-cell office:value-type="string" calcext:value-type="string">
            <text:p>2019-07-12T13:26:32.3377920Z</text:p>
          </table:table-cell>
          <table:table-cell office:value-type="string" calcext:value-type="string">
            <text:p>2019-07-12-13:27:41.5217920</text:p>
          </table:table-cell>
          <table:table-cell table:number-columns-repeated="2"/>
        </table:table-row>
        <table:table-row table:style-name="ro1">
          <table:table-cell office:value-type="float" office:value="425315890" calcext:value-type="float">
            <text:p>425315890</text:p>
          </table:table-cell>
          <table:table-cell office:value-type="float" office:value="616281972.338632" calcext:value-type="float">
            <text:p>616281972.338632</text:p>
          </table:table-cell>
          <table:table-cell/>
          <table:table-cell office:value-type="string" calcext:value-type="string">
            <text:p>2019-07-13T09:26:12.3386319Z</text:p>
          </table:table-cell>
          <table:table-cell office:value-type="string" calcext:value-type="string">
            <text:p>2019-07-13-09:27:21.5226320</text:p>
          </table:table-cell>
          <table:table-cell table:number-columns-repeated="2"/>
        </table:table-row>
        <table:table-row table:style-name="ro1">
          <table:table-cell office:value-type="float" office:value="425384295" calcext:value-type="float">
            <text:p>425384295</text:p>
          </table:table-cell>
          <table:table-cell office:value-type="float" office:value="616350377.339423" calcext:value-type="float">
            <text:p>616350377.339423</text:p>
          </table:table-cell>
          <table:table-cell/>
          <table:table-cell office:value-type="string" calcext:value-type="string">
            <text:p>2019-07-14T04:26:17.3394229Z</text:p>
          </table:table-cell>
          <table:table-cell office:value-type="string" calcext:value-type="string">
            <text:p>2019-07-14-04:27:26.5234229</text:p>
          </table:table-cell>
          <table:table-cell table:number-columns-repeated="2"/>
        </table:table-row>
        <table:table-row table:style-name="ro1">
          <table:table-cell office:value-type="float" office:value="425517563" calcext:value-type="float">
            <text:p>425517563</text:p>
          </table:table-cell>
          <table:table-cell office:value-type="float" office:value="616483645.340984" calcext:value-type="float">
            <text:p>616483645.340984</text:p>
          </table:table-cell>
          <table:table-cell/>
          <table:table-cell office:value-type="string" calcext:value-type="string">
            <text:p>2019-07-15T17:27:25.3409839Z</text:p>
          </table:table-cell>
          <table:table-cell office:value-type="string" calcext:value-type="string">
            <text:p>2019-07-15-17:28:34.5249840</text:p>
          </table:table-cell>
          <table:table-cell table:number-columns-repeated="2"/>
        </table:table-row>
        <table:table-row table:style-name="ro1">
          <table:table-cell office:value-type="float" office:value="425582277" calcext:value-type="float">
            <text:p>425582277</text:p>
          </table:table-cell>
          <table:table-cell office:value-type="float" office:value="616548359.341742" calcext:value-type="float">
            <text:p>616548359.341742</text:p>
          </table:table-cell>
          <table:table-cell/>
          <table:table-cell office:value-type="string" calcext:value-type="string">
            <text:p>2019-07-16T11:25:59.3417420Z</text:p>
          </table:table-cell>
          <table:table-cell office:value-type="string" calcext:value-type="string">
            <text:p>2019-07-16-11:27:08.5257420</text:p>
          </table:table-cell>
          <table:table-cell table:number-columns-repeated="2"/>
        </table:table-row>
        <table:table-row table:style-name="ro1">
          <table:table-cell office:value-type="float" office:value="425661467" calcext:value-type="float">
            <text:p>425661467</text:p>
          </table:table-cell>
          <table:table-cell office:value-type="float" office:value="616627549.342655" calcext:value-type="float">
            <text:p>616627549.342655</text:p>
          </table:table-cell>
          <table:table-cell/>
          <table:table-cell office:value-type="string" calcext:value-type="string">
            <text:p>2019-07-17T09:25:49.3426549Z</text:p>
          </table:table-cell>
          <table:table-cell office:value-type="string" calcext:value-type="string">
            <text:p>2019-07-17-09:26:58.5266549</text:p>
          </table:table-cell>
          <table:table-cell table:number-columns-repeated="2"/>
        </table:table-row>
        <table:table-row table:style-name="ro1">
          <table:table-cell office:value-type="float" office:value="425751465" calcext:value-type="float">
            <text:p>425751465</text:p>
          </table:table-cell>
          <table:table-cell office:value-type="float" office:value="616717547.34371" calcext:value-type="float">
            <text:p>616717547.34371</text:p>
          </table:table-cell>
          <table:table-cell/>
          <table:table-cell office:value-type="string" calcext:value-type="string">
            <text:p>2019-07-18T10:25:47.3437099Z</text:p>
          </table:table-cell>
          <table:table-cell office:value-type="string" calcext:value-type="string">
            <text:p>2019-07-18-10:26:56.5277099</text:p>
          </table:table-cell>
          <table:table-cell table:number-columns-repeated="2"/>
        </table:table-row>
        <table:table-row table:style-name="ro1">
          <table:table-cell office:value-type="float" office:value="425845076" calcext:value-type="float">
            <text:p>425845076</text:p>
          </table:table-cell>
          <table:table-cell office:value-type="float" office:value="616811158.344815" calcext:value-type="float">
            <text:p>616811158.344815</text:p>
          </table:table-cell>
          <table:table-cell/>
          <table:table-cell office:value-type="string" calcext:value-type="string">
            <text:p>2019-07-19T12:25:58.3448150Z</text:p>
          </table:table-cell>
          <table:table-cell office:value-type="string" calcext:value-type="string">
            <text:p>2019-07-19-12:27:07.5288150</text:p>
          </table:table-cell>
          <table:table-cell table:number-columns-repeated="2"/>
        </table:table-row>
        <table:table-row table:style-name="ro1">
          <table:table-cell office:value-type="float" office:value="425924255" calcext:value-type="float">
            <text:p>425924255</text:p>
          </table:table-cell>
          <table:table-cell office:value-type="float" office:value="616890337.345738" calcext:value-type="float">
            <text:p>616890337.345738</text:p>
          </table:table-cell>
          <table:table-cell/>
          <table:table-cell office:value-type="string" calcext:value-type="string">
            <text:p>2019-07-20T10:25:37.3457379Z</text:p>
          </table:table-cell>
          <table:table-cell office:value-type="string" calcext:value-type="string">
            <text:p>2019-07-20-10:26:46.5297379</text:p>
          </table:table-cell>
          <table:table-cell table:number-columns-repeated="2"/>
        </table:table-row>
        <table:table-row table:style-name="ro1">
          <table:table-cell office:value-type="float" office:value="426104256" calcext:value-type="float">
            <text:p>426104256</text:p>
          </table:table-cell>
          <table:table-cell office:value-type="float" office:value="617070338.347834" calcext:value-type="float">
            <text:p>617070338.347834</text:p>
          </table:table-cell>
          <table:table-cell/>
          <table:table-cell office:value-type="string" calcext:value-type="string">
            <text:p>2019-07-22T12:25:38.3478339Z</text:p>
          </table:table-cell>
          <table:table-cell office:value-type="string" calcext:value-type="string">
            <text:p>2019-07-22-12:26:47.5318340</text:p>
          </table:table-cell>
          <table:table-cell table:number-columns-repeated="2"/>
        </table:table-row>
        <table:table-row table:style-name="ro1">
          <table:table-cell office:value-type="float" office:value="426161856" calcext:value-type="float">
            <text:p>426161856</text:p>
          </table:table-cell>
          <table:table-cell office:value-type="float" office:value="617127938.34851" calcext:value-type="float">
            <text:p>617127938.34851</text:p>
          </table:table-cell>
          <table:table-cell/>
          <table:table-cell office:value-type="string" calcext:value-type="string">
            <text:p>2019-07-23T04:25:38.3485100Z</text:p>
          </table:table-cell>
          <table:table-cell office:value-type="string" calcext:value-type="string">
            <text:p>2019-07-23-04:26:47.5325100</text:p>
          </table:table-cell>
          <table:table-cell table:number-columns-repeated="2"/>
        </table:table-row>
        <table:table-row table:style-name="ro1">
          <table:table-cell office:value-type="float" office:value="426295103" calcext:value-type="float">
            <text:p>426295103</text:p>
          </table:table-cell>
          <table:table-cell office:value-type="float" office:value="617261185.35004" calcext:value-type="float">
            <text:p>617261185.35004</text:p>
          </table:table-cell>
          <table:table-cell/>
          <table:table-cell office:value-type="string" calcext:value-type="string">
            <text:p>2019-07-24T17:26:25.3500399Z</text:p>
          </table:table-cell>
          <table:table-cell office:value-type="string" calcext:value-type="string">
            <text:p>2019-07-24-17:27:34.5340399</text:p>
          </table:table-cell>
          <table:table-cell table:number-columns-repeated="2"/>
        </table:table-row>
        <table:table-row table:style-name="ro1">
          <table:table-cell office:value-type="float" office:value="426356226" calcext:value-type="float">
            <text:p>426356226</text:p>
          </table:table-cell>
          <table:table-cell office:value-type="float" office:value="617322308.350765" calcext:value-type="float">
            <text:p>617322308.350765</text:p>
          </table:table-cell>
          <table:table-cell/>
          <table:table-cell office:value-type="string" calcext:value-type="string">
            <text:p>2019-07-25T10:25:08.3507649Z</text:p>
          </table:table-cell>
          <table:table-cell office:value-type="string" calcext:value-type="string">
            <text:p>2019-07-25-10:26:17.5347650</text:p>
          </table:table-cell>
          <table:table-cell table:number-columns-repeated="2"/>
        </table:table-row>
        <table:table-row table:style-name="ro1">
          <table:table-cell office:value-type="float" office:value="426446227" calcext:value-type="float">
            <text:p>426446227</text:p>
          </table:table-cell>
          <table:table-cell office:value-type="float" office:value="617412309.351829" calcext:value-type="float">
            <text:p>617412309.351829</text:p>
          </table:table-cell>
          <table:table-cell/>
          <table:table-cell office:value-type="string" calcext:value-type="string">
            <text:p>2019-07-26T11:25:09.3518289Z</text:p>
          </table:table-cell>
          <table:table-cell office:value-type="string" calcext:value-type="string">
            <text:p>2019-07-26-11:26:18.5358289</text:p>
          </table:table-cell>
          <table:table-cell table:number-columns-repeated="2"/>
        </table:table-row>
        <table:table-row table:style-name="ro1">
          <table:table-cell office:value-type="float" office:value="426507428" calcext:value-type="float">
            <text:p>426507428</text:p>
          </table:table-cell>
          <table:table-cell office:value-type="float" office:value="617473510.352525" calcext:value-type="float">
            <text:p>617473510.352525</text:p>
          </table:table-cell>
          <table:table-cell/>
          <table:table-cell office:value-type="string" calcext:value-type="string">
            <text:p>2019-07-27T04:25:10.3525249Z</text:p>
          </table:table-cell>
          <table:table-cell office:value-type="string" calcext:value-type="string">
            <text:p>2019-07-27-04:26:19.5365250</text:p>
          </table:table-cell>
          <table:table-cell table:number-columns-repeated="2"/>
        </table:table-row>
        <table:table-row table:style-name="ro1">
          <table:table-cell office:value-type="float" office:value="426611802" calcext:value-type="float">
            <text:p>426611802</text:p>
          </table:table-cell>
          <table:table-cell office:value-type="float" office:value="617577884.35375" calcext:value-type="float">
            <text:p>617577884.35375</text:p>
          </table:table-cell>
          <table:table-cell/>
          <table:table-cell office:value-type="string" calcext:value-type="string">
            <text:p>2019-07-28T09:24:44.3537499Z</text:p>
          </table:table-cell>
          <table:table-cell office:value-type="string" calcext:value-type="string">
            <text:p>2019-07-28-09:25:53.5377500</text:p>
          </table:table-cell>
          <table:table-cell table:number-columns-repeated="2"/>
        </table:table-row>
        <table:table-row table:style-name="ro1">
          <table:table-cell office:value-type="float" office:value="426709018" calcext:value-type="float">
            <text:p>426709018</text:p>
          </table:table-cell>
          <table:table-cell office:value-type="float" office:value="617675100.354883" calcext:value-type="float">
            <text:p>617675100.354883</text:p>
          </table:table-cell>
          <table:table-cell/>
          <table:table-cell office:value-type="string" calcext:value-type="string">
            <text:p>2019-07-29T12:25:00.3548829Z</text:p>
          </table:table-cell>
          <table:table-cell office:value-type="string" calcext:value-type="string">
            <text:p>2019-07-29-12:26:09.5388829</text:p>
          </table:table-cell>
          <table:table-cell table:number-columns-repeated="2"/>
        </table:table-row>
        <table:table-row table:style-name="ro1">
          <table:table-cell office:value-type="float" office:value="426780985" calcext:value-type="float">
            <text:p>426780985</text:p>
          </table:table-cell>
          <table:table-cell office:value-type="float" office:value="617747067.355707" calcext:value-type="float">
            <text:p>617747067.355707</text:p>
          </table:table-cell>
          <table:table-cell/>
          <table:table-cell office:value-type="string" calcext:value-type="string">
            <text:p>2019-07-30T08:24:27.3557069Z</text:p>
          </table:table-cell>
          <table:table-cell office:value-type="string" calcext:value-type="string">
            <text:p>2019-07-30-08:25:36.5397069</text:p>
          </table:table-cell>
          <table:table-cell table:number-columns-repeated="2"/>
        </table:table-row>
        <table:table-row table:style-name="ro1">
          <table:table-cell office:value-type="float" office:value="426874583" calcext:value-type="float">
            <text:p>426874583</text:p>
          </table:table-cell>
          <table:table-cell office:value-type="float" office:value="617840665.35681" calcext:value-type="float">
            <text:p>617840665.35681</text:p>
          </table:table-cell>
          <table:table-cell/>
          <table:table-cell office:value-type="string" calcext:value-type="string">
            <text:p>2019-07-31T10:24:25.3568099Z</text:p>
          </table:table-cell>
          <table:table-cell office:value-type="string" calcext:value-type="string">
            <text:p>2019-07-31-10:25:34.5408099</text:p>
          </table:table-cell>
          <table:table-cell table:number-columns-repeated="2"/>
        </table:table-row>
        <table:table-row table:style-name="ro1">
          <table:table-cell office:value-type="float" office:value="426935794" calcext:value-type="float">
            <text:p>426935794</text:p>
          </table:table-cell>
          <table:table-cell office:value-type="float" office:value="617901876.357507" calcext:value-type="float">
            <text:p>617901876.357507</text:p>
          </table:table-cell>
          <table:table-cell/>
          <table:table-cell office:value-type="string" calcext:value-type="string">
            <text:p>2019-08-01T03:24:36.3575069Z</text:p>
          </table:table-cell>
          <table:table-cell office:value-type="string" calcext:value-type="string">
            <text:p>2019-08-01-03:25:45.5415070</text:p>
          </table:table-cell>
          <table:table-cell table:number-columns-repeated="2"/>
        </table:table-row>
        <table:table-row table:style-name="ro1">
          <table:table-cell office:value-type="float" office:value="427040164" calcext:value-type="float">
            <text:p>427040164</text:p>
          </table:table-cell>
          <table:table-cell office:value-type="float" office:value="618006246.35872" calcext:value-type="float">
            <text:p>618006246.35872</text:p>
          </table:table-cell>
          <table:table-cell/>
          <table:table-cell office:value-type="string" calcext:value-type="string">
            <text:p>2019-08-02T08:24:06.3587199Z</text:p>
          </table:table-cell>
          <table:table-cell office:value-type="string" calcext:value-type="string">
            <text:p>2019-08-02-08:25:15.5427199</text:p>
          </table:table-cell>
          <table:table-cell table:number-columns-repeated="2"/>
        </table:table-row>
        <table:table-row table:style-name="ro1">
          <table:table-cell office:value-type="float" office:value="427159041" calcext:value-type="float">
            <text:p>427159041</text:p>
          </table:table-cell>
          <table:table-cell office:value-type="float" office:value="618125123.36009" calcext:value-type="float">
            <text:p>618125123.36009</text:p>
          </table:table-cell>
          <table:table-cell/>
          <table:table-cell office:value-type="string" calcext:value-type="string">
            <text:p>2019-08-03T17:25:23.3600900Z</text:p>
          </table:table-cell>
          <table:table-cell office:value-type="string" calcext:value-type="string">
            <text:p>2019-08-03-17:26:32.5440900</text:p>
          </table:table-cell>
          <table:table-cell table:number-columns-repeated="2"/>
        </table:table-row>
        <table:table-row table:style-name="ro1">
          <table:table-cell office:value-type="float" office:value="427245436" calcext:value-type="float">
            <text:p>427245436</text:p>
          </table:table-cell>
          <table:table-cell office:value-type="float" office:value="618211518.361094" calcext:value-type="float">
            <text:p>618211518.361094</text:p>
          </table:table-cell>
          <table:table-cell/>
          <table:table-cell office:value-type="string" calcext:value-type="string">
            <text:p>2019-08-04T17:25:18.3610939Z</text:p>
          </table:table-cell>
          <table:table-cell office:value-type="string" calcext:value-type="string">
            <text:p>2019-08-04-17:26:27.5450940</text:p>
          </table:table-cell>
          <table:table-cell table:number-columns-repeated="2"/>
        </table:table-row>
        <table:table-row table:style-name="ro1">
          <table:table-cell office:value-type="float" office:value="427310163" calcext:value-type="float">
            <text:p>427310163</text:p>
          </table:table-cell>
          <table:table-cell office:value-type="float" office:value="618276245.361881" calcext:value-type="float">
            <text:p>618276245.361881</text:p>
          </table:table-cell>
          <table:table-cell/>
          <table:table-cell office:value-type="string" calcext:value-type="string">
            <text:p>2019-08-05T11:24:05.3618810Z</text:p>
          </table:table-cell>
          <table:table-cell office:value-type="string" calcext:value-type="string">
            <text:p>2019-08-05-11:25:14.5458810</text:p>
          </table:table-cell>
          <table:table-cell table:number-columns-repeated="2"/>
        </table:table-row>
        <table:table-row table:style-name="ro1">
          <table:table-cell office:value-type="float" office:value="427367760" calcext:value-type="float">
            <text:p>427367760</text:p>
          </table:table-cell>
          <table:table-cell office:value-type="float" office:value="618333842.36255" calcext:value-type="float">
            <text:p>618333842.36255</text:p>
          </table:table-cell>
          <table:table-cell/>
          <table:table-cell office:value-type="string" calcext:value-type="string">
            <text:p>2019-08-06T03:24:02.3625500Z</text:p>
          </table:table-cell>
          <table:table-cell office:value-type="string" calcext:value-type="string">
            <text:p>2019-08-06-03:25:11.5465500</text:p>
          </table:table-cell>
          <table:table-cell table:number-columns-repeated="2"/>
        </table:table-row>
        <table:table-row table:style-name="ro1">
          <table:table-cell office:value-type="float" office:value="427504604" calcext:value-type="float">
            <text:p>427504604</text:p>
          </table:table-cell>
          <table:table-cell office:value-type="float" office:value="618470686.364144" calcext:value-type="float">
            <text:p>618470686.364144</text:p>
          </table:table-cell>
          <table:table-cell/>
          <table:table-cell office:value-type="string" calcext:value-type="string">
            <text:p>2019-08-07T17:24:46.3641439Z</text:p>
          </table:table-cell>
          <table:table-cell office:value-type="string" calcext:value-type="string">
            <text:p>2019-08-07-17:25:55.5481439</text:p>
          </table:table-cell>
          <table:table-cell table:number-columns-repeated="2"/>
        </table:table-row>
        <table:table-row table:style-name="ro1">
          <table:table-cell office:value-type="float" office:value="427562120" calcext:value-type="float">
            <text:p>427562120</text:p>
          </table:table-cell>
          <table:table-cell office:value-type="float" office:value="618528202.364806" calcext:value-type="float">
            <text:p>618528202.364806</text:p>
          </table:table-cell>
          <table:table-cell/>
          <table:table-cell office:value-type="string" calcext:value-type="string">
            <text:p>2019-08-08T09:23:22.3648059Z</text:p>
          </table:table-cell>
          <table:table-cell office:value-type="string" calcext:value-type="string">
            <text:p>2019-08-08-09:24:31.5488059</text:p>
          </table:table-cell>
          <table:table-cell table:number-columns-repeated="2"/>
        </table:table-row>
        <table:table-row table:style-name="ro1">
          <table:table-cell office:value-type="float" office:value="427652119" calcext:value-type="float">
            <text:p>427652119</text:p>
          </table:table-cell>
          <table:table-cell office:value-type="float" office:value="618618201.36585" calcext:value-type="float">
            <text:p>618618201.36585</text:p>
          </table:table-cell>
          <table:table-cell/>
          <table:table-cell office:value-type="string" calcext:value-type="string">
            <text:p>2019-08-09T10:23:21.3658499Z</text:p>
          </table:table-cell>
          <table:table-cell office:value-type="string" calcext:value-type="string">
            <text:p>2019-08-09-10:24:30.5498499</text:p>
          </table:table-cell>
          <table:table-cell table:number-columns-repeated="2"/>
        </table:table-row>
        <table:table-row table:style-name="ro1">
          <table:table-cell office:value-type="float" office:value="427734906" calcext:value-type="float">
            <text:p>427734906</text:p>
          </table:table-cell>
          <table:table-cell office:value-type="float" office:value="618700988.366811" calcext:value-type="float">
            <text:p>618700988.366811</text:p>
          </table:table-cell>
          <table:table-cell/>
          <table:table-cell office:value-type="string" calcext:value-type="string">
            <text:p>2019-08-10T09:23:08.3668110Z</text:p>
          </table:table-cell>
          <table:table-cell office:value-type="string" calcext:value-type="string">
            <text:p>2019-08-10-09:24:17.5508110</text:p>
          </table:table-cell>
          <table:table-cell table:number-columns-repeated="2"/>
        </table:table-row>
        <table:table-row table:style-name="ro1">
          <table:table-cell office:value-type="float" office:value="427850167" calcext:value-type="float">
            <text:p>427850167</text:p>
          </table:table-cell>
          <table:table-cell office:value-type="float" office:value="618816249.368154" calcext:value-type="float">
            <text:p>618816249.368154</text:p>
          </table:table-cell>
          <table:table-cell/>
          <table:table-cell office:value-type="string" calcext:value-type="string">
            <text:p>2019-08-11T17:24:09.3681539Z</text:p>
          </table:table-cell>
          <table:table-cell office:value-type="string" calcext:value-type="string">
            <text:p>2019-08-11-17:25:18.5521539</text:p>
          </table:table-cell>
          <table:table-cell table:number-columns-repeated="2"/>
        </table:table-row>
        <table:table-row table:style-name="ro1">
          <table:table-cell office:value-type="float" office:value="427936558" calcext:value-type="float">
            <text:p>427936558</text:p>
          </table:table-cell>
          <table:table-cell office:value-type="float" office:value="618902640.369137" calcext:value-type="float">
            <text:p>618902640.369137</text:p>
          </table:table-cell>
          <table:table-cell/>
          <table:table-cell office:value-type="string" calcext:value-type="string">
            <text:p>2019-08-12T17:24:00.3691369Z</text:p>
          </table:table-cell>
          <table:table-cell office:value-type="string" calcext:value-type="string">
            <text:p>2019-08-12-17:25:09.5531369</text:p>
          </table:table-cell>
          <table:table-cell table:number-columns-repeated="2"/>
        </table:table-row>
        <table:table-row table:style-name="ro1">
          <table:table-cell office:value-type="float" office:value="427997681" calcext:value-type="float">
            <text:p>427997681</text:p>
          </table:table-cell>
          <table:table-cell office:value-type="float" office:value="618963763.369872" calcext:value-type="float">
            <text:p>618963763.369872</text:p>
          </table:table-cell>
          <table:table-cell/>
          <table:table-cell office:value-type="string" calcext:value-type="string">
            <text:p>2019-08-13T10:22:43.3698719Z</text:p>
          </table:table-cell>
          <table:table-cell office:value-type="string" calcext:value-type="string">
            <text:p>2019-08-13-10:23:52.5538719</text:p>
          </table:table-cell>
          <table:table-cell table:number-columns-repeated="2"/>
        </table:table-row>
        <table:table-row table:style-name="ro1">
          <table:table-cell office:value-type="float" office:value="428076868" calcext:value-type="float">
            <text:p>428076868</text:p>
          </table:table-cell>
          <table:table-cell office:value-type="float" office:value="619042950.370778" calcext:value-type="float">
            <text:p>619042950.370778</text:p>
          </table:table-cell>
          <table:table-cell/>
          <table:table-cell office:value-type="string" calcext:value-type="string">
            <text:p>2019-08-14T08:22:30.3707779Z</text:p>
          </table:table-cell>
          <table:table-cell office:value-type="string" calcext:value-type="string">
            <text:p>2019-08-14-08:23:39.5547779</text:p>
          </table:table-cell>
          <table:table-cell table:number-columns-repeated="2"/>
        </table:table-row>
        <table:table-row table:style-name="ro1">
          <table:table-cell office:value-type="float" office:value="428170468" calcext:value-type="float">
            <text:p>428170468</text:p>
          </table:table-cell>
          <table:table-cell office:value-type="float" office:value="619136550.371866" calcext:value-type="float">
            <text:p>619136550.371866</text:p>
          </table:table-cell>
          <table:table-cell/>
          <table:table-cell office:value-type="string" calcext:value-type="string">
            <text:p>2019-08-15T10:22:30.3718659Z</text:p>
          </table:table-cell>
          <table:table-cell office:value-type="string" calcext:value-type="string">
            <text:p>2019-08-15-10:23:39.5558660</text:p>
          </table:table-cell>
          <table:table-cell table:number-columns-repeated="2"/>
        </table:table-row>
        <table:table-row table:style-name="ro1">
          <table:table-cell office:value-type="float" office:value="428256860" calcext:value-type="float">
            <text:p>428256860</text:p>
          </table:table-cell>
          <table:table-cell office:value-type="float" office:value="619222942.372881" calcext:value-type="float">
            <text:p>619222942.372881</text:p>
          </table:table-cell>
          <table:table-cell/>
          <table:table-cell office:value-type="string" calcext:value-type="string">
            <text:p>2019-08-16T10:22:22.3728809Z</text:p>
          </table:table-cell>
          <table:table-cell office:value-type="string" calcext:value-type="string">
            <text:p>2019-08-16-10:23:31.5568809</text:p>
          </table:table-cell>
          <table:table-cell table:number-columns-repeated="2"/>
        </table:table-row>
        <table:table-row table:style-name="ro1">
          <table:table-cell office:value-type="float" office:value="428343253" calcext:value-type="float">
            <text:p>428343253</text:p>
          </table:table-cell>
          <table:table-cell office:value-type="float" office:value="619309335.373873" calcext:value-type="float">
            <text:p>619309335.373873</text:p>
          </table:table-cell>
          <table:table-cell/>
          <table:table-cell office:value-type="string" calcext:value-type="string">
            <text:p>2019-08-17T10:22:15.3738729Z</text:p>
          </table:table-cell>
          <table:table-cell office:value-type="string" calcext:value-type="string">
            <text:p>2019-08-17-10:23:24.5578730</text:p>
          </table:table-cell>
          <table:table-cell table:number-columns-repeated="2"/>
        </table:table-row>
        <table:table-row table:style-name="ro1">
          <table:table-cell office:value-type="float" office:value="428426034" calcext:value-type="float">
            <text:p>428426034</text:p>
          </table:table-cell>
          <table:table-cell office:value-type="float" office:value="619392116.374827" calcext:value-type="float">
            <text:p>619392116.374827</text:p>
          </table:table-cell>
          <table:table-cell/>
          <table:table-cell office:value-type="string" calcext:value-type="string">
            <text:p>2019-08-18T09:21:56.3748270Z</text:p>
          </table:table-cell>
          <table:table-cell office:value-type="string" calcext:value-type="string">
            <text:p>2019-08-18-09:23:05.5588270</text:p>
          </table:table-cell>
          <table:table-cell table:number-columns-repeated="2"/>
        </table:table-row>
        <table:table-row table:style-name="ro1">
          <table:table-cell office:value-type="float" office:value="428487242" calcext:value-type="float">
            <text:p>428487242</text:p>
          </table:table-cell>
          <table:table-cell office:value-type="float" office:value="619453324.375552" calcext:value-type="float">
            <text:p>619453324.375552</text:p>
          </table:table-cell>
          <table:table-cell/>
          <table:table-cell office:value-type="string" calcext:value-type="string">
            <text:p>2019-08-19T02:22:04.3755519Z</text:p>
          </table:table-cell>
          <table:table-cell office:value-type="string" calcext:value-type="string">
            <text:p>2019-08-19-02:23:13.5595519</text:p>
          </table:table-cell>
          <table:table-cell table:number-columns-repeated="2"/>
        </table:table-row>
        <table:table-row table:style-name="ro1">
          <table:table-cell office:value-type="float" office:value="428602427" calcext:value-type="float">
            <text:p>428602427</text:p>
          </table:table-cell>
          <table:table-cell office:value-type="float" office:value="619568509.376889" calcext:value-type="float">
            <text:p>619568509.376889</text:p>
          </table:table-cell>
          <table:table-cell/>
          <table:table-cell office:value-type="string" calcext:value-type="string">
            <text:p>2019-08-20T10:21:49.3768889Z</text:p>
          </table:table-cell>
          <table:table-cell office:value-type="string" calcext:value-type="string">
            <text:p>2019-08-20-10:22:58.5608890</text:p>
          </table:table-cell>
          <table:table-cell table:number-columns-repeated="2"/>
        </table:table-row>
        <table:table-row table:style-name="ro1">
          <table:table-cell office:value-type="float" office:value="428714072" calcext:value-type="float">
            <text:p>428714072</text:p>
          </table:table-cell>
          <table:table-cell office:value-type="float" office:value="619680154.378192" calcext:value-type="float">
            <text:p>619680154.378192</text:p>
          </table:table-cell>
          <table:table-cell/>
          <table:table-cell office:value-type="string" calcext:value-type="string">
            <text:p>2019-08-21T17:22:34.3781919Z</text:p>
          </table:table-cell>
          <table:table-cell office:value-type="string" calcext:value-type="string">
            <text:p>2019-08-21-17:23:43.5621919</text:p>
          </table:table-cell>
          <table:table-cell table:number-columns-repeated="2"/>
        </table:table-row>
        <table:table-row table:style-name="ro1">
          <table:table-cell office:value-type="float" office:value="428800404" calcext:value-type="float">
            <text:p>428800404</text:p>
          </table:table-cell>
          <table:table-cell office:value-type="float" office:value="619766486.379171" calcext:value-type="float">
            <text:p>619766486.379171</text:p>
          </table:table-cell>
          <table:table-cell/>
          <table:table-cell office:value-type="string" calcext:value-type="string">
            <text:p>2019-08-22T17:21:26.3791710Z</text:p>
          </table:table-cell>
          <table:table-cell office:value-type="string" calcext:value-type="string">
            <text:p>2019-08-22-17:22:35.5631710</text:p>
          </table:table-cell>
          <table:table-cell table:number-columns-repeated="2"/>
        </table:table-row>
        <table:table-row table:style-name="ro1">
          <table:table-cell office:value-type="float" office:value="428861597" calcext:value-type="float">
            <text:p>428861597</text:p>
          </table:table-cell>
          <table:table-cell office:value-type="float" office:value="619827679.379872" calcext:value-type="float">
            <text:p>619827679.379872</text:p>
          </table:table-cell>
          <table:table-cell/>
          <table:table-cell office:value-type="string" calcext:value-type="string">
            <text:p>2019-08-23T10:21:19.3798719Z</text:p>
          </table:table-cell>
          <table:table-cell office:value-type="string" calcext:value-type="string">
            <text:p>2019-08-23-10:22:28.5638719</text:p>
          </table:table-cell>
          <table:table-cell table:number-columns-repeated="2"/>
        </table:table-row>
        <table:table-row table:style-name="ro1">
          <table:table-cell office:value-type="float" office:value="428973249" calcext:value-type="float">
            <text:p>428973249</text:p>
          </table:table-cell>
          <table:table-cell office:value-type="float" office:value="619939331.38113" calcext:value-type="float">
            <text:p>619939331.38113</text:p>
          </table:table-cell>
          <table:table-cell/>
          <table:table-cell office:value-type="string" calcext:value-type="string">
            <text:p>2019-08-24T17:22:11.3811299Z</text:p>
          </table:table-cell>
          <table:table-cell office:value-type="string" calcext:value-type="string">
            <text:p>2019-08-24-17:23:20.5651299</text:p>
          </table:table-cell>
          <table:table-cell table:number-columns-repeated="2"/>
        </table:table-row>
        <table:table-row table:style-name="ro1">
          <table:table-cell office:value-type="float" office:value="429030775" calcext:value-type="float">
            <text:p>429030775</text:p>
          </table:table-cell>
          <table:table-cell office:value-type="float" office:value="619996857.38183" calcext:value-type="float">
            <text:p>619996857.38183</text:p>
          </table:table-cell>
          <table:table-cell/>
          <table:table-cell office:value-type="string" calcext:value-type="string">
            <text:p>2019-08-25T09:20:57.3818299Z</text:p>
          </table:table-cell>
          <table:table-cell office:value-type="string" calcext:value-type="string">
            <text:p>2019-08-25-09:22:06.5658299</text:p>
          </table:table-cell>
          <table:table-cell table:number-columns-repeated="2"/>
        </table:table-row>
        <table:table-row table:style-name="ro1">
          <table:table-cell office:value-type="float" office:value="429117164" calcext:value-type="float">
            <text:p>429117164</text:p>
          </table:table-cell>
          <table:table-cell office:value-type="float" office:value="620083246.382826" calcext:value-type="float">
            <text:p>620083246.382826</text:p>
          </table:table-cell>
          <table:table-cell/>
          <table:table-cell office:value-type="string" calcext:value-type="string">
            <text:p>2019-08-26T09:20:46.3828259Z</text:p>
          </table:table-cell>
          <table:table-cell office:value-type="string" calcext:value-type="string">
            <text:p>2019-08-26-09:21:55.5668259</text:p>
          </table:table-cell>
          <table:table-cell table:number-columns-repeated="2"/>
        </table:table-row>
        <table:table-row table:style-name="ro1">
          <table:table-cell office:value-type="float" office:value="429192742" calcext:value-type="float">
            <text:p>429192742</text:p>
          </table:table-cell>
          <table:table-cell office:value-type="float" office:value="620158824.383704" calcext:value-type="float">
            <text:p>620158824.383704</text:p>
          </table:table-cell>
          <table:table-cell/>
          <table:table-cell office:value-type="string" calcext:value-type="string">
            <text:p>2019-08-27T06:20:24.3837039Z</text:p>
          </table:table-cell>
          <table:table-cell office:value-type="string" calcext:value-type="string">
            <text:p>2019-08-27-06:21:33.5677039</text:p>
          </table:table-cell>
          <table:table-cell table:number-columns-repeated="2"/>
        </table:table-row>
        <table:table-row table:style-name="ro1">
          <table:table-cell office:value-type="float" office:value="429286333" calcext:value-type="float">
            <text:p>429286333</text:p>
          </table:table-cell>
          <table:table-cell office:value-type="float" office:value="620252415.384783" calcext:value-type="float">
            <text:p>620252415.384783</text:p>
          </table:table-cell>
          <table:table-cell/>
          <table:table-cell office:value-type="string" calcext:value-type="string">
            <text:p>2019-08-28T08:20:15.3847830Z</text:p>
          </table:table-cell>
          <table:table-cell office:value-type="string" calcext:value-type="string">
            <text:p>2019-08-28-08:21:24.5687830</text:p>
          </table:table-cell>
          <table:table-cell table:number-columns-repeated="2"/>
        </table:table-row>
        <table:table-row table:style-name="ro1">
          <table:table-cell office:value-type="float" office:value="429361917" calcext:value-type="float">
            <text:p>429361917</text:p>
          </table:table-cell>
          <table:table-cell office:value-type="float" office:value="620327999.385653" calcext:value-type="float">
            <text:p>620327999.385653</text:p>
          </table:table-cell>
          <table:table-cell/>
          <table:table-cell office:value-type="string" calcext:value-type="string">
            <text:p>2019-08-29T05:19:59.3856530Z</text:p>
          </table:table-cell>
          <table:table-cell office:value-type="string" calcext:value-type="string">
            <text:p>2019-08-29-05:21:08.5696530</text:p>
          </table:table-cell>
          <table:table-cell table:number-columns-repeated="2"/>
        </table:table-row>
        <table:table-row table:style-name="ro1">
          <table:table-cell office:value-type="float" office:value="429459137" calcext:value-type="float">
            <text:p>429459137</text:p>
          </table:table-cell>
          <table:table-cell office:value-type="float" office:value="620425219.386776" calcext:value-type="float">
            <text:p>620425219.386776</text:p>
          </table:table-cell>
          <table:table-cell/>
          <table:table-cell office:value-type="string" calcext:value-type="string">
            <text:p>2019-08-30T08:20:19.3867759Z</text:p>
          </table:table-cell>
          <table:table-cell office:value-type="string" calcext:value-type="string">
            <text:p>2019-08-30-08:21:28.5707759</text:p>
          </table:table-cell>
          <table:table-cell table:number-columns-repeated="2"/>
        </table:table-row>
        <table:table-row table:style-name="ro1">
          <table:table-cell office:value-type="float" office:value="429750728" calcext:value-type="float">
            <text:p>429750728</text:p>
          </table:table-cell>
          <table:table-cell office:value-type="float" office:value="620716810.390137" calcext:value-type="float">
            <text:p>620716810.390137</text:p>
          </table:table-cell>
          <table:table-cell/>
          <table:table-cell office:value-type="string" calcext:value-type="string">
            <text:p>2019-09-02T17:20:10.3901369Z</text:p>
          </table:table-cell>
          <table:table-cell office:value-type="string" calcext:value-type="string">
            <text:p>2019-09-02-17:21:19.5741369</text:p>
          </table:table-cell>
          <table:table-cell table:number-columns-repeated="2"/>
        </table:table-row>
        <table:table-row table:style-name="ro1">
          <table:table-cell office:value-type="float" office:value="429865923" calcext:value-type="float">
            <text:p>429865923</text:p>
          </table:table-cell>
          <table:table-cell office:value-type="float" office:value="620832005.391453" calcext:value-type="float">
            <text:p>620832005.391453</text:p>
          </table:table-cell>
          <table:table-cell/>
          <table:table-cell office:value-type="string" calcext:value-type="string">
            <text:p>2019-09-04T01:20:05.3914530Z</text:p>
          </table:table-cell>
          <table:table-cell office:value-type="string" calcext:value-type="string">
            <text:p>2019-09-04-01:21:14.5754530</text:p>
          </table:table-cell>
          <table:table-cell table:number-columns-repeated="2"/>
        </table:table-row>
        <table:table-row table:style-name="ro1">
          <table:table-cell office:value-type="float" office:value="430009943" calcext:value-type="float">
            <text:p>430009943</text:p>
          </table:table-cell>
          <table:table-cell office:value-type="float" office:value="620976025.393107" calcext:value-type="float">
            <text:p>620976025.393107</text:p>
          </table:table-cell>
          <table:table-cell/>
          <table:table-cell office:value-type="string" calcext:value-type="string">
            <text:p>2019-09-05T17:20:25.3931069Z</text:p>
          </table:table-cell>
          <table:table-cell office:value-type="string" calcext:value-type="string">
            <text:p>2019-09-05-17:21:34.5771069</text:p>
          </table:table-cell>
          <table:table-cell table:number-columns-repeated="2"/>
        </table:table-row>
        <table:table-row table:style-name="ro1">
          <table:table-cell office:value-type="float" office:value="430067462" calcext:value-type="float">
            <text:p>430067462</text:p>
          </table:table-cell>
          <table:table-cell office:value-type="float" office:value="621033544.393778" calcext:value-type="float">
            <text:p>621033544.393778</text:p>
          </table:table-cell>
          <table:table-cell/>
          <table:table-cell office:value-type="string" calcext:value-type="string">
            <text:p>2019-09-06T09:19:04.3937779Z</text:p>
          </table:table-cell>
          <table:table-cell office:value-type="string" calcext:value-type="string">
            <text:p>2019-09-06-09:20:13.5777779</text:p>
          </table:table-cell>
          <table:table-cell table:number-columns-repeated="2"/>
        </table:table-row>
        <table:table-row table:style-name="ro1">
          <table:table-cell office:value-type="float" office:value="430182650" calcext:value-type="float">
            <text:p>430182650</text:p>
          </table:table-cell>
          <table:table-cell office:value-type="float" office:value="621148732.395094" calcext:value-type="float">
            <text:p>621148732.395094</text:p>
          </table:table-cell>
          <table:table-cell/>
          <table:table-cell office:value-type="string" calcext:value-type="string">
            <text:p>2019-09-07T17:18:52.3950940Z</text:p>
          </table:table-cell>
          <table:table-cell office:value-type="string" calcext:value-type="string">
            <text:p>2019-09-07-17:20:01.5790940</text:p>
          </table:table-cell>
          <table:table-cell table:number-columns-repeated="2"/>
        </table:table-row>
        <table:table-row table:style-name="ro1">
          <table:table-cell office:value-type="float" office:value="430269036" calcext:value-type="float">
            <text:p>430269036</text:p>
          </table:table-cell>
          <table:table-cell office:value-type="float" office:value="621235118.396077" calcext:value-type="float">
            <text:p>621235118.396077</text:p>
          </table:table-cell>
          <table:table-cell/>
          <table:table-cell office:value-type="string" calcext:value-type="string">
            <text:p>2019-09-08T17:18:38.3960770Z</text:p>
          </table:table-cell>
          <table:table-cell office:value-type="string" calcext:value-type="string">
            <text:p>2019-09-08-17:19:47.5800770</text:p>
          </table:table-cell>
          <table:table-cell table:number-columns-repeated="2"/>
        </table:table-row>
        <table:table-row table:style-name="ro1">
          <table:table-cell office:value-type="float" office:value="430319400" calcext:value-type="float">
            <text:p>430319400</text:p>
          </table:table-cell>
          <table:table-cell office:value-type="float" office:value="621285482.396663" calcext:value-type="float">
            <text:p>621285482.396663</text:p>
          </table:table-cell>
          <table:table-cell/>
          <table:table-cell office:value-type="string" calcext:value-type="string">
            <text:p>2019-09-09T07:18:02.3966629Z</text:p>
          </table:table-cell>
          <table:table-cell office:value-type="string" calcext:value-type="string">
            <text:p>2019-09-09-07:19:11.5806629</text:p>
          </table:table-cell>
          <table:table-cell table:number-columns-repeated="2"/>
        </table:table-row>
        <table:table-row table:style-name="ro1">
          <table:table-cell office:value-type="float" office:value="430441816" calcext:value-type="float">
            <text:p>430441816</text:p>
          </table:table-cell>
          <table:table-cell office:value-type="float" office:value="621407898.398048" calcext:value-type="float">
            <text:p>621407898.398048</text:p>
          </table:table-cell>
          <table:table-cell/>
          <table:table-cell office:value-type="string" calcext:value-type="string">
            <text:p>2019-09-10T17:18:18.3980480Z</text:p>
          </table:table-cell>
          <table:table-cell office:value-type="string" calcext:value-type="string">
            <text:p>2019-09-10-17:19:27.5820480</text:p>
          </table:table-cell>
          <table:table-cell table:number-columns-repeated="2"/>
        </table:table-row>
        <table:table-row table:style-name="ro1">
          <table:table-cell office:value-type="float" office:value="430495783" calcext:value-type="float">
            <text:p>430495783</text:p>
          </table:table-cell>
          <table:table-cell office:value-type="float" office:value="621461865.398667" calcext:value-type="float">
            <text:p>621461865.398667</text:p>
          </table:table-cell>
          <table:table-cell/>
          <table:table-cell office:value-type="string" calcext:value-type="string">
            <text:p>2019-09-11T08:17:45.3986669Z</text:p>
          </table:table-cell>
          <table:table-cell office:value-type="string" calcext:value-type="string">
            <text:p>2019-09-11-08:18:54.5826669</text:p>
          </table:table-cell>
          <table:table-cell table:number-columns-repeated="2"/>
        </table:table-row>
        <table:table-row table:style-name="ro1">
          <table:table-cell office:value-type="float" office:value="430614590" calcext:value-type="float">
            <text:p>430614590</text:p>
          </table:table-cell>
          <table:table-cell office:value-type="float" office:value="621580672.400018" calcext:value-type="float">
            <text:p>621580672.400018</text:p>
          </table:table-cell>
          <table:table-cell/>
          <table:table-cell office:value-type="string" calcext:value-type="string">
            <text:p>2019-09-12T17:17:52.4000179Z</text:p>
          </table:table-cell>
          <table:table-cell office:value-type="string" calcext:value-type="string">
            <text:p>2019-09-12-17:19:01.5840179</text:p>
          </table:table-cell>
          <table:table-cell table:number-columns-repeated="2"/>
        </table:table-row>
        <table:table-row table:style-name="ro1">
          <table:table-cell office:value-type="float" office:value="430700988" calcext:value-type="float">
            <text:p>430700988</text:p>
          </table:table-cell>
          <table:table-cell office:value-type="float" office:value="621667070.401009" calcext:value-type="float">
            <text:p>621667070.401009</text:p>
          </table:table-cell>
          <table:table-cell/>
          <table:table-cell office:value-type="string" calcext:value-type="string">
            <text:p>2019-09-13T17:17:50.4010089Z</text:p>
          </table:table-cell>
          <table:table-cell office:value-type="string" calcext:value-type="string">
            <text:p>2019-09-13-17:18:59.5850089</text:p>
          </table:table-cell>
          <table:table-cell table:number-columns-repeated="2"/>
        </table:table-row>
        <table:table-row table:style-name="ro1">
          <table:table-cell office:value-type="float" office:value="430783814" calcext:value-type="float">
            <text:p>430783814</text:p>
          </table:table-cell>
          <table:table-cell office:value-type="float" office:value="621749896.401935" calcext:value-type="float">
            <text:p>621749896.401935</text:p>
          </table:table-cell>
          <table:table-cell/>
          <table:table-cell office:value-type="string" calcext:value-type="string">
            <text:p>2019-09-14T16:18:16.4019349Z</text:p>
          </table:table-cell>
          <table:table-cell office:value-type="string" calcext:value-type="string">
            <text:p>2019-09-14-16:19:25.5859349</text:p>
          </table:table-cell>
          <table:table-cell table:number-columns-repeated="2"/>
        </table:table-row>
        <table:table-row table:style-name="ro1">
          <table:table-cell office:value-type="float" office:value="430830528" calcext:value-type="float">
            <text:p>430830528</text:p>
          </table:table-cell>
          <table:table-cell office:value-type="float" office:value="621796610.402489" calcext:value-type="float">
            <text:p>621796610.402489</text:p>
          </table:table-cell>
          <table:table-cell/>
          <table:table-cell office:value-type="string" calcext:value-type="string">
            <text:p>2019-09-15T05:16:50.4024889Z</text:p>
          </table:table-cell>
          <table:table-cell office:value-type="string" calcext:value-type="string">
            <text:p>2019-09-15-05:17:59.5864889</text:p>
          </table:table-cell>
          <table:table-cell table:number-columns-repeated="2"/>
        </table:table-row>
        <table:table-row table:style-name="ro1">
          <table:table-cell office:value-type="float" office:value="430956551" calcext:value-type="float">
            <text:p>430956551</text:p>
          </table:table-cell>
          <table:table-cell office:value-type="float" office:value="621922633.403933" calcext:value-type="float">
            <text:p>621922633.403933</text:p>
          </table:table-cell>
          <table:table-cell/>
          <table:table-cell office:value-type="string" calcext:value-type="string">
            <text:p>2019-09-16T16:17:13.4039329Z</text:p>
          </table:table-cell>
          <table:table-cell office:value-type="string" calcext:value-type="string">
            <text:p>2019-09-16-16:18:22.5879329</text:p>
          </table:table-cell>
          <table:table-cell table:number-columns-repeated="2"/>
        </table:table-row>
        <table:table-row table:style-name="ro1">
          <table:table-cell office:value-type="float" office:value="431003304" calcext:value-type="float">
            <text:p>431003304</text:p>
          </table:table-cell>
          <table:table-cell office:value-type="float" office:value="621969386.404466" calcext:value-type="float">
            <text:p>621969386.404466</text:p>
          </table:table-cell>
          <table:table-cell/>
          <table:table-cell office:value-type="string" calcext:value-type="string">
            <text:p>2019-09-17T05:16:26.4044660Z</text:p>
          </table:table-cell>
          <table:table-cell office:value-type="string" calcext:value-type="string">
            <text:p>2019-09-17-05:17:35.5884660</text:p>
          </table:table-cell>
          <table:table-cell table:number-columns-repeated="2"/>
        </table:table-row>
        <table:table-row table:style-name="ro1">
          <table:table-cell office:value-type="float" office:value="431096897" calcext:value-type="float">
            <text:p>431096897</text:p>
          </table:table-cell>
          <table:table-cell office:value-type="float" office:value="622062979.405522" calcext:value-type="float">
            <text:p>622062979.405522</text:p>
          </table:table-cell>
          <table:table-cell/>
          <table:table-cell office:value-type="string" calcext:value-type="string">
            <text:p>2019-09-18T07:16:19.4055219Z</text:p>
          </table:table-cell>
          <table:table-cell office:value-type="string" calcext:value-type="string">
            <text:p>2019-09-18-07:17:28.5895220</text:p>
          </table:table-cell>
          <table:table-cell table:number-columns-repeated="2"/>
        </table:table-row>
        <table:table-row table:style-name="ro1">
          <table:table-cell office:value-type="float" office:value="431186896" calcext:value-type="float">
            <text:p>431186896</text:p>
          </table:table-cell>
          <table:table-cell office:value-type="float" office:value="622152978.406553" calcext:value-type="float">
            <text:p>622152978.406553</text:p>
          </table:table-cell>
          <table:table-cell/>
          <table:table-cell office:value-type="string" calcext:value-type="string">
            <text:p>2019-09-19T08:16:18.4065530Z</text:p>
          </table:table-cell>
          <table:table-cell office:value-type="string" calcext:value-type="string">
            <text:p>2019-09-19-08:17:27.5905530</text:p>
          </table:table-cell>
          <table:table-cell table:number-columns-repeated="2"/>
        </table:table-row>
        <table:table-row table:style-name="ro1">
          <table:table-cell office:value-type="float" office:value="431302106" calcext:value-type="float">
            <text:p>431302106</text:p>
          </table:table-cell>
          <table:table-cell office:value-type="float" office:value="622268188.407855" calcext:value-type="float">
            <text:p>622268188.407855</text:p>
          </table:table-cell>
          <table:table-cell/>
          <table:table-cell office:value-type="string" calcext:value-type="string">
            <text:p>2019-09-20T16:16:28.4078550Z</text:p>
          </table:table-cell>
          <table:table-cell office:value-type="string" calcext:value-type="string">
            <text:p>2019-09-20-16:17:37.5918550</text:p>
          </table:table-cell>
          <table:table-cell table:number-columns-repeated="2"/>
        </table:table-row>
        <table:table-row table:style-name="ro1">
          <table:table-cell office:value-type="float" office:value="431330877" calcext:value-type="float">
            <text:p>431330877</text:p>
          </table:table-cell>
          <table:table-cell office:value-type="float" office:value="622296959.408194" calcext:value-type="float">
            <text:p>622296959.408194</text:p>
          </table:table-cell>
          <table:table-cell/>
          <table:table-cell office:value-type="string" calcext:value-type="string">
            <text:p>2019-09-21T00:15:59.4081939Z</text:p>
          </table:table-cell>
          <table:table-cell office:value-type="string" calcext:value-type="string">
            <text:p>2019-09-21-00:17:08.5921939</text:p>
          </table:table-cell>
          <table:table-cell table:number-columns-repeated="2"/>
        </table:table-row>
        <table:table-row table:style-name="ro1">
          <table:table-cell office:value-type="float" office:value="431474878" calcext:value-type="float">
            <text:p>431474878</text:p>
          </table:table-cell>
          <table:table-cell office:value-type="float" office:value="622440960.409829" calcext:value-type="float">
            <text:p>622440960.409829</text:p>
          </table:table-cell>
          <table:table-cell/>
          <table:table-cell office:value-type="string" calcext:value-type="string">
            <text:p>2019-09-22T16:16:00.4098290Z</text:p>
          </table:table-cell>
          <table:table-cell office:value-type="string" calcext:value-type="string">
            <text:p>2019-09-22-16:17:09.5938290</text:p>
          </table:table-cell>
          <table:table-cell table:number-columns-repeated="2"/>
        </table:table-row>
        <table:table-row table:style-name="ro1">
          <table:table-cell office:value-type="float" office:value="431561262" calcext:value-type="float">
            <text:p>431561262</text:p>
          </table:table-cell>
          <table:table-cell office:value-type="float" office:value="622527344.410805" calcext:value-type="float">
            <text:p>622527344.410805</text:p>
          </table:table-cell>
          <table:table-cell/>
          <table:table-cell office:value-type="string" calcext:value-type="string">
            <text:p>2019-09-23T16:15:44.4108049Z</text:p>
          </table:table-cell>
          <table:table-cell office:value-type="string" calcext:value-type="string">
            <text:p>2019-09-23-16:16:53.5948050</text:p>
          </table:table-cell>
          <table:table-cell table:number-columns-repeated="2"/>
        </table:table-row>
        <table:table-row table:style-name="ro1">
          <table:table-cell office:value-type="float" office:value="431651236" calcext:value-type="float">
            <text:p>431651236</text:p>
          </table:table-cell>
          <table:table-cell office:value-type="float" office:value="622617318.411799" calcext:value-type="float">
            <text:p>622617318.411799</text:p>
          </table:table-cell>
          <table:table-cell/>
          <table:table-cell office:value-type="string" calcext:value-type="string">
            <text:p>2019-09-24T17:15:18.4117989Z</text:p>
          </table:table-cell>
          <table:table-cell office:value-type="string" calcext:value-type="string">
            <text:p>2019-09-24-17:16:27.5957989</text:p>
          </table:table-cell>
          <table:table-cell table:number-columns-repeated="2"/>
        </table:table-row>
        <table:table-row table:style-name="ro1">
          <table:table-cell office:value-type="float" office:value="431665606" calcext:value-type="float">
            <text:p>431665606</text:p>
          </table:table-cell>
          <table:table-cell office:value-type="float" office:value="622631688.411988" calcext:value-type="float">
            <text:p>622631688.411988</text:p>
          </table:table-cell>
          <table:table-cell/>
          <table:table-cell office:value-type="string" calcext:value-type="string">
            <text:p>2019-09-24T21:14:48.4119880Z</text:p>
          </table:table-cell>
          <table:table-cell office:value-type="string" calcext:value-type="string">
            <text:p>2019-09-24-21:15:57.5959880</text:p>
          </table:table-cell>
          <table:table-cell table:number-columns-repeated="2"/>
        </table:table-row>
        <table:table-row table:style-name="ro1">
          <table:table-cell office:value-type="float" office:value="431780794" calcext:value-type="float">
            <text:p>431780794</text:p>
          </table:table-cell>
          <table:table-cell office:value-type="float" office:value="622746876.413298" calcext:value-type="float">
            <text:p>622746876.413298</text:p>
          </table:table-cell>
          <table:table-cell/>
          <table:table-cell office:value-type="string" calcext:value-type="string">
            <text:p>2019-09-26T05:14:36.4132980Z</text:p>
          </table:table-cell>
          <table:table-cell office:value-type="string" calcext:value-type="string">
            <text:p>2019-09-26-05:15:45.5972980</text:p>
          </table:table-cell>
          <table:table-cell table:number-columns-repeated="2"/>
        </table:table-row>
        <table:table-row table:style-name="ro1">
          <table:table-cell office:value-type="float" office:value="431964400" calcext:value-type="float">
            <text:p>431964400</text:p>
          </table:table-cell>
          <table:table-cell office:value-type="float" office:value="622930482.415374" calcext:value-type="float">
            <text:p>622930482.415374</text:p>
          </table:table-cell>
          <table:table-cell/>
          <table:table-cell office:value-type="string" calcext:value-type="string">
            <text:p>2019-09-28T08:14:42.4153740Z</text:p>
          </table:table-cell>
          <table:table-cell office:value-type="string" calcext:value-type="string">
            <text:p>2019-09-28-08:15:51.5993740</text:p>
          </table:table-cell>
          <table:table-cell table:number-columns-repeated="2"/>
        </table:table-row>
        <table:table-row table:style-name="ro1">
          <table:table-cell office:value-type="float" office:value="432075992" calcext:value-type="float">
            <text:p>432075992</text:p>
          </table:table-cell>
          <table:table-cell office:value-type="float" office:value="623042074.416635" calcext:value-type="float">
            <text:p>623042074.416635</text:p>
          </table:table-cell>
          <table:table-cell/>
          <table:table-cell office:value-type="string" calcext:value-type="string">
            <text:p>2019-09-29T15:14:34.4166350Z</text:p>
          </table:table-cell>
          <table:table-cell office:value-type="string" calcext:value-type="string">
            <text:p>2019-09-29-15:15:43.6006350</text:p>
          </table:table-cell>
          <table:table-cell table:number-columns-repeated="2"/>
        </table:table-row>
        <table:table-row table:style-name="ro1">
          <table:table-cell office:value-type="float" office:value="432133557" calcext:value-type="float">
            <text:p>432133557</text:p>
          </table:table-cell>
          <table:table-cell office:value-type="float" office:value="623099639.417299" calcext:value-type="float">
            <text:p>623099639.417299</text:p>
          </table:table-cell>
          <table:table-cell/>
          <table:table-cell office:value-type="string" calcext:value-type="string">
            <text:p>2019-09-30T07:13:59.4172990Z</text:p>
          </table:table-cell>
          <table:table-cell office:value-type="string" calcext:value-type="string">
            <text:p>2019-09-30-07:15:08.6012990</text:p>
          </table:table-cell>
          <table:table-cell table:number-columns-repeated="2"/>
        </table:table-row>
        <table:table-row table:style-name="ro1">
          <table:table-cell office:value-type="float" office:value="432421530" calcext:value-type="float">
            <text:p>432421530</text:p>
          </table:table-cell>
          <table:table-cell office:value-type="float" office:value="623387612.420545" calcext:value-type="float">
            <text:p>623387612.420545</text:p>
          </table:table-cell>
          <table:table-cell/>
          <table:table-cell office:value-type="string" calcext:value-type="string">
            <text:p>2019-10-03T15:13:32.4205449Z</text:p>
          </table:table-cell>
          <table:table-cell office:value-type="string" calcext:value-type="string">
            <text:p>2019-10-03-15:14:41.6045449</text:p>
          </table:table-cell>
          <table:table-cell table:number-columns-repeated="2"/>
        </table:table-row>
        <table:table-row table:style-name="ro1">
          <table:table-cell office:value-type="float" office:value="432515108" calcext:value-type="float">
            <text:p>432515108</text:p>
          </table:table-cell>
          <table:table-cell office:value-type="float" office:value="623481190.42157" calcext:value-type="float">
            <text:p>623481190.42157</text:p>
          </table:table-cell>
          <table:table-cell/>
          <table:table-cell office:value-type="string" calcext:value-type="string">
            <text:p>2019-10-04T17:13:10.4215699Z</text:p>
          </table:table-cell>
          <table:table-cell office:value-type="string" calcext:value-type="string">
            <text:p>2019-10-04-17:14:19.6055699</text:p>
          </table:table-cell>
          <table:table-cell table:number-columns-repeated="2"/>
        </table:table-row>
        <table:table-row table:style-name="ro1">
          <table:table-cell office:value-type="float" office:value="432601494" calcext:value-type="float">
            <text:p>432601494</text:p>
          </table:table-cell>
          <table:table-cell office:value-type="float" office:value="623567576.422543" calcext:value-type="float">
            <text:p>623567576.422543</text:p>
          </table:table-cell>
          <table:table-cell/>
          <table:table-cell office:value-type="string" calcext:value-type="string">
            <text:p>2019-10-05T17:12:56.4225429Z</text:p>
          </table:table-cell>
          <table:table-cell office:value-type="string" calcext:value-type="string">
            <text:p>2019-10-05-17:14:05.6065429</text:p>
          </table:table-cell>
          <table:table-cell table:number-columns-repeated="2"/>
        </table:table-row>
        <table:table-row table:style-name="ro1">
          <table:table-cell office:value-type="float" office:value="432651882" calcext:value-type="float">
            <text:p>432651882</text:p>
          </table:table-cell>
          <table:table-cell office:value-type="float" office:value="623617964.423157" calcext:value-type="float">
            <text:p>623617964.423157</text:p>
          </table:table-cell>
          <table:table-cell/>
          <table:table-cell office:value-type="string" calcext:value-type="string">
            <text:p>2019-10-06T07:12:44.4231569Z</text:p>
          </table:table-cell>
          <table:table-cell office:value-type="string" calcext:value-type="string">
            <text:p>2019-10-06-07:13:53.6071569</text:p>
          </table:table-cell>
          <table:table-cell table:number-columns-repeated="2"/>
        </table:table-row>
        <table:table-row table:style-name="ro1">
          <table:table-cell office:value-type="float" office:value="432767092" calcext:value-type="float">
            <text:p>432767092</text:p>
          </table:table-cell>
          <table:table-cell office:value-type="float" office:value="623733174.424439" calcext:value-type="float">
            <text:p>623733174.424439</text:p>
          </table:table-cell>
          <table:table-cell/>
          <table:table-cell office:value-type="string" calcext:value-type="string">
            <text:p>2019-10-07T15:12:54.4244389Z</text:p>
          </table:table-cell>
          <table:table-cell office:value-type="string" calcext:value-type="string">
            <text:p>2019-10-07-15:14:03.6084389</text:p>
          </table:table-cell>
          <table:table-cell table:number-columns-repeated="2"/>
        </table:table-row>
        <table:table-row table:style-name="ro1">
          <table:table-cell office:value-type="float" office:value="432993822" calcext:value-type="float">
            <text:p>432993822</text:p>
          </table:table-cell>
          <table:table-cell office:value-type="float" office:value="623959904.427" calcext:value-type="float">
            <text:p>623959904.427</text:p>
          </table:table-cell>
          <table:table-cell/>
          <table:table-cell office:value-type="string" calcext:value-type="string">
            <text:p>2019-10-10T06:11:44.4269999Z</text:p>
          </table:table-cell>
          <table:table-cell office:value-type="string" calcext:value-type="string">
            <text:p>2019-10-10-06:12:53.6109999</text:p>
          </table:table-cell>
          <table:table-cell table:number-columns-repeated="2"/>
        </table:table-row>
        <table:table-row table:style-name="ro1">
          <table:table-cell office:value-type="float" office:value="433119822" calcext:value-type="float">
            <text:p>433119822</text:p>
          </table:table-cell>
          <table:table-cell office:value-type="float" office:value="624085904.428387" calcext:value-type="float">
            <text:p>624085904.428387</text:p>
          </table:table-cell>
          <table:table-cell/>
          <table:table-cell office:value-type="string" calcext:value-type="string">
            <text:p>2019-10-11T17:11:44.4283869Z</text:p>
          </table:table-cell>
          <table:table-cell office:value-type="string" calcext:value-type="string">
            <text:p>2019-10-11-17:12:53.6123869</text:p>
          </table:table-cell>
          <table:table-cell table:number-columns-repeated="2"/>
        </table:table-row>
        <table:table-row table:style-name="ro1">
          <table:table-cell office:value-type="float" office:value="433137818" calcext:value-type="float">
            <text:p>433137818</text:p>
          </table:table-cell>
          <table:table-cell office:value-type="float" office:value="624103900.428631" calcext:value-type="float">
            <text:p>624103900.428631</text:p>
          </table:table-cell>
          <table:table-cell/>
          <table:table-cell office:value-type="string" calcext:value-type="string">
            <text:p>2019-10-11T22:11:40.4286309Z</text:p>
          </table:table-cell>
          <table:table-cell office:value-type="string" calcext:value-type="string">
            <text:p>2019-10-11-22:12:49.6126309</text:p>
          </table:table-cell>
          <table:table-cell table:number-columns-repeated="2"/>
        </table:table-row>
        <table:table-row table:style-name="ro1">
          <table:table-cell office:value-type="float" office:value="433285412" calcext:value-type="float">
            <text:p>433285412</text:p>
          </table:table-cell>
          <table:table-cell office:value-type="float" office:value="624251494.430286" calcext:value-type="float">
            <text:p>624251494.430286</text:p>
          </table:table-cell>
          <table:table-cell/>
          <table:table-cell office:value-type="string" calcext:value-type="string">
            <text:p>2019-10-13T15:11:34.4302859Z</text:p>
          </table:table-cell>
          <table:table-cell office:value-type="string" calcext:value-type="string">
            <text:p>2019-10-13-15:12:43.6142859</text:p>
          </table:table-cell>
          <table:table-cell table:number-columns-repeated="2"/>
        </table:table-row>
        <table:table-row table:style-name="ro1">
          <table:table-cell office:value-type="float" office:value="433368205" calcext:value-type="float">
            <text:p>433368205</text:p>
          </table:table-cell>
          <table:table-cell office:value-type="float" office:value="624334287.431203" calcext:value-type="float">
            <text:p>624334287.431203</text:p>
          </table:table-cell>
          <table:table-cell/>
          <table:table-cell office:value-type="string" calcext:value-type="string">
            <text:p>2019-10-14T14:11:27.4312030Z</text:p>
          </table:table-cell>
          <table:table-cell office:value-type="string" calcext:value-type="string">
            <text:p>2019-10-14-14:12:36.6152030</text:p>
          </table:table-cell>
          <table:table-cell table:number-columns-repeated="2"/>
        </table:table-row>
        <table:table-row table:style-name="ro1">
          <table:table-cell office:value-type="float" office:value="433483372" calcext:value-type="float">
            <text:p>433483372</text:p>
          </table:table-cell>
          <table:table-cell office:value-type="float" office:value="624449454.432496" calcext:value-type="float">
            <text:p>624449454.432496</text:p>
          </table:table-cell>
          <table:table-cell/>
          <table:table-cell office:value-type="string" calcext:value-type="string">
            <text:p>2019-10-15T22:10:54.4324959Z</text:p>
          </table:table-cell>
          <table:table-cell office:value-type="string" calcext:value-type="string">
            <text:p>2019-10-15-22:12:03.6164959</text:p>
          </table:table-cell>
          <table:table-cell table:number-columns-repeated="2"/>
        </table:table-row>
        <table:table-row table:style-name="ro1">
          <table:table-cell office:value-type="float" office:value="433629047" calcext:value-type="float">
            <text:p>433629047</text:p>
          </table:table-cell>
          <table:table-cell office:value-type="float" office:value="624595129.434148" calcext:value-type="float">
            <text:p>624595129.434148</text:p>
          </table:table-cell>
          <table:table-cell/>
          <table:table-cell office:value-type="string" calcext:value-type="string">
            <text:p>2019-10-17T14:38:49.4341479Z</text:p>
          </table:table-cell>
          <table:table-cell office:value-type="string" calcext:value-type="string">
            <text:p>2019-10-17-14:39:58.6181479</text:p>
          </table:table-cell>
          <table:table-cell table:number-columns-repeated="2"/>
        </table:table-row>
        <table:table-row table:style-name="ro1">
          <table:table-cell office:value-type="float" office:value="433724529" calcext:value-type="float">
            <text:p>433724529</text:p>
          </table:table-cell>
          <table:table-cell office:value-type="float" office:value="624690611.435182" calcext:value-type="float">
            <text:p>624690611.435182</text:p>
          </table:table-cell>
          <table:table-cell/>
          <table:table-cell office:value-type="string" calcext:value-type="string">
            <text:p>2019-10-18T17:10:11.4351819Z</text:p>
          </table:table-cell>
          <table:table-cell office:value-type="string" calcext:value-type="string">
            <text:p>2019-10-18-17:11:20.6191819</text:p>
          </table:table-cell>
          <table:table-cell table:number-columns-repeated="2"/>
        </table:table-row>
        <table:table-row table:style-name="ro1">
          <table:table-cell office:value-type="float" office:value="433771388" calcext:value-type="float">
            <text:p>433771388</text:p>
          </table:table-cell>
          <table:table-cell office:value-type="float" office:value="624737470.435739" calcext:value-type="float">
            <text:p>624737470.435739</text:p>
          </table:table-cell>
          <table:table-cell/>
          <table:table-cell office:value-type="string" calcext:value-type="string">
            <text:p>2019-10-19T06:11:10.4357390Z</text:p>
          </table:table-cell>
          <table:table-cell office:value-type="string" calcext:value-type="string">
            <text:p>2019-10-19-06:12:19.6197390</text:p>
          </table:table-cell>
          <table:table-cell table:number-columns-repeated="2"/>
        </table:table-row>
        <table:table-row table:style-name="ro1">
          <table:table-cell office:value-type="float" office:value="433857707" calcext:value-type="float">
            <text:p>433857707</text:p>
          </table:table-cell>
          <table:table-cell office:value-type="float" office:value="624823789.436708" calcext:value-type="float">
            <text:p>624823789.436708</text:p>
          </table:table-cell>
          <table:table-cell/>
          <table:table-cell office:value-type="string" calcext:value-type="string">
            <text:p>2019-10-20T06:09:49.4367079Z</text:p>
          </table:table-cell>
          <table:table-cell office:value-type="string" calcext:value-type="string">
            <text:p>2019-10-20-06:10:58.6207079</text:p>
          </table:table-cell>
          <table:table-cell table:number-columns-repeated="2"/>
        </table:table-row>
        <table:table-row table:style-name="ro1">
          <table:table-cell office:value-type="float" office:value="433972915" calcext:value-type="float">
            <text:p>433972915</text:p>
          </table:table-cell>
          <table:table-cell office:value-type="float" office:value="624938997.437997" calcext:value-type="float">
            <text:p>624938997.437997</text:p>
          </table:table-cell>
          <table:table-cell/>
          <table:table-cell office:value-type="string" calcext:value-type="string">
            <text:p>2019-10-21T14:09:57.4379969Z</text:p>
          </table:table-cell>
          <table:table-cell office:value-type="string" calcext:value-type="string">
            <text:p>2019-10-21-14:11:06.6219969</text:p>
          </table:table-cell>
          <table:table-cell table:number-columns-repeated="2"/>
        </table:table-row>
        <table:table-row table:style-name="ro1">
          <table:table-cell office:value-type="float" office:value="434026874" calcext:value-type="float">
            <text:p>434026874</text:p>
          </table:table-cell>
          <table:table-cell office:value-type="float" office:value="624992956.4386" calcext:value-type="float">
            <text:p>624992956.4386</text:p>
          </table:table-cell>
          <table:table-cell/>
          <table:table-cell office:value-type="string" calcext:value-type="string">
            <text:p>2019-10-22T05:09:16.4385999Z</text:p>
          </table:table-cell>
          <table:table-cell office:value-type="string" calcext:value-type="string">
            <text:p>2019-10-22-05:10:25.6225999</text:p>
          </table:table-cell>
          <table:table-cell table:number-columns-repeated="2"/>
        </table:table-row>
        <table:table-row table:style-name="ro1">
          <table:table-cell office:value-type="float" office:value="434300443" calcext:value-type="float">
            <text:p>434300443</text:p>
          </table:table-cell>
          <table:table-cell office:value-type="float" office:value="625266525.441626" calcext:value-type="float">
            <text:p>625266525.441626</text:p>
          </table:table-cell>
          <table:table-cell/>
          <table:table-cell office:value-type="string" calcext:value-type="string">
            <text:p>2019-10-25T09:08:45.4416259Z</text:p>
          </table:table-cell>
          <table:table-cell office:value-type="string" calcext:value-type="string">
            <text:p>2019-10-25-09:09:54.6256259</text:p>
          </table:table-cell>
          <table:table-cell table:number-columns-repeated="2"/>
        </table:table-row>
        <table:table-row table:style-name="ro1">
          <table:table-cell office:value-type="float" office:value="434376044" calcext:value-type="float">
            <text:p>434376044</text:p>
          </table:table-cell>
          <table:table-cell office:value-type="float" office:value="625342126.442502" calcext:value-type="float">
            <text:p>625342126.442502</text:p>
          </table:table-cell>
          <table:table-cell/>
          <table:table-cell office:value-type="string" calcext:value-type="string">
            <text:p>2019-10-26T06:08:46.4425020Z</text:p>
          </table:table-cell>
          <table:table-cell office:value-type="string" calcext:value-type="string">
            <text:p>2019-10-26-06:09:55.6265020</text:p>
          </table:table-cell>
          <table:table-cell table:number-columns-repeated="2"/>
        </table:table-row>
        <table:table-row table:style-name="ro1">
          <table:table-cell office:value-type="float" office:value="434448008" calcext:value-type="float">
            <text:p>434448008</text:p>
          </table:table-cell>
          <table:table-cell office:value-type="float" office:value="625414090.443289" calcext:value-type="float">
            <text:p>625414090.443289</text:p>
          </table:table-cell>
          <table:table-cell/>
          <table:table-cell office:value-type="string" calcext:value-type="string">
            <text:p>2019-10-27T02:08:10.4432890Z</text:p>
          </table:table-cell>
          <table:table-cell office:value-type="string" calcext:value-type="string">
            <text:p>2019-10-27-02:09:19.6272890</text:p>
          </table:table-cell>
          <table:table-cell table:number-columns-repeated="2"/>
        </table:table-row>
        <table:table-row table:style-name="ro1">
          <table:table-cell office:value-type="float" office:value="434545207" calcext:value-type="float">
            <text:p>434545207</text:p>
          </table:table-cell>
          <table:table-cell office:value-type="float" office:value="625511289.44439" calcext:value-type="float">
            <text:p>625511289.44439</text:p>
          </table:table-cell>
          <table:table-cell/>
          <table:table-cell office:value-type="string" calcext:value-type="string">
            <text:p>2019-10-28T05:08:09.4443899Z</text:p>
          </table:table-cell>
          <table:table-cell office:value-type="string" calcext:value-type="string">
            <text:p>2019-10-28-05:09:18.6283899</text:p>
          </table:table-cell>
          <table:table-cell table:number-columns-repeated="2"/>
        </table:table-row>
        <table:table-row table:style-name="ro1">
          <table:table-cell office:value-type="float" office:value="434645989" calcext:value-type="float">
            <text:p>434645989</text:p>
          </table:table-cell>
          <table:table-cell office:value-type="float" office:value="625612071.445487" calcext:value-type="float">
            <text:p>625612071.445487</text:p>
          </table:table-cell>
          <table:table-cell/>
          <table:table-cell office:value-type="string" calcext:value-type="string">
            <text:p>2019-10-29T09:07:51.4454870Z</text:p>
          </table:table-cell>
          <table:table-cell office:value-type="string" calcext:value-type="string">
            <text:p>2019-10-29-09:09:00.6294870</text:p>
          </table:table-cell>
          <table:table-cell table:number-columns-repeated="2"/>
        </table:table-row>
        <table:table-row table:style-name="ro1">
          <table:table-cell office:value-type="float" office:value="434717979" calcext:value-type="float">
            <text:p>434717979</text:p>
          </table:table-cell>
          <table:table-cell office:value-type="float" office:value="625684061.446309" calcext:value-type="float">
            <text:p>625684061.446309</text:p>
          </table:table-cell>
          <table:table-cell/>
          <table:table-cell office:value-type="string" calcext:value-type="string">
            <text:p>2019-10-30T05:07:41.4463089Z</text:p>
          </table:table-cell>
          <table:table-cell office:value-type="string" calcext:value-type="string">
            <text:p>2019-10-30-05:08:50.6303089</text:p>
          </table:table-cell>
          <table:table-cell table:number-columns-repeated="2"/>
        </table:table-row>
        <table:table-row table:style-name="ro1">
          <table:table-cell office:value-type="float" office:value="434847657" calcext:value-type="float">
            <text:p>434847657</text:p>
          </table:table-cell>
          <table:table-cell office:value-type="float" office:value="625813739.447756" calcext:value-type="float">
            <text:p>625813739.447756</text:p>
          </table:table-cell>
          <table:table-cell/>
          <table:table-cell office:value-type="string" calcext:value-type="string">
            <text:p>2019-10-31T17:08:59.4477559Z</text:p>
          </table:table-cell>
          <table:table-cell office:value-type="string" calcext:value-type="string">
            <text:p>2019-10-31-17:10:08.6317559</text:p>
          </table:table-cell>
          <table:table-cell table:number-columns-repeated="2"/>
        </table:table-row>
        <table:table-row table:style-name="ro1">
          <table:table-cell office:value-type="float" office:value="434854835" calcext:value-type="float">
            <text:p>434854835</text:p>
          </table:table-cell>
          <table:table-cell office:value-type="float" office:value="625820917.447815" calcext:value-type="float">
            <text:p>625820917.447815</text:p>
          </table:table-cell>
          <table:table-cell/>
          <table:table-cell office:value-type="string" calcext:value-type="string">
            <text:p>2019-10-31T19:08:37.4478149Z</text:p>
          </table:table-cell>
          <table:table-cell office:value-type="string" calcext:value-type="string">
            <text:p>2019-10-31-19:09:46.6318149</text:p>
          </table:table-cell>
          <table:table-cell table:number-columns-repeated="2"/>
        </table:table-row>
        <table:table-row table:style-name="ro1">
          <table:table-cell office:value-type="float" office:value="434973537" calcext:value-type="float">
            <text:p>434973537</text:p>
          </table:table-cell>
          <table:table-cell office:value-type="float" office:value="625939619.449167" calcext:value-type="float">
            <text:p>625939619.449167</text:p>
          </table:table-cell>
          <table:table-cell/>
          <table:table-cell office:value-type="string" calcext:value-type="string">
            <text:p>2019-11-02T04:06:59.4491670Z</text:p>
          </table:table-cell>
          <table:table-cell office:value-type="string" calcext:value-type="string">
            <text:p>2019-11-02-04:08:08.6331670</text:p>
          </table:table-cell>
          <table:table-cell table:number-columns-repeated="2"/>
        </table:table-row>
        <table:table-row table:style-name="ro1">
          <table:table-cell office:value-type="float" office:value="435063529" calcext:value-type="float">
            <text:p>435063529</text:p>
          </table:table-cell>
          <table:table-cell office:value-type="float" office:value="626029611.450159" calcext:value-type="float">
            <text:p>626029611.450159</text:p>
          </table:table-cell>
          <table:table-cell/>
          <table:table-cell office:value-type="string" calcext:value-type="string">
            <text:p>2019-11-03T05:06:51.4501589Z</text:p>
          </table:table-cell>
          <table:table-cell office:value-type="string" calcext:value-type="string">
            <text:p>2019-11-03-05:08:00.6341589</text:p>
          </table:table-cell>
          <table:table-cell table:number-columns-repeated="2"/>
        </table:table-row>
        <table:table-row table:style-name="ro1">
          <table:table-cell office:value-type="float" office:value="435178736" calcext:value-type="float">
            <text:p>435178736</text:p>
          </table:table-cell>
          <table:table-cell office:value-type="float" office:value="626144818.45143" calcext:value-type="float">
            <text:p>626144818.45143</text:p>
          </table:table-cell>
          <table:table-cell/>
          <table:table-cell office:value-type="string" calcext:value-type="string">
            <text:p>2019-11-04T13:06:58.4514299Z</text:p>
          </table:table-cell>
          <table:table-cell office:value-type="string" calcext:value-type="string">
            <text:p>2019-11-04-13:08:07.6354299</text:p>
          </table:table-cell>
          <table:table-cell table:number-columns-repeated="2"/>
        </table:table-row>
        <table:table-row table:style-name="ro1">
          <table:table-cell office:value-type="float" office:value="435207520" calcext:value-type="float">
            <text:p>435207520</text:p>
          </table:table-cell>
          <table:table-cell office:value-type="float" office:value="626173602.451758" calcext:value-type="float">
            <text:p>626173602.451758</text:p>
          </table:table-cell>
          <table:table-cell/>
          <table:table-cell office:value-type="string" calcext:value-type="string">
            <text:p>2019-11-04T21:06:42.4517580Z</text:p>
          </table:table-cell>
          <table:table-cell office:value-type="string" calcext:value-type="string">
            <text:p>2019-11-04-21:07:51.6357580</text:p>
          </table:table-cell>
          <table:table-cell table:number-columns-repeated="2"/>
        </table:table-row>
        <table:table-row table:style-name="ro1">
          <table:table-cell office:value-type="float" office:value="435362298" calcext:value-type="float">
            <text:p>435362298</text:p>
          </table:table-cell>
          <table:table-cell office:value-type="float" office:value="626328380.453464" calcext:value-type="float">
            <text:p>626328380.453464</text:p>
          </table:table-cell>
          <table:table-cell/>
          <table:table-cell office:value-type="string" calcext:value-type="string">
            <text:p>2019-11-06T16:06:20.4534640Z</text:p>
          </table:table-cell>
          <table:table-cell office:value-type="string" calcext:value-type="string">
            <text:p>2019-11-06-16:07:29.6374640</text:p>
          </table:table-cell>
          <table:table-cell table:number-columns-repeated="2"/>
        </table:table-row>
        <table:table-row table:style-name="ro1">
          <table:table-cell office:value-type="float" office:value="435524293" calcext:value-type="float">
            <text:p>435524293</text:p>
          </table:table-cell>
          <table:table-cell office:value-type="float" office:value="626490375.455275" calcext:value-type="float">
            <text:p>626490375.455275</text:p>
          </table:table-cell>
          <table:table-cell/>
          <table:table-cell office:value-type="string" calcext:value-type="string">
            <text:p>2019-11-08T13:06:15.4552749Z</text:p>
          </table:table-cell>
          <table:table-cell office:value-type="string" calcext:value-type="string">
            <text:p>2019-11-08-13:07:24.6392749</text:p>
          </table:table-cell>
          <table:table-cell table:number-columns-repeated="2"/>
        </table:table-row>
        <table:table-row table:style-name="ro1">
          <table:table-cell office:value-type="float" office:value="435603466" calcext:value-type="float">
            <text:p>435603466</text:p>
          </table:table-cell>
          <table:table-cell office:value-type="float" office:value="626569548.456142" calcext:value-type="float">
            <text:p>626569548.456142</text:p>
          </table:table-cell>
          <table:table-cell/>
          <table:table-cell office:value-type="string" calcext:value-type="string">
            <text:p>2019-11-09T11:05:48.4561419Z</text:p>
          </table:table-cell>
          <table:table-cell office:value-type="string" calcext:value-type="string">
            <text:p>2019-11-09-11:06:57.6401419</text:p>
          </table:table-cell>
          <table:table-cell table:number-columns-repeated="2"/>
        </table:table-row>
        <table:table-row table:style-name="ro1">
          <table:table-cell office:value-type="float" office:value="435697079" calcext:value-type="float">
            <text:p>435697079</text:p>
          </table:table-cell>
          <table:table-cell office:value-type="float" office:value="626663161.457192" calcext:value-type="float">
            <text:p>626663161.457192</text:p>
          </table:table-cell>
          <table:table-cell/>
          <table:table-cell office:value-type="string" calcext:value-type="string">
            <text:p>2019-11-10T13:06:01.4571919Z</text:p>
          </table:table-cell>
          <table:table-cell office:value-type="string" calcext:value-type="string">
            <text:p>2019-11-10-13:07:10.6411919</text:p>
          </table:table-cell>
          <table:table-cell table:number-columns-repeated="2"/>
        </table:table-row>
        <table:table-row table:style-name="ro1">
          <table:table-cell office:value-type="float" office:value="435751037" calcext:value-type="float">
            <text:p>435751037</text:p>
          </table:table-cell>
          <table:table-cell office:value-type="float" office:value="626717119.457804" calcext:value-type="float">
            <text:p>626717119.457804</text:p>
          </table:table-cell>
          <table:table-cell/>
          <table:table-cell office:value-type="string" calcext:value-type="string">
            <text:p>2019-11-11T04:05:19.4578039Z</text:p>
          </table:table-cell>
          <table:table-cell office:value-type="string" calcext:value-type="string">
            <text:p>2019-11-11-04:06:28.6418039</text:p>
          </table:table-cell>
          <table:table-cell table:number-columns-repeated="2"/>
        </table:table-row>
        <table:table-row table:style-name="ro1">
          <table:table-cell office:value-type="float" office:value="435830221" calcext:value-type="float">
            <text:p>435830221</text:p>
          </table:table-cell>
          <table:table-cell office:value-type="float" office:value="626796303.458675" calcext:value-type="float">
            <text:p>626796303.458675</text:p>
          </table:table-cell>
          <table:table-cell/>
          <table:table-cell office:value-type="string" calcext:value-type="string">
            <text:p>2019-11-12T02:05:03.4586750Z</text:p>
          </table:table-cell>
          <table:table-cell office:value-type="string" calcext:value-type="string">
            <text:p>2019-11-12-02:06:12.6426750</text:p>
          </table:table-cell>
          <table:table-cell table:number-columns-repeated="2"/>
        </table:table-row>
        <table:table-row table:style-name="ro1">
          <table:table-cell office:value-type="float" office:value="435970621" calcext:value-type="float">
            <text:p>435970621</text:p>
          </table:table-cell>
          <table:table-cell office:value-type="float" office:value="626936703.460207" calcext:value-type="float">
            <text:p>626936703.460207</text:p>
          </table:table-cell>
          <table:table-cell/>
          <table:table-cell office:value-type="string" calcext:value-type="string">
            <text:p>2019-11-13T17:05:03.4602069Z</text:p>
          </table:table-cell>
          <table:table-cell office:value-type="string" calcext:value-type="string">
            <text:p>2019-11-13-17:06:12.6442070</text:p>
          </table:table-cell>
          <table:table-cell table:number-columns-repeated="2"/>
        </table:table-row>
        <table:table-row table:style-name="ro1">
          <table:table-cell office:value-type="float" office:value="435981410" calcext:value-type="float">
            <text:p>435981410</text:p>
          </table:table-cell>
          <table:table-cell office:value-type="float" office:value="626947492.460334" calcext:value-type="float">
            <text:p>626947492.460334</text:p>
          </table:table-cell>
          <table:table-cell/>
          <table:table-cell office:value-type="string" calcext:value-type="string">
            <text:p>2019-11-13T20:04:52.4603339Z</text:p>
          </table:table-cell>
          <table:table-cell office:value-type="string" calcext:value-type="string">
            <text:p>2019-11-13-20:06:01.6443339</text:p>
          </table:table-cell>
          <table:table-cell table:number-columns-repeated="2"/>
        </table:table-row>
        <table:table-row table:style-name="ro1">
          <table:table-cell office:value-type="float" office:value="436136201" calcext:value-type="float">
            <text:p>436136201</text:p>
          </table:table-cell>
          <table:table-cell office:value-type="float" office:value="627102283.462024" calcext:value-type="float">
            <text:p>627102283.462024</text:p>
          </table:table-cell>
          <table:table-cell/>
          <table:table-cell office:value-type="string" calcext:value-type="string">
            <text:p>2019-11-15T15:04:43.4620239Z</text:p>
          </table:table-cell>
          <table:table-cell office:value-type="string" calcext:value-type="string">
            <text:p>2019-11-15-15:05:52.6460239</text:p>
          </table:table-cell>
          <table:table-cell table:number-columns-repeated="2"/>
        </table:table-row>
        <table:table-row table:style-name="ro1">
          <table:table-cell office:value-type="float" office:value="436222592" calcext:value-type="float">
            <text:p>436222592</text:p>
          </table:table-cell>
          <table:table-cell office:value-type="float" office:value="627188674.46298" calcext:value-type="float">
            <text:p>627188674.46298</text:p>
          </table:table-cell>
          <table:table-cell/>
          <table:table-cell office:value-type="string" calcext:value-type="string">
            <text:p>2019-11-16T15:04:34.4629800Z</text:p>
          </table:table-cell>
          <table:table-cell office:value-type="string" calcext:value-type="string">
            <text:p>2019-11-16-15:05:43.6469800</text:p>
          </table:table-cell>
          <table:table-cell table:number-columns-repeated="2"/>
        </table:table-row>
        <table:table-row table:style-name="ro1">
          <table:table-cell office:value-type="float" office:value="436262166" calcext:value-type="float">
            <text:p>436262166</text:p>
          </table:table-cell>
          <table:table-cell office:value-type="float" office:value="627228248.463443" calcext:value-type="float">
            <text:p>627228248.463443</text:p>
          </table:table-cell>
          <table:table-cell/>
          <table:table-cell office:value-type="string" calcext:value-type="string">
            <text:p>2019-11-17T02:04:08.4634430Z</text:p>
          </table:table-cell>
          <table:table-cell office:value-type="string" calcext:value-type="string">
            <text:p>2019-11-17-02:05:17.6474430</text:p>
          </table:table-cell>
          <table:table-cell table:number-columns-repeated="2"/>
        </table:table-row>
        <table:table-row table:style-name="ro1">
          <table:table-cell office:value-type="float" office:value="436352157" calcext:value-type="float">
            <text:p>436352157</text:p>
          </table:table-cell>
          <table:table-cell office:value-type="float" office:value="627318239.464455" calcext:value-type="float">
            <text:p>627318239.464455</text:p>
          </table:table-cell>
          <table:table-cell/>
          <table:table-cell office:value-type="string" calcext:value-type="string">
            <text:p>2019-11-18T03:03:59.4644550Z</text:p>
          </table:table-cell>
          <table:table-cell office:value-type="string" calcext:value-type="string">
            <text:p>2019-11-18-03:05:08.6484550</text:p>
          </table:table-cell>
          <table:table-cell table:number-columns-repeated="2"/>
        </table:table-row>
        <table:table-row table:style-name="ro1">
          <table:table-cell office:value-type="float" office:value="436470969" calcext:value-type="float">
            <text:p>436470969</text:p>
          </table:table-cell>
          <table:table-cell office:value-type="float" office:value="627437051.465749" calcext:value-type="float">
            <text:p>627437051.465749</text:p>
          </table:table-cell>
          <table:table-cell/>
          <table:table-cell office:value-type="string" calcext:value-type="string">
            <text:p>2019-11-19T12:04:11.4657490Z</text:p>
          </table:table-cell>
          <table:table-cell office:value-type="string" calcext:value-type="string">
            <text:p>2019-11-19-12:05:20.6497490</text:p>
          </table:table-cell>
          <table:table-cell table:number-columns-repeated="2"/>
        </table:table-row>
        <table:table-row table:style-name="ro1">
          <table:table-cell office:value-type="float" office:value="436575347" calcext:value-type="float">
            <text:p>436575347</text:p>
          </table:table-cell>
          <table:table-cell office:value-type="float" office:value="627541429.466901" calcext:value-type="float">
            <text:p>627541429.466901</text:p>
          </table:table-cell>
          <table:table-cell/>
          <table:table-cell office:value-type="string" calcext:value-type="string">
            <text:p>2019-11-20T17:03:49.4669009Z</text:p>
          </table:table-cell>
          <table:table-cell office:value-type="string" calcext:value-type="string">
            <text:p>2019-11-20-17:04:58.6509009</text:p>
          </table:table-cell>
          <table:table-cell table:number-columns-repeated="2"/>
        </table:table-row>
        <table:table-row table:style-name="ro1">
          <table:table-cell office:value-type="float" office:value="436586147" calcext:value-type="float">
            <text:p>436586147</text:p>
          </table:table-cell>
          <table:table-cell office:value-type="float" office:value="627552229.467019" calcext:value-type="float">
            <text:p>627552229.467019</text:p>
          </table:table-cell>
          <table:table-cell/>
          <table:table-cell office:value-type="string" calcext:value-type="string">
            <text:p>2019-11-20T20:03:49.4670189Z</text:p>
          </table:table-cell>
          <table:table-cell office:value-type="string" calcext:value-type="string">
            <text:p>2019-11-20-20:04:58.6510189</text:p>
          </table:table-cell>
          <table:table-cell table:number-columns-repeated="2"/>
        </table:table-row>
        <table:table-row table:style-name="ro1">
          <table:table-cell office:value-type="float" office:value="436748123" calcext:value-type="float">
            <text:p>436748123</text:p>
          </table:table-cell>
          <table:table-cell office:value-type="float" office:value="627714205.468805" calcext:value-type="float">
            <text:p>627714205.468805</text:p>
          </table:table-cell>
          <table:table-cell/>
          <table:table-cell office:value-type="string" calcext:value-type="string">
            <text:p>2019-11-22T17:03:25.4688049Z</text:p>
          </table:table-cell>
          <table:table-cell office:value-type="string" calcext:value-type="string">
            <text:p>2019-11-22-17:04:34.6528049</text:p>
          </table:table-cell>
          <table:table-cell table:number-columns-repeated="2"/>
        </table:table-row>
        <table:table-row table:style-name="ro1">
          <table:table-cell office:value-type="float" office:value="436816535" calcext:value-type="float">
            <text:p>436816535</text:p>
          </table:table-cell>
          <table:table-cell office:value-type="float" office:value="627782617.469559" calcext:value-type="float">
            <text:p>627782617.469559</text:p>
          </table:table-cell>
          <table:table-cell/>
          <table:table-cell office:value-type="string" calcext:value-type="string">
            <text:p>2019-11-23T12:03:37.4695589Z</text:p>
          </table:table-cell>
          <table:table-cell office:value-type="string" calcext:value-type="string">
            <text:p>2019-11-23-12:04:46.6535589</text:p>
          </table:table-cell>
          <table:table-cell table:number-columns-repeated="2"/>
        </table:table-row>
        <table:table-row table:style-name="ro1">
          <table:table-cell office:value-type="float" office:value="436920906" calcext:value-type="float">
            <text:p>436920906</text:p>
          </table:table-cell>
          <table:table-cell office:value-type="float" office:value="627886988.470701" calcext:value-type="float">
            <text:p>627886988.470701</text:p>
          </table:table-cell>
          <table:table-cell/>
          <table:table-cell office:value-type="string" calcext:value-type="string">
            <text:p>2019-11-24T17:03:08.4707009Z</text:p>
          </table:table-cell>
          <table:table-cell office:value-type="string" calcext:value-type="string">
            <text:p>2019-11-24-17:04:17.6547009</text:p>
          </table:table-cell>
          <table:table-cell table:number-columns-repeated="2"/>
        </table:table-row>
        <table:table-row table:style-name="ro1">
          <table:table-cell office:value-type="float" office:value="436989322" calcext:value-type="float">
            <text:p>436989322</text:p>
          </table:table-cell>
          <table:table-cell office:value-type="float" office:value="627955404.47146" calcext:value-type="float">
            <text:p>627955404.47146</text:p>
          </table:table-cell>
          <table:table-cell/>
          <table:table-cell office:value-type="string" calcext:value-type="string">
            <text:p>2019-11-25T12:03:24.4714599Z</text:p>
          </table:table-cell>
          <table:table-cell office:value-type="string" calcext:value-type="string">
            <text:p>2019-11-25-12:04:33.6554600</text:p>
          </table:table-cell>
          <table:table-cell table:number-columns-repeated="2"/>
        </table:table-row>
        <table:table-row table:style-name="ro1">
          <table:table-cell office:value-type="float" office:value="437043282" calcext:value-type="float">
            <text:p>437043282</text:p>
          </table:table-cell>
          <table:table-cell office:value-type="float" office:value="628009364.472067" calcext:value-type="float">
            <text:p>628009364.472067</text:p>
          </table:table-cell>
          <table:table-cell/>
          <table:table-cell office:value-type="string" calcext:value-type="string">
            <text:p>2019-11-26T03:02:44.4720669Z</text:p>
          </table:table-cell>
          <table:table-cell office:value-type="string" calcext:value-type="string">
            <text:p>2019-11-26-03:03:53.6560670</text:p>
          </table:table-cell>
          <table:table-cell table:number-columns-repeated="2"/>
        </table:table-row>
        <table:table-row table:style-name="ro1">
          <table:table-cell office:value-type="float" office:value="437388843" calcext:value-type="float">
            <text:p>437388843</text:p>
          </table:table-cell>
          <table:table-cell office:value-type="float" office:value="628354925.47586" calcext:value-type="float">
            <text:p>628354925.47586</text:p>
          </table:table-cell>
          <table:table-cell/>
          <table:table-cell office:value-type="string" calcext:value-type="string">
            <text:p>2019-11-30T03:02:05.4758599Z</text:p>
          </table:table-cell>
          <table:table-cell office:value-type="string" calcext:value-type="string">
            <text:p>2019-11-30-03:03:14.6598600</text:p>
          </table:table-cell>
          <table:table-cell table:number-columns-repeated="2"/>
        </table:table-row>
        <table:table-row table:style-name="ro1">
          <table:table-cell office:value-type="float" office:value="437525635" calcext:value-type="float">
            <text:p>437525635</text:p>
          </table:table-cell>
          <table:table-cell office:value-type="float" office:value="628491717.477366" calcext:value-type="float">
            <text:p>628491717.477366</text:p>
          </table:table-cell>
          <table:table-cell/>
          <table:table-cell office:value-type="string" calcext:value-type="string">
            <text:p>2019-12-01T17:01:57.4773659Z</text:p>
          </table:table-cell>
          <table:table-cell office:value-type="string" calcext:value-type="string">
            <text:p>2019-12-01-17:03:06.6613659</text:p>
          </table:table-cell>
          <table:table-cell table:number-columns-repeated="2"/>
        </table:table-row>
        <table:table-row table:style-name="ro1">
          <table:table-cell office:value-type="float" office:value="437590454" calcext:value-type="float">
            <text:p>437590454</text:p>
          </table:table-cell>
          <table:table-cell office:value-type="float" office:value="628556536.478073" calcext:value-type="float">
            <text:p>628556536.478073</text:p>
          </table:table-cell>
          <table:table-cell/>
          <table:table-cell office:value-type="string" calcext:value-type="string">
            <text:p>2019-12-02T11:02:16.4780730Z</text:p>
          </table:table-cell>
          <table:table-cell office:value-type="string" calcext:value-type="string">
            <text:p>2019-12-02-11:03:25.6620730</text:p>
          </table:table-cell>
          <table:table-cell table:number-columns-repeated="2"/>
        </table:table-row>
        <table:table-row table:style-name="ro1">
          <table:table-cell office:value-type="float" office:value="437648017" calcext:value-type="float">
            <text:p>437648017</text:p>
          </table:table-cell>
          <table:table-cell office:value-type="float" office:value="628614099.478712" calcext:value-type="float">
            <text:p>628614099.478712</text:p>
          </table:table-cell>
          <table:table-cell/>
          <table:table-cell office:value-type="string" calcext:value-type="string">
            <text:p>2019-12-03T03:01:39.4787119Z</text:p>
          </table:table-cell>
          <table:table-cell office:value-type="string" calcext:value-type="string">
            <text:p>2019-12-03-03:02:48.6627119</text:p>
          </table:table-cell>
          <table:table-cell table:number-columns-repeated="2"/>
        </table:table-row>
        <table:table-row table:style-name="ro1">
          <table:table-cell office:value-type="float" office:value="437777682" calcext:value-type="float">
            <text:p>437777682</text:p>
          </table:table-cell>
          <table:table-cell office:value-type="float" office:value="628743764.480151" calcext:value-type="float">
            <text:p>628743764.480151</text:p>
          </table:table-cell>
          <table:table-cell/>
          <table:table-cell office:value-type="string" calcext:value-type="string">
            <text:p>2019-12-04T15:02:44.4801509Z</text:p>
          </table:table-cell>
          <table:table-cell office:value-type="string" calcext:value-type="string">
            <text:p>2019-12-04-15:03:53.6641509</text:p>
          </table:table-cell>
          <table:table-cell table:number-columns-repeated="2"/>
        </table:table-row>
        <table:table-row table:style-name="ro1">
          <table:table-cell office:value-type="float" office:value="437820800" calcext:value-type="float">
            <text:p>437820800</text:p>
          </table:table-cell>
          <table:table-cell office:value-type="float" office:value="628786882.48061" calcext:value-type="float">
            <text:p>628786882.48061</text:p>
          </table:table-cell>
          <table:table-cell/>
          <table:table-cell office:value-type="string" calcext:value-type="string">
            <text:p>2019-12-05T03:01:22.4806100Z</text:p>
          </table:table-cell>
          <table:table-cell office:value-type="string" calcext:value-type="string">
            <text:p>2019-12-05-03:02:31.6646100</text:p>
          </table:table-cell>
          <table:table-cell table:number-columns-repeated="2"/>
        </table:table-row>
        <table:table-row table:style-name="ro1">
          <table:table-cell office:value-type="float" office:value="438191575" calcext:value-type="float">
            <text:p>438191575</text:p>
          </table:table-cell>
          <table:table-cell office:value-type="float" office:value="629157657.484667" calcext:value-type="float">
            <text:p>629157657.484667</text:p>
          </table:table-cell>
          <table:table-cell/>
          <table:table-cell office:value-type="string" calcext:value-type="string">
            <text:p>2019-12-09T10:00:57.4846669Z</text:p>
          </table:table-cell>
          <table:table-cell office:value-type="string" calcext:value-type="string">
            <text:p>2019-12-09-10:02:06.6686669</text:p>
          </table:table-cell>
          <table:table-cell table:number-columns-repeated="2"/>
        </table:table-row>
        <table:table-row table:style-name="ro1">
          <table:table-cell office:value-type="float" office:value="438303171" calcext:value-type="float">
            <text:p>438303171</text:p>
          </table:table-cell>
          <table:table-cell office:value-type="float" office:value="629269253.48589" calcext:value-type="float">
            <text:p>629269253.48589</text:p>
          </table:table-cell>
          <table:table-cell/>
          <table:table-cell office:value-type="string" calcext:value-type="string">
            <text:p>2019-12-10T17:00:53.4858900Z</text:p>
          </table:table-cell>
          <table:table-cell office:value-type="string" calcext:value-type="string">
            <text:p>2019-12-10-17:02:02.6698900</text:p>
          </table:table-cell>
          <table:table-cell table:number-columns-repeated="2"/>
        </table:table-row>
        <table:table-row table:style-name="ro1">
          <table:table-cell office:value-type="float" office:value="438335545" calcext:value-type="float">
            <text:p>438335545</text:p>
          </table:table-cell>
          <table:table-cell office:value-type="float" office:value="629301627.486251" calcext:value-type="float">
            <text:p>629301627.486251</text:p>
          </table:table-cell>
          <table:table-cell/>
          <table:table-cell office:value-type="string" calcext:value-type="string">
            <text:p>2019-12-11T02:00:27.4862509Z</text:p>
          </table:table-cell>
          <table:table-cell office:value-type="string" calcext:value-type="string">
            <text:p>2019-12-11-02:01:36.6702510</text:p>
          </table:table-cell>
          <table:table-cell table:number-columns-repeated="2"/>
        </table:table-row>
        <table:table-row table:style-name="ro1">
          <table:table-cell office:value-type="float" office:value="438562343" calcext:value-type="float">
            <text:p>438562343</text:p>
          </table:table-cell>
          <table:table-cell office:value-type="float" office:value="629528425.488737" calcext:value-type="float">
            <text:p>629528425.488737</text:p>
          </table:table-cell>
          <table:table-cell/>
          <table:table-cell office:value-type="string" calcext:value-type="string">
            <text:p>2019-12-13T17:00:25.4887369Z</text:p>
          </table:table-cell>
          <table:table-cell office:value-type="string" calcext:value-type="string">
            <text:p>2019-12-13-17:01:34.6727370</text:p>
          </table:table-cell>
          <table:table-cell table:number-columns-repeated="2"/>
        </table:table-row>
        <table:table-row table:style-name="ro1">
          <table:table-cell office:value-type="float" office:value="438623539" calcext:value-type="float">
            <text:p>438623539</text:p>
          </table:table-cell>
          <table:table-cell office:value-type="float" office:value="629589621.489393" calcext:value-type="float">
            <text:p>629589621.489393</text:p>
          </table:table-cell>
          <table:table-cell/>
          <table:table-cell office:value-type="string" calcext:value-type="string">
            <text:p>2019-12-14T10:00:21.4893929Z</text:p>
          </table:table-cell>
          <table:table-cell office:value-type="string" calcext:value-type="string">
            <text:p>2019-12-14-10:01:30.6733930</text:p>
          </table:table-cell>
          <table:table-cell table:number-columns-repeated="2"/>
        </table:table-row>
        <table:table-row table:style-name="ro1">
          <table:table-cell office:value-type="float" office:value="438702716" calcext:value-type="float">
            <text:p>438702716</text:p>
          </table:table-cell>
          <table:table-cell office:value-type="float" office:value="629668798.490253" calcext:value-type="float">
            <text:p>629668798.490253</text:p>
          </table:table-cell>
          <table:table-cell/>
          <table:table-cell office:value-type="string" calcext:value-type="string">
            <text:p>2019-12-15T07:59:58.4902529Z</text:p>
          </table:table-cell>
          <table:table-cell office:value-type="string" calcext:value-type="string">
            <text:p>2019-12-15-08:01:07.6742529</text:p>
          </table:table-cell>
          <table:table-cell table:number-columns-repeated="2"/>
        </table:table-row>
        <table:table-row table:style-name="ro1">
          <table:table-cell office:value-type="float" office:value="438796324" calcext:value-type="float">
            <text:p>438796324</text:p>
          </table:table-cell>
          <table:table-cell office:value-type="float" office:value="629762406.491282" calcext:value-type="float">
            <text:p>629762406.491282</text:p>
          </table:table-cell>
          <table:table-cell/>
          <table:table-cell office:value-type="string" calcext:value-type="string">
            <text:p>2019-12-16T10:00:06.4912819Z</text:p>
          </table:table-cell>
          <table:table-cell office:value-type="string" calcext:value-type="string">
            <text:p>2019-12-16-10:01:15.6752820</text:p>
          </table:table-cell>
          <table:table-cell table:number-columns-repeated="2"/>
        </table:table-row>
        <table:table-row table:style-name="ro1">
          <table:table-cell office:value-type="float" office:value="438907914" calcext:value-type="float">
            <text:p>438907914</text:p>
          </table:table-cell>
          <table:table-cell office:value-type="float" office:value="629873996.492519" calcext:value-type="float">
            <text:p>629873996.492519</text:p>
          </table:table-cell>
          <table:table-cell/>
          <table:table-cell office:value-type="string" calcext:value-type="string">
            <text:p>2019-12-17T16:59:56.4925190Z</text:p>
          </table:table-cell>
          <table:table-cell office:value-type="string" calcext:value-type="string">
            <text:p>2019-12-17-17:01:05.6765190</text:p>
          </table:table-cell>
          <table:table-cell table:number-columns-repeated="2"/>
        </table:table-row>
        <table:table-row table:style-name="ro1">
          <table:table-cell office:value-type="float" office:value="438994306" calcext:value-type="float">
            <text:p>438994306</text:p>
          </table:table-cell>
          <table:table-cell office:value-type="float" office:value="629960388.493463" calcext:value-type="float">
            <text:p>629960388.493463</text:p>
          </table:table-cell>
          <table:table-cell/>
          <table:table-cell office:value-type="string" calcext:value-type="string">
            <text:p>2019-12-18T16:59:48.4934630Z</text:p>
          </table:table-cell>
          <table:table-cell office:value-type="string" calcext:value-type="string">
            <text:p>2019-12-18-17:00:57.6774630</text:p>
          </table:table-cell>
          <table:table-cell table:number-columns-repeated="2"/>
        </table:table-row>
        <table:table-row table:style-name="ro1">
          <table:table-cell office:value-type="float" office:value="438997904" calcext:value-type="float">
            <text:p>438997904</text:p>
          </table:table-cell>
          <table:table-cell office:value-type="float" office:value="629963986.49351" calcext:value-type="float">
            <text:p>629963986.49351</text:p>
          </table:table-cell>
          <table:table-cell/>
          <table:table-cell office:value-type="string" calcext:value-type="string">
            <text:p>2019-12-18T17:59:46.4935100Z</text:p>
          </table:table-cell>
          <table:table-cell office:value-type="string" calcext:value-type="string">
            <text:p>2019-12-18-18:00:55.6775100</text:p>
          </table:table-cell>
          <table:table-cell table:number-columns-repeated="2"/>
        </table:table-row>
        <table:table-row table:style-name="ro1">
          <table:table-cell office:value-type="float" office:value="439167085" calcext:value-type="float">
            <text:p>439167085</text:p>
          </table:table-cell>
          <table:table-cell office:value-type="float" office:value="630133167.495316" calcext:value-type="float">
            <text:p>630133167.495316</text:p>
          </table:table-cell>
          <table:table-cell/>
          <table:table-cell office:value-type="string" calcext:value-type="string">
            <text:p>2019-12-20T16:59:27.4953160Z</text:p>
          </table:table-cell>
          <table:table-cell office:value-type="string" calcext:value-type="string">
            <text:p>2019-12-20-17:00:36.6793160</text:p>
          </table:table-cell>
          <table:table-cell table:number-columns-repeated="2"/>
        </table:table-row>
        <table:table-row table:style-name="ro1">
          <table:table-cell office:value-type="float" office:value="439177859" calcext:value-type="float">
            <text:p>439177859</text:p>
          </table:table-cell>
          <table:table-cell office:value-type="float" office:value="630143941.495453" calcext:value-type="float">
            <text:p>630143941.495453</text:p>
          </table:table-cell>
          <table:table-cell/>
          <table:table-cell office:value-type="string" calcext:value-type="string">
            <text:p>2019-12-20T19:59:01.4954530Z</text:p>
          </table:table-cell>
          <table:table-cell office:value-type="string" calcext:value-type="string">
            <text:p>2019-12-20-20:00:10.6794530</text:p>
          </table:table-cell>
          <table:table-cell table:number-columns-repeated="2"/>
        </table:table-row>
        <table:table-row table:style-name="ro1">
          <table:table-cell office:value-type="float" office:value="439314729" calcext:value-type="float">
            <text:p>439314729</text:p>
          </table:table-cell>
          <table:table-cell office:value-type="float" office:value="630280811.496965" calcext:value-type="float">
            <text:p>630280811.496965</text:p>
          </table:table-cell>
          <table:table-cell/>
          <table:table-cell office:value-type="string" calcext:value-type="string">
            <text:p>2019-12-22T10:00:11.4969649Z</text:p>
          </table:table-cell>
          <table:table-cell office:value-type="string" calcext:value-type="string">
            <text:p>2019-12-22-10:01:20.6809649</text:p>
          </table:table-cell>
          <table:table-cell table:number-columns-repeated="2"/>
        </table:table-row>
        <table:table-row table:style-name="ro1">
          <table:table-cell office:value-type="float" office:value="439476656" calcext:value-type="float">
            <text:p>439476656</text:p>
          </table:table-cell>
          <table:table-cell office:value-type="float" office:value="630442738.498719" calcext:value-type="float">
            <text:p>630442738.498719</text:p>
          </table:table-cell>
          <table:table-cell/>
          <table:table-cell office:value-type="string" calcext:value-type="string">
            <text:p>2019-12-24T06:58:58.4987189Z</text:p>
          </table:table-cell>
          <table:table-cell office:value-type="string" calcext:value-type="string">
            <text:p>2019-12-24-07:00:07.6827189</text:p>
          </table:table-cell>
          <table:table-cell table:number-columns-repeated="2"/>
        </table:table-row>
        <table:table-row table:style-name="ro1">
          <table:table-cell office:value-type="float" office:value="439771881" calcext:value-type="float">
            <text:p>439771881</text:p>
          </table:table-cell>
          <table:table-cell office:value-type="float" office:value="630737963.501954" calcext:value-type="float">
            <text:p>630737963.501954</text:p>
          </table:table-cell>
          <table:table-cell/>
          <table:table-cell office:value-type="string" calcext:value-type="string">
            <text:p>2019-12-27T16:59:23.5019539Z</text:p>
          </table:table-cell>
          <table:table-cell office:value-type="string" calcext:value-type="string">
            <text:p>2019-12-27-17:00:32.6859539</text:p>
          </table:table-cell>
          <table:table-cell table:number-columns-repeated="2"/>
        </table:table-row>
        <table:table-row table:style-name="ro1">
          <table:table-cell office:value-type="float" office:value="439858235" calcext:value-type="float">
            <text:p>439858235</text:p>
          </table:table-cell>
          <table:table-cell office:value-type="float" office:value="630824317.502854" calcext:value-type="float">
            <text:p>630824317.502854</text:p>
          </table:table-cell>
          <table:table-cell/>
          <table:table-cell office:value-type="string" calcext:value-type="string">
            <text:p>2019-12-28T16:58:37.5028539Z</text:p>
          </table:table-cell>
          <table:table-cell office:value-type="string" calcext:value-type="string">
            <text:p>2019-12-28-16:59:46.6868540</text:p>
          </table:table-cell>
          <table:table-cell table:number-columns-repeated="2"/>
        </table:table-row>
        <table:table-row table:style-name="ro1">
          <table:table-cell office:value-type="float" office:value="439944629" calcext:value-type="float">
            <text:p>439944629</text:p>
          </table:table-cell>
          <table:table-cell office:value-type="float" office:value="630910711.503812" calcext:value-type="float">
            <text:p>630910711.503812</text:p>
          </table:table-cell>
          <table:table-cell/>
          <table:table-cell office:value-type="string" calcext:value-type="string">
            <text:p>2019-12-29T16:58:31.5038119Z</text:p>
          </table:table-cell>
          <table:table-cell office:value-type="string" calcext:value-type="string">
            <text:p>2019-12-29-16:59:40.6878119</text:p>
          </table:table-cell>
          <table:table-cell table:number-columns-repeated="2"/>
        </table:table-row>
        <table:table-row table:style-name="ro1">
          <table:table-cell office:value-type="float" office:value="440023827" calcext:value-type="float">
            <text:p>440023827</text:p>
          </table:table-cell>
          <table:table-cell office:value-type="float" office:value="630989909.504697" calcext:value-type="float">
            <text:p>630989909.504697</text:p>
          </table:table-cell>
          <table:table-cell/>
          <table:table-cell office:value-type="string" calcext:value-type="string">
            <text:p>2019-12-30T14:58:29.5046969Z</text:p>
          </table:table-cell>
          <table:table-cell office:value-type="string" calcext:value-type="string">
            <text:p>2019-12-30-14:59:38.6886969</text:p>
          </table:table-cell>
          <table:table-cell table:number-columns-repeated="2"/>
        </table:table-row>
        <table:table-row table:style-name="ro1">
          <table:table-cell office:value-type="float" office:value="440376607" calcext:value-type="float">
            <text:p>440376607</text:p>
          </table:table-cell>
          <table:table-cell office:value-type="float" office:value="631342689.508536" calcext:value-type="float">
            <text:p>631342689.508536</text:p>
          </table:table-cell>
          <table:table-cell/>
          <table:table-cell office:value-type="string" calcext:value-type="string">
            <text:p>2020-01-03T16:58:09.5085359Z</text:p>
          </table:table-cell>
          <table:table-cell office:value-type="string" calcext:value-type="string">
            <text:p>2020-01-03-16:59:18.6925359</text:p>
          </table:table-cell>
          <table:table-cell table:number-columns-repeated="2"/>
        </table:table-row>
        <table:table-row table:style-name="ro1">
          <table:table-cell office:value-type="float" office:value="440434226" calcext:value-type="float">
            <text:p>440434226</text:p>
          </table:table-cell>
          <table:table-cell office:value-type="float" office:value="631400308.509174" calcext:value-type="float">
            <text:p>631400308.509174</text:p>
          </table:table-cell>
          <table:table-cell/>
          <table:table-cell office:value-type="string" calcext:value-type="string">
            <text:p>2020-01-04T08:58:28.5091739Z</text:p>
          </table:table-cell>
          <table:table-cell office:value-type="string" calcext:value-type="string">
            <text:p>2020-01-04-08:59:37.6931740</text:p>
          </table:table-cell>
          <table:table-cell table:number-columns-repeated="2"/>
        </table:table-row>
        <table:table-row table:style-name="ro1">
          <table:table-cell office:value-type="float" office:value="440549395" calcext:value-type="float">
            <text:p>440549395</text:p>
          </table:table-cell>
          <table:table-cell office:value-type="float" office:value="631515477.510414" calcext:value-type="float">
            <text:p>631515477.510414</text:p>
          </table:table-cell>
          <table:table-cell/>
          <table:table-cell office:value-type="string" calcext:value-type="string">
            <text:p>2020-01-05T16:57:57.5104140Z</text:p>
          </table:table-cell>
          <table:table-cell office:value-type="string" calcext:value-type="string">
            <text:p>2020-01-05-16:59:06.6944140</text:p>
          </table:table-cell>
          <table:table-cell table:number-columns-repeated="2"/>
        </table:table-row>
        <table:table-row table:style-name="ro1">
          <table:table-cell office:value-type="float" office:value="440607017" calcext:value-type="float">
            <text:p>440607017</text:p>
          </table:table-cell>
          <table:table-cell office:value-type="float" office:value="631573099.511082" calcext:value-type="float">
            <text:p>631573099.511082</text:p>
          </table:table-cell>
          <table:table-cell/>
          <table:table-cell office:value-type="string" calcext:value-type="string">
            <text:p>2020-01-06T08:58:19.5110819Z</text:p>
          </table:table-cell>
          <table:table-cell office:value-type="string" calcext:value-type="string">
            <text:p>2020-01-06-08:59:28.6950819</text:p>
          </table:table-cell>
          <table:table-cell table:number-columns-repeated="2"/>
        </table:table-row>
        <table:table-row table:style-name="ro1">
          <table:table-cell office:value-type="float" office:value="440682586" calcext:value-type="float">
            <text:p>440682586</text:p>
          </table:table-cell>
          <table:table-cell office:value-type="float" office:value="631648668.511882" calcext:value-type="float">
            <text:p>631648668.511882</text:p>
          </table:table-cell>
          <table:table-cell/>
          <table:table-cell office:value-type="string" calcext:value-type="string">
            <text:p>2020-01-07T05:57:48.5118819Z</text:p>
          </table:table-cell>
          <table:table-cell office:value-type="string" calcext:value-type="string">
            <text:p>2020-01-07-05:58:57.6958819</text:p>
          </table:table-cell>
          <table:table-cell table:number-columns-repeated="2"/>
        </table:table-row>
        <table:table-row table:style-name="ro1">
          <table:table-cell office:value-type="float" office:value="440808587" calcext:value-type="float">
            <text:p>440808587</text:p>
          </table:table-cell>
          <table:table-cell office:value-type="float" office:value="631774669.51324" calcext:value-type="float">
            <text:p>631774669.51324</text:p>
          </table:table-cell>
          <table:table-cell/>
          <table:table-cell office:value-type="string" calcext:value-type="string">
            <text:p>2020-01-08T16:57:49.5132399Z</text:p>
          </table:table-cell>
          <table:table-cell office:value-type="string" calcext:value-type="string">
            <text:p>2020-01-08-16:58:58.6972399</text:p>
          </table:table-cell>
          <table:table-cell table:number-columns-repeated="2"/>
        </table:table-row>
        <table:table-row table:style-name="ro1">
          <table:table-cell office:value-type="float" office:value="440981379" calcext:value-type="float">
            <text:p>440981379</text:p>
          </table:table-cell>
          <table:table-cell office:value-type="float" office:value="631947461.515115" calcext:value-type="float">
            <text:p>631947461.515115</text:p>
          </table:table-cell>
          <table:table-cell/>
          <table:table-cell office:value-type="string" calcext:value-type="string">
            <text:p>2020-01-10T16:57:41.5151150Z</text:p>
          </table:table-cell>
          <table:table-cell office:value-type="string" calcext:value-type="string">
            <text:p>2020-01-10-16:58:50.6991150</text:p>
          </table:table-cell>
          <table:table-cell table:number-columns-repeated="2"/>
        </table:table-row>
        <table:table-row table:style-name="ro1">
          <table:table-cell office:value-type="float" office:value="441064176" calcext:value-type="float">
            <text:p>441064176</text:p>
          </table:table-cell>
          <table:table-cell office:value-type="float" office:value="632030258.516022" calcext:value-type="float">
            <text:p>632030258.516022</text:p>
          </table:table-cell>
          <table:table-cell/>
          <table:table-cell office:value-type="string" calcext:value-type="string">
            <text:p>2020-01-11T15:57:38.5160219Z</text:p>
          </table:table-cell>
          <table:table-cell office:value-type="string" calcext:value-type="string">
            <text:p>2020-01-11-15:58:47.7000219</text:p>
          </table:table-cell>
          <table:table-cell table:number-columns-repeated="2"/>
        </table:table-row>
        <table:table-row table:style-name="ro1">
          <table:table-cell office:value-type="float" office:value="441154172" calcext:value-type="float">
            <text:p>441154172</text:p>
          </table:table-cell>
          <table:table-cell office:value-type="float" office:value="632120254.517" calcext:value-type="float">
            <text:p>632120254.517</text:p>
          </table:table-cell>
          <table:table-cell/>
          <table:table-cell office:value-type="string" calcext:value-type="string">
            <text:p>2020-01-12T16:57:34.5169999Z</text:p>
          </table:table-cell>
          <table:table-cell office:value-type="string" calcext:value-type="string">
            <text:p>2020-01-12-16:58:43.7009999</text:p>
          </table:table-cell>
          <table:table-cell table:number-columns-repeated="2"/>
        </table:table-row>
        <table:table-row table:style-name="ro1">
          <table:table-cell office:value-type="float" office:value="441161347" calcext:value-type="float">
            <text:p>441161347</text:p>
          </table:table-cell>
          <table:table-cell office:value-type="float" office:value="632127429.517084" calcext:value-type="float">
            <text:p>632127429.517084</text:p>
          </table:table-cell>
          <table:table-cell/>
          <table:table-cell office:value-type="string" calcext:value-type="string">
            <text:p>2020-01-12T18:57:09.5170840Z</text:p>
          </table:table-cell>
          <table:table-cell office:value-type="string" calcext:value-type="string">
            <text:p>2020-01-12-18:58:18.7010840</text:p>
          </table:table-cell>
          <table:table-cell table:number-columns-repeated="2"/>
        </table:table-row>
        <table:table-row table:style-name="ro1">
          <table:table-cell office:value-type="float" office:value="441287360" calcext:value-type="float">
            <text:p>441287360</text:p>
          </table:table-cell>
          <table:table-cell office:value-type="float" office:value="632253442.518448" calcext:value-type="float">
            <text:p>632253442.518448</text:p>
          </table:table-cell>
          <table:table-cell/>
          <table:table-cell office:value-type="string" calcext:value-type="string">
            <text:p>2020-01-14T05:57:22.5184479Z</text:p>
          </table:table-cell>
          <table:table-cell office:value-type="string" calcext:value-type="string">
            <text:p>2020-01-14-05:58:31.7024480</text:p>
          </table:table-cell>
          <table:table-cell table:number-columns-repeated="2"/>
        </table:table-row>
        <table:table-row table:style-name="ro1">
          <table:table-cell office:value-type="float" office:value="441370159" calcext:value-type="float">
            <text:p>441370159</text:p>
          </table:table-cell>
          <table:table-cell office:value-type="float" office:value="632336241.519351" calcext:value-type="float">
            <text:p>632336241.519351</text:p>
          </table:table-cell>
          <table:table-cell/>
          <table:table-cell office:value-type="string" calcext:value-type="string">
            <text:p>2020-01-15T04:57:21.5193510Z</text:p>
          </table:table-cell>
          <table:table-cell office:value-type="string" calcext:value-type="string">
            <text:p>2020-01-15-04:58:30.7033510</text:p>
          </table:table-cell>
          <table:table-cell table:number-columns-repeated="2"/>
        </table:table-row>
        <table:table-row table:style-name="ro1">
          <table:table-cell office:value-type="float" office:value="441499761" calcext:value-type="float">
            <text:p>441499761</text:p>
          </table:table-cell>
          <table:table-cell office:value-type="float" office:value="632465843.520761" calcext:value-type="float">
            <text:p>632465843.520761</text:p>
          </table:table-cell>
          <table:table-cell/>
          <table:table-cell office:value-type="string" calcext:value-type="string">
            <text:p>2020-01-16T16:57:23.5207610Z</text:p>
          </table:table-cell>
          <table:table-cell office:value-type="string" calcext:value-type="string">
            <text:p>2020-01-16-16:58:32.7047610</text:p>
          </table:table-cell>
          <table:table-cell table:number-columns-repeated="2"/>
        </table:table-row>
        <table:table-row table:style-name="ro1">
          <table:table-cell office:value-type="float" office:value="441553776" calcext:value-type="float">
            <text:p>441553776</text:p>
          </table:table-cell>
          <table:table-cell office:value-type="float" office:value="632519858.521353" calcext:value-type="float">
            <text:p>632519858.521353</text:p>
          </table:table-cell>
          <table:table-cell/>
          <table:table-cell office:value-type="string" calcext:value-type="string">
            <text:p>2020-01-17T07:57:38.5213530Z</text:p>
          </table:table-cell>
          <table:table-cell office:value-type="string" calcext:value-type="string">
            <text:p>2020-01-17-07:58:47.7053530</text:p>
          </table:table-cell>
          <table:table-cell table:number-columns-repeated="2"/>
        </table:table-row>
        <table:table-row table:style-name="ro1">
          <table:table-cell office:value-type="float" office:value="441611347" calcext:value-type="float">
            <text:p>441611347</text:p>
          </table:table-cell>
          <table:table-cell office:value-type="float" office:value="632577429.521994" calcext:value-type="float">
            <text:p>632577429.521994</text:p>
          </table:table-cell>
          <table:table-cell/>
          <table:table-cell office:value-type="string" calcext:value-type="string">
            <text:p>2020-01-17T23:57:09.5219939Z</text:p>
          </table:table-cell>
          <table:table-cell office:value-type="string" calcext:value-type="string">
            <text:p>2020-01-17-23:58:18.7059940</text:p>
          </table:table-cell>
          <table:table-cell table:number-columns-repeated="2"/>
        </table:table-row>
        <table:table-row table:style-name="ro1">
          <table:table-cell office:value-type="float" office:value="441726571" calcext:value-type="float">
            <text:p>441726571</text:p>
          </table:table-cell>
          <table:table-cell office:value-type="float" office:value="632692653.523241" calcext:value-type="float">
            <text:p>632692653.523241</text:p>
          </table:table-cell>
          <table:table-cell/>
          <table:table-cell office:value-type="string" calcext:value-type="string">
            <text:p>2020-01-19T07:57:33.5232410Z</text:p>
          </table:table-cell>
          <table:table-cell office:value-type="string" calcext:value-type="string">
            <text:p>2020-01-19-07:58:42.7072410</text:p>
          </table:table-cell>
          <table:table-cell table:number-columns-repeated="2"/>
        </table:table-row>
        <table:table-row table:style-name="ro1">
          <table:table-cell office:value-type="float" office:value="441830951" calcext:value-type="float">
            <text:p>441830951</text:p>
          </table:table-cell>
          <table:table-cell office:value-type="float" office:value="632797033.524369" calcext:value-type="float">
            <text:p>632797033.524369</text:p>
          </table:table-cell>
          <table:table-cell/>
          <table:table-cell office:value-type="string" calcext:value-type="string">
            <text:p>2020-01-20T12:57:13.5243690Z</text:p>
          </table:table-cell>
          <table:table-cell office:value-type="string" calcext:value-type="string">
            <text:p>2020-01-20-12:58:22.7083690</text:p>
          </table:table-cell>
          <table:table-cell table:number-columns-repeated="2"/>
        </table:table-row>
        <table:table-row table:style-name="ro1">
          <table:table-cell office:value-type="float" office:value="442190941" calcext:value-type="float">
            <text:p>442190941</text:p>
          </table:table-cell>
          <table:table-cell office:value-type="float" office:value="633157023.528271" calcext:value-type="float">
            <text:p>633157023.528271</text:p>
          </table:table-cell>
          <table:table-cell/>
          <table:table-cell office:value-type="string" calcext:value-type="string">
            <text:p>2020-01-24T16:57:03.5282709Z</text:p>
          </table:table-cell>
          <table:table-cell office:value-type="string" calcext:value-type="string">
            <text:p>2020-01-24-16:58:12.7122709</text:p>
          </table:table-cell>
          <table:table-cell table:number-columns-repeated="2"/>
        </table:table-row>
        <table:table-row table:style-name="ro1">
          <table:table-cell office:value-type="float" office:value="442273770" calcext:value-type="float">
            <text:p>442273770</text:p>
          </table:table-cell>
          <table:table-cell office:value-type="float" office:value="633239852.529199" calcext:value-type="float">
            <text:p>633239852.529199</text:p>
          </table:table-cell>
          <table:table-cell/>
          <table:table-cell office:value-type="string" calcext:value-type="string">
            <text:p>2020-01-25T15:57:32.5291990Z</text:p>
          </table:table-cell>
          <table:table-cell office:value-type="string" calcext:value-type="string">
            <text:p>2020-01-25-15:58:41.7131990</text:p>
          </table:table-cell>
          <table:table-cell table:number-columns-repeated="2"/>
        </table:table-row>
        <table:table-row table:style-name="ro1">
          <table:table-cell office:value-type="float" office:value="442316932" calcext:value-type="float">
            <text:p>442316932</text:p>
          </table:table-cell>
          <table:table-cell office:value-type="float" office:value="633283014.529663" calcext:value-type="float">
            <text:p>633283014.529663</text:p>
          </table:table-cell>
          <table:table-cell/>
          <table:table-cell office:value-type="string" calcext:value-type="string">
            <text:p>2020-01-26T03:56:54.5296629Z</text:p>
          </table:table-cell>
          <table:table-cell office:value-type="string" calcext:value-type="string">
            <text:p>2020-01-26-03:58:03.7136629</text:p>
          </table:table-cell>
          <table:table-cell table:number-columns-repeated="2"/>
        </table:table-row>
        <table:table-row table:style-name="ro1">
          <table:table-cell office:value-type="float" office:value="442622935" calcext:value-type="float">
            <text:p>442622935</text:p>
          </table:table-cell>
          <table:table-cell office:value-type="float" office:value="633589017.532991" calcext:value-type="float">
            <text:p>633589017.532991</text:p>
          </table:table-cell>
          <table:table-cell/>
          <table:table-cell office:value-type="string" calcext:value-type="string">
            <text:p>2020-01-29T16:56:57.5329909Z</text:p>
          </table:table-cell>
          <table:table-cell office:value-type="string" calcext:value-type="string">
            <text:p>2020-01-29-16:58:06.7169909</text:p>
          </table:table-cell>
          <table:table-cell table:number-columns-repeated="2"/>
        </table:table-row>
        <table:table-row table:style-name="ro1">
          <table:table-cell office:value-type="float" office:value="442691334" calcext:value-type="float">
            <text:p>442691334</text:p>
          </table:table-cell>
          <table:table-cell office:value-type="float" office:value="633657416.533744" calcext:value-type="float">
            <text:p>633657416.533744</text:p>
          </table:table-cell>
          <table:table-cell/>
          <table:table-cell office:value-type="string" calcext:value-type="string">
            <text:p>2020-01-30T11:56:56.5337439Z</text:p>
          </table:table-cell>
          <table:table-cell office:value-type="string" calcext:value-type="string">
            <text:p>2020-01-30-11:58:05.7177439</text:p>
          </table:table-cell>
          <table:table-cell table:number-columns-repeated="2"/>
        </table:table-row>
        <table:table-row table:style-name="ro1">
          <table:table-cell office:value-type="float" office:value="442871342" calcext:value-type="float">
            <text:p>442871342</text:p>
          </table:table-cell>
          <table:table-cell office:value-type="float" office:value="633837424.53568" calcext:value-type="float">
            <text:p>633837424.53568</text:p>
          </table:table-cell>
          <table:table-cell/>
          <table:table-cell office:value-type="string" calcext:value-type="string">
            <text:p>2020-02-01T13:57:04.5356799Z</text:p>
          </table:table-cell>
          <table:table-cell office:value-type="string" calcext:value-type="string">
            <text:p>2020-02-01-13:58:13.7196799</text:p>
          </table:table-cell>
          <table:table-cell table:number-columns-repeated="2"/>
        </table:table-row>
        <table:table-row table:style-name="ro1">
          <table:table-cell office:value-type="float" office:value="442903726" calcext:value-type="float">
            <text:p>442903726</text:p>
          </table:table-cell>
          <table:table-cell office:value-type="float" office:value="633869808.536089" calcext:value-type="float">
            <text:p>633869808.536089</text:p>
          </table:table-cell>
          <table:table-cell/>
          <table:table-cell office:value-type="string" calcext:value-type="string">
            <text:p>2020-02-01T22:56:48.5360889Z</text:p>
          </table:table-cell>
          <table:table-cell office:value-type="string" calcext:value-type="string">
            <text:p>2020-02-01-22:57:57.7200889</text:p>
          </table:table-cell>
          <table:table-cell table:number-columns-repeated="2"/>
        </table:table-row>
        <table:table-row table:style-name="ro1">
          <table:table-cell office:value-type="float" office:value="443018941" calcext:value-type="float">
            <text:p>443018941</text:p>
          </table:table-cell>
          <table:table-cell office:value-type="float" office:value="633985023.537335" calcext:value-type="float">
            <text:p>633985023.537335</text:p>
          </table:table-cell>
          <table:table-cell/>
          <table:table-cell office:value-type="string" calcext:value-type="string">
            <text:p>2020-02-03T06:57:03.5373350Z</text:p>
          </table:table-cell>
          <table:table-cell office:value-type="string" calcext:value-type="string">
            <text:p>2020-02-03-06:58:12.7213350</text:p>
          </table:table-cell>
          <table:table-cell table:number-columns-repeated="2"/>
        </table:table-row>
        <table:table-row table:style-name="ro1">
          <table:table-cell office:value-type="float" office:value="443220562" calcext:value-type="float">
            <text:p>443220562</text:p>
          </table:table-cell>
          <table:table-cell office:value-type="float" office:value="634186644.539549" calcext:value-type="float">
            <text:p>634186644.539549</text:p>
          </table:table-cell>
          <table:table-cell/>
          <table:table-cell office:value-type="string" calcext:value-type="string">
            <text:p>2020-02-05T14:57:24.5395489Z</text:p>
          </table:table-cell>
          <table:table-cell office:value-type="string" calcext:value-type="string">
            <text:p>2020-02-05-14:58:33.7235490</text:p>
          </table:table-cell>
          <table:table-cell table:number-columns-repeated="2"/>
        </table:table-row>
        <table:table-row table:style-name="ro1">
          <table:table-cell office:value-type="float" office:value="443393360" calcext:value-type="float">
            <text:p>443393360</text:p>
          </table:table-cell>
          <table:table-cell office:value-type="float" office:value="634359442.541436" calcext:value-type="float">
            <text:p>634359442.541436</text:p>
          </table:table-cell>
          <table:table-cell/>
          <table:table-cell office:value-type="string" calcext:value-type="string">
            <text:p>2020-02-07T14:57:22.5414359Z</text:p>
          </table:table-cell>
          <table:table-cell office:value-type="string" calcext:value-type="string">
            <text:p>2020-02-07-14:58:31.7254359</text:p>
          </table:table-cell>
          <table:table-cell table:number-columns-repeated="2"/>
        </table:table-row>
        <table:table-row table:style-name="ro1">
          <table:table-cell office:value-type="float" office:value="443487023" calcext:value-type="float">
            <text:p>443487023</text:p>
          </table:table-cell>
          <table:table-cell office:value-type="float" office:value="634453105.542431" calcext:value-type="float">
            <text:p>634453105.542431</text:p>
          </table:table-cell>
          <table:table-cell/>
          <table:table-cell office:value-type="string" calcext:value-type="string">
            <text:p>2020-02-08T16:58:25.5424309Z</text:p>
          </table:table-cell>
          <table:table-cell office:value-type="string" calcext:value-type="string">
            <text:p>2020-02-08-16:59:34.7264310</text:p>
          </table:table-cell>
          <table:table-cell table:number-columns-repeated="2"/>
        </table:table-row>
        <table:table-row table:style-name="ro1">
          <table:table-cell office:value-type="float" office:value="443555337" calcext:value-type="float">
            <text:p>443555337</text:p>
          </table:table-cell>
          <table:table-cell office:value-type="float" office:value="634521419.543194" calcext:value-type="float">
            <text:p>634521419.543194</text:p>
          </table:table-cell>
          <table:table-cell/>
          <table:table-cell office:value-type="string" calcext:value-type="string">
            <text:p>2020-02-09T11:56:59.5431939Z</text:p>
          </table:table-cell>
          <table:table-cell office:value-type="string" calcext:value-type="string">
            <text:p>2020-02-09-11:58:08.7271939</text:p>
          </table:table-cell>
          <table:table-cell table:number-columns-repeated="2"/>
        </table:table-row>
        <table:table-row table:style-name="ro1">
          <table:table-cell office:value-type="float" office:value="443623754" calcext:value-type="float">
            <text:p>443623754</text:p>
          </table:table-cell>
          <table:table-cell office:value-type="float" office:value="634589836.543953" calcext:value-type="float">
            <text:p>634589836.543953</text:p>
          </table:table-cell>
          <table:table-cell/>
          <table:table-cell office:value-type="string" calcext:value-type="string">
            <text:p>2020-02-10T06:57:16.5439529Z</text:p>
          </table:table-cell>
          <table:table-cell office:value-type="string" calcext:value-type="string">
            <text:p>2020-02-10-06:58:25.7279529</text:p>
          </table:table-cell>
          <table:table-cell table:number-columns-repeated="2"/>
        </table:table-row>
        <table:table-row table:style-name="ro1">
          <table:table-cell office:value-type="float" office:value="443738968" calcext:value-type="float">
            <text:p>443738968</text:p>
          </table:table-cell>
          <table:table-cell office:value-type="float" office:value="634705050.545175" calcext:value-type="float">
            <text:p>634705050.545175</text:p>
          </table:table-cell>
          <table:table-cell/>
          <table:table-cell office:value-type="string" calcext:value-type="string">
            <text:p>2020-02-11T14:57:30.5451749Z</text:p>
          </table:table-cell>
          <table:table-cell office:value-type="string" calcext:value-type="string">
            <text:p>2020-02-11-14:58:39.7291749</text:p>
          </table:table-cell>
          <table:table-cell table:number-columns-repeated="2"/>
        </table:table-row>
        <table:table-row table:style-name="ro1">
          <table:table-cell office:value-type="float" office:value="443803739" calcext:value-type="float">
            <text:p>443803739</text:p>
          </table:table-cell>
          <table:table-cell office:value-type="float" office:value="634769821.545899" calcext:value-type="float">
            <text:p>634769821.545899</text:p>
          </table:table-cell>
          <table:table-cell/>
          <table:table-cell office:value-type="string" calcext:value-type="string">
            <text:p>2020-02-12T08:57:01.5458990Z</text:p>
          </table:table-cell>
          <table:table-cell office:value-type="string" calcext:value-type="string">
            <text:p>2020-02-12-08:58:10.7298990</text:p>
          </table:table-cell>
          <table:table-cell table:number-columns-repeated="2"/>
        </table:table-row>
        <table:table-row table:style-name="ro1">
          <table:table-cell office:value-type="float" office:value="444005428" calcext:value-type="float">
            <text:p>444005428</text:p>
          </table:table-cell>
          <table:table-cell office:value-type="float" office:value="634971510.548129" calcext:value-type="float">
            <text:p>634971510.548129</text:p>
          </table:table-cell>
          <table:table-cell/>
          <table:table-cell office:value-type="string" calcext:value-type="string">
            <text:p>2020-02-14T16:58:30.5481289Z</text:p>
          </table:table-cell>
          <table:table-cell office:value-type="string" calcext:value-type="string">
            <text:p>2020-02-14-16:59:39.7321289</text:p>
          </table:table-cell>
          <table:table-cell table:number-columns-repeated="2"/>
        </table:table-row>
        <table:table-row table:style-name="ro1">
          <table:table-cell office:value-type="float" office:value="444091829" calcext:value-type="float">
            <text:p>444091829</text:p>
          </table:table-cell>
          <table:table-cell office:value-type="float" office:value="635057911.549029" calcext:value-type="float">
            <text:p>635057911.549029</text:p>
          </table:table-cell>
          <table:table-cell/>
          <table:table-cell office:value-type="string" calcext:value-type="string">
            <text:p>2020-02-15T16:58:31.5490289Z</text:p>
          </table:table-cell>
          <table:table-cell office:value-type="string" calcext:value-type="string">
            <text:p>2020-02-15-16:59:40.7330290</text:p>
          </table:table-cell>
          <table:table-cell table:number-columns-repeated="2"/>
        </table:table-row>
        <table:table-row table:style-name="ro1">
          <table:table-cell office:value-type="float" office:value="444167373" calcext:value-type="float">
            <text:p>444167373</text:p>
          </table:table-cell>
          <table:table-cell office:value-type="float" office:value="635133455.549899" calcext:value-type="float">
            <text:p>635133455.549899</text:p>
          </table:table-cell>
          <table:table-cell/>
          <table:table-cell office:value-type="string" calcext:value-type="string">
            <text:p>2020-02-16T13:57:35.5498989Z</text:p>
          </table:table-cell>
          <table:table-cell office:value-type="string" calcext:value-type="string">
            <text:p>2020-02-16-13:58:44.7338989</text:p>
          </table:table-cell>
          <table:table-cell table:number-columns-repeated="2"/>
        </table:table-row>
        <table:table-row table:style-name="ro1">
          <table:table-cell office:value-type="float" office:value="444224952" calcext:value-type="float">
            <text:p>444224952</text:p>
          </table:table-cell>
          <table:table-cell office:value-type="float" office:value="635191034.55497" calcext:value-type="float">
            <text:p>635191034.55497</text:p>
          </table:table-cell>
          <table:table-cell/>
          <table:table-cell office:value-type="string" calcext:value-type="string">
            <text:p>2020-02-17T05:57:14.5549700Z</text:p>
          </table:table-cell>
          <table:table-cell office:value-type="string" calcext:value-type="string">
            <text:p>2020-02-17-05:58:23.7389700</text:p>
          </table:table-cell>
          <table:table-cell table:number-columns-repeated="2"/>
        </table:table-row>
        <table:table-row table:style-name="ro1">
          <table:table-cell office:value-type="float" office:value="444426578" calcext:value-type="float">
            <text:p>444426578</text:p>
          </table:table-cell>
          <table:table-cell office:value-type="float" office:value="635392660.557238" calcext:value-type="float">
            <text:p>635392660.557238</text:p>
          </table:table-cell>
          <table:table-cell/>
          <table:table-cell office:value-type="string" calcext:value-type="string">
            <text:p>2020-02-19T13:57:40.5572379Z</text:p>
          </table:table-cell>
          <table:table-cell office:value-type="string" calcext:value-type="string">
            <text:p>2020-02-19-13:58:49.7412379</text:p>
          </table:table-cell>
          <table:table-cell table:number-columns-repeated="2"/>
        </table:table-row>
        <table:table-row table:style-name="ro1">
          <table:table-cell office:value-type="float" office:value="444599378" calcext:value-type="float">
            <text:p>444599378</text:p>
          </table:table-cell>
          <table:table-cell office:value-type="float" office:value="635565460.559152" calcext:value-type="float">
            <text:p>635565460.559152</text:p>
          </table:table-cell>
          <table:table-cell/>
          <table:table-cell office:value-type="string" calcext:value-type="string">
            <text:p>2020-02-21T13:57:40.5591520Z</text:p>
          </table:table-cell>
          <table:table-cell office:value-type="string" calcext:value-type="string">
            <text:p>2020-02-21-13:58:49.7431520</text:p>
          </table:table-cell>
          <table:table-cell table:number-columns-repeated="2"/>
        </table:table-row>
        <table:table-row table:style-name="ro1">
          <table:table-cell office:value-type="float" office:value="444693042" calcext:value-type="float">
            <text:p>444693042</text:p>
          </table:table-cell>
          <table:table-cell office:value-type="float" office:value="635659124.560183" calcext:value-type="float">
            <text:p>635659124.560183</text:p>
          </table:table-cell>
          <table:table-cell/>
          <table:table-cell office:value-type="string" calcext:value-type="string">
            <text:p>2020-02-22T15:58:44.5601829Z</text:p>
          </table:table-cell>
          <table:table-cell office:value-type="string" calcext:value-type="string">
            <text:p>2020-02-22-15:59:53.7441829</text:p>
          </table:table-cell>
          <table:table-cell table:number-columns-repeated="2"/>
        </table:table-row>
        <table:table-row table:style-name="ro1">
          <table:table-cell office:value-type="float" office:value="444743370" calcext:value-type="float">
            <text:p>444743370</text:p>
          </table:table-cell>
          <table:table-cell office:value-type="float" office:value="635709452.560754" calcext:value-type="float">
            <text:p>635709452.560754</text:p>
          </table:table-cell>
          <table:table-cell/>
          <table:table-cell office:value-type="string" calcext:value-type="string">
            <text:p>2020-02-23T05:57:32.5607539Z</text:p>
          </table:table-cell>
          <table:table-cell office:value-type="string" calcext:value-type="string">
            <text:p>2020-02-23-05:58:41.7447539</text:p>
          </table:table-cell>
          <table:table-cell table:number-columns-repeated="2"/>
        </table:table-row>
        <table:table-row table:style-name="ro1">
          <table:table-cell office:value-type="float" office:value="444829775" calcext:value-type="float">
            <text:p>444829775</text:p>
          </table:table-cell>
          <table:table-cell office:value-type="float" office:value="635795857.561731" calcext:value-type="float">
            <text:p>635795857.561731</text:p>
          </table:table-cell>
          <table:table-cell/>
          <table:table-cell office:value-type="string" calcext:value-type="string">
            <text:p>2020-02-24T05:57:37.5617309Z</text:p>
          </table:table-cell>
          <table:table-cell office:value-type="string" calcext:value-type="string">
            <text:p>2020-02-24-05:58:46.7457309</text:p>
          </table:table-cell>
          <table:table-cell table:number-columns-repeated="2"/>
        </table:table-row>
        <table:table-row table:style-name="ro1">
          <table:table-cell office:value-type="float" office:value="444916181" calcext:value-type="float">
            <text:p>444916181</text:p>
          </table:table-cell>
          <table:table-cell office:value-type="float" office:value="635882263.562694" calcext:value-type="float">
            <text:p>635882263.562694</text:p>
          </table:table-cell>
          <table:table-cell/>
          <table:table-cell office:value-type="string" calcext:value-type="string">
            <text:p>2020-02-25T05:57:43.5626939Z</text:p>
          </table:table-cell>
          <table:table-cell office:value-type="string" calcext:value-type="string">
            <text:p>2020-02-25-05:58:52.7466939</text:p>
          </table:table-cell>
          <table:table-cell table:number-columns-repeated="2"/>
        </table:table-row>
        <table:table-row table:style-name="ro1">
          <table:table-cell office:value-type="float" office:value="444980965" calcext:value-type="float">
            <text:p>444980965</text:p>
          </table:table-cell>
          <table:table-cell office:value-type="float" office:value="635947047.563381" calcext:value-type="float">
            <text:p>635947047.563381</text:p>
          </table:table-cell>
          <table:table-cell/>
          <table:table-cell office:value-type="string" calcext:value-type="string">
            <text:p>2020-02-25T23:57:27.5633809Z</text:p>
          </table:table-cell>
          <table:table-cell office:value-type="string" calcext:value-type="string">
            <text:p>2020-02-25-23:58:36.7473809</text:p>
          </table:table-cell>
          <table:table-cell table:number-columns-repeated="2"/>
        </table:table-row>
        <table:table-row table:style-name="ro1">
          <table:table-cell office:value-type="float" office:value="445067362" calcext:value-type="float">
            <text:p>445067362</text:p>
          </table:table-cell>
          <table:table-cell office:value-type="float" office:value="636033444.564366" calcext:value-type="float">
            <text:p>636033444.564366</text:p>
          </table:table-cell>
          <table:table-cell/>
          <table:table-cell office:value-type="string" calcext:value-type="string">
            <text:p>2020-02-26T23:57:24.5643659Z</text:p>
          </table:table-cell>
          <table:table-cell office:value-type="string" calcext:value-type="string">
            <text:p>2020-02-26-23:58:33.7483659</text:p>
          </table:table-cell>
          <table:table-cell table:number-columns-repeated="2"/>
        </table:table-row>
        <table:table-row table:style-name="ro1">
          <table:table-cell office:value-type="float" office:value="445211461" calcext:value-type="float">
            <text:p>445211461</text:p>
          </table:table-cell>
          <table:table-cell office:value-type="float" office:value="636177543.565993" calcext:value-type="float">
            <text:p>636177543.565993</text:p>
          </table:table-cell>
          <table:table-cell/>
          <table:table-cell office:value-type="string" calcext:value-type="string">
            <text:p>2020-02-28T15:59:03.5659929Z</text:p>
          </table:table-cell>
          <table:table-cell office:value-type="string" calcext:value-type="string">
            <text:p>2020-02-28-16:00:12.7499929</text:p>
          </table:table-cell>
          <table:table-cell table:number-columns-repeated="2"/>
        </table:table-row>
        <table:table-row table:style-name="ro1">
          <table:table-cell office:value-type="float" office:value="445279769" calcext:value-type="float">
            <text:p>445279769</text:p>
          </table:table-cell>
          <table:table-cell office:value-type="float" office:value="636245851.566752" calcext:value-type="float">
            <text:p>636245851.566752</text:p>
          </table:table-cell>
          <table:table-cell/>
          <table:table-cell office:value-type="string" calcext:value-type="string">
            <text:p>2020-02-29T10:57:31.5667519Z</text:p>
          </table:table-cell>
          <table:table-cell office:value-type="string" calcext:value-type="string">
            <text:p>2020-02-29-10:58:40.7507519</text:p>
          </table:table-cell>
          <table:table-cell table:number-columns-repeated="2"/>
        </table:table-row>
        <table:table-row table:style-name="ro1">
          <table:table-cell office:value-type="float" office:value="445373396" calcext:value-type="float">
            <text:p>445373396</text:p>
          </table:table-cell>
          <table:table-cell office:value-type="float" office:value="636339478.567807" calcext:value-type="float">
            <text:p>636339478.567807</text:p>
          </table:table-cell>
          <table:table-cell/>
          <table:table-cell office:value-type="string" calcext:value-type="string">
            <text:p>2020-03-01T12:57:58.5678069Z</text:p>
          </table:table-cell>
          <table:table-cell office:value-type="string" calcext:value-type="string">
            <text:p>2020-03-01-12:59:07.7518069</text:p>
          </table:table-cell>
          <table:table-cell table:number-columns-repeated="2"/>
        </table:table-row>
        <table:table-row table:style-name="ro1">
          <table:table-cell office:value-type="float" office:value="445546207" calcext:value-type="float">
            <text:p>445546207</text:p>
          </table:table-cell>
          <table:table-cell office:value-type="float" office:value="636512289.569752" calcext:value-type="float">
            <text:p>636512289.569752</text:p>
          </table:table-cell>
          <table:table-cell/>
          <table:table-cell office:value-type="string" calcext:value-type="string">
            <text:p>2020-03-03T12:58:09.5697519Z</text:p>
          </table:table-cell>
          <table:table-cell office:value-type="string" calcext:value-type="string">
            <text:p>2020-03-03-12:59:18.7537519</text:p>
          </table:table-cell>
          <table:table-cell table:number-columns-repeated="2"/>
        </table:table-row>
        <table:table-row table:style-name="ro1">
          <table:table-cell office:value-type="float" office:value="445647074" calcext:value-type="float">
            <text:p>445647074</text:p>
          </table:table-cell>
          <table:table-cell office:value-type="float" office:value="636613156.570839" calcext:value-type="float">
            <text:p>636613156.570839</text:p>
          </table:table-cell>
          <table:table-cell/>
          <table:table-cell office:value-type="string" calcext:value-type="string">
            <text:p>2020-03-04T16:59:16.5708389Z</text:p>
          </table:table-cell>
          <table:table-cell office:value-type="string" calcext:value-type="string">
            <text:p>2020-03-04-17:00:25.7548389</text:p>
          </table:table-cell>
          <table:table-cell table:number-columns-repeated="2"/>
        </table:table-row>
        <table:table-row table:style-name="ro1">
          <table:table-cell office:value-type="float" office:value="445719017" calcext:value-type="float">
            <text:p>445719017</text:p>
          </table:table-cell>
          <table:table-cell office:value-type="float" office:value="636685099.571689" calcext:value-type="float">
            <text:p>636685099.571689</text:p>
          </table:table-cell>
          <table:table-cell/>
          <table:table-cell office:value-type="string" calcext:value-type="string">
            <text:p>2020-03-05T12:58:19.5716890Z</text:p>
          </table:table-cell>
          <table:table-cell office:value-type="string" calcext:value-type="string">
            <text:p>2020-03-05-12:59:28.7556890</text:p>
          </table:table-cell>
          <table:table-cell table:number-columns-repeated="2"/>
        </table:table-row>
        <table:table-row table:style-name="ro1">
          <table:table-cell office:value-type="float" office:value="445819881" calcext:value-type="float">
            <text:p>445819881</text:p>
          </table:table-cell>
          <table:table-cell office:value-type="float" office:value="636785963.572802" calcext:value-type="float">
            <text:p>636785963.572802</text:p>
          </table:table-cell>
          <table:table-cell/>
          <table:table-cell office:value-type="string" calcext:value-type="string">
            <text:p>2020-03-06T16:59:23.5728019Z</text:p>
          </table:table-cell>
          <table:table-cell office:value-type="string" calcext:value-type="string">
            <text:p>2020-03-06-17:00:32.7568019</text:p>
          </table:table-cell>
          <table:table-cell table:number-columns-repeated="2"/>
        </table:table-row>
        <table:table-row table:style-name="ro1">
          <table:table-cell office:value-type="float" office:value="445891817" calcext:value-type="float">
            <text:p>445891817</text:p>
          </table:table-cell>
          <table:table-cell office:value-type="float" office:value="636857899.573641" calcext:value-type="float">
            <text:p>636857899.573641</text:p>
          </table:table-cell>
          <table:table-cell/>
          <table:table-cell office:value-type="string" calcext:value-type="string">
            <text:p>2020-03-07T12:58:19.5736409Z</text:p>
          </table:table-cell>
          <table:table-cell office:value-type="string" calcext:value-type="string">
            <text:p>2020-03-07-12:59:28.7576409</text:p>
          </table:table-cell>
          <table:table-cell table:number-columns-repeated="2"/>
        </table:table-row>
        <table:table-row table:style-name="ro1">
          <table:table-cell office:value-type="float" office:value="445960192" calcext:value-type="float">
            <text:p>445960192</text:p>
          </table:table-cell>
          <table:table-cell office:value-type="float" office:value="636926274.57437" calcext:value-type="float">
            <text:p>636926274.57437</text:p>
          </table:table-cell>
          <table:table-cell/>
          <table:table-cell office:value-type="string" calcext:value-type="string">
            <text:p>2020-03-08T07:57:54.5743700Z</text:p>
          </table:table-cell>
          <table:table-cell office:value-type="string" calcext:value-type="string">
            <text:p>2020-03-08-07:59:03.7583700</text:p>
          </table:table-cell>
          <table:table-cell table:number-columns-repeated="2"/>
        </table:table-row>
        <table:table-row table:style-name="ro1">
          <table:table-cell office:value-type="float" office:value="446061011" calcext:value-type="float">
            <text:p>446061011</text:p>
          </table:table-cell>
          <table:table-cell office:value-type="float" office:value="637027093.57552" calcext:value-type="float">
            <text:p>637027093.57552</text:p>
          </table:table-cell>
          <table:table-cell/>
          <table:table-cell office:value-type="string" calcext:value-type="string">
            <text:p>2020-03-09T11:58:13.5755200Z</text:p>
          </table:table-cell>
          <table:table-cell office:value-type="string" calcext:value-type="string">
            <text:p>2020-03-09-11:59:22.7595200</text:p>
          </table:table-cell>
          <table:table-cell table:number-columns-repeated="2"/>
        </table:table-row>
        <table:table-row table:style-name="ro1">
          <table:table-cell office:value-type="float" office:value="446132997" calcext:value-type="float">
            <text:p>446132997</text:p>
          </table:table-cell>
          <table:table-cell office:value-type="float" office:value="637099079.576329" calcext:value-type="float">
            <text:p>637099079.576329</text:p>
          </table:table-cell>
          <table:table-cell/>
          <table:table-cell office:value-type="string" calcext:value-type="string">
            <text:p>2020-03-10T07:57:59.5763289Z</text:p>
          </table:table-cell>
          <table:table-cell office:value-type="string" calcext:value-type="string">
            <text:p>2020-03-10-07:59:08.7603290</text:p>
          </table:table-cell>
          <table:table-cell table:number-columns-repeated="2"/>
        </table:table-row>
        <table:table-row table:style-name="ro1">
          <table:table-cell office:value-type="float" office:value="446280598" calcext:value-type="float">
            <text:p>446280598</text:p>
          </table:table-cell>
          <table:table-cell office:value-type="float" office:value="637246680.577986" calcext:value-type="float">
            <text:p>637246680.577986</text:p>
          </table:table-cell>
          <table:table-cell/>
          <table:table-cell office:value-type="string" calcext:value-type="string">
            <text:p>2020-03-12T00:58:00.5779860Z</text:p>
          </table:table-cell>
          <table:table-cell office:value-type="string" calcext:value-type="string">
            <text:p>2020-03-12-00:59:09.7619860</text:p>
          </table:table-cell>
          <table:table-cell table:number-columns-repeated="2"/>
        </table:table-row>
        <table:table-row table:style-name="ro1">
          <table:table-cell office:value-type="float" office:value="446424692" calcext:value-type="float">
            <text:p>446424692</text:p>
          </table:table-cell>
          <table:table-cell office:value-type="float" office:value="637390774.579597" calcext:value-type="float">
            <text:p>637390774.579597</text:p>
          </table:table-cell>
          <table:table-cell/>
          <table:table-cell office:value-type="string" calcext:value-type="string">
            <text:p>2020-03-13T16:59:34.5795969Z</text:p>
          </table:table-cell>
          <table:table-cell office:value-type="string" calcext:value-type="string">
            <text:p>2020-03-13-17:00:43.7635970</text:p>
          </table:table-cell>
          <table:table-cell table:number-columns-repeated="2"/>
        </table:table-row>
        <table:table-row table:style-name="ro1">
          <table:table-cell office:value-type="float" office:value="446489425" calcext:value-type="float">
            <text:p>446489425</text:p>
          </table:table-cell>
          <table:table-cell office:value-type="float" office:value="637455507.580351" calcext:value-type="float">
            <text:p>637455507.580351</text:p>
          </table:table-cell>
          <table:table-cell/>
          <table:table-cell office:value-type="string" calcext:value-type="string">
            <text:p>2020-03-14T10:58:27.5803509Z</text:p>
          </table:table-cell>
          <table:table-cell office:value-type="string" calcext:value-type="string">
            <text:p>2020-03-14-10:59:36.7643510</text:p>
          </table:table-cell>
          <table:table-cell table:number-columns-repeated="2"/>
        </table:table-row>
        <table:table-row table:style-name="ro1">
          <table:table-cell office:value-type="float" office:value="446565015" calcext:value-type="float">
            <text:p>446565015</text:p>
          </table:table-cell>
          <table:table-cell office:value-type="float" office:value="637531097.581184" calcext:value-type="float">
            <text:p>637531097.581184</text:p>
          </table:table-cell>
          <table:table-cell/>
          <table:table-cell office:value-type="string" calcext:value-type="string">
            <text:p>2020-03-15T07:58:17.5811840Z</text:p>
          </table:table-cell>
          <table:table-cell office:value-type="string" calcext:value-type="string">
            <text:p>2020-03-15-07:59:26.7651840</text:p>
          </table:table-cell>
          <table:table-cell table:number-columns-repeated="2"/>
        </table:table-row>
        <table:table-row table:style-name="ro1">
          <table:table-cell office:value-type="float" office:value="446665846" calcext:value-type="float">
            <text:p>446665846</text:p>
          </table:table-cell>
          <table:table-cell office:value-type="float" office:value="637631928.58234" calcext:value-type="float">
            <text:p>637631928.58234</text:p>
          </table:table-cell>
          <table:table-cell/>
          <table:table-cell office:value-type="string" calcext:value-type="string">
            <text:p>2020-03-16T11:58:48.5823400Z</text:p>
          </table:table-cell>
          <table:table-cell office:value-type="string" calcext:value-type="string">
            <text:p>2020-03-16-11:59:57.7663400</text:p>
          </table:table-cell>
          <table:table-cell table:number-columns-repeated="2"/>
        </table:table-row>
        <table:table-row table:style-name="ro1">
          <table:table-cell office:value-type="float" office:value="446709021" calcext:value-type="float">
            <text:p>446709021</text:p>
          </table:table-cell>
          <table:table-cell office:value-type="float" office:value="637675103.582807" calcext:value-type="float">
            <text:p>637675103.582807</text:p>
          </table:table-cell>
          <table:table-cell/>
          <table:table-cell office:value-type="string" calcext:value-type="string">
            <text:p>2020-03-16T23:58:23.5828069Z</text:p>
          </table:table-cell>
          <table:table-cell office:value-type="string" calcext:value-type="string">
            <text:p>2020-03-16-23:59:32.7668069</text:p>
          </table:table-cell>
          <table:table-cell table:number-columns-repeated="2"/>
        </table:table-row>
        <table:table-row table:style-name="ro1">
          <table:table-cell office:value-type="float" office:value="446802621" calcext:value-type="float">
            <text:p>446802621</text:p>
          </table:table-cell>
          <table:table-cell office:value-type="float" office:value="637768703.583883" calcext:value-type="float">
            <text:p>637768703.583883</text:p>
          </table:table-cell>
          <table:table-cell/>
          <table:table-cell office:value-type="string" calcext:value-type="string">
            <text:p>2020-03-18T01:58:23.5838829Z</text:p>
          </table:table-cell>
          <table:table-cell office:value-type="string" calcext:value-type="string">
            <text:p>2020-03-18-01:59:32.7678829</text:p>
          </table:table-cell>
          <table:table-cell table:number-columns-repeated="2"/>
        </table:table-row>
        <table:table-row table:style-name="ro1">
          <table:table-cell office:value-type="float" office:value="446878230" calcext:value-type="float">
            <text:p>446878230</text:p>
          </table:table-cell>
          <table:table-cell office:value-type="float" office:value="637844312.58471" calcext:value-type="float">
            <text:p>637844312.58471</text:p>
          </table:table-cell>
          <table:table-cell/>
          <table:table-cell office:value-type="string" calcext:value-type="string">
            <text:p>2020-03-18T22:58:32.5847100Z</text:p>
          </table:table-cell>
          <table:table-cell office:value-type="string" calcext:value-type="string">
            <text:p>2020-03-18-22:59:41.7687100</text:p>
          </table:table-cell>
          <table:table-cell table:number-columns-repeated="2"/>
        </table:table-row>
        <table:table-row table:style-name="ro1">
          <table:table-cell office:value-type="float" office:value="447018714" calcext:value-type="float">
            <text:p>447018714</text:p>
          </table:table-cell>
          <table:table-cell office:value-type="float" office:value="637984796.586296" calcext:value-type="float">
            <text:p>637984796.586296</text:p>
          </table:table-cell>
          <table:table-cell/>
          <table:table-cell office:value-type="string" calcext:value-type="string">
            <text:p>2020-03-20T13:59:56.5862959Z</text:p>
          </table:table-cell>
          <table:table-cell office:value-type="string" calcext:value-type="string">
            <text:p>2020-03-20-14:01:05.7702959</text:p>
          </table:table-cell>
          <table:table-cell table:number-columns-repeated="2"/>
        </table:table-row>
        <table:table-row table:style-name="ro1">
          <table:table-cell office:value-type="float" office:value="447069053" calcext:value-type="float">
            <text:p>447069053</text:p>
          </table:table-cell>
          <table:table-cell office:value-type="float" office:value="638035135.586895" calcext:value-type="float">
            <text:p>638035135.586895</text:p>
          </table:table-cell>
          <table:table-cell/>
          <table:table-cell office:value-type="string" calcext:value-type="string">
            <text:p>2020-03-21T03:58:55.5868949Z</text:p>
          </table:table-cell>
          <table:table-cell office:value-type="string" calcext:value-type="string">
            <text:p>2020-03-21-04:00:04.7708950</text:p>
          </table:table-cell>
          <table:table-cell table:number-columns-repeated="2"/>
        </table:table-row>
        <table:table-row table:style-name="ro1">
          <table:table-cell office:value-type="float" office:value="447241871" calcext:value-type="float">
            <text:p>447241871</text:p>
          </table:table-cell>
          <table:table-cell office:value-type="float" office:value="638207953.588848" calcext:value-type="float">
            <text:p>638207953.588848</text:p>
          </table:table-cell>
          <table:table-cell/>
          <table:table-cell office:value-type="string" calcext:value-type="string">
            <text:p>2020-03-23T03:59:13.5888479Z</text:p>
          </table:table-cell>
          <table:table-cell office:value-type="string" calcext:value-type="string">
            <text:p>2020-03-23-04:00:22.7728480</text:p>
          </table:table-cell>
          <table:table-cell table:number-columns-repeated="2"/>
        </table:table-row>
        <table:table-row table:style-name="ro1">
          <table:table-cell office:value-type="float" office:value="447357084" calcext:value-type="float">
            <text:p>447357084</text:p>
          </table:table-cell>
          <table:table-cell office:value-type="float" office:value="638323166.590154" calcext:value-type="float">
            <text:p>638323166.590154</text:p>
          </table:table-cell>
          <table:table-cell/>
          <table:table-cell office:value-type="string" calcext:value-type="string">
            <text:p>2020-03-24T11:59:26.5901539Z</text:p>
          </table:table-cell>
          <table:table-cell office:value-type="string" calcext:value-type="string">
            <text:p>2020-03-24-12:00:35.7741539</text:p>
          </table:table-cell>
          <table:table-cell table:number-columns-repeated="2"/>
        </table:table-row>
        <table:table-row table:style-name="ro1">
          <table:table-cell office:value-type="float" office:value="447411057" calcext:value-type="float">
            <text:p>447411057</text:p>
          </table:table-cell>
          <table:table-cell office:value-type="float" office:value="638377139.590756" calcext:value-type="float">
            <text:p>638377139.590756</text:p>
          </table:table-cell>
          <table:table-cell/>
          <table:table-cell office:value-type="string" calcext:value-type="string">
            <text:p>2020-03-25T02:58:59.5907559Z</text:p>
          </table:table-cell>
          <table:table-cell office:value-type="string" calcext:value-type="string">
            <text:p>2020-03-25-03:00:08.7747559</text:p>
          </table:table-cell>
          <table:table-cell table:number-columns-repeated="2"/>
        </table:table-row>
        <table:table-row table:style-name="ro1">
          <table:table-cell office:value-type="float" office:value="447486652" calcext:value-type="float">
            <text:p>447486652</text:p>
          </table:table-cell>
          <table:table-cell office:value-type="float" office:value="638452734.59161" calcext:value-type="float">
            <text:p>638452734.59161</text:p>
          </table:table-cell>
          <table:table-cell/>
          <table:table-cell office:value-type="string" calcext:value-type="string">
            <text:p>2020-03-25T23:58:54.5916099Z</text:p>
          </table:table-cell>
          <table:table-cell office:value-type="string" calcext:value-type="string">
            <text:p>2020-03-26-00:00:03.7756099</text:p>
          </table:table-cell>
          <table:table-cell table:number-columns-repeated="2"/>
        </table:table-row>
        <table:table-row table:style-name="ro1">
          <table:table-cell office:value-type="float" office:value="447587489" calcext:value-type="float">
            <text:p>447587489</text:p>
          </table:table-cell>
          <table:table-cell office:value-type="float" office:value="638553571.592756" calcext:value-type="float">
            <text:p>638553571.592756</text:p>
          </table:table-cell>
          <table:table-cell/>
          <table:table-cell office:value-type="string" calcext:value-type="string">
            <text:p>2020-03-27T03:59:31.5927560Z</text:p>
          </table:table-cell>
          <table:table-cell office:value-type="string" calcext:value-type="string">
            <text:p>2020-03-27-04:00:40.7767560</text:p>
          </table:table-cell>
          <table:table-cell table:number-columns-repeated="2"/>
        </table:table-row>
        <table:table-row table:style-name="ro1">
          <table:table-cell office:value-type="float" office:value="447720754" calcext:value-type="float">
            <text:p>447720754</text:p>
          </table:table-cell>
          <table:table-cell office:value-type="float" office:value="638686836.594286" calcext:value-type="float">
            <text:p>638686836.594286</text:p>
          </table:table-cell>
          <table:table-cell/>
          <table:table-cell office:value-type="string" calcext:value-type="string">
            <text:p>2020-03-28T17:00:36.5942859Z</text:p>
          </table:table-cell>
          <table:table-cell office:value-type="string" calcext:value-type="string">
            <text:p>2020-03-28-17:01:45.7782859</text:p>
          </table:table-cell>
          <table:table-cell table:number-columns-repeated="2"/>
        </table:table-row>
        <table:table-row table:style-name="ro1">
          <table:table-cell office:value-type="float" office:value="447789102" calcext:value-type="float">
            <text:p>447789102</text:p>
          </table:table-cell>
          <table:table-cell office:value-type="float" office:value="638755184.595058" calcext:value-type="float">
            <text:p>638755184.595058</text:p>
          </table:table-cell>
          <table:table-cell/>
          <table:table-cell office:value-type="string" calcext:value-type="string">
            <text:p>2020-03-29T11:59:44.5950579Z</text:p>
          </table:table-cell>
          <table:table-cell office:value-type="string" calcext:value-type="string">
            <text:p>2020-03-29-12:00:53.7790579</text:p>
          </table:table-cell>
          <table:table-cell table:number-columns-repeated="2"/>
        </table:table-row>
        <table:table-row table:style-name="ro1">
          <table:table-cell office:value-type="float" office:value="447951086" calcext:value-type="float">
            <text:p>447951086</text:p>
          </table:table-cell>
          <table:table-cell office:value-type="float" office:value="638917168.596878" calcext:value-type="float">
            <text:p>638917168.596878</text:p>
          </table:table-cell>
          <table:table-cell/>
          <table:table-cell office:value-type="string" calcext:value-type="string">
            <text:p>2020-03-31T08:59:28.5968779Z</text:p>
          </table:table-cell>
          <table:table-cell office:value-type="string" calcext:value-type="string">
            <text:p>2020-03-31-09:00:37.7808779</text:p>
          </table:table-cell>
          <table:table-cell table:number-columns-repeated="2"/>
        </table:table-row>
        <table:table-row table:style-name="ro1">
          <table:table-cell office:value-type="float" office:value="448120292" calcext:value-type="float">
            <text:p>448120292</text:p>
          </table:table-cell>
          <table:table-cell office:value-type="float" office:value="639086374.598806" calcext:value-type="float">
            <text:p>639086374.598806</text:p>
          </table:table-cell>
          <table:table-cell/>
          <table:table-cell office:value-type="string" calcext:value-type="string">
            <text:p>2020-04-02T07:59:34.5988060Z</text:p>
          </table:table-cell>
          <table:table-cell office:value-type="string" calcext:value-type="string">
            <text:p>2020-04-02-08:00:43.7828060</text:p>
          </table:table-cell>
          <table:table-cell table:number-columns-repeated="2"/>
        </table:table-row>
        <table:table-row table:style-name="ro1">
          <table:table-cell office:value-type="float" office:value="448239189" calcext:value-type="float">
            <text:p>448239189</text:p>
          </table:table-cell>
          <table:table-cell office:value-type="float" office:value="639205271.60016" calcext:value-type="float">
            <text:p>639205271.60016</text:p>
          </table:table-cell>
          <table:table-cell/>
          <table:table-cell office:value-type="string" calcext:value-type="string">
            <text:p>2020-04-03T17:01:11.6001600Z</text:p>
          </table:table-cell>
          <table:table-cell office:value-type="string" calcext:value-type="string">
            <text:p>2020-04-03-17:02:20.7841600</text:p>
          </table:table-cell>
          <table:table-cell table:number-columns-repeated="2"/>
        </table:table-row>
        <table:table-row table:style-name="ro1">
          <table:table-cell office:value-type="float" office:value="448303916" calcext:value-type="float">
            <text:p>448303916</text:p>
          </table:table-cell>
          <table:table-cell office:value-type="float" office:value="639269998.600904" calcext:value-type="float">
            <text:p>639269998.600904</text:p>
          </table:table-cell>
          <table:table-cell/>
          <table:table-cell office:value-type="string" calcext:value-type="string">
            <text:p>2020-04-04T10:59:58.6009039Z</text:p>
          </table:table-cell>
          <table:table-cell office:value-type="string" calcext:value-type="string">
            <text:p>2020-04-04-11:01:07.7849040</text:p>
          </table:table-cell>
          <table:table-cell table:number-columns-repeated="2"/>
        </table:table-row>
        <table:table-row table:style-name="ro1">
          <table:table-cell office:value-type="float" office:value="448465910" calcext:value-type="float">
            <text:p>448465910</text:p>
          </table:table-cell>
          <table:table-cell office:value-type="float" office:value="639431992.602734" calcext:value-type="float">
            <text:p>639431992.602734</text:p>
          </table:table-cell>
          <table:table-cell/>
          <table:table-cell office:value-type="string" calcext:value-type="string">
            <text:p>2020-04-06T07:59:52.6027339Z</text:p>
          </table:table-cell>
          <table:table-cell office:value-type="string" calcext:value-type="string">
            <text:p>2020-04-06-08:01:01.7867339</text:p>
          </table:table-cell>
          <table:table-cell table:number-columns-repeated="2"/>
        </table:table-row>
        <table:table-row table:style-name="ro1">
          <table:table-cell office:value-type="float" office:value="448563171" calcext:value-type="float">
            <text:p>448563171</text:p>
          </table:table-cell>
          <table:table-cell office:value-type="float" office:value="639529253.603868" calcext:value-type="float">
            <text:p>639529253.603868</text:p>
          </table:table-cell>
          <table:table-cell/>
          <table:table-cell office:value-type="string" calcext:value-type="string">
            <text:p>2020-04-07T11:00:53.6038680Z</text:p>
          </table:table-cell>
          <table:table-cell office:value-type="string" calcext:value-type="string">
            <text:p>2020-04-07-11:02:02.7878680</text:p>
          </table:table-cell>
          <table:table-cell table:number-columns-repeated="2"/>
        </table:table-row>
        <table:table-row table:style-name="ro1">
          <table:table-cell office:value-type="float" office:value="448649546" calcext:value-type="float">
            <text:p>448649546</text:p>
          </table:table-cell>
          <table:table-cell office:value-type="float" office:value="639615628.604837" calcext:value-type="float">
            <text:p>639615628.604837</text:p>
          </table:table-cell>
          <table:table-cell/>
          <table:table-cell office:value-type="string" calcext:value-type="string">
            <text:p>2020-04-08T11:00:28.6048369Z</text:p>
          </table:table-cell>
          <table:table-cell office:value-type="string" calcext:value-type="string">
            <text:p>2020-04-08-11:01:37.7888369</text:p>
          </table:table-cell>
          <table:table-cell table:number-columns-repeated="2"/>
        </table:table-row>
        <table:table-row table:style-name="ro1">
          <table:table-cell office:value-type="float" office:value="448743220" calcext:value-type="float">
            <text:p>448743220</text:p>
          </table:table-cell>
          <table:table-cell office:value-type="float" office:value="639709302.605903" calcext:value-type="float">
            <text:p>639709302.605903</text:p>
          </table:table-cell>
          <table:table-cell/>
          <table:table-cell office:value-type="string" calcext:value-type="string">
            <text:p>2020-04-09T13:01:42.6059030Z</text:p>
          </table:table-cell>
          <table:table-cell office:value-type="string" calcext:value-type="string">
            <text:p>2020-04-09-13:02:51.7899030</text:p>
          </table:table-cell>
          <table:table-cell table:number-columns-repeated="2"/>
        </table:table-row>
        <table:table-row table:style-name="ro1">
          <table:table-cell office:value-type="float" office:value="448793549" calcext:value-type="float">
            <text:p>448793549</text:p>
          </table:table-cell>
          <table:table-cell office:value-type="float" office:value="639759631.606494" calcext:value-type="float">
            <text:p>639759631.606494</text:p>
          </table:table-cell>
          <table:table-cell/>
          <table:table-cell office:value-type="string" calcext:value-type="string">
            <text:p>2020-04-10T03:00:31.6064939Z</text:p>
          </table:table-cell>
          <table:table-cell office:value-type="string" calcext:value-type="string">
            <text:p>2020-04-10-03:01:40.7904939</text:p>
          </table:table-cell>
          <table:table-cell table:number-columns-repeated="2"/>
        </table:table-row>
        <table:table-row table:style-name="ro1">
          <table:table-cell office:value-type="float" office:value="448908766" calcext:value-type="float">
            <text:p>448908766</text:p>
          </table:table-cell>
          <table:table-cell office:value-type="float" office:value="639874848.6078" calcext:value-type="float">
            <text:p>639874848.6078</text:p>
          </table:table-cell>
          <table:table-cell/>
          <table:table-cell office:value-type="string" calcext:value-type="string">
            <text:p>2020-04-11T11:00:48.6078000Z</text:p>
          </table:table-cell>
          <table:table-cell office:value-type="string" calcext:value-type="string">
            <text:p>2020-04-11-11:01:57.7918000</text:p>
          </table:table-cell>
          <table:table-cell table:number-columns-repeated="2"/>
        </table:table-row>
        <table:table-row table:style-name="ro1">
          <table:table-cell office:value-type="float" office:value="449103227" calcext:value-type="float">
            <text:p>449103227</text:p>
          </table:table-cell>
          <table:table-cell office:value-type="float" office:value="640069309.610042" calcext:value-type="float">
            <text:p>640069309.610042</text:p>
          </table:table-cell>
          <table:table-cell/>
          <table:table-cell office:value-type="string" calcext:value-type="string">
            <text:p>2020-04-13T17:01:49.6100419Z</text:p>
          </table:table-cell>
          <table:table-cell office:value-type="string" calcext:value-type="string">
            <text:p>2020-04-13-17:02:58.7940419</text:p>
          </table:table-cell>
          <table:table-cell table:number-columns-repeated="2"/>
        </table:table-row>
        <table:table-row table:style-name="ro1">
          <table:table-cell office:value-type="float" office:value="449164377" calcext:value-type="float">
            <text:p>449164377</text:p>
          </table:table-cell>
          <table:table-cell office:value-type="float" office:value="640130459.610719" calcext:value-type="float">
            <text:p>640130459.610719</text:p>
          </table:table-cell>
          <table:table-cell/>
          <table:table-cell office:value-type="string" calcext:value-type="string">
            <text:p>2020-04-14T10:00:59.6107189Z</text:p>
          </table:table-cell>
          <table:table-cell office:value-type="string" calcext:value-type="string">
            <text:p>2020-04-14-10:02:08.7947189</text:p>
          </table:table-cell>
          <table:table-cell table:number-columns-repeated="2"/>
        </table:table-row>
        <table:table-row table:style-name="ro1">
          <table:table-cell office:value-type="float" office:value="449243551" calcext:value-type="float">
            <text:p>449243551</text:p>
          </table:table-cell>
          <table:table-cell office:value-type="float" office:value="640209633.611623" calcext:value-type="float">
            <text:p>640209633.611623</text:p>
          </table:table-cell>
          <table:table-cell/>
          <table:table-cell office:value-type="string" calcext:value-type="string">
            <text:p>2020-04-15T08:00:33.6116229Z</text:p>
          </table:table-cell>
          <table:table-cell office:value-type="string" calcext:value-type="string">
            <text:p>2020-04-15-08:01:42.7956229</text:p>
          </table:table-cell>
          <table:table-cell table:number-columns-repeated="2"/>
        </table:table-row>
        <table:table-row table:style-name="ro1">
          <table:table-cell office:value-type="float" office:value="449391176" calcext:value-type="float">
            <text:p>449391176</text:p>
          </table:table-cell>
          <table:table-cell office:value-type="float" office:value="640357258.613322" calcext:value-type="float">
            <text:p>640357258.613322</text:p>
          </table:table-cell>
          <table:table-cell/>
          <table:table-cell office:value-type="string" calcext:value-type="string">
            <text:p>2020-04-17T01:00:58.6133220Z</text:p>
          </table:table-cell>
          <table:table-cell office:value-type="string" calcext:value-type="string">
            <text:p>2020-04-17-01:02:07.7973220</text:p>
          </table:table-cell>
          <table:table-cell table:number-columns-repeated="2"/>
        </table:table-row>
        <table:table-row table:style-name="ro1">
          <table:table-cell office:value-type="float" office:value="449509997" calcext:value-type="float">
            <text:p>449509997</text:p>
          </table:table-cell>
          <table:table-cell office:value-type="float" office:value="640476079.614675" calcext:value-type="float">
            <text:p>640476079.614675</text:p>
          </table:table-cell>
          <table:table-cell/>
          <table:table-cell office:value-type="string" calcext:value-type="string">
            <text:p>2020-04-18T10:01:19.6146749Z</text:p>
          </table:table-cell>
          <table:table-cell office:value-type="string" calcext:value-type="string">
            <text:p>2020-04-18-10:02:28.7986749</text:p>
          </table:table-cell>
          <table:table-cell table:number-columns-repeated="2"/>
        </table:table-row>
        <table:table-row table:style-name="ro1">
          <table:table-cell office:value-type="float" office:value="449592776" calcext:value-type="float">
            <text:p>449592776</text:p>
          </table:table-cell>
          <table:table-cell office:value-type="float" office:value="640558858.615636" calcext:value-type="float">
            <text:p>640558858.615636</text:p>
          </table:table-cell>
          <table:table-cell/>
          <table:table-cell office:value-type="string" calcext:value-type="string">
            <text:p>2020-04-19T09:00:58.6156359Z</text:p>
          </table:table-cell>
          <table:table-cell office:value-type="string" calcext:value-type="string">
            <text:p>2020-04-19-09:02:07.7996360</text:p>
          </table:table-cell>
          <table:table-cell table:number-columns-repeated="2"/>
        </table:table-row>
        <table:table-row table:style-name="ro1">
          <table:table-cell office:value-type="float" office:value="449690067" calcext:value-type="float">
            <text:p>449690067</text:p>
          </table:table-cell>
          <table:table-cell office:value-type="float" office:value="640656149.616728" calcext:value-type="float">
            <text:p>640656149.616728</text:p>
          </table:table-cell>
          <table:table-cell/>
          <table:table-cell office:value-type="string" calcext:value-type="string">
            <text:p>2020-04-20T12:02:29.6167279Z</text:p>
          </table:table-cell>
          <table:table-cell office:value-type="string" calcext:value-type="string">
            <text:p>2020-04-20-12:03:38.8007279</text:p>
          </table:table-cell>
          <table:table-cell table:number-columns-repeated="2"/>
        </table:table-row>
        <table:table-row table:style-name="ro1">
          <table:table-cell office:value-type="float" office:value="449740448" calcext:value-type="float">
            <text:p>449740448</text:p>
          </table:table-cell>
          <table:table-cell office:value-type="float" office:value="640706530.617322" calcext:value-type="float">
            <text:p>640706530.617322</text:p>
          </table:table-cell>
          <table:table-cell/>
          <table:table-cell office:value-type="string" calcext:value-type="string">
            <text:p>2020-04-21T02:02:10.6173219Z</text:p>
          </table:table-cell>
          <table:table-cell office:value-type="string" calcext:value-type="string">
            <text:p>2020-04-21-02:03:19.8013219</text:p>
          </table:table-cell>
          <table:table-cell table:number-columns-repeated="2"/>
        </table:table-row>
        <table:table-row table:style-name="ro1">
          <table:table-cell office:value-type="float" office:value="450028467" calcext:value-type="float">
            <text:p>450028467</text:p>
          </table:table-cell>
          <table:table-cell office:value-type="float" office:value="640994549.62064" calcext:value-type="float">
            <text:p>640994549.62064</text:p>
          </table:table-cell>
          <table:table-cell/>
          <table:table-cell office:value-type="string" calcext:value-type="string">
            <text:p>2020-04-24T10:02:29.6206400Z</text:p>
          </table:table-cell>
          <table:table-cell office:value-type="string" calcext:value-type="string">
            <text:p>2020-04-24-10:03:38.8046400</text:p>
          </table:table-cell>
          <table:table-cell table:number-columns-repeated="2"/>
        </table:table-row>
        <table:table-row table:style-name="ro1">
          <table:table-cell office:value-type="float" office:value="450428058" calcext:value-type="float">
            <text:p>450428058</text:p>
          </table:table-cell>
          <table:table-cell office:value-type="float" office:value="641394140.625204" calcext:value-type="float">
            <text:p>641394140.625204</text:p>
          </table:table-cell>
          <table:table-cell/>
          <table:table-cell office:value-type="string" calcext:value-type="string">
            <text:p>2020-04-29T01:02:20.6252039Z</text:p>
          </table:table-cell>
          <table:table-cell office:value-type="string" calcext:value-type="string">
            <text:p>2020-04-29-01:03:29.8092039</text:p>
          </table:table-cell>
          <table:table-cell table:number-columns-repeated="2"/>
        </table:table-row>
        <table:table-row table:style-name="ro1">
          <table:table-cell office:value-type="float" office:value="450644114" calcext:value-type="float">
            <text:p>450644114</text:p>
          </table:table-cell>
          <table:table-cell office:value-type="float" office:value="641610196.627678" calcext:value-type="float">
            <text:p>641610196.627678</text:p>
          </table:table-cell>
          <table:table-cell/>
          <table:table-cell office:value-type="string" calcext:value-type="string">
            <text:p>2020-05-01T13:03:16.6276780Z</text:p>
          </table:table-cell>
          <table:table-cell office:value-type="string" calcext:value-type="string">
            <text:p>2020-05-01-13:04:25.8116780</text:p>
          </table:table-cell>
          <table:table-cell table:number-columns-repeated="2"/>
        </table:table-row>
        <table:table-row table:style-name="ro1">
          <table:table-cell office:value-type="float" office:value="450906928" calcext:value-type="float">
            <text:p>450906928</text:p>
          </table:table-cell>
          <table:table-cell office:value-type="float" office:value="641873010.630708" calcext:value-type="float">
            <text:p>641873010.630708</text:p>
          </table:table-cell>
          <table:table-cell/>
          <table:table-cell office:value-type="string" calcext:value-type="string">
            <text:p>2020-05-04T14:03:30.6307079Z</text:p>
          </table:table-cell>
          <table:table-cell office:value-type="string" calcext:value-type="string">
            <text:p>2020-05-04-14:04:39.8147079</text:p>
          </table:table-cell>
          <table:table-cell table:number-columns-repeated="2"/>
        </table:table-row>
        <table:table-row table:style-name="ro1">
          <table:table-cell office:value-type="float" office:value="451234531" calcext:value-type="float">
            <text:p>451234531</text:p>
          </table:table-cell>
          <table:table-cell office:value-type="float" office:value="642200613.634489" calcext:value-type="float">
            <text:p>642200613.634489</text:p>
          </table:table-cell>
          <table:table-cell/>
          <table:table-cell office:value-type="string" calcext:value-type="string">
            <text:p>2020-05-08T09:03:33.6344889Z</text:p>
          </table:table-cell>
          <table:table-cell office:value-type="string" calcext:value-type="string">
            <text:p>2020-05-08-09:04:42.8184889</text:p>
          </table:table-cell>
          <table:table-cell table:number-columns-repeated="2"/>
        </table:table-row>
        <table:table-row table:style-name="ro1">
          <table:table-cell office:value-type="float" office:value="451551334" calcext:value-type="float">
            <text:p>451551334</text:p>
          </table:table-cell>
          <table:table-cell office:value-type="float" office:value="642517416.638137" calcext:value-type="float">
            <text:p>642517416.638137</text:p>
          </table:table-cell>
          <table:table-cell/>
          <table:table-cell office:value-type="string" calcext:value-type="string">
            <text:p>2020-05-12T01:03:36.6381369Z</text:p>
          </table:table-cell>
          <table:table-cell office:value-type="string" calcext:value-type="string">
            <text:p>2020-05-12-01:04:45.8221369</text:p>
          </table:table-cell>
          <table:table-cell table:number-columns-repeated="2"/>
        </table:table-row>
        <table:table-row table:style-name="ro1">
          <table:table-cell office:value-type="float" office:value="451846540" calcext:value-type="float">
            <text:p>451846540</text:p>
          </table:table-cell>
          <table:table-cell office:value-type="float" office:value="642812622.641534" calcext:value-type="float">
            <text:p>642812622.641534</text:p>
          </table:table-cell>
          <table:table-cell/>
          <table:table-cell office:value-type="string" calcext:value-type="string">
            <text:p>2020-05-15T11:03:42.6415339Z</text:p>
          </table:table-cell>
          <table:table-cell office:value-type="string" calcext:value-type="string">
            <text:p>2020-05-15-11:04:51.8255339</text:p>
          </table:table-cell>
          <table:table-cell table:number-columns-repeated="2"/>
        </table:table-row>
        <table:table-row table:style-name="ro1">
          <table:table-cell office:value-type="float" office:value="452181363" calcext:value-type="float">
            <text:p>452181363</text:p>
          </table:table-cell>
          <table:table-cell office:value-type="float" office:value="643147445.645415" calcext:value-type="float">
            <text:p>643147445.645415</text:p>
          </table:table-cell>
          <table:table-cell/>
          <table:table-cell office:value-type="string" calcext:value-type="string">
            <text:p>2020-05-19T08:04:05.6454149Z</text:p>
          </table:table-cell>
          <table:table-cell office:value-type="string" calcext:value-type="string">
            <text:p>2020-05-19-08:05:14.8294149</text:p>
          </table:table-cell>
          <table:table-cell table:number-columns-repeated="2"/>
        </table:table-row>
        <table:table-row table:style-name="ro1">
          <table:table-cell office:value-type="float" office:value="452473881" calcext:value-type="float">
            <text:p>452473881</text:p>
          </table:table-cell>
          <table:table-cell office:value-type="float" office:value="643439963.64876" calcext:value-type="float">
            <text:p>643439963.64876</text:p>
          </table:table-cell>
          <table:table-cell/>
          <table:table-cell office:value-type="string" calcext:value-type="string">
            <text:p>2020-05-22T17:19:23.6487599Z</text:p>
          </table:table-cell>
          <table:table-cell office:value-type="string" calcext:value-type="string">
            <text:p>2020-05-22-17:20:32.8327599</text:p>
          </table:table-cell>
          <table:table-cell table:number-columns-repeated="2"/>
        </table:table-row>
        <table:table-row table:style-name="ro1">
          <table:table-cell office:value-type="float" office:value="452498127" calcext:value-type="float">
            <text:p>452498127</text:p>
          </table:table-cell>
          <table:table-cell office:value-type="float" office:value="643464209.649055" calcext:value-type="float">
            <text:p>643464209.649055</text:p>
          </table:table-cell>
          <table:table-cell/>
          <table:table-cell office:value-type="string" calcext:value-type="string">
            <text:p>2020-05-23T00:03:29.6490550Z</text:p>
          </table:table-cell>
          <table:table-cell office:value-type="string" calcext:value-type="string">
            <text:p>2020-05-23-00:04:38.8330550</text:p>
          </table:table-cell>
          <table:table-cell table:number-columns-repeated="2"/>
        </table:table-row>
        <table:table-row table:style-name="ro1">
          <table:table-cell office:value-type="float" office:value="452818581" calcext:value-type="float">
            <text:p>452818581</text:p>
          </table:table-cell>
          <table:table-cell office:value-type="float" office:value="643784663.652742" calcext:value-type="float">
            <text:p>643784663.652742</text:p>
          </table:table-cell>
          <table:table-cell/>
          <table:table-cell office:value-type="string" calcext:value-type="string">
            <text:p>2020-05-26T17:04:23.6527420Z</text:p>
          </table:table-cell>
          <table:table-cell office:value-type="string" calcext:value-type="string">
            <text:p>2020-05-26-17:05:32.8367420</text:p>
          </table:table-cell>
          <table:table-cell table:number-columns-repeated="2"/>
        </table:table-row>
        <table:table-row table:style-name="ro1">
          <table:table-cell office:value-type="float" office:value="452840135" calcext:value-type="float">
            <text:p>452840135</text:p>
          </table:table-cell>
          <table:table-cell office:value-type="float" office:value="643806217.653003" calcext:value-type="float">
            <text:p>643806217.653003</text:p>
          </table:table-cell>
          <table:table-cell/>
          <table:table-cell office:value-type="string" calcext:value-type="string">
            <text:p>2020-05-26T23:03:37.6530029Z</text:p>
          </table:table-cell>
          <table:table-cell office:value-type="string" calcext:value-type="string">
            <text:p>2020-05-26-23:04:46.8370029</text:p>
          </table:table-cell>
          <table:table-cell table:number-columns-repeated="2"/>
        </table:table-row>
        <table:table-row table:style-name="ro1">
          <table:table-cell office:value-type="float" office:value="453077782" calcext:value-type="float">
            <text:p>453077782</text:p>
          </table:table-cell>
          <table:table-cell office:value-type="float" office:value="644043864.655734" calcext:value-type="float">
            <text:p>644043864.655734</text:p>
          </table:table-cell>
          <table:table-cell/>
          <table:table-cell office:value-type="string" calcext:value-type="string">
            <text:p>2020-05-29T17:04:24.6557339Z</text:p>
          </table:table-cell>
          <table:table-cell office:value-type="string" calcext:value-type="string">
            <text:p>2020-05-29-17:05:33.8397339</text:p>
          </table:table-cell>
          <table:table-cell table:number-columns-repeated="2"/>
        </table:table-row>
        <table:table-row table:style-name="ro1">
          <table:table-cell office:value-type="float" office:value="453138987" calcext:value-type="float">
            <text:p>453138987</text:p>
          </table:table-cell>
          <table:table-cell office:value-type="float" office:value="644105069.656454" calcext:value-type="float">
            <text:p>644105069.656454</text:p>
          </table:table-cell>
          <table:table-cell/>
          <table:table-cell office:value-type="string" calcext:value-type="string">
            <text:p>2020-05-30T10:04:29.6564539Z</text:p>
          </table:table-cell>
          <table:table-cell office:value-type="string" calcext:value-type="string">
            <text:p>2020-05-30-10:05:38.8404539</text:p>
          </table:table-cell>
          <table:table-cell table:number-columns-repeated="2"/>
        </table:table-row>
        <table:table-row table:style-name="ro1">
          <table:table-cell office:value-type="float" office:value="453336996" calcext:value-type="float">
            <text:p>453336996</text:p>
          </table:table-cell>
          <table:table-cell office:value-type="float" office:value="644303078.658729" calcext:value-type="float">
            <text:p>644303078.658729</text:p>
          </table:table-cell>
          <table:table-cell/>
          <table:table-cell office:value-type="string" calcext:value-type="string">
            <text:p>2020-06-01T17:04:38.6587289Z</text:p>
          </table:table-cell>
          <table:table-cell office:value-type="string" calcext:value-type="string">
            <text:p>2020-06-01-17:05:47.8427289</text:p>
          </table:table-cell>
          <table:table-cell table:number-columns-repeated="2"/>
        </table:table-row>
        <table:table-row table:style-name="ro1">
          <table:table-cell office:value-type="float" office:value="453358577" calcext:value-type="float">
            <text:p>453358577</text:p>
          </table:table-cell>
          <table:table-cell office:value-type="float" office:value="644324659.65901" calcext:value-type="float">
            <text:p>644324659.65901</text:p>
          </table:table-cell>
          <table:table-cell/>
          <table:table-cell office:value-type="string" calcext:value-type="string">
            <text:p>2020-06-01T23:04:19.6590099Z</text:p>
          </table:table-cell>
          <table:table-cell office:value-type="string" calcext:value-type="string">
            <text:p>2020-06-01-23:05:28.8430099</text:p>
          </table:table-cell>
          <table:table-cell table:number-columns-repeated="2"/>
        </table:table-row>
        <table:table-row table:style-name="ro1">
          <table:table-cell office:value-type="float" office:value="453646577" calcext:value-type="float">
            <text:p>453646577</text:p>
          </table:table-cell>
          <table:table-cell office:value-type="float" office:value="644612659.662347" calcext:value-type="float">
            <text:p>644612659.662347</text:p>
          </table:table-cell>
          <table:table-cell/>
          <table:table-cell office:value-type="string" calcext:value-type="string">
            <text:p>2020-06-05T07:04:19.6623469Z</text:p>
          </table:table-cell>
          <table:table-cell office:value-type="string" calcext:value-type="string">
            <text:p>2020-06-05-07:05:28.8463469</text:p>
          </table:table-cell>
          <table:table-cell table:number-columns-repeated="2"/>
        </table:table-row>
        <table:table-row table:style-name="ro1">
          <table:table-cell office:value-type="float" office:value="453992179" calcext:value-type="float">
            <text:p>453992179</text:p>
          </table:table-cell>
          <table:table-cell office:value-type="float" office:value="644958261.666346" calcext:value-type="float">
            <text:p>644958261.666346</text:p>
          </table:table-cell>
          <table:table-cell/>
          <table:table-cell office:value-type="string" calcext:value-type="string">
            <text:p>2020-06-09T07:04:21.6663459Z</text:p>
          </table:table-cell>
          <table:table-cell office:value-type="string" calcext:value-type="string">
            <text:p>2020-06-09-07:05:30.8503459</text:p>
          </table:table-cell>
          <table:table-cell table:number-columns-repeated="2"/>
        </table:table-row>
        <table:table-row table:style-name="ro1">
          <table:table-cell office:value-type="float" office:value="454064127" calcext:value-type="float">
            <text:p>454064127</text:p>
          </table:table-cell>
          <table:table-cell office:value-type="float" office:value="645030209.667155" calcext:value-type="float">
            <text:p>645030209.667155</text:p>
          </table:table-cell>
          <table:table-cell/>
          <table:table-cell office:value-type="string" calcext:value-type="string">
            <text:p>2020-06-10T03:03:29.6671550Z</text:p>
          </table:table-cell>
          <table:table-cell office:value-type="string" calcext:value-type="string">
            <text:p>2020-06-10-03:04:38.8511550</text:p>
          </table:table-cell>
          <table:table-cell table:number-columns-repeated="2"/>
        </table:table-row>
        <table:table-row table:style-name="ro1">
          <table:table-cell office:value-type="float" office:value="454287367" calcext:value-type="float">
            <text:p>454287367</text:p>
          </table:table-cell>
          <table:table-cell office:value-type="float" office:value="645253449.669733" calcext:value-type="float">
            <text:p>645253449.669733</text:p>
          </table:table-cell>
          <table:table-cell/>
          <table:table-cell office:value-type="string" calcext:value-type="string">
            <text:p>2020-06-12T17:04:09.6697329Z</text:p>
          </table:table-cell>
          <table:table-cell office:value-type="string" calcext:value-type="string">
            <text:p>2020-06-12-17:05:18.8537329</text:p>
          </table:table-cell>
          <table:table-cell table:number-columns-repeated="2"/>
        </table:table-row>
        <table:table-row table:style-name="ro1">
          <table:table-cell office:value-type="float" office:value="454308967" calcext:value-type="float">
            <text:p>454308967</text:p>
          </table:table-cell>
          <table:table-cell office:value-type="float" office:value="645275049.670002" calcext:value-type="float">
            <text:p>645275049.670002</text:p>
          </table:table-cell>
          <table:table-cell/>
          <table:table-cell office:value-type="string" calcext:value-type="string">
            <text:p>2020-06-12T23:04:09.6700019Z</text:p>
          </table:table-cell>
          <table:table-cell office:value-type="string" calcext:value-type="string">
            <text:p>2020-06-12-23:05:18.8540019</text:p>
          </table:table-cell>
          <table:table-cell table:number-columns-repeated="2"/>
        </table:table-row>
        <table:table-row table:style-name="ro1">
          <table:table-cell office:value-type="float" office:value="454593371" calcext:value-type="float">
            <text:p>454593371</text:p>
          </table:table-cell>
          <table:table-cell office:value-type="float" office:value="645559453.673306" calcext:value-type="float">
            <text:p>645559453.673306</text:p>
          </table:table-cell>
          <table:table-cell/>
          <table:table-cell office:value-type="string" calcext:value-type="string">
            <text:p>2020-06-16T06:04:13.6733059Z</text:p>
          </table:table-cell>
          <table:table-cell office:value-type="string" calcext:value-type="string">
            <text:p>2020-06-16-06:05:22.8573060</text:p>
          </table:table-cell>
          <table:table-cell table:number-columns-repeated="2"/>
        </table:table-row>
        <table:table-row table:style-name="ro1">
          <table:table-cell office:value-type="float" office:value="454719360" calcext:value-type="float">
            <text:p>454719360</text:p>
          </table:table-cell>
          <table:table-cell office:value-type="float" office:value="645685442.674735" calcext:value-type="float">
            <text:p>645685442.674735</text:p>
          </table:table-cell>
          <table:table-cell/>
          <table:table-cell office:value-type="string" calcext:value-type="string">
            <text:p>2020-06-17T17:04:02.6747349Z</text:p>
          </table:table-cell>
          <table:table-cell office:value-type="string" calcext:value-type="string">
            <text:p>2020-06-17-17:05:11.8587349</text:p>
          </table:table-cell>
          <table:table-cell table:number-columns-repeated="2"/>
        </table:table-row>
        <table:table-row table:style-name="ro1">
          <table:table-cell office:value-type="float" office:value="454726519" calcext:value-type="float">
            <text:p>454726519</text:p>
          </table:table-cell>
          <table:table-cell office:value-type="float" office:value="645692601.674822" calcext:value-type="float">
            <text:p>645692601.674822</text:p>
          </table:table-cell>
          <table:table-cell/>
          <table:table-cell office:value-type="string" calcext:value-type="string">
            <text:p>2020-06-17T19:03:21.6748219Z</text:p>
          </table:table-cell>
          <table:table-cell office:value-type="string" calcext:value-type="string">
            <text:p>2020-06-17-19:04:30.8588219</text:p>
          </table:table-cell>
          <table:table-cell table:number-columns-repeated="2"/>
        </table:table-row>
        <table:table-row table:style-name="ro1">
          <table:table-cell office:value-type="float" office:value="454892156" calcext:value-type="float">
            <text:p>454892156</text:p>
          </table:table-cell>
          <table:table-cell office:value-type="float" office:value="645858238.676724" calcext:value-type="float">
            <text:p>645858238.676724</text:p>
          </table:table-cell>
          <table:table-cell/>
          <table:table-cell office:value-type="string" calcext:value-type="string">
            <text:p>2020-06-19T17:03:58.6767239Z</text:p>
          </table:table-cell>
          <table:table-cell office:value-type="string" calcext:value-type="string">
            <text:p>2020-06-19-17:05:07.8607239</text:p>
          </table:table-cell>
          <table:table-cell table:number-columns-repeated="2"/>
        </table:table-row>
        <table:table-row table:style-name="ro1">
          <table:table-cell office:value-type="float" office:value="454910175" calcext:value-type="float">
            <text:p>454910175</text:p>
          </table:table-cell>
          <table:table-cell office:value-type="float" office:value="645876257.676956" calcext:value-type="float">
            <text:p>645876257.676956</text:p>
          </table:table-cell>
          <table:table-cell/>
          <table:table-cell office:value-type="string" calcext:value-type="string">
            <text:p>2020-06-19T22:04:17.6769559Z</text:p>
          </table:table-cell>
          <table:table-cell office:value-type="string" calcext:value-type="string">
            <text:p>2020-06-19-22:05:26.8609559</text:p>
          </table:table-cell>
          <table:table-cell table:number-columns-repeated="2"/>
        </table:table-row>
        <table:table-row table:style-name="ro1">
          <table:table-cell office:value-type="float" office:value="455237761" calcext:value-type="float">
            <text:p>455237761</text:p>
          </table:table-cell>
          <table:table-cell office:value-type="float" office:value="646203843.680727" calcext:value-type="float">
            <text:p>646203843.680727</text:p>
          </table:table-cell>
          <table:table-cell/>
          <table:table-cell office:value-type="string" calcext:value-type="string">
            <text:p>2020-06-23T17:04:03.6807270Z</text:p>
          </table:table-cell>
          <table:table-cell office:value-type="string" calcext:value-type="string">
            <text:p>2020-06-23-17:05:12.8647270</text:p>
          </table:table-cell>
          <table:table-cell table:number-columns-repeated="2"/>
        </table:table-row>
        <table:table-row table:style-name="ro1">
          <table:table-cell office:value-type="float" office:value="455255765" calcext:value-type="float">
            <text:p>455255765</text:p>
          </table:table-cell>
          <table:table-cell office:value-type="float" office:value="646221847.680944" calcext:value-type="float">
            <text:p>646221847.680944</text:p>
          </table:table-cell>
          <table:table-cell/>
          <table:table-cell office:value-type="string" calcext:value-type="string">
            <text:p>2020-06-23T22:04:07.6809439Z</text:p>
          </table:table-cell>
          <table:table-cell office:value-type="string" calcext:value-type="string">
            <text:p>2020-06-23-22:05:16.8649439</text:p>
          </table:table-cell>
          <table:table-cell table:number-columns-repeated="2"/>
        </table:table-row>
        <table:table-row table:style-name="ro1">
          <table:table-cell office:value-type="float" office:value="455457361" calcext:value-type="float">
            <text:p>455457361</text:p>
          </table:table-cell>
          <table:table-cell office:value-type="float" office:value="646423443.683294" calcext:value-type="float">
            <text:p>646423443.683294</text:p>
          </table:table-cell>
          <table:table-cell/>
          <table:table-cell office:value-type="string" calcext:value-type="string">
            <text:p>2020-06-26T06:04:03.6832939Z</text:p>
          </table:table-cell>
          <table:table-cell office:value-type="string" calcext:value-type="string">
            <text:p>2020-06-26-06:05:12.8672939</text:p>
          </table:table-cell>
          <table:table-cell table:number-columns-repeated="2"/>
        </table:table-row>
        <table:table-row table:style-name="ro1">
          <table:table-cell office:value-type="float" office:value="455622910" calcext:value-type="float">
            <text:p>455622910</text:p>
          </table:table-cell>
          <table:table-cell office:value-type="float" office:value="646588992.685197" calcext:value-type="float">
            <text:p>646588992.685197</text:p>
          </table:table-cell>
          <table:table-cell/>
          <table:table-cell office:value-type="string" calcext:value-type="string">
            <text:p>2020-06-28T04:03:12.6851969Z</text:p>
          </table:table-cell>
          <table:table-cell office:value-type="string" calcext:value-type="string">
            <text:p>2020-06-28-04:04:21.8691970</text:p>
          </table:table-cell>
          <table:table-cell table:number-columns-repeated="2"/>
        </table:table-row>
        <table:table-row table:style-name="ro1">
          <table:table-cell office:value-type="float" office:value="455842520" calcext:value-type="float">
            <text:p>455842520</text:p>
          </table:table-cell>
          <table:table-cell office:value-type="float" office:value="646808602.687715" calcext:value-type="float">
            <text:p>646808602.687715</text:p>
          </table:table-cell>
          <table:table-cell/>
          <table:table-cell office:value-type="string" calcext:value-type="string">
            <text:p>2020-06-30T17:03:22.6877149Z</text:p>
          </table:table-cell>
          <table:table-cell office:value-type="string" calcext:value-type="string">
            <text:p>2020-06-30-17:04:31.8717149</text:p>
          </table:table-cell>
          <table:table-cell table:number-columns-repeated="2"/>
        </table:table-row>
        <table:table-row table:style-name="ro1">
          <table:table-cell office:value-type="float" office:value="455860543" calcext:value-type="float">
            <text:p>455860543</text:p>
          </table:table-cell>
          <table:table-cell office:value-type="float" office:value="646826625.687944" calcext:value-type="float">
            <text:p>646826625.687944</text:p>
          </table:table-cell>
          <table:table-cell/>
          <table:table-cell office:value-type="string" calcext:value-type="string">
            <text:p>2020-06-30T22:03:45.6879439Z</text:p>
          </table:table-cell>
          <table:table-cell office:value-type="string" calcext:value-type="string">
            <text:p>2020-06-30-22:04:54.8719439</text:p>
          </table:table-cell>
          <table:table-cell table:number-columns-repeated="2"/>
        </table:table-row>
        <table:table-row table:style-name="ro1">
          <table:table-cell office:value-type="float" office:value="456015313" calcext:value-type="float">
            <text:p>456015313</text:p>
          </table:table-cell>
          <table:table-cell office:value-type="float" office:value="646981395.689717" calcext:value-type="float">
            <text:p>646981395.689717</text:p>
          </table:table-cell>
          <table:table-cell/>
          <table:table-cell office:value-type="string" calcext:value-type="string">
            <text:p>2020-07-02T17:03:15.6897169Z</text:p>
          </table:table-cell>
          <table:table-cell office:value-type="string" calcext:value-type="string">
            <text:p>2020-07-02-17:04:24.8737169</text:p>
          </table:table-cell>
          <table:table-cell table:number-columns-repeated="2"/>
        </table:table-row>
        <table:table-row table:style-name="ro1">
          <table:table-cell office:value-type="float" office:value="456065748" calcext:value-type="float">
            <text:p>456065748</text:p>
          </table:table-cell>
          <table:table-cell office:value-type="float" office:value="647031830.690298" calcext:value-type="float">
            <text:p>647031830.690298</text:p>
          </table:table-cell>
          <table:table-cell/>
          <table:table-cell office:value-type="string" calcext:value-type="string">
            <text:p>2020-07-03T07:03:50.6902979Z</text:p>
          </table:table-cell>
          <table:table-cell office:value-type="string" calcext:value-type="string">
            <text:p>2020-07-03-07:04:59.8742979</text:p>
          </table:table-cell>
          <table:table-cell table:number-columns-repeated="2"/>
        </table:table-row>
        <table:table-row table:style-name="ro1">
          <table:table-cell office:value-type="float" office:value="456188106" calcext:value-type="float">
            <text:p>456188106</text:p>
          </table:table-cell>
          <table:table-cell office:value-type="float" office:value="647154188.691712" calcext:value-type="float">
            <text:p>647154188.691712</text:p>
          </table:table-cell>
          <table:table-cell/>
          <table:table-cell office:value-type="string" calcext:value-type="string">
            <text:p>2020-07-04T17:03:08.6917120Z</text:p>
          </table:table-cell>
          <table:table-cell office:value-type="string" calcext:value-type="string">
            <text:p>2020-07-04-17:04:17.8757120</text:p>
          </table:table-cell>
          <table:table-cell table:number-columns-repeated="2"/>
        </table:table-row>
        <table:table-row table:style-name="ro1">
          <table:table-cell office:value-type="float" office:value="456216883" calcext:value-type="float">
            <text:p>456216883</text:p>
          </table:table-cell>
          <table:table-cell office:value-type="float" office:value="647182965.692041" calcext:value-type="float">
            <text:p>647182965.692041</text:p>
          </table:table-cell>
          <table:table-cell/>
          <table:table-cell office:value-type="string" calcext:value-type="string">
            <text:p>2020-07-05T01:02:45.6920410Z</text:p>
          </table:table-cell>
          <table:table-cell office:value-type="string" calcext:value-type="string">
            <text:p>2020-07-05-01:03:54.8760410</text:p>
          </table:table-cell>
          <table:table-cell table:number-columns-repeated="2"/>
        </table:table-row>
        <table:table-row table:style-name="ro1">
          <table:table-cell office:value-type="float" office:value="456404128" calcext:value-type="float">
            <text:p>456404128</text:p>
          </table:table-cell>
          <table:table-cell office:value-type="float" office:value="647370210.694207" calcext:value-type="float">
            <text:p>647370210.694207</text:p>
          </table:table-cell>
          <table:table-cell/>
          <table:table-cell office:value-type="string" calcext:value-type="string">
            <text:p>2020-07-07T05:03:30.6942069Z</text:p>
          </table:table-cell>
          <table:table-cell office:value-type="string" calcext:value-type="string">
            <text:p>2020-07-07-05:04:39.8782069</text:p>
          </table:table-cell>
          <table:table-cell table:number-columns-repeated="2"/>
        </table:table-row>
        <table:table-row table:style-name="ro1">
          <table:table-cell office:value-type="float" office:value="456706482" calcext:value-type="float">
            <text:p>456706482</text:p>
          </table:table-cell>
          <table:table-cell office:value-type="float" office:value="647672564.697699" calcext:value-type="float">
            <text:p>647672564.697699</text:p>
          </table:table-cell>
          <table:table-cell/>
          <table:table-cell office:value-type="string" calcext:value-type="string">
            <text:p>2020-07-10T17:02:44.6976989Z</text:p>
          </table:table-cell>
          <table:table-cell office:value-type="string" calcext:value-type="string">
            <text:p>2020-07-10-17:03:53.8816989</text:p>
          </table:table-cell>
          <table:table-cell table:number-columns-repeated="2"/>
        </table:table-row>
        <table:table-row table:style-name="ro1">
          <table:table-cell office:value-type="float" office:value="456735256" calcext:value-type="float">
            <text:p>456735256</text:p>
          </table:table-cell>
          <table:table-cell office:value-type="float" office:value="647701338.698015" calcext:value-type="float">
            <text:p>647701338.698015</text:p>
          </table:table-cell>
          <table:table-cell/>
          <table:table-cell office:value-type="string" calcext:value-type="string">
            <text:p>2020-07-11T01:02:18.6980149Z</text:p>
          </table:table-cell>
          <table:table-cell office:value-type="string" calcext:value-type="string">
            <text:p>2020-07-11-01:03:27.8820149</text:p>
          </table:table-cell>
          <table:table-cell table:number-columns-repeated="2"/>
        </table:table-row>
        <table:table-row table:style-name="ro1">
          <table:table-cell office:value-type="float" office:value="456908054" calcext:value-type="float">
            <text:p>456908054</text:p>
          </table:table-cell>
          <table:table-cell office:value-type="float" office:value="647874136.700014" calcext:value-type="float">
            <text:p>647874136.700014</text:p>
          </table:table-cell>
          <table:table-cell/>
          <table:table-cell office:value-type="string" calcext:value-type="string">
            <text:p>2020-07-13T01:02:16.7000139Z</text:p>
          </table:table-cell>
          <table:table-cell office:value-type="string" calcext:value-type="string">
            <text:p>2020-07-13-01:03:25.8840140</text:p>
          </table:table-cell>
          <table:table-cell table:number-columns-repeated="2"/>
        </table:table-row>
        <table:table-row table:style-name="ro1">
          <table:table-cell office:value-type="float" office:value="457005301" calcext:value-type="float">
            <text:p>457005301</text:p>
          </table:table-cell>
          <table:table-cell office:value-type="float" office:value="647971383.701158" calcext:value-type="float">
            <text:p>647971383.701158</text:p>
          </table:table-cell>
          <table:table-cell/>
          <table:table-cell office:value-type="string" calcext:value-type="string">
            <text:p>2020-07-14T04:03:03.7011579Z</text:p>
          </table:table-cell>
          <table:table-cell office:value-type="string" calcext:value-type="string">
            <text:p>2020-07-14-04:04:12.8851579</text:p>
          </table:table-cell>
          <table:table-cell table:number-columns-repeated="2"/>
        </table:table-row>
        <table:table-row table:style-name="ro1">
          <table:table-cell office:value-type="float" office:value="457311247" calcext:value-type="float">
            <text:p>457311247</text:p>
          </table:table-cell>
          <table:table-cell office:value-type="float" office:value="648277329.704652" calcext:value-type="float">
            <text:p>648277329.704652</text:p>
          </table:table-cell>
          <table:table-cell/>
          <table:table-cell office:value-type="string" calcext:value-type="string">
            <text:p>2020-07-17T17:02:09.7046519Z</text:p>
          </table:table-cell>
          <table:table-cell office:value-type="string" calcext:value-type="string">
            <text:p>2020-07-17-17:03:18.8886519</text:p>
          </table:table-cell>
          <table:table-cell table:number-columns-repeated="2"/>
        </table:table-row>
        <table:table-row table:style-name="ro1">
          <table:table-cell office:value-type="float" office:value="457322068" calcext:value-type="float">
            <text:p>457322068</text:p>
          </table:table-cell>
          <table:table-cell office:value-type="float" office:value="648288150.704789" calcext:value-type="float">
            <text:p>648288150.704789</text:p>
          </table:table-cell>
          <table:table-cell/>
          <table:table-cell office:value-type="string" calcext:value-type="string">
            <text:p>2020-07-17T20:02:30.7047890Z</text:p>
          </table:table-cell>
          <table:table-cell office:value-type="string" calcext:value-type="string">
            <text:p>2020-07-17-20:03:39.8887890</text:p>
          </table:table-cell>
          <table:table-cell table:number-columns-repeated="2"/>
        </table:table-row>
        <table:table-row table:style-name="ro1">
          <table:table-cell office:value-type="float" office:value="457566799" calcext:value-type="float">
            <text:p>457566799</text:p>
          </table:table-cell>
          <table:table-cell office:value-type="float" office:value="648532881.707595" calcext:value-type="float">
            <text:p>648532881.707595</text:p>
          </table:table-cell>
          <table:table-cell/>
          <table:table-cell office:value-type="string" calcext:value-type="string">
            <text:p>2020-07-20T16:01:21.7075949Z</text:p>
          </table:table-cell>
          <table:table-cell office:value-type="string" calcext:value-type="string">
            <text:p>2020-07-20-16:02:30.8915950</text:p>
          </table:table-cell>
          <table:table-cell table:number-columns-repeated="2"/>
        </table:table-row>
        <table:table-row table:style-name="ro1">
          <table:table-cell office:value-type="float" office:value="457656792" calcext:value-type="float">
            <text:p>457656792</text:p>
          </table:table-cell>
          <table:table-cell office:value-type="float" office:value="648622874.708637" calcext:value-type="float">
            <text:p>648622874.708637</text:p>
          </table:table-cell>
          <table:table-cell/>
          <table:table-cell office:value-type="string" calcext:value-type="string">
            <text:p>2020-07-21T17:01:14.7086369Z</text:p>
          </table:table-cell>
          <table:table-cell office:value-type="string" calcext:value-type="string">
            <text:p>2020-07-21-17:02:23.8926370</text:p>
          </table:table-cell>
          <table:table-cell table:number-columns-repeated="2"/>
        </table:table-row>
        <table:table-row table:style-name="ro1">
          <table:table-cell office:value-type="float" office:value="457743188" calcext:value-type="float">
            <text:p>457743188</text:p>
          </table:table-cell>
          <table:table-cell office:value-type="float" office:value="648709270.709612" calcext:value-type="float">
            <text:p>648709270.709612</text:p>
          </table:table-cell>
          <table:table-cell/>
          <table:table-cell office:value-type="string" calcext:value-type="string">
            <text:p>2020-07-22T17:01:10.7096120Z</text:p>
          </table:table-cell>
          <table:table-cell office:value-type="string" calcext:value-type="string">
            <text:p>2020-07-22-17:02:19.8936120</text:p>
          </table:table-cell>
          <table:table-cell table:number-columns-repeated="2"/>
        </table:table-row>
        <table:table-row table:style-name="ro1">
          <table:table-cell office:value-type="float" office:value="457754067" calcext:value-type="float">
            <text:p>457754067</text:p>
          </table:table-cell>
          <table:table-cell office:value-type="float" office:value="648720149.709747" calcext:value-type="float">
            <text:p>648720149.709747</text:p>
          </table:table-cell>
          <table:table-cell/>
          <table:table-cell office:value-type="string" calcext:value-type="string">
            <text:p>2020-07-22T20:02:29.7097469Z</text:p>
          </table:table-cell>
          <table:table-cell office:value-type="string" calcext:value-type="string">
            <text:p>2020-07-22-20:03:38.8937469</text:p>
          </table:table-cell>
          <table:table-cell table:number-columns-repeated="2"/>
        </table:table-row>
        <table:table-row table:style-name="ro1">
          <table:table-cell office:value-type="float" office:value="457915978" calcext:value-type="float">
            <text:p>457915978</text:p>
          </table:table-cell>
          <table:table-cell office:value-type="float" office:value="648882060.711596" calcext:value-type="float">
            <text:p>648882060.711596</text:p>
          </table:table-cell>
          <table:table-cell/>
          <table:table-cell office:value-type="string" calcext:value-type="string">
            <text:p>2020-07-24T17:01:00.7115960Z</text:p>
          </table:table-cell>
          <table:table-cell office:value-type="string" calcext:value-type="string">
            <text:p>2020-07-24-17:02:09.8955960</text:p>
          </table:table-cell>
          <table:table-cell table:number-columns-repeated="2"/>
        </table:table-row>
        <table:table-row table:style-name="ro1">
          <table:table-cell office:value-type="float" office:value="457919555" calcext:value-type="float">
            <text:p>457919555</text:p>
          </table:table-cell>
          <table:table-cell office:value-type="float" office:value="648885637.711653" calcext:value-type="float">
            <text:p>648885637.711653</text:p>
          </table:table-cell>
          <table:table-cell/>
          <table:table-cell office:value-type="string" calcext:value-type="string">
            <text:p>2020-07-24T18:00:37.7116529Z</text:p>
          </table:table-cell>
          <table:table-cell office:value-type="string" calcext:value-type="string">
            <text:p>2020-07-24-18:01:46.8956530</text:p>
          </table:table-cell>
          <table:table-cell table:number-columns-repeated="2"/>
        </table:table-row>
        <table:table-row table:style-name="ro1">
          <table:table-cell office:value-type="float" office:value="458175154" calcext:value-type="float">
            <text:p>458175154</text:p>
          </table:table-cell>
          <table:table-cell office:value-type="float" office:value="649141236.714574" calcext:value-type="float">
            <text:p>649141236.714574</text:p>
          </table:table-cell>
          <table:table-cell/>
          <table:table-cell office:value-type="string" calcext:value-type="string">
            <text:p>2020-07-27T17:00:36.7145739Z</text:p>
          </table:table-cell>
          <table:table-cell office:value-type="string" calcext:value-type="string">
            <text:p>2020-07-27-17:01:45.8985739</text:p>
          </table:table-cell>
          <table:table-cell table:number-columns-repeated="2"/>
        </table:table-row>
        <table:table-row table:style-name="ro1">
          <table:table-cell office:value-type="float" office:value="458240014" calcext:value-type="float">
            <text:p>458240014</text:p>
          </table:table-cell>
          <table:table-cell office:value-type="float" office:value="649206096.715326" calcext:value-type="float">
            <text:p>649206096.715326</text:p>
          </table:table-cell>
          <table:table-cell/>
          <table:table-cell office:value-type="string" calcext:value-type="string">
            <text:p>2020-07-28T11:01:36.7153259Z</text:p>
          </table:table-cell>
          <table:table-cell office:value-type="string" calcext:value-type="string">
            <text:p>2020-07-28-11:02:45.8993259</text:p>
          </table:table-cell>
          <table:table-cell table:number-columns-repeated="2"/>
        </table:table-row>
        <table:table-row table:style-name="ro1">
          <table:table-cell office:value-type="float" office:value="458297557" calcext:value-type="float">
            <text:p>458297557</text:p>
          </table:table-cell>
          <table:table-cell office:value-type="float" office:value="649263639.715979" calcext:value-type="float">
            <text:p>649263639.715979</text:p>
          </table:table-cell>
          <table:table-cell/>
          <table:table-cell office:value-type="string" calcext:value-type="string">
            <text:p>2020-07-29T03:00:39.7159789Z</text:p>
          </table:table-cell>
          <table:table-cell office:value-type="string" calcext:value-type="string">
            <text:p>2020-07-29-03:01:48.8999789</text:p>
          </table:table-cell>
          <table:table-cell table:number-columns-repeated="2"/>
        </table:table-row>
        <table:table-row table:style-name="ro1">
          <table:table-cell office:value-type="float" office:value="458434336" calcext:value-type="float">
            <text:p>458434336</text:p>
          </table:table-cell>
          <table:table-cell office:value-type="float" office:value="649400418.717541" calcext:value-type="float">
            <text:p>649400418.717541</text:p>
          </table:table-cell>
          <table:table-cell/>
          <table:table-cell office:value-type="string" calcext:value-type="string">
            <text:p>2020-07-30T17:00:18.7175409Z</text:p>
          </table:table-cell>
          <table:table-cell office:value-type="string" calcext:value-type="string">
            <text:p>2020-07-30-17:01:27.9015409</text:p>
          </table:table-cell>
          <table:table-cell table:number-columns-repeated="2"/>
        </table:table-row>
        <table:table-row table:style-name="ro1">
          <table:table-cell office:value-type="float" office:value="458520727" calcext:value-type="float">
            <text:p>458520727</text:p>
          </table:table-cell>
          <table:table-cell office:value-type="float" office:value="649486809.718517" calcext:value-type="float">
            <text:p>649486809.718517</text:p>
          </table:table-cell>
          <table:table-cell/>
          <table:table-cell office:value-type="string" calcext:value-type="string">
            <text:p>2020-07-31T17:00:09.7185169Z</text:p>
          </table:table-cell>
          <table:table-cell office:value-type="string" calcext:value-type="string">
            <text:p>2020-07-31-17:01:18.9025169</text:p>
          </table:table-cell>
          <table:table-cell table:number-columns-repeated="2"/>
        </table:table-row>
        <table:table-row table:style-name="ro1">
          <table:table-cell office:value-type="float" office:value="458556737" calcext:value-type="float">
            <text:p>458556737</text:p>
          </table:table-cell>
          <table:table-cell office:value-type="float" office:value="649522819.718952" calcext:value-type="float">
            <text:p>649522819.718952</text:p>
          </table:table-cell>
          <table:table-cell/>
          <table:table-cell office:value-type="string" calcext:value-type="string">
            <text:p>2020-08-01T03:00:19.7189519Z</text:p>
          </table:table-cell>
          <table:table-cell office:value-type="string" calcext:value-type="string">
            <text:p>2020-08-01-03:01:28.9029519</text:p>
          </table:table-cell>
          <table:table-cell table:number-columns-repeated="2"/>
        </table:table-row>
        <table:table-row table:style-name="ro1">
          <table:table-cell office:value-type="float" office:value="458689914" calcext:value-type="float">
            <text:p>458689914</text:p>
          </table:table-cell>
          <table:table-cell office:value-type="float" office:value="649655996.720464" calcext:value-type="float">
            <text:p>649655996.720464</text:p>
          </table:table-cell>
          <table:table-cell/>
          <table:table-cell office:value-type="string" calcext:value-type="string">
            <text:p>2020-08-02T15:59:56.7204639Z</text:p>
          </table:table-cell>
          <table:table-cell office:value-type="string" calcext:value-type="string">
            <text:p>2020-08-02-16:01:05.9044640</text:p>
          </table:table-cell>
          <table:table-cell table:number-columns-repeated="2"/>
        </table:table-row>
        <table:table-row table:style-name="ro1">
          <table:table-cell office:value-type="float" office:value="458815903" calcext:value-type="float">
            <text:p>458815903</text:p>
          </table:table-cell>
          <table:table-cell office:value-type="float" office:value="649781985.721919" calcext:value-type="float">
            <text:p>649781985.721919</text:p>
          </table:table-cell>
          <table:table-cell/>
          <table:table-cell office:value-type="string" calcext:value-type="string">
            <text:p>2020-08-04T02:59:45.7219189Z</text:p>
          </table:table-cell>
          <table:table-cell office:value-type="string" calcext:value-type="string">
            <text:p>2020-08-04-03:00:54.9059189</text:p>
          </table:table-cell>
          <table:table-cell table:number-columns-repeated="2"/>
        </table:table-row>
        <table:table-row table:style-name="ro1">
          <table:table-cell office:value-type="float" office:value="458952694" calcext:value-type="float">
            <text:p>458952694</text:p>
          </table:table-cell>
          <table:table-cell office:value-type="float" office:value="649918776.72346" calcext:value-type="float">
            <text:p>649918776.72346</text:p>
          </table:table-cell>
          <table:table-cell/>
          <table:table-cell office:value-type="string" calcext:value-type="string">
            <text:p>2020-08-05T16:59:36.7234599Z</text:p>
          </table:table-cell>
          <table:table-cell office:value-type="string" calcext:value-type="string">
            <text:p>2020-08-05-17:00:45.9074599</text:p>
          </table:table-cell>
          <table:table-cell table:number-columns-repeated="2"/>
        </table:table-row>
        <table:table-row table:style-name="ro1">
          <table:table-cell office:value-type="float" office:value="458959886" calcext:value-type="float">
            <text:p>458959886</text:p>
          </table:table-cell>
          <table:table-cell office:value-type="float" office:value="649925968.723566" calcext:value-type="float">
            <text:p>649925968.723566</text:p>
          </table:table-cell>
          <table:table-cell/>
          <table:table-cell office:value-type="string" calcext:value-type="string">
            <text:p>2020-08-05T18:59:28.7235659Z</text:p>
          </table:table-cell>
          <table:table-cell office:value-type="string" calcext:value-type="string">
            <text:p>2020-08-05-19:00:37.9075659</text:p>
          </table:table-cell>
          <table:table-cell table:number-columns-repeated="2"/>
        </table:table-row>
        <table:table-row table:style-name="ro1">
          <table:table-cell office:value-type="float" office:value="459125476" calcext:value-type="float">
            <text:p>459125476</text:p>
          </table:table-cell>
          <table:table-cell office:value-type="float" office:value="650091558.725437" calcext:value-type="float">
            <text:p>650091558.725437</text:p>
          </table:table-cell>
          <table:table-cell/>
          <table:table-cell office:value-type="string" calcext:value-type="string">
            <text:p>2020-08-07T16:59:18.7254369Z</text:p>
          </table:table-cell>
          <table:table-cell office:value-type="string" calcext:value-type="string">
            <text:p>2020-08-07-17:00:27.9094369</text:p>
          </table:table-cell>
          <table:table-cell table:number-columns-repeated="2"/>
        </table:table-row>
        <table:table-row table:style-name="ro1">
          <table:table-cell office:value-type="float" office:value="459183145" calcext:value-type="float">
            <text:p>459183145</text:p>
          </table:table-cell>
          <table:table-cell office:value-type="float" office:value="650149227.726109" calcext:value-type="float">
            <text:p>650149227.726109</text:p>
          </table:table-cell>
          <table:table-cell/>
          <table:table-cell office:value-type="string" calcext:value-type="string">
            <text:p>2020-08-08T09:00:27.7261090Z</text:p>
          </table:table-cell>
          <table:table-cell office:value-type="string" calcext:value-type="string">
            <text:p>2020-08-08-09:01:36.9101090</text:p>
          </table:table-cell>
          <table:table-cell table:number-columns-repeated="2"/>
        </table:table-row>
        <table:table-row table:style-name="ro1">
          <table:table-cell office:value-type="float" office:value="459237042" calcext:value-type="float">
            <text:p>459237042</text:p>
          </table:table-cell>
          <table:table-cell office:value-type="float" office:value="650203124.726717" calcext:value-type="float">
            <text:p>650203124.726717</text:p>
          </table:table-cell>
          <table:table-cell/>
          <table:table-cell office:value-type="string" calcext:value-type="string">
            <text:p>2020-08-08T23:58:44.7267169Z</text:p>
          </table:table-cell>
          <table:table-cell office:value-type="string" calcext:value-type="string">
            <text:p>2020-08-08-23:59:53.9107170</text:p>
          </table:table-cell>
          <table:table-cell table:number-columns-repeated="2"/>
        </table:table-row>
        <table:table-row table:style-name="ro1">
          <table:table-cell office:value-type="float" office:value="459384654" calcext:value-type="float">
            <text:p>459384654</text:p>
          </table:table-cell>
          <table:table-cell office:value-type="float" office:value="650350736.728401" calcext:value-type="float">
            <text:p>650350736.728401</text:p>
          </table:table-cell>
          <table:table-cell/>
          <table:table-cell office:value-type="string" calcext:value-type="string">
            <text:p>2020-08-10T16:58:56.7284009Z</text:p>
          </table:table-cell>
          <table:table-cell office:value-type="string" calcext:value-type="string">
            <text:p>2020-08-10-17:00:05.9124009</text:p>
          </table:table-cell>
          <table:table-cell table:number-columns-repeated="2"/>
        </table:table-row>
        <table:table-row table:style-name="ro1">
          <table:table-cell office:value-type="float" office:value="459471041" calcext:value-type="float">
            <text:p>459471041</text:p>
          </table:table-cell>
          <table:table-cell office:value-type="float" office:value="650437123.72939" calcext:value-type="float">
            <text:p>650437123.72939</text:p>
          </table:table-cell>
          <table:table-cell/>
          <table:table-cell office:value-type="string" calcext:value-type="string">
            <text:p>2020-08-11T16:58:43.7293900Z</text:p>
          </table:table-cell>
          <table:table-cell office:value-type="string" calcext:value-type="string">
            <text:p>2020-08-11-16:59:52.9133900</text:p>
          </table:table-cell>
          <table:table-cell table:number-columns-repeated="2"/>
        </table:table-row>
        <table:table-row table:style-name="ro1">
          <table:table-cell office:value-type="float" office:value="459553834" calcext:value-type="float">
            <text:p>459553834</text:p>
          </table:table-cell>
          <table:table-cell office:value-type="float" office:value="650519916.730316" calcext:value-type="float">
            <text:p>650519916.730316</text:p>
          </table:table-cell>
          <table:table-cell/>
          <table:table-cell office:value-type="string" calcext:value-type="string">
            <text:p>2020-08-12T15:58:36.7303160Z</text:p>
          </table:table-cell>
          <table:table-cell office:value-type="string" calcext:value-type="string">
            <text:p>2020-08-12-15:59:45.9143160</text:p>
          </table:table-cell>
          <table:table-cell table:number-columns-repeated="2"/>
        </table:table-row>
        <table:table-row table:style-name="ro1">
          <table:table-cell office:value-type="float" office:value="459636622" calcext:value-type="float">
            <text:p>459636622</text:p>
          </table:table-cell>
          <table:table-cell office:value-type="float" office:value="650602704.731255" calcext:value-type="float">
            <text:p>650602704.731255</text:p>
          </table:table-cell>
          <table:table-cell/>
          <table:table-cell office:value-type="string" calcext:value-type="string">
            <text:p>2020-08-13T14:58:24.7312549Z</text:p>
          </table:table-cell>
          <table:table-cell office:value-type="string" calcext:value-type="string">
            <text:p>2020-08-13-14:59:33.9152549</text:p>
          </table:table-cell>
          <table:table-cell table:number-columns-repeated="2"/>
        </table:table-row>
        <table:table-row table:style-name="ro1">
          <table:table-cell office:value-type="float" office:value="459676218" calcext:value-type="float">
            <text:p>459676218</text:p>
          </table:table-cell>
          <table:table-cell office:value-type="float" office:value="650642300.731728" calcext:value-type="float">
            <text:p>650642300.731728</text:p>
          </table:table-cell>
          <table:table-cell/>
          <table:table-cell office:value-type="string" calcext:value-type="string">
            <text:p>2020-08-14T01:58:20.7317279Z</text:p>
          </table:table-cell>
          <table:table-cell office:value-type="string" calcext:value-type="string">
            <text:p>2020-08-14-01:59:29.9157279</text:p>
          </table:table-cell>
          <table:table-cell table:number-columns-repeated="2"/>
        </table:table-row>
        <table:table-row table:style-name="ro1">
          <table:table-cell office:value-type="float" office:value="459816656" calcext:value-type="float">
            <text:p>459816656</text:p>
          </table:table-cell>
          <table:table-cell office:value-type="float" office:value="650782738.733317" calcext:value-type="float">
            <text:p>650782738.733317</text:p>
          </table:table-cell>
          <table:table-cell/>
          <table:table-cell office:value-type="string" calcext:value-type="string">
            <text:p>2020-08-15T16:58:58.7333170Z</text:p>
          </table:table-cell>
          <table:table-cell office:value-type="string" calcext:value-type="string">
            <text:p>2020-08-15-17:00:07.9173170</text:p>
          </table:table-cell>
          <table:table-cell table:number-columns-repeated="2"/>
        </table:table-row>
        <table:table-row table:style-name="ro1">
          <table:table-cell office:value-type="float" office:value="459902998" calcext:value-type="float">
            <text:p>459902998</text:p>
          </table:table-cell>
          <table:table-cell office:value-type="float" office:value="650869080.734303" calcext:value-type="float">
            <text:p>650869080.734303</text:p>
          </table:table-cell>
          <table:table-cell/>
          <table:table-cell office:value-type="string" calcext:value-type="string">
            <text:p>2020-08-16T16:58:00.7343029Z</text:p>
          </table:table-cell>
          <table:table-cell office:value-type="string" calcext:value-type="string">
            <text:p>2020-08-16-16:59:09.9183030</text:p>
          </table:table-cell>
          <table:table-cell table:number-columns-repeated="2"/>
        </table:table-row>
        <table:table-row table:style-name="ro1">
          <table:table-cell office:value-type="float" office:value="460050648" calcext:value-type="float">
            <text:p>460050648</text:p>
          </table:table-cell>
          <table:table-cell office:value-type="float" office:value="651016730.736002" calcext:value-type="float">
            <text:p>651016730.736002</text:p>
          </table:table-cell>
          <table:table-cell/>
          <table:table-cell office:value-type="string" calcext:value-type="string">
            <text:p>2020-08-18T09:58:50.7360019Z</text:p>
          </table:table-cell>
          <table:table-cell office:value-type="string" calcext:value-type="string">
            <text:p>2020-08-18-09:59:59.9200019</text:p>
          </table:table-cell>
          <table:table-cell table:number-columns-repeated="2"/>
        </table:table-row>
        <table:table-row table:style-name="ro1">
          <table:table-cell office:value-type="float" office:value="460108185" calcext:value-type="float">
            <text:p>460108185</text:p>
          </table:table-cell>
          <table:table-cell office:value-type="float" office:value="651074267.736641" calcext:value-type="float">
            <text:p>651074267.736641</text:p>
          </table:table-cell>
          <table:table-cell/>
          <table:table-cell office:value-type="string" calcext:value-type="string">
            <text:p>2020-08-19T01:57:47.7366409Z</text:p>
          </table:table-cell>
          <table:table-cell office:value-type="string" calcext:value-type="string">
            <text:p>2020-08-19-01:58:56.9206409</text:p>
          </table:table-cell>
          <table:table-cell table:number-columns-repeated="2"/>
        </table:table-row>
        <table:table-row table:style-name="ro1">
          <table:table-cell office:value-type="float" office:value="460248570" calcext:value-type="float">
            <text:p>460248570</text:p>
          </table:table-cell>
          <table:table-cell office:value-type="float" office:value="651214652.738233" calcext:value-type="float">
            <text:p>651214652.738233</text:p>
          </table:table-cell>
          <table:table-cell/>
          <table:table-cell office:value-type="string" calcext:value-type="string">
            <text:p>2020-08-20T16:57:32.7382329Z</text:p>
          </table:table-cell>
          <table:table-cell office:value-type="string" calcext:value-type="string">
            <text:p>2020-08-20-16:58:41.9222329</text:p>
          </table:table-cell>
          <table:table-cell table:number-columns-repeated="2"/>
        </table:table-row>
        <table:table-row table:style-name="ro1">
          <table:table-cell office:value-type="float" office:value="460334954" calcext:value-type="float">
            <text:p>460334954</text:p>
          </table:table-cell>
          <table:table-cell office:value-type="float" office:value="651301036.739219" calcext:value-type="float">
            <text:p>651301036.739219</text:p>
          </table:table-cell>
          <table:table-cell/>
          <table:table-cell office:value-type="string" calcext:value-type="string">
            <text:p>2020-08-21T16:57:16.7392189Z</text:p>
          </table:table-cell>
          <table:table-cell office:value-type="string" calcext:value-type="string">
            <text:p>2020-08-21-16:58:25.9232189</text:p>
          </table:table-cell>
          <table:table-cell table:number-columns-repeated="2"/>
        </table:table-row>
        <table:table-row table:style-name="ro1">
          <table:table-cell office:value-type="float" office:value="460417741" calcext:value-type="float">
            <text:p>460417741</text:p>
          </table:table-cell>
          <table:table-cell office:value-type="float" office:value="651383823.740153" calcext:value-type="float">
            <text:p>651383823.740153</text:p>
          </table:table-cell>
          <table:table-cell/>
          <table:table-cell office:value-type="string" calcext:value-type="string">
            <text:p>2020-08-22T15:57:03.7401529Z</text:p>
          </table:table-cell>
          <table:table-cell office:value-type="string" calcext:value-type="string">
            <text:p>2020-08-22-15:58:12.9241529</text:p>
          </table:table-cell>
          <table:table-cell table:number-columns-repeated="2"/>
        </table:table-row>
        <table:table-row table:style-name="ro1">
          <table:table-cell office:value-type="float" office:value="460518511" calcext:value-type="float">
            <text:p>460518511</text:p>
          </table:table-cell>
          <table:table-cell office:value-type="float" office:value="651484593.741286" calcext:value-type="float">
            <text:p>651484593.741286</text:p>
          </table:table-cell>
          <table:table-cell/>
          <table:table-cell office:value-type="string" calcext:value-type="string">
            <text:p>2020-08-23T19:56:33.7412860Z</text:p>
          </table:table-cell>
          <table:table-cell office:value-type="string" calcext:value-type="string">
            <text:p>2020-08-23-19:57:42.9252860</text:p>
          </table:table-cell>
          <table:table-cell table:number-columns-repeated="2"/>
        </table:table-row>
        <table:table-row table:style-name="ro1">
          <table:table-cell office:value-type="float" office:value="460680516" calcext:value-type="float">
            <text:p>460680516</text:p>
          </table:table-cell>
          <table:table-cell office:value-type="float" office:value="651646598.743146" calcext:value-type="float">
            <text:p>651646598.743146</text:p>
          </table:table-cell>
          <table:table-cell/>
          <table:table-cell office:value-type="string" calcext:value-type="string">
            <text:p>2020-08-25T16:56:38.7431459Z</text:p>
          </table:table-cell>
          <table:table-cell office:value-type="string" calcext:value-type="string">
            <text:p>2020-08-25-16:57:47.9271459</text:p>
          </table:table-cell>
          <table:table-cell table:number-columns-repeated="2"/>
        </table:table-row>
        <table:table-row table:style-name="ro1">
          <table:table-cell office:value-type="float" office:value="460766956" calcext:value-type="float">
            <text:p>460766956</text:p>
          </table:table-cell>
          <table:table-cell office:value-type="float" office:value="651733038.744115" calcext:value-type="float">
            <text:p>651733038.744115</text:p>
          </table:table-cell>
          <table:table-cell/>
          <table:table-cell office:value-type="string" calcext:value-type="string">
            <text:p>2020-08-26T16:57:18.7441149Z</text:p>
          </table:table-cell>
          <table:table-cell office:value-type="string" calcext:value-type="string">
            <text:p>2020-08-26-16:58:27.9281150</text:p>
          </table:table-cell>
          <table:table-cell table:number-columns-repeated="2"/>
        </table:table-row>
        <table:table-row table:style-name="ro1">
          <table:table-cell office:value-type="float" office:value="460849688" calcext:value-type="float">
            <text:p>460849688</text:p>
          </table:table-cell>
          <table:table-cell office:value-type="float" office:value="651815770.745047" calcext:value-type="float">
            <text:p>651815770.745047</text:p>
          </table:table-cell>
          <table:table-cell/>
          <table:table-cell office:value-type="string" calcext:value-type="string">
            <text:p>2020-08-27T15:56:10.7450469Z</text:p>
          </table:table-cell>
          <table:table-cell office:value-type="string" calcext:value-type="string">
            <text:p>2020-08-27-15:57:19.9290469</text:p>
          </table:table-cell>
          <table:table-cell table:number-columns-repeated="2"/>
        </table:table-row>
        <table:table-row table:style-name="ro1">
          <table:table-cell office:value-type="float" office:value="460939701" calcext:value-type="float">
            <text:p>460939701</text:p>
          </table:table-cell>
          <table:table-cell office:value-type="float" office:value="651905783.746082" calcext:value-type="float">
            <text:p>651905783.746082</text:p>
          </table:table-cell>
          <table:table-cell/>
          <table:table-cell office:value-type="string" calcext:value-type="string">
            <text:p>2020-08-28T16:56:23.7460819Z</text:p>
          </table:table-cell>
          <table:table-cell office:value-type="string" calcext:value-type="string">
            <text:p>2020-08-28-16:57:32.9300819</text:p>
          </table:table-cell>
          <table:table-cell table:number-columns-repeated="2"/>
        </table:table-row>
        <table:table-row table:style-name="ro1">
          <table:table-cell office:value-type="float" office:value="461022469" calcext:value-type="float">
            <text:p>461022469</text:p>
          </table:table-cell>
          <table:table-cell office:value-type="float" office:value="651988551.747005" calcext:value-type="float">
            <text:p>651988551.747005</text:p>
          </table:table-cell>
          <table:table-cell/>
          <table:table-cell office:value-type="string" calcext:value-type="string">
            <text:p>2020-08-29T15:55:51.7470049Z</text:p>
          </table:table-cell>
          <table:table-cell office:value-type="string" calcext:value-type="string">
            <text:p>2020-08-29-15:57:00.9310050</text:p>
          </table:table-cell>
          <table:table-cell table:number-columns-repeated="2"/>
        </table:table-row>
        <table:table-row table:style-name="ro1">
          <table:table-cell office:value-type="float" office:value="461112478" calcext:value-type="float">
            <text:p>461112478</text:p>
          </table:table-cell>
          <table:table-cell office:value-type="float" office:value="652078560.748045" calcext:value-type="float">
            <text:p>652078560.748045</text:p>
          </table:table-cell>
          <table:table-cell/>
          <table:table-cell office:value-type="string" calcext:value-type="string">
            <text:p>2020-08-30T16:56:00.7480449Z</text:p>
          </table:table-cell>
          <table:table-cell office:value-type="string" calcext:value-type="string">
            <text:p>2020-08-30-16:57:09.9320449</text:p>
          </table:table-cell>
          <table:table-cell table:number-columns-repeated="2"/>
        </table:table-row>
        <table:table-row table:style-name="ro1">
          <table:table-cell office:value-type="float" office:value="461141263" calcext:value-type="float">
            <text:p>461141263</text:p>
          </table:table-cell>
          <table:table-cell office:value-type="float" office:value="652107345.748362" calcext:value-type="float">
            <text:p>652107345.748362</text:p>
          </table:table-cell>
          <table:table-cell/>
          <table:table-cell office:value-type="string" calcext:value-type="string">
            <text:p>2020-08-31T00:55:45.7483619Z</text:p>
          </table:table-cell>
          <table:table-cell office:value-type="string" calcext:value-type="string">
            <text:p>2020-08-31-00:56:54.9323619</text:p>
          </table:table-cell>
          <table:table-cell table:number-columns-repeated="2"/>
        </table:table-row>
        <table:table-row table:style-name="ro1">
          <table:table-cell office:value-type="float" office:value="461285242" calcext:value-type="float">
            <text:p>461285242</text:p>
          </table:table-cell>
          <table:table-cell office:value-type="float" office:value="652251324.749991" calcext:value-type="float">
            <text:p>652251324.749991</text:p>
          </table:table-cell>
          <table:table-cell/>
          <table:table-cell office:value-type="string" calcext:value-type="string">
            <text:p>2020-09-01T16:55:24.7499909Z</text:p>
          </table:table-cell>
          <table:table-cell office:value-type="string" calcext:value-type="string">
            <text:p>2020-09-01-16:56:33.9339909</text:p>
          </table:table-cell>
          <table:table-cell table:number-columns-repeated="2"/>
        </table:table-row>
        <table:table-row table:style-name="ro1">
          <table:table-cell office:value-type="float" office:value="461314043" calcext:value-type="float">
            <text:p>461314043</text:p>
          </table:table-cell>
          <table:table-cell office:value-type="float" office:value="652280125.750333" calcext:value-type="float">
            <text:p>652280125.750333</text:p>
          </table:table-cell>
          <table:table-cell/>
          <table:table-cell office:value-type="string" calcext:value-type="string">
            <text:p>2020-09-02T00:55:25.7503329Z</text:p>
          </table:table-cell>
          <table:table-cell office:value-type="string" calcext:value-type="string">
            <text:p>2020-09-02-00:56:34.9343329</text:p>
          </table:table-cell>
          <table:table-cell table:number-columns-repeated="2"/>
        </table:table-row>
        <table:table-row table:style-name="ro1">
          <table:table-cell office:value-type="float" office:value="461440019" calcext:value-type="float">
            <text:p>461440019</text:p>
          </table:table-cell>
          <table:table-cell office:value-type="float" office:value="652406101.751723" calcext:value-type="float">
            <text:p>652406101.751723</text:p>
          </table:table-cell>
          <table:table-cell/>
          <table:table-cell office:value-type="string" calcext:value-type="string">
            <text:p>2020-09-03T11:55:01.7517229Z</text:p>
          </table:table-cell>
          <table:table-cell office:value-type="string" calcext:value-type="string">
            <text:p>2020-09-03-11:56:10.9357229</text:p>
          </table:table-cell>
          <table:table-cell table:number-columns-repeated="2"/>
        </table:table-row>
        <table:table-row table:style-name="ro1">
          <table:table-cell office:value-type="float" office:value="461486874" calcext:value-type="float">
            <text:p>461486874</text:p>
          </table:table-cell>
          <table:table-cell office:value-type="float" office:value="652452956.752276" calcext:value-type="float">
            <text:p>652452956.752276</text:p>
          </table:table-cell>
          <table:table-cell/>
          <table:table-cell office:value-type="string" calcext:value-type="string">
            <text:p>2020-09-04T00:55:56.7522759Z</text:p>
          </table:table-cell>
          <table:table-cell office:value-type="string" calcext:value-type="string">
            <text:p>2020-09-04-00:57:05.9362759</text:p>
          </table:table-cell>
          <table:table-cell table:number-columns-repeated="2"/>
        </table:table-row>
        <table:table-row table:style-name="ro1">
          <table:table-cell office:value-type="float" office:value="461630861" calcext:value-type="float">
            <text:p>461630861</text:p>
          </table:table-cell>
          <table:table-cell office:value-type="float" office:value="652596943.753906" calcext:value-type="float">
            <text:p>652596943.753906</text:p>
          </table:table-cell>
          <table:table-cell/>
          <table:table-cell office:value-type="string" calcext:value-type="string">
            <text:p>2020-09-05T16:55:43.7539060Z</text:p>
          </table:table-cell>
          <table:table-cell office:value-type="string" calcext:value-type="string">
            <text:p>2020-09-05-16:56:52.9379060</text:p>
          </table:table-cell>
          <table:table-cell table:number-columns-repeated="2"/>
        </table:table-row>
        <table:table-row table:style-name="ro1">
          <table:table-cell office:value-type="float" office:value="461718406" calcext:value-type="float">
            <text:p>461718406</text:p>
          </table:table-cell>
          <table:table-cell office:value-type="float" office:value="652684488.754864" calcext:value-type="float">
            <text:p>652684488.754864</text:p>
          </table:table-cell>
          <table:table-cell/>
          <table:table-cell office:value-type="string" calcext:value-type="string">
            <text:p>2020-09-06T17:14:48.7548639Z</text:p>
          </table:table-cell>
          <table:table-cell office:value-type="string" calcext:value-type="string">
            <text:p>2020-09-06-17:15:57.9388639</text:p>
          </table:table-cell>
          <table:table-cell table:number-columns-repeated="2"/>
        </table:table-row>
        <table:table-row table:style-name="ro1">
          <table:table-cell office:value-type="float" office:value="461803591" calcext:value-type="float">
            <text:p>461803591</text:p>
          </table:table-cell>
          <table:table-cell office:value-type="float" office:value="652769673.755856" calcext:value-type="float">
            <text:p>652769673.755856</text:p>
          </table:table-cell>
          <table:table-cell/>
          <table:table-cell office:value-type="string" calcext:value-type="string">
            <text:p>2020-09-07T16:54:33.7558560Z</text:p>
          </table:table-cell>
          <table:table-cell office:value-type="string" calcext:value-type="string">
            <text:p>2020-09-07-16:55:42.9398560</text:p>
          </table:table-cell>
          <table:table-cell table:number-columns-repeated="2"/>
        </table:table-row>
        <table:table-row table:style-name="ro1">
          <table:table-cell office:value-type="float" office:value="461889977" calcext:value-type="float">
            <text:p>461889977</text:p>
          </table:table-cell>
          <table:table-cell office:value-type="float" office:value="652856059.756828" calcext:value-type="float">
            <text:p>652856059.756828</text:p>
          </table:table-cell>
          <table:table-cell/>
          <table:table-cell office:value-type="string" calcext:value-type="string">
            <text:p>2020-09-08T16:54:19.7568279Z</text:p>
          </table:table-cell>
          <table:table-cell office:value-type="string" calcext:value-type="string">
            <text:p>2020-09-08-16:55:28.9408279</text:p>
          </table:table-cell>
          <table:table-cell table:number-columns-repeated="2"/>
        </table:table-row>
        <table:table-row table:style-name="ro1">
          <table:table-cell office:value-type="float" office:value="461976375" calcext:value-type="float">
            <text:p>461976375</text:p>
          </table:table-cell>
          <table:table-cell office:value-type="float" office:value="652942457.757808" calcext:value-type="float">
            <text:p>652942457.757808</text:p>
          </table:table-cell>
          <table:table-cell/>
          <table:table-cell office:value-type="string" calcext:value-type="string">
            <text:p>2020-09-09T16:54:17.7578079Z</text:p>
          </table:table-cell>
          <table:table-cell office:value-type="string" calcext:value-type="string">
            <text:p>2020-09-09-16:55:26.9418079</text:p>
          </table:table-cell>
          <table:table-cell table:number-columns-repeated="2"/>
        </table:table-row>
        <table:table-row table:style-name="ro1">
          <table:table-cell office:value-type="float" office:value="462001538" calcext:value-type="float">
            <text:p>462001538</text:p>
          </table:table-cell>
          <table:table-cell office:value-type="float" office:value="652967620.758081" calcext:value-type="float">
            <text:p>652967620.758081</text:p>
          </table:table-cell>
          <table:table-cell/>
          <table:table-cell office:value-type="string" calcext:value-type="string">
            <text:p>2020-09-09T23:53:40.7580809Z</text:p>
          </table:table-cell>
          <table:table-cell office:value-type="string" calcext:value-type="string">
            <text:p>2020-09-09-23:54:49.9420809</text:p>
          </table:table-cell>
          <table:table-cell table:number-columns-repeated="2"/>
        </table:table-row>
        <table:table-row table:style-name="ro1">
          <table:table-cell office:value-type="float" office:value="462145545" calcext:value-type="float">
            <text:p>462145545</text:p>
          </table:table-cell>
          <table:table-cell office:value-type="float" office:value="653111627.759709" calcext:value-type="float">
            <text:p>653111627.759709</text:p>
          </table:table-cell>
          <table:table-cell/>
          <table:table-cell office:value-type="string" calcext:value-type="string">
            <text:p>2020-09-11T15:53:47.7597090Z</text:p>
          </table:table-cell>
          <table:table-cell office:value-type="string" calcext:value-type="string">
            <text:p>2020-09-11-15:54:56.9437090</text:p>
          </table:table-cell>
          <table:table-cell table:number-columns-repeated="2"/>
        </table:table-row>
        <table:table-row table:style-name="ro1">
          <table:table-cell office:value-type="float" office:value="462235536" calcext:value-type="float">
            <text:p>462235536</text:p>
          </table:table-cell>
          <table:table-cell office:value-type="float" office:value="653201618.760717" calcext:value-type="float">
            <text:p>653201618.760717</text:p>
          </table:table-cell>
          <table:table-cell/>
          <table:table-cell office:value-type="string" calcext:value-type="string">
            <text:p>2020-09-12T16:53:38.7607170Z</text:p>
          </table:table-cell>
          <table:table-cell office:value-type="string" calcext:value-type="string">
            <text:p>2020-09-12-16:54:47.9447170</text:p>
          </table:table-cell>
          <table:table-cell table:number-columns-repeated="2"/>
        </table:table-row>
        <table:table-row table:style-name="ro1">
          <table:table-cell office:value-type="float" office:value="462321928" calcext:value-type="float">
            <text:p>462321928</text:p>
          </table:table-cell>
          <table:table-cell office:value-type="float" office:value="653288010.761665" calcext:value-type="float">
            <text:p>653288010.761665</text:p>
          </table:table-cell>
          <table:table-cell/>
          <table:table-cell office:value-type="string" calcext:value-type="string">
            <text:p>2020-09-13T16:53:30.7616649Z</text:p>
          </table:table-cell>
          <table:table-cell office:value-type="string" calcext:value-type="string">
            <text:p>2020-09-13-16:54:39.9456650</text:p>
          </table:table-cell>
          <table:table-cell table:number-columns-repeated="2"/>
        </table:table-row>
        <table:table-row table:style-name="ro1">
          <table:table-cell office:value-type="float" office:value="462347087" calcext:value-type="float">
            <text:p>462347087</text:p>
          </table:table-cell>
          <table:table-cell office:value-type="float" office:value="653313169.761965" calcext:value-type="float">
            <text:p>653313169.761965</text:p>
          </table:table-cell>
          <table:table-cell/>
          <table:table-cell office:value-type="string" calcext:value-type="string">
            <text:p>2020-09-13T23:52:49.7619650Z</text:p>
          </table:table-cell>
          <table:table-cell office:value-type="string" calcext:value-type="string">
            <text:p>2020-09-13-23:53:58.9459650</text:p>
          </table:table-cell>
          <table:table-cell table:number-columns-repeated="2"/>
        </table:table-row>
        <table:table-row table:style-name="ro1">
          <table:table-cell office:value-type="float" office:value="462433496" calcext:value-type="float">
            <text:p>462433496</text:p>
          </table:table-cell>
          <table:table-cell office:value-type="float" office:value="653399578.762936" calcext:value-type="float">
            <text:p>653399578.762936</text:p>
          </table:table-cell>
          <table:table-cell/>
          <table:table-cell office:value-type="string" calcext:value-type="string">
            <text:p>2020-09-14T23:52:58.7629359Z</text:p>
          </table:table-cell>
          <table:table-cell office:value-type="string" calcext:value-type="string">
            <text:p>2020-09-14-23:54:07.9469360</text:p>
          </table:table-cell>
          <table:table-cell table:number-columns-repeated="2"/>
        </table:table-row>
        <table:table-row table:style-name="ro1">
          <table:table-cell office:value-type="float" office:value="462606270" calcext:value-type="float">
            <text:p>462606270</text:p>
          </table:table-cell>
          <table:table-cell office:value-type="float" office:value="653572352.767216" calcext:value-type="float">
            <text:p>653572352.767216</text:p>
          </table:table-cell>
          <table:table-cell/>
          <table:table-cell office:value-type="string" calcext:value-type="string">
            <text:p>2020-09-16T23:52:32.7672159Z</text:p>
          </table:table-cell>
          <table:table-cell office:value-type="string" calcext:value-type="string">
            <text:p>2020-09-16-23:53:41.9512159</text:p>
          </table:table-cell>
          <table:table-cell table:number-columns-repeated="2"/>
        </table:table-row>
        <table:table-row table:style-name="ro1">
          <table:table-cell office:value-type="float" office:value="462750255" calcext:value-type="float">
            <text:p>462750255</text:p>
          </table:table-cell>
          <table:table-cell office:value-type="float" office:value="653716337.768882" calcext:value-type="float">
            <text:p>653716337.768882</text:p>
          </table:table-cell>
          <table:table-cell/>
          <table:table-cell office:value-type="string" calcext:value-type="string">
            <text:p>2020-09-18T15:52:17.7688820Z</text:p>
          </table:table-cell>
          <table:table-cell office:value-type="string" calcext:value-type="string">
            <text:p>2020-09-18-15:53:26.9528820</text:p>
          </table:table-cell>
          <table:table-cell table:number-columns-repeated="2"/>
        </table:table-row>
        <table:table-row table:style-name="ro1">
          <table:table-cell office:value-type="float" office:value="462836638" calcext:value-type="float">
            <text:p>462836638</text:p>
          </table:table-cell>
          <table:table-cell office:value-type="float" office:value="653802720.769871" calcext:value-type="float">
            <text:p>653802720.769871</text:p>
          </table:table-cell>
          <table:table-cell/>
          <table:table-cell office:value-type="string" calcext:value-type="string">
            <text:p>2020-09-19T15:52:00.7698709Z</text:p>
          </table:table-cell>
          <table:table-cell office:value-type="string" calcext:value-type="string">
            <text:p>2020-09-19-15:53:09.9538710</text:p>
          </table:table-cell>
          <table:table-cell table:number-columns-repeated="2"/>
        </table:table-row>
        <table:table-row table:style-name="ro1">
          <table:table-cell office:value-type="float" office:value="463013019" calcext:value-type="float">
            <text:p>463013019</text:p>
          </table:table-cell>
          <table:table-cell office:value-type="float" office:value="653979101.771853" calcext:value-type="float">
            <text:p>653979101.771853</text:p>
          </table:table-cell>
          <table:table-cell/>
          <table:table-cell office:value-type="string" calcext:value-type="string">
            <text:p>2020-09-21T16:51:41.7718529Z</text:p>
          </table:table-cell>
          <table:table-cell office:value-type="string" calcext:value-type="string">
            <text:p>2020-09-21-16:52:50.9558529</text:p>
          </table:table-cell>
          <table:table-cell table:number-columns-repeated="2"/>
        </table:table-row>
        <table:table-row table:style-name="ro1">
          <table:table-cell office:value-type="float" office:value="463095814" calcext:value-type="float">
            <text:p>463095814</text:p>
          </table:table-cell>
          <table:table-cell office:value-type="float" office:value="654061896.772823" calcext:value-type="float">
            <text:p>654061896.772823</text:p>
          </table:table-cell>
          <table:table-cell/>
          <table:table-cell office:value-type="string" calcext:value-type="string">
            <text:p>2020-09-22T15:51:36.7728229Z</text:p>
          </table:table-cell>
          <table:table-cell office:value-type="string" calcext:value-type="string">
            <text:p>2020-09-22-15:52:45.9568229</text:p>
          </table:table-cell>
          <table:table-cell table:number-columns-repeated="2"/>
        </table:table-row>
        <table:table-row table:style-name="ro1">
          <table:table-cell office:value-type="float" office:value="463354981" calcext:value-type="float">
            <text:p>463354981</text:p>
          </table:table-cell>
          <table:table-cell office:value-type="float" office:value="654321063.775783" calcext:value-type="float">
            <text:p>654321063.775783</text:p>
          </table:table-cell>
          <table:table-cell/>
          <table:table-cell office:value-type="string" calcext:value-type="string">
            <text:p>2020-09-25T15:51:03.7757829Z</text:p>
          </table:table-cell>
          <table:table-cell office:value-type="string" calcext:value-type="string">
            <text:p>2020-09-25-15:52:12.9597829</text:p>
          </table:table-cell>
          <table:table-cell table:number-columns-repeated="2"/>
        </table:table-row>
        <table:table-row table:style-name="ro1">
          <table:table-cell office:value-type="float" office:value="463437753" calcext:value-type="float">
            <text:p>463437753</text:p>
          </table:table-cell>
          <table:table-cell office:value-type="float" office:value="654403835.776732" calcext:value-type="float">
            <text:p>654403835.776732</text:p>
          </table:table-cell>
          <table:table-cell/>
          <table:table-cell office:value-type="string" calcext:value-type="string">
            <text:p>2020-09-26T14:50:35.7767319Z</text:p>
          </table:table-cell>
          <table:table-cell office:value-type="string" calcext:value-type="string">
            <text:p>2020-09-26-14:51:44.9607319</text:p>
          </table:table-cell>
          <table:table-cell table:number-columns-repeated="2"/>
        </table:table-row>
        <table:table-row table:style-name="ro1">
          <table:table-cell office:value-type="float" office:value="463527758" calcext:value-type="float">
            <text:p>463527758</text:p>
          </table:table-cell>
          <table:table-cell office:value-type="float" office:value="654493840.777758" calcext:value-type="float">
            <text:p>654493840.777758</text:p>
          </table:table-cell>
          <table:table-cell/>
          <table:table-cell office:value-type="string" calcext:value-type="string">
            <text:p>2020-09-27T15:50:40.7777580Z</text:p>
          </table:table-cell>
          <table:table-cell office:value-type="string" calcext:value-type="string">
            <text:p>2020-09-27-15:51:49.9617580</text:p>
          </table:table-cell>
          <table:table-cell table:number-columns-repeated="2"/>
        </table:table-row>
        <table:table-row table:style-name="ro1">
          <table:table-cell office:value-type="float" office:value="463552931" calcext:value-type="float">
            <text:p>463552931</text:p>
          </table:table-cell>
          <table:table-cell office:value-type="float" office:value="654519013.778033" calcext:value-type="float">
            <text:p>654519013.778033</text:p>
          </table:table-cell>
          <table:table-cell/>
          <table:table-cell office:value-type="string" calcext:value-type="string">
            <text:p>2020-09-27T22:50:13.7780330Z</text:p>
          </table:table-cell>
          <table:table-cell office:value-type="string" calcext:value-type="string">
            <text:p>2020-09-27-22:51:22.9620330</text:p>
          </table:table-cell>
          <table:table-cell table:number-columns-repeated="2"/>
        </table:table-row>
        <table:table-row table:style-name="ro1">
          <table:table-cell office:value-type="float" office:value="463704108" calcext:value-type="float">
            <text:p>463704108</text:p>
          </table:table-cell>
          <table:table-cell office:value-type="float" office:value="654670190.779741" calcext:value-type="float">
            <text:p>654670190.779741</text:p>
          </table:table-cell>
          <table:table-cell/>
          <table:table-cell office:value-type="string" calcext:value-type="string">
            <text:p>2020-09-29T16:49:50.7797409Z</text:p>
          </table:table-cell>
          <table:table-cell office:value-type="string" calcext:value-type="string">
            <text:p>2020-09-29-16:50:59.9637409</text:p>
          </table:table-cell>
          <table:table-cell table:number-columns-repeated="2"/>
        </table:table-row>
        <table:table-row table:style-name="ro1">
          <table:table-cell office:value-type="float" office:value="463718478" calcext:value-type="float">
            <text:p>463718478</text:p>
          </table:table-cell>
          <table:table-cell office:value-type="float" office:value="654684560.779926" calcext:value-type="float">
            <text:p>654684560.779926</text:p>
          </table:table-cell>
          <table:table-cell/>
          <table:table-cell office:value-type="string" calcext:value-type="string">
            <text:p>2020-09-29T20:49:20.7799259Z</text:p>
          </table:table-cell>
          <table:table-cell office:value-type="string" calcext:value-type="string">
            <text:p>2020-09-29-20:50:29.9639259</text:p>
          </table:table-cell>
          <table:table-cell table:number-columns-repeated="2"/>
        </table:table-row>
        <table:table-row table:style-name="ro1">
          <table:table-cell office:value-type="float" office:value="463878372" calcext:value-type="float">
            <text:p>463878372</text:p>
          </table:table-cell>
          <table:table-cell office:value-type="float" office:value="654844454.781726" calcext:value-type="float">
            <text:p>654844454.781726</text:p>
          </table:table-cell>
          <table:table-cell/>
          <table:table-cell office:value-type="string" calcext:value-type="string">
            <text:p>2020-10-01T17:14:14.7817260Z</text:p>
          </table:table-cell>
          <table:table-cell office:value-type="string" calcext:value-type="string">
            <text:p>2020-10-01-17:15:23.9657260</text:p>
          </table:table-cell>
          <table:table-cell table:number-columns-repeated="2"/>
        </table:table-row>
        <table:table-row table:style-name="ro1">
          <table:table-cell office:value-type="float" office:value="463964163" calcext:value-type="float">
            <text:p>463964163</text:p>
          </table:table-cell>
          <table:table-cell office:value-type="float" office:value="654930245.782686" calcext:value-type="float">
            <text:p>654930245.782686</text:p>
          </table:table-cell>
          <table:table-cell/>
          <table:table-cell office:value-type="string" calcext:value-type="string">
            <text:p>2020-10-02T17:04:05.7826859Z</text:p>
          </table:table-cell>
          <table:table-cell office:value-type="string" calcext:value-type="string">
            <text:p>2020-10-02-17:05:14.9666860</text:p>
          </table:table-cell>
          <table:table-cell table:number-columns-repeated="2"/>
        </table:table-row>
        <table:table-row table:style-name="ro1">
          <table:table-cell office:value-type="float" office:value="464049656" calcext:value-type="float">
            <text:p>464049656</text:p>
          </table:table-cell>
          <table:table-cell office:value-type="float" office:value="655015738.783656" calcext:value-type="float">
            <text:p>655015738.783656</text:p>
          </table:table-cell>
          <table:table-cell/>
          <table:table-cell office:value-type="string" calcext:value-type="string">
            <text:p>2020-10-03T16:48:58.7836560Z</text:p>
          </table:table-cell>
          <table:table-cell office:value-type="string" calcext:value-type="string">
            <text:p>2020-10-03-16:50:07.9676560</text:p>
          </table:table-cell>
          <table:table-cell table:number-columns-repeated="2"/>
        </table:table-row>
        <table:table-row table:style-name="ro1">
          <table:table-cell office:value-type="float" office:value="464136660" calcext:value-type="float">
            <text:p>464136660</text:p>
          </table:table-cell>
          <table:table-cell office:value-type="float" office:value="655102742.784649" calcext:value-type="float">
            <text:p>655102742.784649</text:p>
          </table:table-cell>
          <table:table-cell/>
          <table:table-cell office:value-type="string" calcext:value-type="string">
            <text:p>2020-10-04T16:59:02.7846490Z</text:p>
          </table:table-cell>
          <table:table-cell office:value-type="string" calcext:value-type="string">
            <text:p>2020-10-04-17:00:11.9686490</text:p>
          </table:table-cell>
          <table:table-cell table:number-columns-repeated="2"/>
        </table:table-row>
        <table:table-row table:style-name="ro1">
          <table:table-cell office:value-type="float" office:value="464222632" calcext:value-type="float">
            <text:p>464222632</text:p>
          </table:table-cell>
          <table:table-cell office:value-type="float" office:value="655188714.785638" calcext:value-type="float">
            <text:p>655188714.785638</text:p>
          </table:table-cell>
          <table:table-cell/>
          <table:table-cell office:value-type="string" calcext:value-type="string">
            <text:p>2020-10-05T16:51:54.7856379Z</text:p>
          </table:table-cell>
          <table:table-cell office:value-type="string" calcext:value-type="string">
            <text:p>2020-10-05-16:53:03.9696379</text:p>
          </table:table-cell>
          <table:table-cell table:number-columns-repeated="2"/>
        </table:table-row>
        <table:table-row table:style-name="ro1">
          <table:table-cell office:value-type="float" office:value="464301639" calcext:value-type="float">
            <text:p>464301639</text:p>
          </table:table-cell>
          <table:table-cell office:value-type="float" office:value="655267721.786555" calcext:value-type="float">
            <text:p>655267721.786555</text:p>
          </table:table-cell>
          <table:table-cell/>
          <table:table-cell office:value-type="string" calcext:value-type="string">
            <text:p>2020-10-06T14:48:41.7865549Z</text:p>
          </table:table-cell>
          <table:table-cell office:value-type="string" calcext:value-type="string">
            <text:p>2020-10-06-14:49:50.9705549</text:p>
          </table:table-cell>
          <table:table-cell table:number-columns-repeated="2"/>
        </table:table-row>
        <table:table-row table:style-name="ro1">
          <table:table-cell office:value-type="float" office:value="464395208" calcext:value-type="float">
            <text:p>464395208</text:p>
          </table:table-cell>
          <table:table-cell office:value-type="float" office:value="655361290.787579" calcext:value-type="float">
            <text:p>655361290.787579</text:p>
          </table:table-cell>
          <table:table-cell/>
          <table:table-cell office:value-type="string" calcext:value-type="string">
            <text:p>2020-10-07T16:48:10.7875789Z</text:p>
          </table:table-cell>
          <table:table-cell office:value-type="string" calcext:value-type="string">
            <text:p>2020-10-07-16:49:19.9715789</text:p>
          </table:table-cell>
          <table:table-cell table:number-columns-repeated="2"/>
        </table:table-row>
        <table:table-row table:style-name="ro1">
          <table:table-cell office:value-type="float" office:value="464483170" calcext:value-type="float">
            <text:p>464483170</text:p>
          </table:table-cell>
          <table:table-cell office:value-type="float" office:value="655449252.788584" calcext:value-type="float">
            <text:p>655449252.788584</text:p>
          </table:table-cell>
          <table:table-cell/>
          <table:table-cell office:value-type="string" calcext:value-type="string">
            <text:p>2020-10-08T17:14:12.7885839Z</text:p>
          </table:table-cell>
          <table:table-cell office:value-type="string" calcext:value-type="string">
            <text:p>2020-10-08-17:15:21.9725840</text:p>
          </table:table-cell>
          <table:table-cell table:number-columns-repeated="2"/>
        </table:table-row>
        <table:table-row table:style-name="ro1">
          <table:table-cell office:value-type="float" office:value="464560806" calcext:value-type="float">
            <text:p>464560806</text:p>
          </table:table-cell>
          <table:table-cell office:value-type="float" office:value="655526888.789495" calcext:value-type="float">
            <text:p>655526888.789495</text:p>
          </table:table-cell>
          <table:table-cell/>
          <table:table-cell office:value-type="string" calcext:value-type="string">
            <text:p>2020-10-09T14:48:08.7894949Z</text:p>
          </table:table-cell>
          <table:table-cell office:value-type="string" calcext:value-type="string">
            <text:p>2020-10-09-14:49:17.9734950</text:p>
          </table:table-cell>
          <table:table-cell table:number-columns-repeated="2"/>
        </table:table-row>
        <table:table-row table:style-name="ro1">
          <table:table-cell office:value-type="float" office:value="464654364" calcext:value-type="float">
            <text:p>464654364</text:p>
          </table:table-cell>
          <table:table-cell office:value-type="float" office:value="655620446.790521" calcext:value-type="float">
            <text:p>655620446.790521</text:p>
          </table:table-cell>
          <table:table-cell/>
          <table:table-cell office:value-type="string" calcext:value-type="string">
            <text:p>2020-10-10T16:47:26.7905210Z</text:p>
          </table:table-cell>
          <table:table-cell office:value-type="string" calcext:value-type="string">
            <text:p>2020-10-10-16:48:35.9745210</text:p>
          </table:table-cell>
          <table:table-cell table:number-columns-repeated="2"/>
        </table:table-row>
        <table:table-row table:style-name="ro1">
          <table:table-cell office:value-type="float" office:value="464733572" calcext:value-type="float">
            <text:p>464733572</text:p>
          </table:table-cell>
          <table:table-cell office:value-type="float" office:value="655699654.791447" calcext:value-type="float">
            <text:p>655699654.791447</text:p>
          </table:table-cell>
          <table:table-cell/>
          <table:table-cell office:value-type="string" calcext:value-type="string">
            <text:p>2020-10-11T14:47:34.7914470Z</text:p>
          </table:table-cell>
          <table:table-cell office:value-type="string" calcext:value-type="string">
            <text:p>2020-10-11-14:48:43.9754470</text:p>
          </table:table-cell>
          <table:table-cell table:number-columns-repeated="2"/>
        </table:table-row>
        <table:table-row table:style-name="ro1">
          <table:table-cell office:value-type="float" office:value="464819961" calcext:value-type="float">
            <text:p>464819961</text:p>
          </table:table-cell>
          <table:table-cell office:value-type="float" office:value="655786043.792428" calcext:value-type="float">
            <text:p>655786043.792428</text:p>
          </table:table-cell>
          <table:table-cell/>
          <table:table-cell office:value-type="string" calcext:value-type="string">
            <text:p>2020-10-12T14:47:23.7924280Z</text:p>
          </table:table-cell>
          <table:table-cell office:value-type="string" calcext:value-type="string">
            <text:p>2020-10-12-14:48:32.9764280</text:p>
          </table:table-cell>
          <table:table-cell table:number-columns-repeated="2"/>
        </table:table-row>
        <table:table-row table:style-name="ro1">
          <table:table-cell office:value-type="float" office:value="464906351" calcext:value-type="float">
            <text:p>464906351</text:p>
          </table:table-cell>
          <table:table-cell office:value-type="float" office:value="655872433.793389" calcext:value-type="float">
            <text:p>655872433.793389</text:p>
          </table:table-cell>
          <table:table-cell/>
          <table:table-cell office:value-type="string" calcext:value-type="string">
            <text:p>2020-10-13T14:47:13.7933889Z</text:p>
          </table:table-cell>
          <table:table-cell office:value-type="string" calcext:value-type="string">
            <text:p>2020-10-13-14:48:22.9773889</text:p>
          </table:table-cell>
          <table:table-cell table:number-columns-repeated="2"/>
        </table:table-row>
        <table:table-row table:style-name="ro1">
          <table:table-cell office:value-type="float" office:value="465001434" calcext:value-type="float">
            <text:p>465001434</text:p>
          </table:table-cell>
          <table:table-cell office:value-type="float" office:value="655967516.79444" calcext:value-type="float">
            <text:p>655967516.79444</text:p>
          </table:table-cell>
          <table:table-cell/>
          <table:table-cell office:value-type="string" calcext:value-type="string">
            <text:p>2020-10-14T17:11:56.7944400Z</text:p>
          </table:table-cell>
          <table:table-cell office:value-type="string" calcext:value-type="string">
            <text:p>2020-10-14-17:13:05.9784400</text:p>
          </table:table-cell>
          <table:table-cell table:number-columns-repeated="2"/>
        </table:table-row>
        <table:table-row table:style-name="ro1">
          <table:table-cell office:value-type="float" office:value="465010691" calcext:value-type="float">
            <text:p>465010691</text:p>
          </table:table-cell>
          <table:table-cell office:value-type="float" office:value="655976773.794558" calcext:value-type="float">
            <text:p>655976773.794558</text:p>
          </table:table-cell>
          <table:table-cell/>
          <table:table-cell office:value-type="string" calcext:value-type="string">
            <text:p>2020-10-14T19:46:13.7945579Z</text:p>
          </table:table-cell>
          <table:table-cell office:value-type="string" calcext:value-type="string">
            <text:p>2020-10-14-19:47:22.9785579</text:p>
          </table:table-cell>
          <table:table-cell table:number-columns-repeated="2"/>
        </table:table-row>
        <table:table-row table:style-name="ro1">
          <table:table-cell office:value-type="float" office:value="465248288" calcext:value-type="float">
            <text:p>465248288</text:p>
          </table:table-cell>
          <table:table-cell office:value-type="float" office:value="656214370.797242" calcext:value-type="float">
            <text:p>656214370.797242</text:p>
          </table:table-cell>
          <table:table-cell/>
          <table:table-cell office:value-type="string" calcext:value-type="string">
            <text:p>2020-10-17T13:46:10.7972419Z</text:p>
          </table:table-cell>
          <table:table-cell office:value-type="string" calcext:value-type="string">
            <text:p>2020-10-17-13:47:19.9812419</text:p>
          </table:table-cell>
          <table:table-cell table:number-columns-repeated="2"/>
        </table:table-row>
        <table:table-row table:style-name="ro1">
          <table:table-cell office:value-type="float" office:value="465335604" calcext:value-type="float">
            <text:p>465335604</text:p>
          </table:table-cell>
          <table:table-cell office:value-type="float" office:value="656301686.798201" calcext:value-type="float">
            <text:p>656301686.798201</text:p>
          </table:table-cell>
          <table:table-cell/>
          <table:table-cell office:value-type="string" calcext:value-type="string">
            <text:p>2020-10-18T14:01:26.7982009Z</text:p>
          </table:table-cell>
          <table:table-cell office:value-type="string" calcext:value-type="string">
            <text:p>2020-10-18-14:02:35.9822009</text:p>
          </table:table-cell>
          <table:table-cell table:number-columns-repeated="2"/>
        </table:table-row>
        <table:table-row table:style-name="ro1">
          <table:table-cell office:value-type="float" office:value="465429152" calcext:value-type="float">
            <text:p>465429152</text:p>
          </table:table-cell>
          <table:table-cell office:value-type="float" office:value="656395234.799226" calcext:value-type="float">
            <text:p>656395234.799226</text:p>
          </table:table-cell>
          <table:table-cell/>
          <table:table-cell office:value-type="string" calcext:value-type="string">
            <text:p>2020-10-19T16:00:34.7992259Z</text:p>
          </table:table-cell>
          <table:table-cell office:value-type="string" calcext:value-type="string">
            <text:p>2020-10-19-16:01:43.9832259</text:p>
          </table:table-cell>
          <table:table-cell table:number-columns-repeated="2"/>
        </table:table-row>
        <table:table-row table:style-name="ro1">
          <table:table-cell office:value-type="float" office:value="465503916" calcext:value-type="float">
            <text:p>465503916</text:p>
          </table:table-cell>
          <table:table-cell office:value-type="float" office:value="656469998.800124" calcext:value-type="float">
            <text:p>656469998.800124</text:p>
          </table:table-cell>
          <table:table-cell/>
          <table:table-cell office:value-type="string" calcext:value-type="string">
            <text:p>2020-10-20T12:46:38.8001239Z</text:p>
          </table:table-cell>
          <table:table-cell office:value-type="string" calcext:value-type="string">
            <text:p>2020-10-20-12:47:47.9841239</text:p>
          </table:table-cell>
          <table:table-cell table:number-columns-repeated="2"/>
        </table:table-row>
        <table:table-row table:style-name="ro1">
          <table:table-cell office:value-type="float" office:value="465593912" calcext:value-type="float">
            <text:p>465593912</text:p>
          </table:table-cell>
          <table:table-cell office:value-type="float" office:value="656559994.801142" calcext:value-type="float">
            <text:p>656559994.801142</text:p>
          </table:table-cell>
          <table:table-cell/>
          <table:table-cell office:value-type="string" calcext:value-type="string">
            <text:p>2020-10-21T13:46:34.8011419Z</text:p>
          </table:table-cell>
          <table:table-cell office:value-type="string" calcext:value-type="string">
            <text:p>2020-10-21-13:47:43.9851419</text:p>
          </table:table-cell>
          <table:table-cell table:number-columns-repeated="2"/>
        </table:table-row>
        <table:table-row table:style-name="ro1">
          <table:table-cell office:value-type="float" office:value="465691096" calcext:value-type="float">
            <text:p>465691096</text:p>
          </table:table-cell>
          <table:table-cell office:value-type="float" office:value="656657178.802205" calcext:value-type="float">
            <text:p>656657178.802205</text:p>
          </table:table-cell>
          <table:table-cell/>
          <table:table-cell office:value-type="string" calcext:value-type="string">
            <text:p>2020-10-22T16:46:18.8022049Z</text:p>
          </table:table-cell>
          <table:table-cell office:value-type="string" calcext:value-type="string">
            <text:p>2020-10-22-16:47:27.9862049</text:p>
          </table:table-cell>
          <table:table-cell table:number-columns-repeated="2"/>
        </table:table-row>
        <table:table-row table:style-name="ro1">
          <table:table-cell office:value-type="float" office:value="465777483" calcext:value-type="float">
            <text:p>465777483</text:p>
          </table:table-cell>
          <table:table-cell office:value-type="float" office:value="656743565.803179" calcext:value-type="float">
            <text:p>656743565.803179</text:p>
          </table:table-cell>
          <table:table-cell/>
          <table:table-cell office:value-type="string" calcext:value-type="string">
            <text:p>2020-10-23T16:46:05.8031790Z</text:p>
          </table:table-cell>
          <table:table-cell office:value-type="string" calcext:value-type="string">
            <text:p>2020-10-23-16:47:14.9871790</text:p>
          </table:table-cell>
          <table:table-cell table:number-columns-repeated="2"/>
        </table:table-row>
        <table:table-row table:style-name="ro1">
          <table:table-cell office:value-type="float" office:value="465849475" calcext:value-type="float">
            <text:p>465849475</text:p>
          </table:table-cell>
          <table:table-cell office:value-type="float" office:value="656815557.804011" calcext:value-type="float">
            <text:p>656815557.804011</text:p>
          </table:table-cell>
          <table:table-cell/>
          <table:table-cell office:value-type="string" calcext:value-type="string">
            <text:p>2020-10-24T12:45:57.8040109Z</text:p>
          </table:table-cell>
          <table:table-cell office:value-type="string" calcext:value-type="string">
            <text:p>2020-10-24-12:47:06.9880110</text:p>
          </table:table-cell>
          <table:table-cell table:number-columns-repeated="2"/>
        </table:table-row>
        <table:table-row table:style-name="ro1">
          <table:table-cell office:value-type="float" office:value="465950178" calcext:value-type="float">
            <text:p>465950178</text:p>
          </table:table-cell>
          <table:table-cell office:value-type="float" office:value="656916260.805124" calcext:value-type="float">
            <text:p>656916260.805124</text:p>
          </table:table-cell>
          <table:table-cell/>
          <table:table-cell office:value-type="string" calcext:value-type="string">
            <text:p>2020-10-25T16:44:20.8051239Z</text:p>
          </table:table-cell>
          <table:table-cell office:value-type="string" calcext:value-type="string">
            <text:p>2020-10-25-16:45:29.9891239</text:p>
          </table:table-cell>
          <table:table-cell table:number-columns-repeated="2"/>
        </table:table-row>
        <table:table-row table:style-name="ro1">
          <table:table-cell office:value-type="float" office:value="466036566" calcext:value-type="float">
            <text:p>466036566</text:p>
          </table:table-cell>
          <table:table-cell office:value-type="float" office:value="657002648.806085" calcext:value-type="float">
            <text:p>657002648.806085</text:p>
          </table:table-cell>
          <table:table-cell/>
          <table:table-cell office:value-type="string" calcext:value-type="string">
            <text:p>2020-10-26T16:44:08.8060849Z</text:p>
          </table:table-cell>
          <table:table-cell office:value-type="string" calcext:value-type="string">
            <text:p>2020-10-26-16:45:17.9900850</text:p>
          </table:table-cell>
          <table:table-cell table:number-columns-repeated="2"/>
        </table:table-row>
        <table:table-row table:style-name="ro1">
          <table:table-cell office:value-type="float" office:value="466122955" calcext:value-type="float">
            <text:p>466122955</text:p>
          </table:table-cell>
          <table:table-cell office:value-type="float" office:value="657089037.807072" calcext:value-type="float">
            <text:p>657089037.807072</text:p>
          </table:table-cell>
          <table:table-cell/>
          <table:table-cell office:value-type="string" calcext:value-type="string">
            <text:p>2020-10-27T16:43:57.8070720Z</text:p>
          </table:table-cell>
          <table:table-cell office:value-type="string" calcext:value-type="string">
            <text:p>2020-10-27-16:45:06.9910720</text:p>
          </table:table-cell>
          <table:table-cell table:number-columns-repeated="2"/>
        </table:table-row>
        <table:table-row table:style-name="ro1">
          <table:table-cell office:value-type="float" office:value="466137367" calcext:value-type="float">
            <text:p>466137367</text:p>
          </table:table-cell>
          <table:table-cell office:value-type="float" office:value="657103449.80724" calcext:value-type="float">
            <text:p>657103449.80724</text:p>
          </table:table-cell>
          <table:table-cell/>
          <table:table-cell office:value-type="string" calcext:value-type="string">
            <text:p>2020-10-27T20:44:09.8072400Z</text:p>
          </table:table-cell>
          <table:table-cell office:value-type="string" calcext:value-type="string">
            <text:p>2020-10-27-20:45:18.9912400</text:p>
          </table:table-cell>
          <table:table-cell table:number-columns-repeated="2"/>
        </table:table-row>
        <table:table-row table:style-name="ro1">
          <table:table-cell office:value-type="float" office:value="466382118" calcext:value-type="float">
            <text:p>466382118</text:p>
          </table:table-cell>
          <table:table-cell office:value-type="float" office:value="657348200.80996" calcext:value-type="float">
            <text:p>657348200.80996</text:p>
          </table:table-cell>
          <table:table-cell/>
          <table:table-cell office:value-type="string" calcext:value-type="string">
            <text:p>2020-10-30T16:43:20.8099600Z</text:p>
          </table:table-cell>
          <table:table-cell office:value-type="string" calcext:value-type="string">
            <text:p>2020-10-30-16:44:29.9939600</text:p>
          </table:table-cell>
          <table:table-cell table:number-columns-repeated="2"/>
        </table:table-row>
        <table:table-row table:style-name="ro1">
          <table:table-cell office:value-type="float" office:value="466468503" calcext:value-type="float">
            <text:p>466468503</text:p>
          </table:table-cell>
          <table:table-cell office:value-type="float" office:value="657434585.810941" calcext:value-type="float">
            <text:p>657434585.810941</text:p>
          </table:table-cell>
          <table:table-cell/>
          <table:table-cell office:value-type="string" calcext:value-type="string">
            <text:p>2020-10-31T16:43:05.8109409Z</text:p>
          </table:table-cell>
          <table:table-cell office:value-type="string" calcext:value-type="string">
            <text:p>2020-10-31-16:44:14.9949409</text:p>
          </table:table-cell>
          <table:table-cell table:number-columns-repeated="2"/>
        </table:table-row>
        <table:table-row table:style-name="ro1">
          <table:table-cell office:value-type="float" office:value="466556338" calcext:value-type="float">
            <text:p>466556338</text:p>
          </table:table-cell>
          <table:table-cell office:value-type="float" office:value="657522420.811916" calcext:value-type="float">
            <text:p>657522420.811916</text:p>
          </table:table-cell>
          <table:table-cell/>
          <table:table-cell office:value-type="string" calcext:value-type="string">
            <text:p>2020-11-01T17:07:00.8119159Z</text:p>
          </table:table-cell>
          <table:table-cell office:value-type="string" calcext:value-type="string">
            <text:p>2020-11-01-17:08:09.9959160</text:p>
          </table:table-cell>
          <table:table-cell table:number-columns-repeated="2"/>
        </table:table-row>
        <table:table-row table:style-name="ro1">
          <table:table-cell office:value-type="float" office:value="466626907" calcext:value-type="float">
            <text:p>466626907</text:p>
          </table:table-cell>
          <table:table-cell office:value-type="float" office:value="657592989.812722" calcext:value-type="float">
            <text:p>657592989.812722</text:p>
          </table:table-cell>
          <table:table-cell/>
          <table:table-cell office:value-type="string" calcext:value-type="string">
            <text:p>2020-11-02T12:43:09.8127219Z</text:p>
          </table:table-cell>
          <table:table-cell office:value-type="string" calcext:value-type="string">
            <text:p>2020-11-02-12:44:18.9967219</text:p>
          </table:table-cell>
          <table:table-cell table:number-columns-repeated="2"/>
        </table:table-row>
        <table:table-row table:style-name="ro1">
          <table:table-cell office:value-type="float" office:value="466828470" calcext:value-type="float">
            <text:p>466828470</text:p>
          </table:table-cell>
          <table:table-cell office:value-type="float" office:value="657794552.814976" calcext:value-type="float">
            <text:p>657794552.814976</text:p>
          </table:table-cell>
          <table:table-cell/>
          <table:table-cell office:value-type="string" calcext:value-type="string">
            <text:p>2020-11-04T20:42:32.8149759Z</text:p>
          </table:table-cell>
          <table:table-cell office:value-type="string" calcext:value-type="string">
            <text:p>2020-11-04-20:43:41.9989759</text:p>
          </table:table-cell>
          <table:table-cell table:number-columns-repeated="2"/>
        </table:table-row>
        <table:table-row table:style-name="ro1">
          <table:table-cell office:value-type="float" office:value="466986833" calcext:value-type="float">
            <text:p>466986833</text:p>
          </table:table-cell>
          <table:table-cell office:value-type="float" office:value="657952915.816727" calcext:value-type="float">
            <text:p>657952915.816727</text:p>
          </table:table-cell>
          <table:table-cell/>
          <table:table-cell office:value-type="string" calcext:value-type="string">
            <text:p>2020-11-06T16:41:55.8167270Z</text:p>
          </table:table-cell>
          <table:table-cell office:value-type="string" calcext:value-type="string">
            <text:p>2020-11-06-16:43:05.0007270</text:p>
          </table:table-cell>
          <table:table-cell table:number-columns-repeated="2"/>
        </table:table-row>
        <table:table-row table:style-name="ro1">
          <table:table-cell office:value-type="float" office:value="466994021" calcext:value-type="float">
            <text:p>466994021</text:p>
          </table:table-cell>
          <table:table-cell office:value-type="float" office:value="657960103.816819" calcext:value-type="float">
            <text:p>657960103.816819</text:p>
          </table:table-cell>
          <table:table-cell/>
          <table:table-cell office:value-type="string" calcext:value-type="string">
            <text:p>2020-11-06T18:41:43.8168189Z</text:p>
          </table:table-cell>
          <table:table-cell office:value-type="string" calcext:value-type="string">
            <text:p>2020-11-06-18:42:53.0008189</text:p>
          </table:table-cell>
          <table:table-cell table:number-columns-repeated="2"/>
        </table:table-row>
        <table:table-row table:style-name="ro1">
          <table:table-cell office:value-type="float" office:value="467246000" calcext:value-type="float">
            <text:p>467246000</text:p>
          </table:table-cell>
          <table:table-cell office:value-type="float" office:value="658212082.819611" calcext:value-type="float">
            <text:p>658212082.819611</text:p>
          </table:table-cell>
          <table:table-cell/>
          <table:table-cell office:value-type="string" calcext:value-type="string">
            <text:p>2020-11-09T16:41:22.8196109Z</text:p>
          </table:table-cell>
          <table:table-cell office:value-type="string" calcext:value-type="string">
            <text:p>2020-11-09-16:42:32.0036109</text:p>
          </table:table-cell>
          <table:table-cell table:number-columns-repeated="2"/>
        </table:table-row>
        <table:table-row table:style-name="ro1">
          <table:table-cell office:value-type="float" office:value="467318017" calcext:value-type="float">
            <text:p>467318017</text:p>
          </table:table-cell>
          <table:table-cell office:value-type="float" office:value="658284099.820442" calcext:value-type="float">
            <text:p>658284099.820442</text:p>
          </table:table-cell>
          <table:table-cell/>
          <table:table-cell office:value-type="string" calcext:value-type="string">
            <text:p>2020-11-10T12:41:39.8204419Z</text:p>
          </table:table-cell>
          <table:table-cell office:value-type="string" calcext:value-type="string">
            <text:p>2020-11-10-12:42:49.0044419</text:p>
          </table:table-cell>
          <table:table-cell table:number-columns-repeated="2"/>
        </table:table-row>
        <table:table-row table:style-name="ro1">
          <table:table-cell office:value-type="float" office:value="467346803" calcext:value-type="float">
            <text:p>467346803</text:p>
          </table:table-cell>
          <table:table-cell office:value-type="float" office:value="658312885.820765" calcext:value-type="float">
            <text:p>658312885.820765</text:p>
          </table:table-cell>
          <table:table-cell/>
          <table:table-cell office:value-type="string" calcext:value-type="string">
            <text:p>2020-11-10T20:41:25.8207650Z</text:p>
          </table:table-cell>
          <table:table-cell office:value-type="string" calcext:value-type="string">
            <text:p>2020-11-10-20:42:35.0047650</text:p>
          </table:table-cell>
          <table:table-cell table:number-columns-repeated="2"/>
        </table:table-row>
        <table:table-row table:style-name="ro1">
          <table:table-cell office:value-type="float" office:value="467577181" calcext:value-type="float">
            <text:p>467577181</text:p>
          </table:table-cell>
          <table:table-cell office:value-type="float" office:value="658543263.823327" calcext:value-type="float">
            <text:p>658543263.823327</text:p>
          </table:table-cell>
          <table:table-cell/>
          <table:table-cell office:value-type="string" calcext:value-type="string">
            <text:p>2020-11-13T12:41:03.8233269Z</text:p>
          </table:table-cell>
          <table:table-cell office:value-type="string" calcext:value-type="string">
            <text:p>2020-11-13-12:42:13.0073269</text:p>
          </table:table-cell>
          <table:table-cell table:number-columns-repeated="2"/>
        </table:table-row>
        <table:table-row table:style-name="ro1">
          <table:table-cell office:value-type="float" office:value="467677947" calcext:value-type="float">
            <text:p>467677947</text:p>
          </table:table-cell>
          <table:table-cell office:value-type="float" office:value="658644029.824427" calcext:value-type="float">
            <text:p>658644029.824427</text:p>
          </table:table-cell>
          <table:table-cell/>
          <table:table-cell office:value-type="string" calcext:value-type="string">
            <text:p>2020-11-14T16:40:29.8244270Z</text:p>
          </table:table-cell>
          <table:table-cell office:value-type="string" calcext:value-type="string">
            <text:p>2020-11-14-16:41:39.0084270</text:p>
          </table:table-cell>
          <table:table-cell table:number-columns-repeated="2"/>
        </table:table-row>
        <table:table-row table:style-name="ro1">
          <table:table-cell office:value-type="float" office:value="467764338" calcext:value-type="float">
            <text:p>467764338</text:p>
          </table:table-cell>
          <table:table-cell office:value-type="float" office:value="658730420.825392" calcext:value-type="float">
            <text:p>658730420.825392</text:p>
          </table:table-cell>
          <table:table-cell/>
          <table:table-cell office:value-type="string" calcext:value-type="string">
            <text:p>2020-11-15T16:40:20.8253920Z</text:p>
          </table:table-cell>
          <table:table-cell office:value-type="string" calcext:value-type="string">
            <text:p>2020-11-15-16:41:30.0093920</text:p>
          </table:table-cell>
          <table:table-cell table:number-columns-repeated="2"/>
        </table:table-row>
        <table:table-row table:style-name="ro1">
          <table:table-cell office:value-type="float" office:value="467843529" calcext:value-type="float">
            <text:p>467843529</text:p>
          </table:table-cell>
          <table:table-cell office:value-type="float" office:value="658809611.826253" calcext:value-type="float">
            <text:p>658809611.826253</text:p>
          </table:table-cell>
          <table:table-cell/>
          <table:table-cell office:value-type="string" calcext:value-type="string">
            <text:p>2020-11-16T14:40:11.8262529Z</text:p>
          </table:table-cell>
          <table:table-cell office:value-type="string" calcext:value-type="string">
            <text:p>2020-11-16-14:41:21.0102529</text:p>
          </table:table-cell>
          <table:table-cell table:number-columns-repeated="2"/>
        </table:table-row>
        <table:table-row table:style-name="ro1">
          <table:table-cell office:value-type="float" office:value="467937114" calcext:value-type="float">
            <text:p>467937114</text:p>
          </table:table-cell>
          <table:table-cell office:value-type="float" office:value="658903196.827311" calcext:value-type="float">
            <text:p>658903196.827311</text:p>
          </table:table-cell>
          <table:table-cell/>
          <table:table-cell office:value-type="string" calcext:value-type="string">
            <text:p>2020-11-17T16:39:56.8273110Z</text:p>
          </table:table-cell>
          <table:table-cell office:value-type="string" calcext:value-type="string">
            <text:p>2020-11-17-16:41:06.0113110</text:p>
          </table:table-cell>
          <table:table-cell table:number-columns-repeated="2"/>
        </table:table-row>
        <table:table-row table:style-name="ro1">
          <table:table-cell office:value-type="float" office:value="467947918" calcext:value-type="float">
            <text:p>467947918</text:p>
          </table:table-cell>
          <table:table-cell office:value-type="float" office:value="658914000.827447" calcext:value-type="float">
            <text:p>658914000.827447</text:p>
          </table:table-cell>
          <table:table-cell/>
          <table:table-cell office:value-type="string" calcext:value-type="string">
            <text:p>2020-11-17T19:40:00.8274469Z</text:p>
          </table:table-cell>
          <table:table-cell office:value-type="string" calcext:value-type="string">
            <text:p>2020-11-17-19:41:10.0114469</text:p>
          </table:table-cell>
          <table:table-cell table:number-columns-repeated="2"/>
        </table:table-row>
        <table:table-row table:style-name="ro1">
          <table:table-cell office:value-type="float" office:value="468196280" calcext:value-type="float">
            <text:p>468196280</text:p>
          </table:table-cell>
          <table:table-cell office:value-type="float" office:value="659162362.830182" calcext:value-type="float">
            <text:p>659162362.830182</text:p>
          </table:table-cell>
          <table:table-cell/>
          <table:table-cell office:value-type="string" calcext:value-type="string">
            <text:p>2020-11-20T16:39:22.8301819Z</text:p>
          </table:table-cell>
          <table:table-cell office:value-type="string" calcext:value-type="string">
            <text:p>2020-11-20-16:40:32.0141819</text:p>
          </table:table-cell>
          <table:table-cell table:number-columns-repeated="2"/>
        </table:table-row>
        <table:table-row table:style-name="ro1">
          <table:table-cell office:value-type="float" office:value="468282673" calcext:value-type="float">
            <text:p>468282673</text:p>
          </table:table-cell>
          <table:table-cell office:value-type="float" office:value="659248755.831136" calcext:value-type="float">
            <text:p>659248755.831136</text:p>
          </table:table-cell>
          <table:table-cell/>
          <table:table-cell office:value-type="string" calcext:value-type="string">
            <text:p>2020-11-21T16:39:15.8311359Z</text:p>
          </table:table-cell>
          <table:table-cell office:value-type="string" calcext:value-type="string">
            <text:p>2020-11-21-16:40:25.0151360</text:p>
          </table:table-cell>
          <table:table-cell table:number-columns-repeated="2"/>
        </table:table-row>
        <table:table-row table:style-name="ro1">
          <table:table-cell office:value-type="float" office:value="468369065" calcext:value-type="float">
            <text:p>468369065</text:p>
          </table:table-cell>
          <table:table-cell office:value-type="float" office:value="659335147.832103" calcext:value-type="float">
            <text:p>659335147.832103</text:p>
          </table:table-cell>
          <table:table-cell/>
          <table:table-cell office:value-type="string" calcext:value-type="string">
            <text:p>2020-11-22T16:39:07.8321030Z</text:p>
          </table:table-cell>
          <table:table-cell office:value-type="string" calcext:value-type="string">
            <text:p>2020-11-22-16:40:17.0161030</text:p>
          </table:table-cell>
          <table:table-cell table:number-columns-repeated="2"/>
        </table:table-row>
        <table:table-row table:style-name="ro1">
          <table:table-cell office:value-type="float" office:value="468455456" calcext:value-type="float">
            <text:p>468455456</text:p>
          </table:table-cell>
          <table:table-cell office:value-type="float" office:value="659421538.833057" calcext:value-type="float">
            <text:p>659421538.833057</text:p>
          </table:table-cell>
          <table:table-cell/>
          <table:table-cell office:value-type="string" calcext:value-type="string">
            <text:p>2020-11-23T16:38:58.8330569Z</text:p>
          </table:table-cell>
          <table:table-cell office:value-type="string" calcext:value-type="string">
            <text:p>2020-11-23-16:40:08.0170569</text:p>
          </table:table-cell>
          <table:table-cell table:number-columns-repeated="2"/>
        </table:table-row>
        <table:table-row table:style-name="ro1">
          <table:table-cell office:value-type="float" office:value="468523865" calcext:value-type="float">
            <text:p>468523865</text:p>
          </table:table-cell>
          <table:table-cell office:value-type="float" office:value="659489947.833816" calcext:value-type="float">
            <text:p>659489947.833816</text:p>
          </table:table-cell>
          <table:table-cell/>
          <table:table-cell office:value-type="string" calcext:value-type="string">
            <text:p>2020-11-24T11:39:07.8338159Z</text:p>
          </table:table-cell>
          <table:table-cell office:value-type="string" calcext:value-type="string">
            <text:p>2020-11-24-11:40:17.0178159</text:p>
          </table:table-cell>
          <table:table-cell table:number-columns-repeated="2"/>
        </table:table-row>
        <table:table-row table:style-name="ro1">
          <table:table-cell office:value-type="float" office:value="468714625" calcext:value-type="float">
            <text:p>468714625</text:p>
          </table:table-cell>
          <table:table-cell office:value-type="float" office:value="659680707.83592" calcext:value-type="float">
            <text:p>659680707.83592</text:p>
          </table:table-cell>
          <table:table-cell/>
          <table:table-cell office:value-type="string" calcext:value-type="string">
            <text:p>2020-11-26T16:38:27.8359199Z</text:p>
          </table:table-cell>
          <table:table-cell office:value-type="string" calcext:value-type="string">
            <text:p>2020-11-26-16:39:37.0199199</text:p>
          </table:table-cell>
          <table:table-cell table:number-columns-repeated="2"/>
        </table:table-row>
        <table:table-row table:style-name="ro1">
          <table:table-cell office:value-type="float" office:value="468801012" calcext:value-type="float">
            <text:p>468801012</text:p>
          </table:table-cell>
          <table:table-cell office:value-type="float" office:value="659767094.836889" calcext:value-type="float">
            <text:p>659767094.836889</text:p>
          </table:table-cell>
          <table:table-cell/>
          <table:table-cell office:value-type="string" calcext:value-type="string">
            <text:p>2020-11-27T16:38:14.8368890Z</text:p>
          </table:table-cell>
          <table:table-cell office:value-type="string" calcext:value-type="string">
            <text:p>2020-11-27-16:39:24.0208890</text:p>
          </table:table-cell>
          <table:table-cell table:number-columns-repeated="2"/>
        </table:table-row>
        <table:table-row table:style-name="ro1">
          <table:table-cell office:value-type="float" office:value="468808224" calcext:value-type="float">
            <text:p>468808224</text:p>
          </table:table-cell>
          <table:table-cell office:value-type="float" office:value="659774306.836976" calcext:value-type="float">
            <text:p>659774306.836976</text:p>
          </table:table-cell>
          <table:table-cell/>
          <table:table-cell office:value-type="string" calcext:value-type="string">
            <text:p>2020-11-27T18:38:26.8369759Z</text:p>
          </table:table-cell>
          <table:table-cell office:value-type="string" calcext:value-type="string">
            <text:p>2020-11-27-18:39:36.0209759</text:p>
          </table:table-cell>
          <table:table-cell table:number-columns-repeated="2"/>
        </table:table-row>
        <table:table-row table:style-name="ro1">
          <table:table-cell office:value-type="float" office:value="468973796" calcext:value-type="float">
            <text:p>468973796</text:p>
          </table:table-cell>
          <table:table-cell office:value-type="float" office:value="659939878.838793" calcext:value-type="float">
            <text:p>659939878.838793</text:p>
          </table:table-cell>
          <table:table-cell/>
          <table:table-cell office:value-type="string" calcext:value-type="string">
            <text:p>2020-11-29T16:37:58.8387930Z</text:p>
          </table:table-cell>
          <table:table-cell office:value-type="string" calcext:value-type="string">
            <text:p>2020-11-29-16:39:08.0227930</text:p>
          </table:table-cell>
          <table:table-cell table:number-columns-repeated="2"/>
        </table:table-row>
        <table:table-row table:style-name="ro1">
          <table:table-cell office:value-type="float" office:value="469139373" calcext:value-type="float">
            <text:p>469139373</text:p>
          </table:table-cell>
          <table:table-cell office:value-type="float" office:value="660105455.840601" calcext:value-type="float">
            <text:p>660105455.840601</text:p>
          </table:table-cell>
          <table:table-cell/>
          <table:table-cell office:value-type="string" calcext:value-type="string">
            <text:p>2020-12-01T14:37:35.8406009Z</text:p>
          </table:table-cell>
          <table:table-cell office:value-type="string" calcext:value-type="string">
            <text:p>2020-12-01-14:38:45.0246009</text:p>
          </table:table-cell>
          <table:table-cell table:number-columns-repeated="2"/>
        </table:table-row>
        <table:table-row table:style-name="ro1">
          <table:table-cell office:value-type="float" office:value="469232968" calcext:value-type="float">
            <text:p>469232968</text:p>
          </table:table-cell>
          <table:table-cell office:value-type="float" office:value="660199050.841662" calcext:value-type="float">
            <text:p>660199050.841662</text:p>
          </table:table-cell>
          <table:table-cell/>
          <table:table-cell office:value-type="string" calcext:value-type="string">
            <text:p>2020-12-02T16:37:30.8416619Z</text:p>
          </table:table-cell>
          <table:table-cell office:value-type="string" calcext:value-type="string">
            <text:p>2020-12-02-16:38:40.0256619</text:p>
          </table:table-cell>
          <table:table-cell table:number-columns-repeated="2"/>
        </table:table-row>
        <table:table-row table:style-name="ro1">
          <table:table-cell office:value-type="float" office:value="469286954" calcext:value-type="float">
            <text:p>469286954</text:p>
          </table:table-cell>
          <table:table-cell office:value-type="float" office:value="660253036.842236" calcext:value-type="float">
            <text:p>660253036.842236</text:p>
          </table:table-cell>
          <table:table-cell/>
          <table:table-cell office:value-type="string" calcext:value-type="string">
            <text:p>2020-12-03T07:37:16.8422360Z</text:p>
          </table:table-cell>
          <table:table-cell office:value-type="string" calcext:value-type="string">
            <text:p>2020-12-03-07:38:26.0262360</text:p>
          </table:table-cell>
          <table:table-cell table:number-columns-repeated="2"/>
        </table:table-row>
        <table:table-row table:style-name="ro1">
          <table:table-cell office:value-type="float" office:value="469376947" calcext:value-type="float">
            <text:p>469376947</text:p>
          </table:table-cell>
          <table:table-cell office:value-type="float" office:value="660343029.843236" calcext:value-type="float">
            <text:p>660343029.843236</text:p>
          </table:table-cell>
          <table:table-cell/>
          <table:table-cell office:value-type="string" calcext:value-type="string">
            <text:p>2020-12-04T08:37:09.8432359Z</text:p>
          </table:table-cell>
          <table:table-cell office:value-type="string" calcext:value-type="string">
            <text:p>2020-12-04-08:38:19.0272359</text:p>
          </table:table-cell>
          <table:table-cell table:number-columns-repeated="2"/>
        </table:table-row>
        <table:table-row table:style-name="ro1">
          <table:table-cell office:value-type="float" office:value="469470552" calcext:value-type="float">
            <text:p>469470552</text:p>
          </table:table-cell>
          <table:table-cell office:value-type="float" office:value="660436634.844285" calcext:value-type="float">
            <text:p>660436634.844285</text:p>
          </table:table-cell>
          <table:table-cell/>
          <table:table-cell office:value-type="string" calcext:value-type="string">
            <text:p>2020-12-05T10:37:14.8442850Z</text:p>
          </table:table-cell>
          <table:table-cell office:value-type="string" calcext:value-type="string">
            <text:p>2020-12-05-10:38:24.0282850</text:p>
          </table:table-cell>
          <table:table-cell table:number-columns-repeated="2"/>
        </table:table-row>
        <table:table-row table:style-name="ro1">
          <table:table-cell office:value-type="float" office:value="469578534" calcext:value-type="float">
            <text:p>469578534</text:p>
          </table:table-cell>
          <table:table-cell office:value-type="float" office:value="660544616.845477" calcext:value-type="float">
            <text:p>660544616.845477</text:p>
          </table:table-cell>
          <table:table-cell/>
          <table:table-cell office:value-type="string" calcext:value-type="string">
            <text:p>2020-12-06T16:36:56.8454769Z</text:p>
          </table:table-cell>
          <table:table-cell office:value-type="string" calcext:value-type="string">
            <text:p>2020-12-06-16:38:06.0294770</text:p>
          </table:table-cell>
          <table:table-cell table:number-columns-repeated="2"/>
        </table:table-row>
        <table:table-row table:style-name="ro1">
          <table:table-cell office:value-type="float" office:value="469636121" calcext:value-type="float">
            <text:p>469636121</text:p>
          </table:table-cell>
          <table:table-cell office:value-type="float" office:value="660602203.846094" calcext:value-type="float">
            <text:p>660602203.846094</text:p>
          </table:table-cell>
          <table:table-cell/>
          <table:table-cell office:value-type="string" calcext:value-type="string">
            <text:p>2020-12-07T08:36:43.8460940Z</text:p>
          </table:table-cell>
          <table:table-cell office:value-type="string" calcext:value-type="string">
            <text:p>2020-12-07-08:37:53.0300940</text:p>
          </table:table-cell>
          <table:table-cell table:number-columns-repeated="2"/>
        </table:table-row>
        <table:table-row table:style-name="ro1">
          <table:table-cell office:value-type="float" office:value="469744114" calcext:value-type="float">
            <text:p>469744114</text:p>
          </table:table-cell>
          <table:table-cell office:value-type="float" office:value="660710196.847291" calcext:value-type="float">
            <text:p>660710196.847291</text:p>
          </table:table-cell>
          <table:table-cell/>
          <table:table-cell office:value-type="string" calcext:value-type="string">
            <text:p>2020-12-08T14:36:36.8472909Z</text:p>
          </table:table-cell>
          <table:table-cell office:value-type="string" calcext:value-type="string">
            <text:p>2020-12-08-14:37:46.0312910</text:p>
          </table:table-cell>
          <table:table-cell table:number-columns-repeated="2"/>
        </table:table-row>
        <table:table-row table:style-name="ro1">
          <table:table-cell office:value-type="float" office:value="469898900" calcext:value-type="float">
            <text:p>469898900</text:p>
          </table:table-cell>
          <table:table-cell office:value-type="float" office:value="660864982.849" calcext:value-type="float">
            <text:p>660864982.849</text:p>
          </table:table-cell>
          <table:table-cell/>
          <table:table-cell office:value-type="string" calcext:value-type="string">
            <text:p>2020-12-10T09:36:22.8489999Z</text:p>
          </table:table-cell>
          <table:table-cell office:value-type="string" calcext:value-type="string">
            <text:p>2020-12-10-09:37:32.0329999</text:p>
          </table:table-cell>
          <table:table-cell table:number-columns-repeated="2"/>
        </table:table-row>
        <table:table-row table:style-name="ro1">
          <table:table-cell office:value-type="float" office:value="470010501" calcext:value-type="float">
            <text:p>470010501</text:p>
          </table:table-cell>
          <table:table-cell office:value-type="float" office:value="660976583.850239" calcext:value-type="float">
            <text:p>660976583.850239</text:p>
          </table:table-cell>
          <table:table-cell/>
          <table:table-cell office:value-type="string" calcext:value-type="string">
            <text:p>2020-12-11T16:36:23.8502390Z</text:p>
          </table:table-cell>
          <table:table-cell office:value-type="string" calcext:value-type="string">
            <text:p>2020-12-11-16:37:33.0342390</text:p>
          </table:table-cell>
          <table:table-cell table:number-columns-repeated="2"/>
        </table:table-row>
        <table:table-row table:style-name="ro1">
          <table:table-cell office:value-type="float" office:value="470075309" calcext:value-type="float">
            <text:p>470075309</text:p>
          </table:table-cell>
          <table:table-cell office:value-type="float" office:value="661041391.850947" calcext:value-type="float">
            <text:p>661041391.850947</text:p>
          </table:table-cell>
          <table:table-cell/>
          <table:table-cell office:value-type="string" calcext:value-type="string">
            <text:p>2020-12-12T10:36:31.8509470Z</text:p>
          </table:table-cell>
          <table:table-cell office:value-type="string" calcext:value-type="string">
            <text:p>2020-12-12-10:37:41.0349470</text:p>
          </table:table-cell>
          <table:table-cell table:number-columns-repeated="2"/>
        </table:table-row>
        <table:table-row table:style-name="ro1">
          <table:table-cell office:value-type="float" office:value="470183277" calcext:value-type="float">
            <text:p>470183277</text:p>
          </table:table-cell>
          <table:table-cell office:value-type="float" office:value="661149359.852139" calcext:value-type="float">
            <text:p>661149359.852139</text:p>
          </table:table-cell>
          <table:table-cell/>
          <table:table-cell office:value-type="string" calcext:value-type="string">
            <text:p>2020-12-13T16:35:59.8521389Z</text:p>
          </table:table-cell>
          <table:table-cell office:value-type="string" calcext:value-type="string">
            <text:p>2020-12-13-16:37:09.0361390</text:p>
          </table:table-cell>
          <table:table-cell table:number-columns-repeated="2"/>
        </table:table-row>
        <table:table-row table:style-name="ro1">
          <table:table-cell office:value-type="float" office:value="470186872" calcext:value-type="float">
            <text:p>470186872</text:p>
          </table:table-cell>
          <table:table-cell office:value-type="float" office:value="661152954.852172" calcext:value-type="float">
            <text:p>661152954.852172</text:p>
          </table:table-cell>
          <table:table-cell/>
          <table:table-cell office:value-type="string" calcext:value-type="string">
            <text:p>2020-12-13T17:35:54.8521720Z</text:p>
          </table:table-cell>
          <table:table-cell office:value-type="string" calcext:value-type="string">
            <text:p>2020-12-13-17:37:04.0361720</text:p>
          </table:table-cell>
          <table:table-cell table:number-columns-repeated="2"/>
        </table:table-row>
        <table:table-row table:style-name="ro1">
          <table:table-cell office:value-type="float" office:value="470356065" calcext:value-type="float">
            <text:p>470356065</text:p>
          </table:table-cell>
          <table:table-cell office:value-type="float" office:value="661322147.854025" calcext:value-type="float">
            <text:p>661322147.854025</text:p>
          </table:table-cell>
          <table:table-cell/>
          <table:table-cell office:value-type="string" calcext:value-type="string">
            <text:p>2020-12-15T16:35:47.8540250Z</text:p>
          </table:table-cell>
          <table:table-cell office:value-type="string" calcext:value-type="string">
            <text:p>2020-12-15-16:36:57.0380250</text:p>
          </table:table-cell>
          <table:table-cell table:number-columns-repeated="2"/>
        </table:table-row>
        <table:table-row table:style-name="ro1">
          <table:table-cell office:value-type="float" office:value="470359655" calcext:value-type="float">
            <text:p>470359655</text:p>
          </table:table-cell>
          <table:table-cell office:value-type="float" office:value="661325737.854084" calcext:value-type="float">
            <text:p>661325737.854084</text:p>
          </table:table-cell>
          <table:table-cell/>
          <table:table-cell office:value-type="string" calcext:value-type="string">
            <text:p>2020-12-15T17:35:37.8540840Z</text:p>
          </table:table-cell>
          <table:table-cell office:value-type="string" calcext:value-type="string">
            <text:p>2020-12-15-17:36:47.0380840</text:p>
          </table:table-cell>
          <table:table-cell table:number-columns-repeated="2"/>
        </table:table-row>
        <table:table-row table:style-name="ro1">
          <table:table-cell office:value-type="float" office:value="470582835" calcext:value-type="float">
            <text:p>470582835</text:p>
          </table:table-cell>
          <table:table-cell office:value-type="float" office:value="661548917.856512" calcext:value-type="float">
            <text:p>661548917.856512</text:p>
          </table:table-cell>
          <table:table-cell/>
          <table:table-cell office:value-type="string" calcext:value-type="string">
            <text:p>2020-12-18T07:35:17.8565119Z</text:p>
          </table:table-cell>
          <table:table-cell office:value-type="string" calcext:value-type="string">
            <text:p>2020-12-18-07:36:27.0405119</text:p>
          </table:table-cell>
          <table:table-cell table:number-columns-repeated="2"/>
        </table:table-row>
        <table:table-row table:style-name="ro1">
          <table:table-cell office:value-type="float" office:value="470701651" calcext:value-type="float">
            <text:p>470701651</text:p>
          </table:table-cell>
          <table:table-cell office:value-type="float" office:value="661667733.857824" calcext:value-type="float">
            <text:p>661667733.857824</text:p>
          </table:table-cell>
          <table:table-cell/>
          <table:table-cell office:value-type="string" calcext:value-type="string">
            <text:p>2020-12-19T16:35:33.8578239Z</text:p>
          </table:table-cell>
          <table:table-cell office:value-type="string" calcext:value-type="string">
            <text:p>2020-12-19-16:36:43.0418239</text:p>
          </table:table-cell>
          <table:table-cell table:number-columns-repeated="2"/>
        </table:table-row>
        <table:table-row table:style-name="ro1">
          <table:table-cell office:value-type="float" office:value="470777226" calcext:value-type="float">
            <text:p>470777226</text:p>
          </table:table-cell>
          <table:table-cell office:value-type="float" office:value="661743308.85865" calcext:value-type="float">
            <text:p>661743308.85865</text:p>
          </table:table-cell>
          <table:table-cell/>
          <table:table-cell office:value-type="string" calcext:value-type="string">
            <text:p>2020-12-20T13:35:08.8586499Z</text:p>
          </table:table-cell>
          <table:table-cell office:value-type="string" calcext:value-type="string">
            <text:p>2020-12-20-13:36:18.0426499</text:p>
          </table:table-cell>
          <table:table-cell table:number-columns-repeated="2"/>
        </table:table-row>
        <table:table-row table:style-name="ro1">
          <table:table-cell office:value-type="float" office:value="470960862" calcext:value-type="float">
            <text:p>470960862</text:p>
          </table:table-cell>
          <table:table-cell office:value-type="float" office:value="661926944.860681" calcext:value-type="float">
            <text:p>661926944.860681</text:p>
          </table:table-cell>
          <table:table-cell/>
          <table:table-cell office:value-type="string" calcext:value-type="string">
            <text:p>2020-12-22T16:35:44.8606809Z</text:p>
          </table:table-cell>
          <table:table-cell office:value-type="string" calcext:value-type="string">
            <text:p>2020-12-22-16:36:54.0446809</text:p>
          </table:table-cell>
          <table:table-cell table:number-columns-repeated="2"/>
        </table:table-row>
        <table:table-row table:style-name="ro1">
          <table:table-cell office:value-type="float" office:value="471011244" calcext:value-type="float">
            <text:p>471011244</text:p>
          </table:table-cell>
          <table:table-cell office:value-type="float" office:value="661977326.861216" calcext:value-type="float">
            <text:p>661977326.861216</text:p>
          </table:table-cell>
          <table:table-cell/>
          <table:table-cell office:value-type="string" calcext:value-type="string">
            <text:p>2020-12-23T06:35:26.8612159Z</text:p>
          </table:table-cell>
          <table:table-cell office:value-type="string" calcext:value-type="string">
            <text:p>2020-12-23-06:36:36.0452159</text:p>
          </table:table-cell>
          <table:table-cell table:number-columns-repeated="2"/>
        </table:table-row>
        <table:table-row table:style-name="ro1">
          <table:table-cell office:value-type="float" office:value="471392880" calcext:value-type="float">
            <text:p>471392880</text:p>
          </table:table-cell>
          <table:table-cell office:value-type="float" office:value="662358962.865418" calcext:value-type="float">
            <text:p>662358962.865418</text:p>
          </table:table-cell>
          <table:table-cell/>
          <table:table-cell office:value-type="string" calcext:value-type="string">
            <text:p>2020-12-27T16:36:02.8654179Z</text:p>
          </table:table-cell>
          <table:table-cell office:value-type="string" calcext:value-type="string">
            <text:p>2020-12-27-16:37:12.0494179</text:p>
          </table:table-cell>
          <table:table-cell table:number-columns-repeated="2"/>
        </table:table-row>
        <table:table-row table:style-name="ro1">
          <table:table-cell office:value-type="float" office:value="471824793" calcext:value-type="float">
            <text:p>471824793</text:p>
          </table:table-cell>
          <table:table-cell office:value-type="float" office:value="662790875.870151" calcext:value-type="float">
            <text:p>662790875.870151</text:p>
          </table:table-cell>
          <table:table-cell/>
          <table:table-cell office:value-type="string" calcext:value-type="string">
            <text:p>2021-01-01T16:34:35.8701510Z</text:p>
          </table:table-cell>
          <table:table-cell office:value-type="string" calcext:value-type="string">
            <text:p>2021-01-01-16:35:45.0541510</text:p>
          </table:table-cell>
          <table:table-cell table:number-columns-repeated="2"/>
        </table:table-row>
        <table:table-row table:style-name="ro1">
          <table:table-cell office:value-type="float" office:value="471882365" calcext:value-type="float">
            <text:p>471882365</text:p>
          </table:table-cell>
          <table:table-cell office:value-type="float" office:value="662848447.870781" calcext:value-type="float">
            <text:p>662848447.870781</text:p>
          </table:table-cell>
          <table:table-cell/>
          <table:table-cell office:value-type="string" calcext:value-type="string">
            <text:p>2021-01-02T08:34:07.8707809Z</text:p>
          </table:table-cell>
          <table:table-cell office:value-type="string" calcext:value-type="string">
            <text:p>2021-01-02-08:35:17.0547809</text:p>
          </table:table-cell>
          <table:table-cell table:number-columns-repeated="2"/>
        </table:table-row>
        <table:table-row table:style-name="ro1">
          <table:table-cell office:value-type="float" office:value="471975959" calcext:value-type="float">
            <text:p>471975959</text:p>
          </table:table-cell>
          <table:table-cell office:value-type="float" office:value="662942041.871767" calcext:value-type="float">
            <text:p>662942041.871767</text:p>
          </table:table-cell>
          <table:table-cell/>
          <table:table-cell office:value-type="string" calcext:value-type="string">
            <text:p>2021-01-03T10:34:01.8717670Z</text:p>
          </table:table-cell>
          <table:table-cell office:value-type="string" calcext:value-type="string">
            <text:p>2021-01-03-10:35:11.0557670</text:p>
          </table:table-cell>
          <table:table-cell table:number-columns-repeated="2"/>
        </table:table-row>
        <table:table-row table:style-name="ro1">
          <table:table-cell office:value-type="float" office:value="472022826" calcext:value-type="float">
            <text:p>472022826</text:p>
          </table:table-cell>
          <table:table-cell office:value-type="float" office:value="662988908.872312" calcext:value-type="float">
            <text:p>662988908.872312</text:p>
          </table:table-cell>
          <table:table-cell/>
          <table:table-cell office:value-type="string" calcext:value-type="string">
            <text:p>2021-01-03T23:35:08.8723119Z</text:p>
          </table:table-cell>
          <table:table-cell office:value-type="string" calcext:value-type="string">
            <text:p>2021-01-03-23:36:18.0563119</text:p>
          </table:table-cell>
          <table:table-cell table:number-columns-repeated="2"/>
        </table:table-row>
        <table:table-row table:style-name="ro1">
          <table:table-cell office:value-type="float" office:value="472141564" calcext:value-type="float">
            <text:p>472141564</text:p>
          </table:table-cell>
          <table:table-cell office:value-type="float" office:value="663107646.873614" calcext:value-type="float">
            <text:p>663107646.873614</text:p>
          </table:table-cell>
          <table:table-cell/>
          <table:table-cell office:value-type="string" calcext:value-type="string">
            <text:p>2021-01-05T08:34:06.8736139Z</text:p>
          </table:table-cell>
          <table:table-cell office:value-type="string" calcext:value-type="string">
            <text:p>2021-01-05-08:35:16.0576139</text:p>
          </table:table-cell>
          <table:table-cell table:number-columns-repeated="2"/>
        </table:table-row>
        <table:table-row table:style-name="ro1">
          <table:table-cell office:value-type="float" office:value="472206359" calcext:value-type="float">
            <text:p>472206359</text:p>
          </table:table-cell>
          <table:table-cell office:value-type="float" office:value="663172441.874294" calcext:value-type="float">
            <text:p>663172441.874294</text:p>
          </table:table-cell>
          <table:table-cell/>
          <table:table-cell office:value-type="string" calcext:value-type="string">
            <text:p>2021-01-06T02:34:01.8742940Z</text:p>
          </table:table-cell>
          <table:table-cell office:value-type="string" calcext:value-type="string">
            <text:p>2021-01-06-02:35:11.0582940</text:p>
          </table:table-cell>
          <table:table-cell table:number-columns-repeated="2"/>
        </table:table-row>
        <table:table-row table:style-name="ro1">
          <table:table-cell office:value-type="float" office:value="472343227" calcext:value-type="float">
            <text:p>472343227</text:p>
          </table:table-cell>
          <table:table-cell office:value-type="float" office:value="663309309.875761" calcext:value-type="float">
            <text:p>663309309.875761</text:p>
          </table:table-cell>
          <table:table-cell/>
          <table:table-cell office:value-type="string" calcext:value-type="string">
            <text:p>2021-01-07T16:35:09.8757610Z</text:p>
          </table:table-cell>
          <table:table-cell office:value-type="string" calcext:value-type="string">
            <text:p>2021-01-07-16:36:19.0597610</text:p>
          </table:table-cell>
          <table:table-cell table:number-columns-repeated="2"/>
        </table:table-row>
        <table:table-row table:style-name="ro1">
          <table:table-cell office:value-type="float" office:value="472400754" calcext:value-type="float">
            <text:p>472400754</text:p>
          </table:table-cell>
          <table:table-cell office:value-type="float" office:value="663366836.876416" calcext:value-type="float">
            <text:p>663366836.876416</text:p>
          </table:table-cell>
          <table:table-cell/>
          <table:table-cell office:value-type="string" calcext:value-type="string">
            <text:p>2021-01-08T08:33:56.8764159Z</text:p>
          </table:table-cell>
          <table:table-cell office:value-type="string" calcext:value-type="string">
            <text:p>2021-01-08-08:35:06.0604159</text:p>
          </table:table-cell>
          <table:table-cell table:number-columns-repeated="2"/>
        </table:table-row>
        <table:table-row table:style-name="ro1">
          <table:table-cell office:value-type="float" office:value="472706801" calcext:value-type="float">
            <text:p>472706801</text:p>
          </table:table-cell>
          <table:table-cell office:value-type="float" office:value="663672883.879717" calcext:value-type="float">
            <text:p>663672883.879717</text:p>
          </table:table-cell>
          <table:table-cell/>
          <table:table-cell office:value-type="string" calcext:value-type="string">
            <text:p>2021-01-11T21:34:43.8797169Z</text:p>
          </table:table-cell>
          <table:table-cell office:value-type="string" calcext:value-type="string">
            <text:p>2021-01-11-21:35:53.0637170</text:p>
          </table:table-cell>
          <table:table-cell table:number-columns-repeated="2"/>
        </table:table-row>
        <table:table-row table:style-name="ro1">
          <table:table-cell office:value-type="float" office:value="472890328" calcext:value-type="float">
            <text:p>472890328</text:p>
          </table:table-cell>
          <table:table-cell office:value-type="float" office:value="663856410.881724" calcext:value-type="float">
            <text:p>663856410.881724</text:p>
          </table:table-cell>
          <table:table-cell/>
          <table:table-cell office:value-type="string" calcext:value-type="string">
            <text:p>2021-01-14T00:33:30.8817239Z</text:p>
          </table:table-cell>
          <table:table-cell office:value-type="string" calcext:value-type="string">
            <text:p>2021-01-14-00:34:40.0657240</text:p>
          </table:table-cell>
          <table:table-cell table:number-columns-repeated="2"/>
        </table:table-row>
        <table:table-row table:style-name="ro1">
          <table:table-cell office:value-type="float" office:value="473117137" calcext:value-type="float">
            <text:p>473117137</text:p>
          </table:table-cell>
          <table:table-cell office:value-type="float" office:value="664083219.884172" calcext:value-type="float">
            <text:p>664083219.884172</text:p>
          </table:table-cell>
          <table:table-cell/>
          <table:table-cell office:value-type="string" calcext:value-type="string">
            <text:p>2021-01-16T15:33:39.8841719Z</text:p>
          </table:table-cell>
          <table:table-cell office:value-type="string" calcext:value-type="string">
            <text:p>2021-01-16-15:34:49.0681719</text:p>
          </table:table-cell>
          <table:table-cell table:number-columns-repeated="2"/>
        </table:table-row>
        <table:table-row table:style-name="ro1">
          <table:table-cell office:value-type="float" office:value="473289918" calcext:value-type="float">
            <text:p>473289918</text:p>
          </table:table-cell>
          <table:table-cell office:value-type="float" office:value="664256000.886059" calcext:value-type="float">
            <text:p>664256000.886059</text:p>
          </table:table-cell>
          <table:table-cell/>
          <table:table-cell office:value-type="string" calcext:value-type="string">
            <text:p>2021-01-18T15:33:20.8860589Z</text:p>
          </table:table-cell>
          <table:table-cell office:value-type="string" calcext:value-type="string">
            <text:p>2021-01-18-15:34:30.0700589</text:p>
          </table:table-cell>
          <table:table-cell table:number-columns-repeated="2"/>
        </table:table-row>
        <table:table-row table:style-name="ro1">
          <table:table-cell office:value-type="float" office:value="473376592" calcext:value-type="float">
            <text:p>473376592</text:p>
          </table:table-cell>
          <table:table-cell office:value-type="float" office:value="664342674.886998" calcext:value-type="float">
            <text:p>664342674.886998</text:p>
          </table:table-cell>
          <table:table-cell/>
          <table:table-cell office:value-type="string" calcext:value-type="string">
            <text:p>2021-01-19T15:37:54.8869979Z</text:p>
          </table:table-cell>
          <table:table-cell office:value-type="string" calcext:value-type="string">
            <text:p>2021-01-19-15:39:04.0709979</text:p>
          </table:table-cell>
          <table:table-cell table:number-columns-repeated="2"/>
        </table:table-row>
        <table:table-row table:style-name="ro1">
          <table:table-cell office:value-type="float" office:value="473426788" calcext:value-type="float">
            <text:p>473426788</text:p>
          </table:table-cell>
          <table:table-cell office:value-type="float" office:value="664392870.88754" calcext:value-type="float">
            <text:p>664392870.88754</text:p>
          </table:table-cell>
          <table:table-cell/>
          <table:table-cell office:value-type="string" calcext:value-type="string">
            <text:p>2021-01-20T05:34:30.8875399Z</text:p>
          </table:table-cell>
          <table:table-cell office:value-type="string" calcext:value-type="string">
            <text:p>2021-01-20-05:35:40.0715399</text:p>
          </table:table-cell>
          <table:table-cell table:number-columns-repeated="2"/>
        </table:table-row>
        <table:table-row table:style-name="ro1">
          <table:table-cell office:value-type="float" office:value="473624686" calcext:value-type="float">
            <text:p>473624686</text:p>
          </table:table-cell>
          <table:table-cell office:value-type="float" office:value="664590768.88967" calcext:value-type="float">
            <text:p>664590768.88967</text:p>
          </table:table-cell>
          <table:table-cell/>
          <table:table-cell office:value-type="string" calcext:value-type="string">
            <text:p>2021-01-22T12:32:48.8896700Z</text:p>
          </table:table-cell>
          <table:table-cell office:value-type="string" calcext:value-type="string">
            <text:p>2021-01-22-12:33:58.0736700</text:p>
          </table:table-cell>
          <table:table-cell table:number-columns-repeated="2"/>
        </table:table-row>
        <table:table-row table:style-name="ro1">
          <table:table-cell office:value-type="float" office:value="473714694" calcext:value-type="float">
            <text:p>473714694</text:p>
          </table:table-cell>
          <table:table-cell office:value-type="float" office:value="664680776.890665" calcext:value-type="float">
            <text:p>664680776.890665</text:p>
          </table:table-cell>
          <table:table-cell/>
          <table:table-cell office:value-type="string" calcext:value-type="string">
            <text:p>2021-01-23T13:32:56.8906649Z</text:p>
          </table:table-cell>
          <table:table-cell office:value-type="string" calcext:value-type="string">
            <text:p>2021-01-23-13:34:06.0746649</text:p>
          </table:table-cell>
          <table:table-cell table:number-columns-repeated="2"/>
        </table:table-row>
        <table:table-row table:style-name="ro1">
          <table:table-cell office:value-type="float" office:value="473797486" calcext:value-type="float">
            <text:p>473797486</text:p>
          </table:table-cell>
          <table:table-cell office:value-type="float" office:value="664763568.89156" calcext:value-type="float">
            <text:p>664763568.89156</text:p>
          </table:table-cell>
          <table:table-cell/>
          <table:table-cell office:value-type="string" calcext:value-type="string">
            <text:p>2021-01-24T12:32:48.8915599Z</text:p>
          </table:table-cell>
          <table:table-cell office:value-type="string" calcext:value-type="string">
            <text:p>2021-01-24-12:33:58.0755599</text:p>
          </table:table-cell>
          <table:table-cell table:number-columns-repeated="2"/>
        </table:table-row>
        <table:table-row table:style-name="ro1">
          <table:table-cell office:value-type="float" office:value="473876679" calcext:value-type="float">
            <text:p>473876679</text:p>
          </table:table-cell>
          <table:table-cell office:value-type="float" office:value="664842761.892394" calcext:value-type="float">
            <text:p>664842761.892394</text:p>
          </table:table-cell>
          <table:table-cell/>
          <table:table-cell office:value-type="string" calcext:value-type="string">
            <text:p>2021-01-25T10:32:41.8923939Z</text:p>
          </table:table-cell>
          <table:table-cell office:value-type="string" calcext:value-type="string">
            <text:p>2021-01-25-10:33:51.0763939</text:p>
          </table:table-cell>
          <table:table-cell table:number-columns-repeated="2"/>
        </table:table-row>
        <table:table-row table:style-name="ro1">
          <table:table-cell office:value-type="float" office:value="473977516" calcext:value-type="float">
            <text:p>473977516</text:p>
          </table:table-cell>
          <table:table-cell office:value-type="float" office:value="664943598.893526" calcext:value-type="float">
            <text:p>664943598.893526</text:p>
          </table:table-cell>
          <table:table-cell/>
          <table:table-cell office:value-type="string" calcext:value-type="string">
            <text:p>2021-01-26T14:33:18.8935259Z</text:p>
          </table:table-cell>
          <table:table-cell office:value-type="string" calcext:value-type="string">
            <text:p>2021-01-26-14:34:28.0775259</text:p>
          </table:table-cell>
          <table:table-cell table:number-columns-repeated="2"/>
        </table:table-row>
        <table:table-row table:style-name="ro1">
          <table:table-cell office:value-type="float" office:value="474236706" calcext:value-type="float">
            <text:p>474236706</text:p>
          </table:table-cell>
          <table:table-cell office:value-type="float" office:value="665202788.896329" calcext:value-type="float">
            <text:p>665202788.896329</text:p>
          </table:table-cell>
          <table:table-cell/>
          <table:table-cell office:value-type="string" calcext:value-type="string">
            <text:p>2021-01-29T14:33:08.8963289Z</text:p>
          </table:table-cell>
          <table:table-cell office:value-type="string" calcext:value-type="string">
            <text:p>2021-01-29-14:34:18.0803289</text:p>
          </table:table-cell>
          <table:table-cell table:number-columns-repeated="2"/>
        </table:table-row>
        <table:table-row table:style-name="ro1">
          <table:table-cell office:value-type="float" office:value="474312278" calcext:value-type="float">
            <text:p>474312278</text:p>
          </table:table-cell>
          <table:table-cell office:value-type="float" office:value="665278360.897134" calcext:value-type="float">
            <text:p>665278360.897134</text:p>
          </table:table-cell>
          <table:table-cell/>
          <table:table-cell office:value-type="string" calcext:value-type="string">
            <text:p>2021-01-30T11:32:40.8971339Z</text:p>
          </table:table-cell>
          <table:table-cell office:value-type="string" calcext:value-type="string">
            <text:p>2021-01-30-11:33:50.0811339</text:p>
          </table:table-cell>
          <table:table-cell table:number-columns-repeated="2"/>
        </table:table-row>
        <table:table-row table:style-name="ro1">
          <table:table-cell office:value-type="float" office:value="474380685" calcext:value-type="float">
            <text:p>474380685</text:p>
          </table:table-cell>
          <table:table-cell office:value-type="float" office:value="665346767.897904" calcext:value-type="float">
            <text:p>665346767.897904</text:p>
          </table:table-cell>
          <table:table-cell/>
          <table:table-cell office:value-type="string" calcext:value-type="string">
            <text:p>2021-01-31T06:32:47.8979040Z</text:p>
          </table:table-cell>
          <table:table-cell office:value-type="string" calcext:value-type="string">
            <text:p>2021-01-31-06:33:57.0819040</text:p>
          </table:table-cell>
          <table:table-cell table:number-columns-repeated="2"/>
        </table:table-row>
        <table:table-row table:style-name="ro1">
          <table:table-cell office:value-type="float" office:value="474477887" calcext:value-type="float">
            <text:p>474477887</text:p>
          </table:table-cell>
          <table:table-cell office:value-type="float" office:value="665443969.898937" calcext:value-type="float">
            <text:p>665443969.898937</text:p>
          </table:table-cell>
          <table:table-cell/>
          <table:table-cell office:value-type="string" calcext:value-type="string">
            <text:p>2021-02-01T09:32:49.8989369Z</text:p>
          </table:table-cell>
          <table:table-cell office:value-type="string" calcext:value-type="string">
            <text:p>2021-02-01-09:33:59.0829370</text:p>
          </table:table-cell>
          <table:table-cell table:number-columns-repeated="2"/>
        </table:table-row>
        <table:table-row table:style-name="ro1">
          <table:table-cell office:value-type="float" office:value="474539072" calcext:value-type="float">
            <text:p>474539072</text:p>
          </table:table-cell>
          <table:table-cell office:value-type="float" office:value="665505154.899605" calcext:value-type="float">
            <text:p>665505154.899605</text:p>
          </table:table-cell>
          <table:table-cell/>
          <table:table-cell office:value-type="string" calcext:value-type="string">
            <text:p>2021-02-02T02:32:34.8996050Z</text:p>
          </table:table-cell>
          <table:table-cell office:value-type="string" calcext:value-type="string">
            <text:p>2021-02-02-02:33:44.0836050</text:p>
          </table:table-cell>
          <table:table-cell table:number-columns-repeated="2"/>
        </table:table-row>
        <table:table-row table:style-name="ro1">
          <table:table-cell office:value-type="float" office:value="474849364" calcext:value-type="float">
            <text:p>474849364</text:p>
          </table:table-cell>
          <table:table-cell office:value-type="float" office:value="665815446.902997" calcext:value-type="float">
            <text:p>665815446.902997</text:p>
          </table:table-cell>
          <table:table-cell/>
          <table:table-cell office:value-type="string" calcext:value-type="string">
            <text:p>2021-02-05T16:44:06.9029970Z</text:p>
          </table:table-cell>
          <table:table-cell office:value-type="string" calcext:value-type="string">
            <text:p>2021-02-05-16:45:16.0869970</text:p>
          </table:table-cell>
          <table:table-cell table:number-columns-repeated="2"/>
        </table:table-row>
        <table:table-row table:style-name="ro1">
          <table:table-cell office:value-type="float" office:value="474927907" calcext:value-type="float">
            <text:p>474927907</text:p>
          </table:table-cell>
          <table:table-cell office:value-type="float" office:value="665893989.903872" calcext:value-type="float">
            <text:p>665893989.903872</text:p>
          </table:table-cell>
          <table:table-cell/>
          <table:table-cell office:value-type="string" calcext:value-type="string">
            <text:p>2021-02-06T14:33:09.9038720Z</text:p>
          </table:table-cell>
          <table:table-cell office:value-type="string" calcext:value-type="string">
            <text:p>2021-02-06-14:34:19.0878720</text:p>
          </table:table-cell>
          <table:table-cell table:number-columns-repeated="2"/>
        </table:table-row>
        <table:table-row table:style-name="ro1">
          <table:table-cell office:value-type="float" office:value="475014305" calcext:value-type="float">
            <text:p>475014305</text:p>
          </table:table-cell>
          <table:table-cell office:value-type="float" office:value="665980387.904806" calcext:value-type="float">
            <text:p>665980387.904806</text:p>
          </table:table-cell>
          <table:table-cell/>
          <table:table-cell office:value-type="string" calcext:value-type="string">
            <text:p>2021-02-07T14:33:07.9048060Z</text:p>
          </table:table-cell>
          <table:table-cell office:value-type="string" calcext:value-type="string">
            <text:p>2021-02-07-14:34:17.0888060</text:p>
          </table:table-cell>
          <table:table-cell table:number-columns-repeated="2"/>
        </table:table-row>
        <table:table-row table:style-name="ro1">
          <table:table-cell office:value-type="float" office:value="475082678" calcext:value-type="float">
            <text:p>475082678</text:p>
          </table:table-cell>
          <table:table-cell office:value-type="float" office:value="666048760.905528" calcext:value-type="float">
            <text:p>666048760.905528</text:p>
          </table:table-cell>
          <table:table-cell/>
          <table:table-cell office:value-type="string" calcext:value-type="string">
            <text:p>2021-02-08T09:32:40.9055279Z</text:p>
          </table:table-cell>
          <table:table-cell office:value-type="string" calcext:value-type="string">
            <text:p>2021-02-08-09:33:50.0895279</text:p>
          </table:table-cell>
          <table:table-cell table:number-columns-repeated="2"/>
        </table:table-row>
        <table:table-row table:style-name="ro1">
          <table:table-cell office:value-type="float" office:value="475176276" calcext:value-type="float">
            <text:p>475176276</text:p>
          </table:table-cell>
          <table:table-cell office:value-type="float" office:value="666142358.906564" calcext:value-type="float">
            <text:p>666142358.906564</text:p>
          </table:table-cell>
          <table:table-cell/>
          <table:table-cell office:value-type="string" calcext:value-type="string">
            <text:p>2021-02-09T11:32:38.9065639Z</text:p>
          </table:table-cell>
          <table:table-cell office:value-type="string" calcext:value-type="string">
            <text:p>2021-02-09-11:33:48.0905640</text:p>
          </table:table-cell>
          <table:table-cell table:number-columns-repeated="2"/>
        </table:table-row>
        <table:table-row table:style-name="ro1">
          <table:table-cell office:value-type="float" office:value="475453481" calcext:value-type="float">
            <text:p>475453481</text:p>
          </table:table-cell>
          <table:table-cell office:value-type="float" office:value="666419563.909566" calcext:value-type="float">
            <text:p>666419563.909566</text:p>
          </table:table-cell>
          <table:table-cell/>
          <table:table-cell office:value-type="string" calcext:value-type="string">
            <text:p>2021-02-12T16:32:43.9095659Z</text:p>
          </table:table-cell>
          <table:table-cell office:value-type="string" calcext:value-type="string">
            <text:p>2021-02-12-16:33:53.0935659</text:p>
          </table:table-cell>
          <table:table-cell table:number-columns-repeated="2"/>
        </table:table-row>
        <table:table-row table:style-name="ro1">
          <table:table-cell office:value-type="float" office:value="475529101" calcext:value-type="float">
            <text:p>475529101</text:p>
          </table:table-cell>
          <table:table-cell office:value-type="float" office:value="666495183.910426" calcext:value-type="float">
            <text:p>666495183.910426</text:p>
          </table:table-cell>
          <table:table-cell/>
          <table:table-cell office:value-type="string" calcext:value-type="string">
            <text:p>2021-02-13T13:33:03.9104260Z</text:p>
          </table:table-cell>
          <table:table-cell office:value-type="string" calcext:value-type="string">
            <text:p>2021-02-13-13:34:13.0944260</text:p>
          </table:table-cell>
          <table:table-cell table:number-columns-repeated="2"/>
        </table:table-row>
        <table:table-row table:style-name="ro1">
          <table:table-cell office:value-type="float" office:value="475626288" calcext:value-type="float">
            <text:p>475626288</text:p>
          </table:table-cell>
          <table:table-cell office:value-type="float" office:value="666592370.911471" calcext:value-type="float">
            <text:p>666592370.911471</text:p>
          </table:table-cell>
          <table:table-cell/>
          <table:table-cell office:value-type="string" calcext:value-type="string">
            <text:p>2021-02-14T16:32:50.9114710Z</text:p>
          </table:table-cell>
          <table:table-cell office:value-type="string" calcext:value-type="string">
            <text:p>2021-02-14-16:34:00.0954710</text:p>
          </table:table-cell>
          <table:table-cell table:number-columns-repeated="2"/>
        </table:table-row>
        <table:table-row table:style-name="ro1">
          <table:table-cell office:value-type="float" office:value="475662280" calcext:value-type="float">
            <text:p>475662280</text:p>
          </table:table-cell>
          <table:table-cell office:value-type="float" office:value="666628362.911859" calcext:value-type="float">
            <text:p>666628362.911859</text:p>
          </table:table-cell>
          <table:table-cell/>
          <table:table-cell office:value-type="string" calcext:value-type="string">
            <text:p>2021-02-15T02:32:42.9118590Z</text:p>
          </table:table-cell>
          <table:table-cell office:value-type="string" calcext:value-type="string">
            <text:p>2021-02-15-02:33:52.0958590</text:p>
          </table:table-cell>
          <table:table-cell table:number-columns-repeated="2"/>
        </table:table-row>
        <table:table-row table:style-name="ro1">
          <table:table-cell office:value-type="float" office:value="475799089" calcext:value-type="float">
            <text:p>475799089</text:p>
          </table:table-cell>
          <table:table-cell office:value-type="float" office:value="666765171.913354" calcext:value-type="float">
            <text:p>666765171.913354</text:p>
          </table:table-cell>
          <table:table-cell/>
          <table:table-cell office:value-type="string" calcext:value-type="string">
            <text:p>2021-02-16T16:32:51.9133540Z</text:p>
          </table:table-cell>
          <table:table-cell office:value-type="string" calcext:value-type="string">
            <text:p>2021-02-16-16:34:01.0973540</text:p>
          </table:table-cell>
          <table:table-cell table:number-columns-repeated="2"/>
        </table:table-row>
        <table:table-row table:style-name="ro1">
          <table:table-cell office:value-type="float" office:value="475885488" calcext:value-type="float">
            <text:p>475885488</text:p>
          </table:table-cell>
          <table:table-cell office:value-type="float" office:value="666851570.914303" calcext:value-type="float">
            <text:p>666851570.914303</text:p>
          </table:table-cell>
          <table:table-cell/>
          <table:table-cell office:value-type="string" calcext:value-type="string">
            <text:p>2021-02-17T16:32:50.9143029Z</text:p>
          </table:table-cell>
          <table:table-cell office:value-type="string" calcext:value-type="string">
            <text:p>2021-02-17-16:34:00.0983029</text:p>
          </table:table-cell>
          <table:table-cell table:number-columns-repeated="2"/>
        </table:table-row>
        <table:table-row table:style-name="ro1">
          <table:table-cell office:value-type="float" office:value="475971889" calcext:value-type="float">
            <text:p>475971889</text:p>
          </table:table-cell>
          <table:table-cell office:value-type="float" office:value="666937971.915239" calcext:value-type="float">
            <text:p>666937971.915239</text:p>
          </table:table-cell>
          <table:table-cell/>
          <table:table-cell office:value-type="string" calcext:value-type="string">
            <text:p>2021-02-18T16:32:51.9152389Z</text:p>
          </table:table-cell>
          <table:table-cell office:value-type="string" calcext:value-type="string">
            <text:p>2021-02-18-16:34:01.0992389</text:p>
          </table:table-cell>
          <table:table-cell table:number-columns-repeated="2"/>
        </table:table-row>
        <table:table-row table:style-name="ro1">
          <table:table-cell office:value-type="float" office:value="476007889" calcext:value-type="float">
            <text:p>476007889</text:p>
          </table:table-cell>
          <table:table-cell office:value-type="float" office:value="666973971.915641" calcext:value-type="float">
            <text:p>666973971.915641</text:p>
          </table:table-cell>
          <table:table-cell/>
          <table:table-cell office:value-type="string" calcext:value-type="string">
            <text:p>2021-02-19T02:32:51.9156409Z</text:p>
          </table:table-cell>
          <table:table-cell office:value-type="string" calcext:value-type="string">
            <text:p>2021-02-19-02:34:01.0996409</text:p>
          </table:table-cell>
          <table:table-cell table:number-columns-repeated="2"/>
        </table:table-row>
        <table:table-row table:style-name="ro1">
          <table:table-cell office:value-type="float" office:value="476094291" calcext:value-type="float">
            <text:p>476094291</text:p>
          </table:table-cell>
          <table:table-cell office:value-type="float" office:value="667060373.916586" calcext:value-type="float">
            <text:p>667060373.916586</text:p>
          </table:table-cell>
          <table:table-cell/>
          <table:table-cell office:value-type="string" calcext:value-type="string">
            <text:p>2021-02-20T02:32:53.9165860Z</text:p>
          </table:table-cell>
          <table:table-cell office:value-type="string" calcext:value-type="string">
            <text:p>2021-02-20-02:34:03.1005860</text:p>
          </table:table-cell>
          <table:table-cell table:number-columns-repeated="2"/>
        </table:table-row>
        <table:table-row table:style-name="ro1">
          <table:table-cell office:value-type="float" office:value="476180693" calcext:value-type="float">
            <text:p>476180693</text:p>
          </table:table-cell>
          <table:table-cell office:value-type="float" office:value="667146775.917528" calcext:value-type="float">
            <text:p>667146775.917528</text:p>
          </table:table-cell>
          <table:table-cell/>
          <table:table-cell office:value-type="string" calcext:value-type="string">
            <text:p>2021-02-21T02:32:55.9175280Z</text:p>
          </table:table-cell>
          <table:table-cell office:value-type="string" calcext:value-type="string">
            <text:p>2021-02-21-02:34:05.1015280</text:p>
          </table:table-cell>
          <table:table-cell table:number-columns-repeated="2"/>
        </table:table-row>
        <table:table-row table:style-name="ro1">
          <table:table-cell office:value-type="float" office:value="476267094" calcext:value-type="float">
            <text:p>476267094</text:p>
          </table:table-cell>
          <table:table-cell office:value-type="float" office:value="667233176.918475" calcext:value-type="float">
            <text:p>667233176.918475</text:p>
          </table:table-cell>
          <table:table-cell/>
          <table:table-cell office:value-type="string" calcext:value-type="string">
            <text:p>2021-02-22T02:32:56.9184750Z</text:p>
          </table:table-cell>
          <table:table-cell office:value-type="string" calcext:value-type="string">
            <text:p>2021-02-22-02:34:06.1024750</text:p>
          </table:table-cell>
          <table:table-cell table:number-columns-repeated="2"/>
        </table:table-row>
        <table:table-row table:style-name="ro1">
          <table:table-cell office:value-type="float" office:value="476393097" calcext:value-type="float">
            <text:p>476393097</text:p>
          </table:table-cell>
          <table:table-cell office:value-type="float" office:value="667359179.919844" calcext:value-type="float">
            <text:p>667359179.919844</text:p>
          </table:table-cell>
          <table:table-cell/>
          <table:table-cell office:value-type="string" calcext:value-type="string">
            <text:p>2021-02-23T13:32:59.9198440Z</text:p>
          </table:table-cell>
          <table:table-cell office:value-type="string" calcext:value-type="string">
            <text:p>2021-02-23-13:34:09.1038440</text:p>
          </table:table-cell>
          <table:table-cell table:number-columns-repeated="2"/>
        </table:table-row>
        <table:table-row table:style-name="ro1">
          <table:table-cell office:value-type="float" office:value="476439899" calcext:value-type="float">
            <text:p>476439899</text:p>
          </table:table-cell>
          <table:table-cell office:value-type="float" office:value="667405981.920372" calcext:value-type="float">
            <text:p>667405981.920372</text:p>
          </table:table-cell>
          <table:table-cell/>
          <table:table-cell office:value-type="string" calcext:value-type="string">
            <text:p>2021-02-24T02:33:01.9203720Z</text:p>
          </table:table-cell>
          <table:table-cell office:value-type="string" calcext:value-type="string">
            <text:p>2021-02-24-02:34:11.1043720</text:p>
          </table:table-cell>
          <table:table-cell table:number-columns-repeated="2"/>
        </table:table-row>
        <table:table-row table:style-name="ro1">
          <table:table-cell office:value-type="float" office:value="476547899" calcext:value-type="float">
            <text:p>476547899</text:p>
          </table:table-cell>
          <table:table-cell office:value-type="float" office:value="667513981.921544" calcext:value-type="float">
            <text:p>667513981.921544</text:p>
          </table:table-cell>
          <table:table-cell/>
          <table:table-cell office:value-type="string" calcext:value-type="string">
            <text:p>2021-02-25T08:33:01.9215439Z</text:p>
          </table:table-cell>
          <table:table-cell office:value-type="string" calcext:value-type="string">
            <text:p>2021-02-25-08:34:11.1055439</text:p>
          </table:table-cell>
          <table:table-cell table:number-columns-repeated="2"/>
        </table:table-row>
        <table:table-row table:style-name="ro1">
          <table:table-cell office:value-type="float" office:value="476663106" calcext:value-type="float">
            <text:p>476663106</text:p>
          </table:table-cell>
          <table:table-cell office:value-type="float" office:value="667629188.922813" calcext:value-type="float">
            <text:p>667629188.922813</text:p>
          </table:table-cell>
          <table:table-cell/>
          <table:table-cell office:value-type="string" calcext:value-type="string">
            <text:p>2021-02-26T16:33:08.9228129Z</text:p>
          </table:table-cell>
          <table:table-cell office:value-type="string" calcext:value-type="string">
            <text:p>2021-02-26-16:34:18.1068129</text:p>
          </table:table-cell>
          <table:table-cell table:number-columns-repeated="2"/>
        </table:table-row>
        <table:table-row table:style-name="ro1">
          <table:table-cell office:value-type="float" office:value="476727907" calcext:value-type="float">
            <text:p>476727907</text:p>
          </table:table-cell>
          <table:table-cell office:value-type="float" office:value="667693989.923543" calcext:value-type="float">
            <text:p>667693989.923543</text:p>
          </table:table-cell>
          <table:table-cell/>
          <table:table-cell office:value-type="string" calcext:value-type="string">
            <text:p>2021-02-27T10:33:09.9235429Z</text:p>
          </table:table-cell>
          <table:table-cell office:value-type="string" calcext:value-type="string">
            <text:p>2021-02-27-10:34:19.1075429</text:p>
          </table:table-cell>
          <table:table-cell table:number-columns-repeated="2"/>
        </table:table-row>
        <table:table-row table:style-name="ro1">
          <table:table-cell office:value-type="float" office:value="476785509" calcext:value-type="float">
            <text:p>476785509</text:p>
          </table:table-cell>
          <table:table-cell office:value-type="float" office:value="667751591.924169" calcext:value-type="float">
            <text:p>667751591.924169</text:p>
          </table:table-cell>
          <table:table-cell/>
          <table:table-cell office:value-type="string" calcext:value-type="string">
            <text:p>2021-02-28T02:33:11.9241689Z</text:p>
          </table:table-cell>
          <table:table-cell office:value-type="string" calcext:value-type="string">
            <text:p>2021-02-28-02:34:21.1081689</text:p>
          </table:table-cell>
          <table:table-cell table:number-columns-repeated="2"/>
        </table:table-row>
        <table:table-row table:style-name="ro1">
          <table:table-cell office:value-type="float" office:value="476879119" calcext:value-type="float">
            <text:p>476879119</text:p>
          </table:table-cell>
          <table:table-cell office:value-type="float" office:value="667845201.925207" calcext:value-type="float">
            <text:p>667845201.925207</text:p>
          </table:table-cell>
          <table:table-cell/>
          <table:table-cell office:value-type="string" calcext:value-type="string">
            <text:p>2021-03-01T04:33:21.9252070Z</text:p>
          </table:table-cell>
          <table:table-cell office:value-type="string" calcext:value-type="string">
            <text:p>2021-03-01-04:34:31.1092070</text:p>
          </table:table-cell>
          <table:table-cell table:number-columns-repeated="2"/>
        </table:table-row>
        <table:table-row table:style-name="ro1">
          <table:table-cell office:value-type="float" office:value="476990726" calcext:value-type="float">
            <text:p>476990726</text:p>
          </table:table-cell>
          <table:table-cell office:value-type="float" office:value="667956808.926431" calcext:value-type="float">
            <text:p>667956808.926431</text:p>
          </table:table-cell>
          <table:table-cell/>
          <table:table-cell office:value-type="string" calcext:value-type="string">
            <text:p>2021-03-02T11:33:28.9264309Z</text:p>
          </table:table-cell>
          <table:table-cell office:value-type="string" calcext:value-type="string">
            <text:p>2021-03-02-11:34:38.1104309</text:p>
          </table:table-cell>
          <table:table-cell table:number-columns-repeated="2"/>
        </table:table-row>
        <table:table-row table:style-name="ro1">
          <table:table-cell office:value-type="float" office:value="477077124" calcext:value-type="float">
            <text:p>477077124</text:p>
          </table:table-cell>
          <table:table-cell office:value-type="float" office:value="668043206.927377" calcext:value-type="float">
            <text:p>668043206.927377</text:p>
          </table:table-cell>
          <table:table-cell/>
          <table:table-cell office:value-type="string" calcext:value-type="string">
            <text:p>2021-03-03T11:33:26.9273769Z</text:p>
          </table:table-cell>
          <table:table-cell office:value-type="string" calcext:value-type="string">
            <text:p>2021-03-03-11:34:36.1113770</text:p>
          </table:table-cell>
          <table:table-cell table:number-columns-repeated="2"/>
        </table:table-row>
        <table:table-row table:style-name="ro1">
          <table:table-cell office:value-type="float" office:value="477249938" calcext:value-type="float">
            <text:p>477249938</text:p>
          </table:table-cell>
          <table:table-cell office:value-type="float" office:value="668216020.929291" calcext:value-type="float">
            <text:p>668216020.929291</text:p>
          </table:table-cell>
          <table:table-cell/>
          <table:table-cell office:value-type="string" calcext:value-type="string">
            <text:p>2021-03-05T11:33:40.9292910Z</text:p>
          </table:table-cell>
          <table:table-cell office:value-type="string" calcext:value-type="string">
            <text:p>2021-03-05-11:34:50.1132910</text:p>
          </table:table-cell>
          <table:table-cell table:number-columns-repeated="2"/>
        </table:table-row>
        <table:table-row table:style-name="ro1">
          <table:table-cell office:value-type="float" office:value="477311134" calcext:value-type="float">
            <text:p>477311134</text:p>
          </table:table-cell>
          <table:table-cell office:value-type="float" office:value="668277216.929961" calcext:value-type="float">
            <text:p>668277216.929961</text:p>
          </table:table-cell>
          <table:table-cell/>
          <table:table-cell office:value-type="string" calcext:value-type="string">
            <text:p>2021-03-06T04:33:36.9299609Z</text:p>
          </table:table-cell>
          <table:table-cell office:value-type="string" calcext:value-type="string">
            <text:p>2021-03-06-04:34:46.1139609</text:p>
          </table:table-cell>
          <table:table-cell table:number-columns-repeated="2"/>
        </table:table-row>
        <table:table-row table:style-name="ro1">
          <table:table-cell office:value-type="float" office:value="477397542" calcext:value-type="float">
            <text:p>477397542</text:p>
          </table:table-cell>
          <table:table-cell office:value-type="float" office:value="668363624.930919" calcext:value-type="float">
            <text:p>668363624.930919</text:p>
          </table:table-cell>
          <table:table-cell/>
          <table:table-cell office:value-type="string" calcext:value-type="string">
            <text:p>2021-03-07T04:33:44.9309189Z</text:p>
          </table:table-cell>
          <table:table-cell office:value-type="string" calcext:value-type="string">
            <text:p>2021-03-07-04:34:54.1149189</text:p>
          </table:table-cell>
          <table:table-cell table:number-columns-repeated="2"/>
        </table:table-row>
        <table:table-row table:style-name="ro1">
          <table:table-cell office:value-type="float" office:value="477498336" calcext:value-type="float">
            <text:p>477498336</text:p>
          </table:table-cell>
          <table:table-cell office:value-type="float" office:value="668464418.932002" calcext:value-type="float">
            <text:p>668464418.932002</text:p>
          </table:table-cell>
          <table:table-cell/>
          <table:table-cell office:value-type="string" calcext:value-type="string">
            <text:p>2021-03-08T08:33:38.9320019Z</text:p>
          </table:table-cell>
          <table:table-cell office:value-type="string" calcext:value-type="string">
            <text:p>2021-03-08-08:34:48.1160019</text:p>
          </table:table-cell>
          <table:table-cell table:number-columns-repeated="2"/>
        </table:table-row>
        <table:table-row table:style-name="ro1">
          <table:table-cell office:value-type="float" office:value="477570351" calcext:value-type="float">
            <text:p>477570351</text:p>
          </table:table-cell>
          <table:table-cell office:value-type="float" office:value="668536433.932819" calcext:value-type="float">
            <text:p>668536433.932819</text:p>
          </table:table-cell>
          <table:table-cell/>
          <table:table-cell office:value-type="string" calcext:value-type="string">
            <text:p>2021-03-09T04:33:53.9328190Z</text:p>
          </table:table-cell>
          <table:table-cell office:value-type="string" calcext:value-type="string">
            <text:p>2021-03-09-04:35:03.1168190</text:p>
          </table:table-cell>
          <table:table-cell table:number-columns-repeated="2"/>
        </table:table-row>
        <table:table-row table:style-name="ro1">
          <table:table-cell office:value-type="float" office:value="477663949" calcext:value-type="float">
            <text:p>477663949</text:p>
          </table:table-cell>
          <table:table-cell office:value-type="float" office:value="668630031.933827" calcext:value-type="float">
            <text:p>668630031.933827</text:p>
          </table:table-cell>
          <table:table-cell/>
          <table:table-cell office:value-type="string" calcext:value-type="string">
            <text:p>2021-03-10T06:33:51.9338270Z</text:p>
          </table:table-cell>
          <table:table-cell office:value-type="string" calcext:value-type="string">
            <text:p>2021-03-10-06:35:01.1178270</text:p>
          </table:table-cell>
          <table:table-cell table:number-columns-repeated="2"/>
        </table:table-row>
        <table:table-row table:style-name="ro1">
          <table:table-cell office:value-type="float" office:value="477872751" calcext:value-type="float">
            <text:p>477872751</text:p>
          </table:table-cell>
          <table:table-cell office:value-type="float" office:value="668838833.936159" calcext:value-type="float">
            <text:p>668838833.936159</text:p>
          </table:table-cell>
          <table:table-cell/>
          <table:table-cell office:value-type="string" calcext:value-type="string">
            <text:p>2021-03-12T16:33:53.9361590Z</text:p>
          </table:table-cell>
          <table:table-cell office:value-type="string" calcext:value-type="string">
            <text:p>2021-03-12-16:35:03.1201590</text:p>
          </table:table-cell>
          <table:table-cell table:number-columns-repeated="2"/>
        </table:table-row>
        <table:table-row table:style-name="ro1">
          <table:table-cell office:value-type="float" office:value="477944755" calcext:value-type="float">
            <text:p>477944755</text:p>
          </table:table-cell>
          <table:table-cell office:value-type="float" office:value="668910837.936916" calcext:value-type="float">
            <text:p>668910837.936916</text:p>
          </table:table-cell>
          <table:table-cell/>
          <table:table-cell office:value-type="string" calcext:value-type="string">
            <text:p>2021-03-13T12:33:57.9369159Z</text:p>
          </table:table-cell>
          <table:table-cell office:value-type="string" calcext:value-type="string">
            <text:p>2021-03-13-12:35:07.1209160</text:p>
          </table:table-cell>
          <table:table-cell table:number-columns-repeated="2"/>
        </table:table-row>
        <table:table-row table:style-name="ro1">
          <table:table-cell office:value-type="float" office:value="478020354" calcext:value-type="float">
            <text:p>478020354</text:p>
          </table:table-cell>
          <table:table-cell office:value-type="float" office:value="668986436.937774" calcext:value-type="float">
            <text:p>668986436.937774</text:p>
          </table:table-cell>
          <table:table-cell/>
          <table:table-cell office:value-type="string" calcext:value-type="string">
            <text:p>2021-03-14T09:33:56.9377739Z</text:p>
          </table:table-cell>
          <table:table-cell office:value-type="string" calcext:value-type="string">
            <text:p>2021-03-14-09:35:06.1217739</text:p>
          </table:table-cell>
          <table:table-cell table:number-columns-repeated="2"/>
        </table:table-row>
        <table:table-row table:style-name="ro1">
          <table:table-cell office:value-type="float" office:value="478099555" calcext:value-type="float">
            <text:p>478099555</text:p>
          </table:table-cell>
          <table:table-cell office:value-type="float" office:value="669065637.938653" calcext:value-type="float">
            <text:p>669065637.938653</text:p>
          </table:table-cell>
          <table:table-cell/>
          <table:table-cell office:value-type="string" calcext:value-type="string">
            <text:p>2021-03-15T07:33:57.9386529Z</text:p>
          </table:table-cell>
          <table:table-cell office:value-type="string" calcext:value-type="string">
            <text:p>2021-03-15-07:35:07.1226530</text:p>
          </table:table-cell>
          <table:table-cell table:number-columns-repeated="2"/>
        </table:table-row>
        <table:table-row table:style-name="ro1">
          <table:table-cell office:value-type="float" office:value="478211270" calcext:value-type="float">
            <text:p>478211270</text:p>
          </table:table-cell>
          <table:table-cell office:value-type="float" office:value="669177352.939891" calcext:value-type="float">
            <text:p>669177352.939891</text:p>
          </table:table-cell>
          <table:table-cell/>
          <table:table-cell office:value-type="string" calcext:value-type="string">
            <text:p>2021-03-16T14:35:52.9398909Z</text:p>
          </table:table-cell>
          <table:table-cell office:value-type="string" calcext:value-type="string">
            <text:p>2021-03-16-14:37:02.1238909</text:p>
          </table:table-cell>
          <table:table-cell table:number-columns-repeated="2"/>
        </table:table-row>
        <table:table-row table:style-name="ro1">
          <table:table-cell office:value-type="float" office:value="478257978" calcext:value-type="float">
            <text:p>478257978</text:p>
          </table:table-cell>
          <table:table-cell office:value-type="float" office:value="669224060.940418" calcext:value-type="float">
            <text:p>669224060.940418</text:p>
          </table:table-cell>
          <table:table-cell/>
          <table:table-cell office:value-type="string" calcext:value-type="string">
            <text:p>2021-03-17T03:34:20.9404180Z</text:p>
          </table:table-cell>
          <table:table-cell office:value-type="string" calcext:value-type="string">
            <text:p>2021-03-17-03:35:30.1244180</text:p>
          </table:table-cell>
          <table:table-cell table:number-columns-repeated="2"/>
        </table:table-row>
        <table:table-row table:style-name="ro1">
          <table:table-cell office:value-type="float" office:value="478380375" calcext:value-type="float">
            <text:p>478380375</text:p>
          </table:table-cell>
          <table:table-cell office:value-type="float" office:value="669346457.94175" calcext:value-type="float">
            <text:p>669346457.94175</text:p>
          </table:table-cell>
          <table:table-cell/>
          <table:table-cell office:value-type="string" calcext:value-type="string">
            <text:p>2021-03-18T13:34:17.9417499Z</text:p>
          </table:table-cell>
          <table:table-cell office:value-type="string" calcext:value-type="string">
            <text:p>2021-03-18-13:35:27.1257499</text:p>
          </table:table-cell>
          <table:table-cell table:number-columns-repeated="2"/>
        </table:table-row>
        <table:table-row table:style-name="ro1">
          <table:table-cell office:value-type="float" office:value="478477581" calcext:value-type="float">
            <text:p>478477581</text:p>
          </table:table-cell>
          <table:table-cell office:value-type="float" office:value="669443663.942839" calcext:value-type="float">
            <text:p>669443663.942839</text:p>
          </table:table-cell>
          <table:table-cell/>
          <table:table-cell office:value-type="string" calcext:value-type="string">
            <text:p>2021-03-19T16:34:23.9428390Z</text:p>
          </table:table-cell>
          <table:table-cell office:value-type="string" calcext:value-type="string">
            <text:p>2021-03-19-16:35:33.1268390</text:p>
          </table:table-cell>
          <table:table-cell table:number-columns-repeated="2"/>
        </table:table-row>
        <table:table-row table:style-name="ro1">
          <table:table-cell office:value-type="float" office:value="478535294" calcext:value-type="float">
            <text:p>478535294</text:p>
          </table:table-cell>
          <table:table-cell office:value-type="float" office:value="669501376.943469" calcext:value-type="float">
            <text:p>669501376.943469</text:p>
          </table:table-cell>
          <table:table-cell/>
          <table:table-cell office:value-type="string" calcext:value-type="string">
            <text:p>2021-03-20T08:36:16.9434689Z</text:p>
          </table:table-cell>
          <table:table-cell office:value-type="string" calcext:value-type="string">
            <text:p>2021-03-20-08:37:26.1274689</text:p>
          </table:table-cell>
          <table:table-cell table:number-columns-repeated="2"/>
        </table:table-row>
        <table:table-row table:style-name="ro1">
          <table:table-cell office:value-type="float" office:value="478636105" calcext:value-type="float">
            <text:p>478636105</text:p>
          </table:table-cell>
          <table:table-cell office:value-type="float" office:value="669602187.944553" calcext:value-type="float">
            <text:p>669602187.944553</text:p>
          </table:table-cell>
          <table:table-cell/>
          <table:table-cell office:value-type="string" calcext:value-type="string">
            <text:p>2021-03-21T12:36:27.9445530Z</text:p>
          </table:table-cell>
          <table:table-cell office:value-type="string" calcext:value-type="string">
            <text:p>2021-03-21-12:37:37.1285530</text:p>
          </table:table-cell>
          <table:table-cell table:number-columns-repeated="2"/>
        </table:table-row>
        <table:table-row table:style-name="ro1">
          <table:table-cell office:value-type="float" office:value="478689999" calcext:value-type="float">
            <text:p>478689999</text:p>
          </table:table-cell>
          <table:table-cell office:value-type="float" office:value="669656081.945208" calcext:value-type="float">
            <text:p>669656081.945208</text:p>
          </table:table-cell>
          <table:table-cell/>
          <table:table-cell office:value-type="string" calcext:value-type="string">
            <text:p>2021-03-22T03:34:41.9452079Z</text:p>
          </table:table-cell>
          <table:table-cell office:value-type="string" calcext:value-type="string">
            <text:p>2021-03-22-03:35:51.1292079</text:p>
          </table:table-cell>
          <table:table-cell table:number-columns-repeated="2"/>
        </table:table-row>
        <table:table-row table:style-name="ro1">
          <table:table-cell office:value-type="float" office:value="478812393" calcext:value-type="float">
            <text:p>478812393</text:p>
          </table:table-cell>
          <table:table-cell office:value-type="float" office:value="669778475.946543" calcext:value-type="float">
            <text:p>669778475.946543</text:p>
          </table:table-cell>
          <table:table-cell/>
          <table:table-cell office:value-type="string" calcext:value-type="string">
            <text:p>2021-03-23T13:34:35.9465429Z</text:p>
          </table:table-cell>
          <table:table-cell office:value-type="string" calcext:value-type="string">
            <text:p>2021-03-23-13:35:45.1305429</text:p>
          </table:table-cell>
          <table:table-cell table:number-columns-repeated="2"/>
        </table:table-row>
        <table:table-row table:style-name="ro1">
          <table:table-cell office:value-type="float" office:value="478905999" calcext:value-type="float">
            <text:p>478905999</text:p>
          </table:table-cell>
          <table:table-cell office:value-type="float" office:value="669872081.947585" calcext:value-type="float">
            <text:p>669872081.947585</text:p>
          </table:table-cell>
          <table:table-cell/>
          <table:table-cell office:value-type="string" calcext:value-type="string">
            <text:p>2021-03-24T15:34:41.9475849Z</text:p>
          </table:table-cell>
          <table:table-cell office:value-type="string" calcext:value-type="string">
            <text:p>2021-03-24-15:35:51.1315850</text:p>
          </table:table-cell>
          <table:table-cell table:number-columns-repeated="2"/>
        </table:table-row>
        <table:table-row table:style-name="ro1">
          <table:table-cell office:value-type="float" office:value="478992408" calcext:value-type="float">
            <text:p>478992408</text:p>
          </table:table-cell>
          <table:table-cell office:value-type="float" office:value="669958490.948559" calcext:value-type="float">
            <text:p>669958490.948559</text:p>
          </table:table-cell>
          <table:table-cell/>
          <table:table-cell office:value-type="string" calcext:value-type="string">
            <text:p>2021-03-25T15:34:50.9485589Z</text:p>
          </table:table-cell>
          <table:table-cell office:value-type="string" calcext:value-type="string">
            <text:p>2021-03-25-15:36:00.1325589</text:p>
          </table:table-cell>
          <table:table-cell table:number-columns-repeated="2"/>
        </table:table-row>
        <table:table-row table:style-name="ro1">
          <table:table-cell office:value-type="float" office:value="479032010" calcext:value-type="float">
            <text:p>479032010</text:p>
          </table:table-cell>
          <table:table-cell office:value-type="float" office:value="669998092.949007" calcext:value-type="float">
            <text:p>669998092.949007</text:p>
          </table:table-cell>
          <table:table-cell/>
          <table:table-cell office:value-type="string" calcext:value-type="string">
            <text:p>2021-03-26T02:34:52.9490070Z</text:p>
          </table:table-cell>
          <table:table-cell office:value-type="string" calcext:value-type="string">
            <text:p>2021-03-26-02:36:02.1330070</text:p>
          </table:table-cell>
          <table:table-cell table:number-columns-repeated="2"/>
        </table:table-row>
        <table:table-row table:style-name="ro1">
          <table:table-cell office:value-type="float" office:value="479168813" calcext:value-type="float">
            <text:p>479168813</text:p>
          </table:table-cell>
          <table:table-cell office:value-type="float" office:value="670134895.950524" calcext:value-type="float">
            <text:p>670134895.950524</text:p>
          </table:table-cell>
          <table:table-cell/>
          <table:table-cell office:value-type="string" calcext:value-type="string">
            <text:p>2021-03-27T16:34:55.9505239Z</text:p>
          </table:table-cell>
          <table:table-cell office:value-type="string" calcext:value-type="string">
            <text:p>2021-03-27-16:36:05.1345239</text:p>
          </table:table-cell>
          <table:table-cell table:number-columns-repeated="2"/>
        </table:table-row>
        <table:table-row table:style-name="ro1">
          <table:table-cell office:value-type="float" office:value="479330823" calcext:value-type="float">
            <text:p>479330823</text:p>
          </table:table-cell>
          <table:table-cell office:value-type="float" office:value="670296905.952306" calcext:value-type="float">
            <text:p>670296905.952306</text:p>
          </table:table-cell>
          <table:table-cell/>
          <table:table-cell office:value-type="string" calcext:value-type="string">
            <text:p>2021-03-29T13:35:05.9523060Z</text:p>
          </table:table-cell>
          <table:table-cell office:value-type="string" calcext:value-type="string">
            <text:p>2021-03-29-13:36:15.1363060</text:p>
          </table:table-cell>
          <table:table-cell table:number-columns-repeated="2"/>
        </table:table-row>
        <table:table-row table:style-name="ro1">
          <table:table-cell office:value-type="float" office:value="479428028" calcext:value-type="float">
            <text:p>479428028</text:p>
          </table:table-cell>
          <table:table-cell office:value-type="float" office:value="670394110.953405" calcext:value-type="float">
            <text:p>670394110.953405</text:p>
          </table:table-cell>
          <table:table-cell/>
          <table:table-cell office:value-type="string" calcext:value-type="string">
            <text:p>2021-03-30T16:35:10.9534050Z</text:p>
          </table:table-cell>
          <table:table-cell office:value-type="string" calcext:value-type="string">
            <text:p>2021-03-30-16:36:20.1374050</text:p>
          </table:table-cell>
          <table:table-cell table:number-columns-repeated="2"/>
        </table:table-row>
        <table:table-row table:style-name="ro1">
          <table:table-cell office:value-type="float" office:value="479514430" calcext:value-type="float">
            <text:p>479514430</text:p>
          </table:table-cell>
          <table:table-cell office:value-type="float" office:value="670480512.954376" calcext:value-type="float">
            <text:p>670480512.954376</text:p>
          </table:table-cell>
          <table:table-cell/>
          <table:table-cell office:value-type="string" calcext:value-type="string">
            <text:p>2021-03-31T16:35:12.9543759Z</text:p>
          </table:table-cell>
          <table:table-cell office:value-type="string" calcext:value-type="string">
            <text:p>2021-03-31-16:36:22.1383759</text:p>
          </table:table-cell>
          <table:table-cell table:number-columns-repeated="2"/>
        </table:table-row>
        <table:table-row table:style-name="ro1">
          <table:table-cell office:value-type="float" office:value="479550436" calcext:value-type="float">
            <text:p>479550436</text:p>
          </table:table-cell>
          <table:table-cell office:value-type="float" office:value="670516518.954773" calcext:value-type="float">
            <text:p>670516518.954773</text:p>
          </table:table-cell>
          <table:table-cell/>
          <table:table-cell office:value-type="string" calcext:value-type="string">
            <text:p>2021-04-01T02:35:18.9547729Z</text:p>
          </table:table-cell>
          <table:table-cell office:value-type="string" calcext:value-type="string">
            <text:p>2021-04-01-02:36:28.1387729</text:p>
          </table:table-cell>
          <table:table-cell table:number-columns-repeated="2"/>
        </table:table-row>
        <table:table-row table:style-name="ro1">
          <table:table-cell office:value-type="float" office:value="479687244" calcext:value-type="float">
            <text:p>479687244</text:p>
          </table:table-cell>
          <table:table-cell office:value-type="float" office:value="670653326.956302" calcext:value-type="float">
            <text:p>670653326.956302</text:p>
          </table:table-cell>
          <table:table-cell/>
          <table:table-cell office:value-type="string" calcext:value-type="string">
            <text:p>2021-04-02T16:35:26.9563019Z</text:p>
          </table:table-cell>
          <table:table-cell office:value-type="string" calcext:value-type="string">
            <text:p>2021-04-02-16:36:36.1403019</text:p>
          </table:table-cell>
          <table:table-cell table:number-columns-repeated="2"/>
        </table:table-row>
        <table:table-row table:style-name="ro1">
          <table:table-cell office:value-type="float" office:value="479737709" calcext:value-type="float">
            <text:p>479737709</text:p>
          </table:table-cell>
          <table:table-cell office:value-type="float" office:value="670703791.95685" calcext:value-type="float">
            <text:p>670703791.95685</text:p>
          </table:table-cell>
          <table:table-cell/>
          <table:table-cell office:value-type="string" calcext:value-type="string">
            <text:p>2021-04-03T06:36:31.9568499Z</text:p>
          </table:table-cell>
          <table:table-cell office:value-type="string" calcext:value-type="string">
            <text:p>2021-04-03-06:37:41.1408499</text:p>
          </table:table-cell>
          <table:table-cell table:number-columns-repeated="2"/>
        </table:table-row>
        <table:table-row table:style-name="ro1">
          <table:table-cell office:value-type="float" office:value="479860054" calcext:value-type="float">
            <text:p>479860054</text:p>
          </table:table-cell>
          <table:table-cell office:value-type="float" office:value="670826136.958241" calcext:value-type="float">
            <text:p>670826136.958241</text:p>
          </table:table-cell>
          <table:table-cell/>
          <table:table-cell office:value-type="string" calcext:value-type="string">
            <text:p>2021-04-04T16:35:36.9582409Z</text:p>
          </table:table-cell>
          <table:table-cell office:value-type="string" calcext:value-type="string">
            <text:p>2021-04-04-16:36:46.1422410</text:p>
          </table:table-cell>
          <table:table-cell table:number-columns-repeated="2"/>
        </table:table-row>
        <table:table-row table:style-name="ro1">
          <table:table-cell office:value-type="float" office:value="479932049" calcext:value-type="float">
            <text:p>479932049</text:p>
          </table:table-cell>
          <table:table-cell office:value-type="float" office:value="670898131.959026" calcext:value-type="float">
            <text:p>670898131.959026</text:p>
          </table:table-cell>
          <table:table-cell/>
          <table:table-cell office:value-type="string" calcext:value-type="string">
            <text:p>2021-04-05T12:35:31.9590259Z</text:p>
          </table:table-cell>
          <table:table-cell office:value-type="string" calcext:value-type="string">
            <text:p>2021-04-05-12:36:41.1430259</text:p>
          </table:table-cell>
          <table:table-cell table:number-columns-repeated="2"/>
        </table:table-row>
        <table:table-row table:style-name="ro1">
          <table:table-cell office:value-type="float" office:value="480014854" calcext:value-type="float">
            <text:p>480014854</text:p>
          </table:table-cell>
          <table:table-cell office:value-type="float" office:value="670980936.959948" calcext:value-type="float">
            <text:p>670980936.959948</text:p>
          </table:table-cell>
          <table:table-cell/>
          <table:table-cell office:value-type="string" calcext:value-type="string">
            <text:p>2021-04-06T11:35:36.9599479Z</text:p>
          </table:table-cell>
          <table:table-cell office:value-type="string" calcext:value-type="string">
            <text:p>2021-04-06-11:36:46.1439479</text:p>
          </table:table-cell>
          <table:table-cell table:number-columns-repeated="2"/>
        </table:table-row>
        <table:table-row table:style-name="ro1">
          <table:table-cell office:value-type="float" office:value="480119267" calcext:value-type="float">
            <text:p>480119267</text:p>
          </table:table-cell>
          <table:table-cell office:value-type="float" office:value="671085349.961138" calcext:value-type="float">
            <text:p>671085349.961138</text:p>
          </table:table-cell>
          <table:table-cell/>
          <table:table-cell office:value-type="string" calcext:value-type="string">
            <text:p>2021-04-07T16:35:49.9611380Z</text:p>
          </table:table-cell>
          <table:table-cell office:value-type="string" calcext:value-type="string">
            <text:p>2021-04-07-16:36:59.1451380</text:p>
          </table:table-cell>
          <table:table-cell table:number-columns-repeated="2"/>
        </table:table-row>
        <table:table-row table:style-name="ro1">
          <table:table-cell office:value-type="float" office:value="480140857" calcext:value-type="float">
            <text:p>480140857</text:p>
          </table:table-cell>
          <table:table-cell office:value-type="float" office:value="671106939.96135" calcext:value-type="float">
            <text:p>671106939.96135</text:p>
          </table:table-cell>
          <table:table-cell/>
          <table:table-cell office:value-type="string" calcext:value-type="string">
            <text:p>2021-04-07T22:35:39.9613499Z</text:p>
          </table:table-cell>
          <table:table-cell office:value-type="string" calcext:value-type="string">
            <text:p>2021-04-07-22:36:49.1453499</text:p>
          </table:table-cell>
          <table:table-cell table:number-columns-repeated="2"/>
        </table:table-row>
        <table:table-row table:style-name="ro1">
          <table:table-cell office:value-type="float" office:value="480292075" calcext:value-type="float">
            <text:p>480292075</text:p>
          </table:table-cell>
          <table:table-cell office:value-type="float" office:value="671258157.963055" calcext:value-type="float">
            <text:p>671258157.963055</text:p>
          </table:table-cell>
          <table:table-cell/>
          <table:table-cell office:value-type="string" calcext:value-type="string">
            <text:p>2021-04-09T16:35:57.9630550Z</text:p>
          </table:table-cell>
          <table:table-cell office:value-type="string" calcext:value-type="string">
            <text:p>2021-04-09-16:37:07.1470550</text:p>
          </table:table-cell>
          <table:table-cell table:number-columns-repeated="2"/>
        </table:table-row>
        <table:table-row table:style-name="ro1">
          <table:table-cell office:value-type="float" office:value="480349734" calcext:value-type="float">
            <text:p>480349734</text:p>
          </table:table-cell>
          <table:table-cell office:value-type="float" office:value="671315816.963709" calcext:value-type="float">
            <text:p>671315816.963709</text:p>
          </table:table-cell>
          <table:table-cell/>
          <table:table-cell office:value-type="string" calcext:value-type="string">
            <text:p>2021-04-10T08:36:56.9637089Z</text:p>
          </table:table-cell>
          <table:table-cell office:value-type="string" calcext:value-type="string">
            <text:p>2021-04-10-08:38:06.1477090</text:p>
          </table:table-cell>
          <table:table-cell table:number-columns-repeated="2"/>
        </table:table-row>
        <table:table-row table:style-name="ro1">
          <table:table-cell office:value-type="float" office:value="480464886" calcext:value-type="float">
            <text:p>480464886</text:p>
          </table:table-cell>
          <table:table-cell office:value-type="float" office:value="671430968.96499" calcext:value-type="float">
            <text:p>671430968.96499</text:p>
          </table:table-cell>
          <table:table-cell/>
          <table:table-cell office:value-type="string" calcext:value-type="string">
            <text:p>2021-04-11T16:36:08.9649900Z</text:p>
          </table:table-cell>
          <table:table-cell office:value-type="string" calcext:value-type="string">
            <text:p>2021-04-11-16:37:18.1489900</text:p>
          </table:table-cell>
          <table:table-cell table:number-columns-repeated="2"/>
        </table:table-row>
        <table:table-row table:style-name="ro1">
          <table:table-cell office:value-type="float" office:value="480544086" calcext:value-type="float">
            <text:p>480544086</text:p>
          </table:table-cell>
          <table:table-cell office:value-type="float" office:value="671510168.965873" calcext:value-type="float">
            <text:p>671510168.965873</text:p>
          </table:table-cell>
          <table:table-cell/>
          <table:table-cell office:value-type="string" calcext:value-type="string">
            <text:p>2021-04-12T14:36:08.9658730Z</text:p>
          </table:table-cell>
          <table:table-cell office:value-type="string" calcext:value-type="string">
            <text:p>2021-04-12-14:37:18.1498730</text:p>
          </table:table-cell>
          <table:table-cell table:number-columns-repeated="2"/>
        </table:table-row>
        <table:table-row table:style-name="ro1">
          <table:table-cell office:value-type="float" office:value="480637705" calcext:value-type="float">
            <text:p>480637705</text:p>
          </table:table-cell>
          <table:table-cell office:value-type="float" office:value="671603787.966927" calcext:value-type="float">
            <text:p>671603787.966927</text:p>
          </table:table-cell>
          <table:table-cell/>
          <table:table-cell office:value-type="string" calcext:value-type="string">
            <text:p>2021-04-13T16:36:27.9669269Z</text:p>
          </table:table-cell>
          <table:table-cell office:value-type="string" calcext:value-type="string">
            <text:p>2021-04-13-16:37:37.1509269</text:p>
          </table:table-cell>
          <table:table-cell table:number-columns-repeated="2"/>
        </table:table-row>
        <table:table-row table:style-name="ro1">
          <table:table-cell office:value-type="float" office:value="480720499" calcext:value-type="float">
            <text:p>480720499</text:p>
          </table:table-cell>
          <table:table-cell office:value-type="float" office:value="671686581.967867" calcext:value-type="float">
            <text:p>671686581.967867</text:p>
          </table:table-cell>
          <table:table-cell/>
          <table:table-cell office:value-type="string" calcext:value-type="string">
            <text:p>2021-04-14T15:36:21.9678670Z</text:p>
          </table:table-cell>
          <table:table-cell office:value-type="string" calcext:value-type="string">
            <text:p>2021-04-14-15:37:31.1518670</text:p>
          </table:table-cell>
          <table:table-cell table:number-columns-repeated="2"/>
        </table:table-row>
        <table:table-row table:style-name="ro1">
          <table:table-cell office:value-type="float" office:value="480968906" calcext:value-type="float">
            <text:p>480968906</text:p>
          </table:table-cell>
          <table:table-cell office:value-type="float" office:value="671934988.970633" calcext:value-type="float">
            <text:p>671934988.970633</text:p>
          </table:table-cell>
          <table:table-cell/>
          <table:table-cell office:value-type="string" calcext:value-type="string">
            <text:p>2021-04-17T12:36:28.9706330Z</text:p>
          </table:table-cell>
          <table:table-cell office:value-type="string" calcext:value-type="string">
            <text:p>2021-04-17-12:37:38.1546330</text:p>
          </table:table-cell>
          <table:table-cell table:number-columns-repeated="2"/>
        </table:table-row>
        <table:table-row table:style-name="ro1">
          <table:table-cell office:value-type="float" office:value="481040971" calcext:value-type="float">
            <text:p>481040971</text:p>
          </table:table-cell>
          <table:table-cell office:value-type="float" office:value="672007053.97148" calcext:value-type="float">
            <text:p>672007053.97148</text:p>
          </table:table-cell>
          <table:table-cell/>
          <table:table-cell office:value-type="string" calcext:value-type="string">
            <text:p>2021-04-18T08:37:33.9714800Z</text:p>
          </table:table-cell>
          <table:table-cell office:value-type="string" calcext:value-type="string">
            <text:p>2021-04-18-08:38:43.1554800</text:p>
          </table:table-cell>
          <table:table-cell table:number-columns-repeated="2"/>
        </table:table-row>
        <table:table-row table:style-name="ro1">
          <table:table-cell office:value-type="float" office:value="481148919" calcext:value-type="float">
            <text:p>481148919</text:p>
          </table:table-cell>
          <table:table-cell office:value-type="float" office:value="672115001.972681" calcext:value-type="float">
            <text:p>672115001.972681</text:p>
          </table:table-cell>
          <table:table-cell/>
          <table:table-cell office:value-type="string" calcext:value-type="string">
            <text:p>2021-04-19T14:36:41.9726809Z</text:p>
          </table:table-cell>
          <table:table-cell office:value-type="string" calcext:value-type="string">
            <text:p>2021-04-19-14:37:51.1566809</text:p>
          </table:table-cell>
          <table:table-cell table:number-columns-repeated="2"/>
        </table:table-row>
        <table:table-row table:style-name="ro1">
          <table:table-cell office:value-type="float" office:value="481238924" calcext:value-type="float">
            <text:p>481238924</text:p>
          </table:table-cell>
          <table:table-cell office:value-type="float" office:value="672205006.973693" calcext:value-type="float">
            <text:p>672205006.973693</text:p>
          </table:table-cell>
          <table:table-cell/>
          <table:table-cell office:value-type="string" calcext:value-type="string">
            <text:p>2021-04-20T15:36:46.9736930Z</text:p>
          </table:table-cell>
          <table:table-cell office:value-type="string" calcext:value-type="string">
            <text:p>2021-04-20-15:37:56.1576930</text:p>
          </table:table-cell>
          <table:table-cell table:number-columns-repeated="2"/>
        </table:table-row>
        <table:table-row table:style-name="ro1">
          <table:table-cell office:value-type="float" office:value="481415335" calcext:value-type="float">
            <text:p>481415335</text:p>
          </table:table-cell>
          <table:table-cell office:value-type="float" office:value="672381417.975686" calcext:value-type="float">
            <text:p>672381417.975686</text:p>
          </table:table-cell>
          <table:table-cell/>
          <table:table-cell office:value-type="string" calcext:value-type="string">
            <text:p>2021-04-22T16:36:57.9756859Z</text:p>
          </table:table-cell>
          <table:table-cell office:value-type="string" calcext:value-type="string">
            <text:p>2021-04-22-16:38:07.1596859</text:p>
          </table:table-cell>
          <table:table-cell table:number-columns-repeated="2"/>
        </table:table-row>
        <table:table-row table:style-name="ro1">
          <table:table-cell office:value-type="float" office:value="481469398" calcext:value-type="float">
            <text:p>481469398</text:p>
          </table:table-cell>
          <table:table-cell office:value-type="float" office:value="672435480.976301" calcext:value-type="float">
            <text:p>672435480.976301</text:p>
          </table:table-cell>
          <table:table-cell/>
          <table:table-cell office:value-type="string" calcext:value-type="string">
            <text:p>2021-04-23T07:38:00.9763009Z</text:p>
          </table:table-cell>
          <table:table-cell office:value-type="string" calcext:value-type="string">
            <text:p>2021-04-23-07:39:10.1603009</text:p>
          </table:table-cell>
          <table:table-cell table:number-columns-repeated="2"/>
        </table:table-row>
        <table:table-row table:style-name="ro1">
          <table:table-cell office:value-type="float" office:value="481555738" calcext:value-type="float">
            <text:p>481555738</text:p>
          </table:table-cell>
          <table:table-cell office:value-type="float" office:value="672521820.977231" calcext:value-type="float">
            <text:p>672521820.977231</text:p>
          </table:table-cell>
          <table:table-cell/>
          <table:table-cell office:value-type="string" calcext:value-type="string">
            <text:p>2021-04-24T07:37:00.9772310Z</text:p>
          </table:table-cell>
          <table:table-cell office:value-type="string" calcext:value-type="string">
            <text:p>2021-04-24-07:38:10.1612310</text:p>
          </table:table-cell>
          <table:table-cell table:number-columns-repeated="2"/>
        </table:table-row>
        <table:table-row table:style-name="ro1">
          <table:table-cell office:value-type="float" office:value="481667342" calcext:value-type="float">
            <text:p>481667342</text:p>
          </table:table-cell>
          <table:table-cell office:value-type="float" office:value="672633424.978514" calcext:value-type="float">
            <text:p>672633424.978514</text:p>
          </table:table-cell>
          <table:table-cell/>
          <table:table-cell office:value-type="string" calcext:value-type="string">
            <text:p>2021-04-25T14:37:04.9785139Z</text:p>
          </table:table-cell>
          <table:table-cell office:value-type="string" calcext:value-type="string">
            <text:p>2021-04-25-14:38:14.1625139</text:p>
          </table:table-cell>
          <table:table-cell table:number-columns-repeated="2"/>
        </table:table-row>
        <table:table-row table:style-name="ro1">
          <table:table-cell office:value-type="float" office:value="481753746" calcext:value-type="float">
            <text:p>481753746</text:p>
          </table:table-cell>
          <table:table-cell office:value-type="float" office:value="672719828.979489" calcext:value-type="float">
            <text:p>672719828.979489</text:p>
          </table:table-cell>
          <table:table-cell/>
          <table:table-cell office:value-type="string" calcext:value-type="string">
            <text:p>2021-04-26T14:37:08.9794889Z</text:p>
          </table:table-cell>
          <table:table-cell office:value-type="string" calcext:value-type="string">
            <text:p>2021-04-26-14:38:18.1634889</text:p>
          </table:table-cell>
          <table:table-cell table:number-columns-repeated="2"/>
        </table:table-row>
        <table:table-row table:style-name="ro1">
          <table:table-cell office:value-type="float" office:value="481847358" calcext:value-type="float">
            <text:p>481847358</text:p>
          </table:table-cell>
          <table:table-cell office:value-type="float" office:value="672813440.980555" calcext:value-type="float">
            <text:p>672813440.980555</text:p>
          </table:table-cell>
          <table:table-cell/>
          <table:table-cell office:value-type="string" calcext:value-type="string">
            <text:p>2021-04-27T16:37:20.9805549Z</text:p>
          </table:table-cell>
          <table:table-cell office:value-type="string" calcext:value-type="string">
            <text:p>2021-04-27-16:38:30.1645549</text:p>
          </table:table-cell>
          <table:table-cell table:number-columns-repeated="2"/>
        </table:table-row>
        <table:table-row table:style-name="ro1">
          <table:table-cell office:value-type="float" office:value="481933765" calcext:value-type="float">
            <text:p>481933765</text:p>
          </table:table-cell>
          <table:table-cell office:value-type="float" office:value="672899847.981531" calcext:value-type="float">
            <text:p>672899847.981531</text:p>
          </table:table-cell>
          <table:table-cell/>
          <table:table-cell office:value-type="string" calcext:value-type="string">
            <text:p>2021-04-28T16:37:27.9815310Z</text:p>
          </table:table-cell>
          <table:table-cell office:value-type="string" calcext:value-type="string">
            <text:p>2021-04-28-16:38:37.1655310</text:p>
          </table:table-cell>
          <table:table-cell table:number-columns-repeated="2"/>
        </table:table-row>
        <table:table-row table:style-name="ro1">
          <table:table-cell office:value-type="float" office:value="482005759" calcext:value-type="float">
            <text:p>482005759</text:p>
          </table:table-cell>
          <table:table-cell office:value-type="float" office:value="672971841.982329" calcext:value-type="float">
            <text:p>672971841.982329</text:p>
          </table:table-cell>
          <table:table-cell/>
          <table:table-cell office:value-type="string" calcext:value-type="string">
            <text:p>2021-04-29T12:37:21.9823290Z</text:p>
          </table:table-cell>
          <table:table-cell office:value-type="string" calcext:value-type="string">
            <text:p>2021-04-29-12:38:31.1663290</text:p>
          </table:table-cell>
          <table:table-cell table:number-columns-repeated="2"/>
        </table:table-row>
        <table:table-row table:style-name="ro1">
          <table:table-cell office:value-type="float" office:value="482095764" calcext:value-type="float">
            <text:p>482095764</text:p>
          </table:table-cell>
          <table:table-cell office:value-type="float" office:value="673061846.983351" calcext:value-type="float">
            <text:p>673061846.983351</text:p>
          </table:table-cell>
          <table:table-cell/>
          <table:table-cell office:value-type="string" calcext:value-type="string">
            <text:p>2021-04-30T13:37:26.9833509Z</text:p>
          </table:table-cell>
          <table:table-cell office:value-type="string" calcext:value-type="string">
            <text:p>2021-04-30-13:38:36.1673510</text:p>
          </table:table-cell>
          <table:table-cell table:number-columns-repeated="2"/>
        </table:table-row>
        <table:table-row table:style-name="ro1">
          <table:table-cell office:value-type="float" office:value="482192982" calcext:value-type="float">
            <text:p>482192982</text:p>
          </table:table-cell>
          <table:table-cell office:value-type="float" office:value="673159064.984459" calcext:value-type="float">
            <text:p>673159064.984459</text:p>
          </table:table-cell>
          <table:table-cell/>
          <table:table-cell office:value-type="string" calcext:value-type="string">
            <text:p>2021-05-01T16:37:44.9844590Z</text:p>
          </table:table-cell>
          <table:table-cell office:value-type="string" calcext:value-type="string">
            <text:p>2021-05-01-16:38:54.1684590</text:p>
          </table:table-cell>
          <table:table-cell table:number-columns-repeated="2"/>
        </table:table-row>
        <table:table-row table:style-name="ro1">
          <table:table-cell office:value-type="float" office:value="482250582" calcext:value-type="float">
            <text:p>482250582</text:p>
          </table:table-cell>
          <table:table-cell office:value-type="float" office:value="673216664.985121" calcext:value-type="float">
            <text:p>673216664.985121</text:p>
          </table:table-cell>
          <table:table-cell/>
          <table:table-cell office:value-type="string" calcext:value-type="string">
            <text:p>2021-05-02T08:37:44.9851210Z</text:p>
          </table:table-cell>
          <table:table-cell office:value-type="string" calcext:value-type="string">
            <text:p>2021-05-02-08:38:54.1691210</text:p>
          </table:table-cell>
          <table:table-cell table:number-columns-repeated="2"/>
        </table:table-row>
        <table:table-row table:style-name="ro1">
          <table:table-cell office:value-type="float" office:value="482358572" calcext:value-type="float">
            <text:p>482358572</text:p>
          </table:table-cell>
          <table:table-cell office:value-type="float" office:value="673324654.986336" calcext:value-type="float">
            <text:p>673324654.986336</text:p>
          </table:table-cell>
          <table:table-cell/>
          <table:table-cell office:value-type="string" calcext:value-type="string">
            <text:p>2021-05-03T14:37:34.9863359Z</text:p>
          </table:table-cell>
          <table:table-cell office:value-type="string" calcext:value-type="string">
            <text:p>2021-05-03-14:38:44.1703360</text:p>
          </table:table-cell>
          <table:table-cell table:number-columns-repeated="2"/>
        </table:table-row>
        <table:table-row table:style-name="ro1">
          <table:table-cell office:value-type="float" office:value="482617815" calcext:value-type="float">
            <text:p>482617815</text:p>
          </table:table-cell>
          <table:table-cell office:value-type="float" office:value="673583897.989274" calcext:value-type="float">
            <text:p>673583897.989274</text:p>
          </table:table-cell>
          <table:table-cell/>
          <table:table-cell office:value-type="string" calcext:value-type="string">
            <text:p>2021-05-06T14:38:17.9892740Z</text:p>
          </table:table-cell>
          <table:table-cell office:value-type="string" calcext:value-type="string">
            <text:p>2021-05-06-14:39:27.1732740</text:p>
          </table:table-cell>
          <table:table-cell table:number-columns-repeated="2"/>
        </table:table-row>
        <table:table-row table:style-name="ro1">
          <table:table-cell office:value-type="float" office:value="483046233" calcext:value-type="float">
            <text:p>483046233</text:p>
          </table:table-cell>
          <table:table-cell office:value-type="float" office:value="674012315.994122" calcext:value-type="float">
            <text:p>674012315.994122</text:p>
          </table:table-cell>
          <table:table-cell/>
          <table:table-cell office:value-type="string" calcext:value-type="string">
            <text:p>2021-05-11T13:38:35.9941220Z</text:p>
          </table:table-cell>
          <table:table-cell office:value-type="string" calcext:value-type="string">
            <text:p>2021-05-11-13:39:45.1781220</text:p>
          </table:table-cell>
          <table:table-cell table:number-columns-repeated="2"/>
        </table:table-row>
        <table:table-row table:style-name="ro1">
          <table:table-cell office:value-type="float" office:value="483078594" calcext:value-type="float">
            <text:p>483078594</text:p>
          </table:table-cell>
          <table:table-cell office:value-type="float" office:value="674044676.994485" calcext:value-type="float">
            <text:p>674044676.994485</text:p>
          </table:table-cell>
          <table:table-cell/>
          <table:table-cell office:value-type="string" calcext:value-type="string">
            <text:p>2021-05-11T22:37:56.9944850Z</text:p>
          </table:table-cell>
          <table:table-cell office:value-type="string" calcext:value-type="string">
            <text:p>2021-05-11-22:39:06.1784850</text:p>
          </table:table-cell>
          <table:table-cell table:number-columns-repeated="2"/>
        </table:table-row>
        <table:table-row table:style-name="ro1">
          <table:table-cell office:value-type="float" office:value="483258633" calcext:value-type="float">
            <text:p>483258633</text:p>
          </table:table-cell>
          <table:table-cell office:value-type="float" office:value="674224715.996534" calcext:value-type="float">
            <text:p>674224715.996534</text:p>
          </table:table-cell>
          <table:table-cell/>
          <table:table-cell office:value-type="string" calcext:value-type="string">
            <text:p>2021-05-14T00:38:35.9965339Z</text:p>
          </table:table-cell>
          <table:table-cell office:value-type="string" calcext:value-type="string">
            <text:p>2021-05-14-00:39:45.1805340</text:p>
          </table:table-cell>
          <table:table-cell table:number-columns-repeated="2"/>
        </table:table-row>
        <table:table-row table:style-name="ro1">
          <table:table-cell office:value-type="float" office:value="483402648" calcext:value-type="float">
            <text:p>483402648</text:p>
          </table:table-cell>
          <table:table-cell office:value-type="float" office:value="674368730.998157" calcext:value-type="float">
            <text:p>674368730.998157</text:p>
          </table:table-cell>
          <table:table-cell/>
          <table:table-cell office:value-type="string" calcext:value-type="string">
            <text:p>2021-05-15T16:38:50.9981570Z</text:p>
          </table:table-cell>
          <table:table-cell office:value-type="string" calcext:value-type="string">
            <text:p>2021-05-15-16:40:00.1821570</text:p>
          </table:table-cell>
          <table:table-cell table:number-columns-repeated="2"/>
        </table:table-row>
        <table:table-row table:style-name="ro1">
          <table:table-cell office:value-type="float" office:value="483489052" calcext:value-type="float">
            <text:p>483489052</text:p>
          </table:table-cell>
          <table:table-cell office:value-type="float" office:value="674455134.999143" calcext:value-type="float">
            <text:p>674455134.999143</text:p>
          </table:table-cell>
          <table:table-cell/>
          <table:table-cell office:value-type="string" calcext:value-type="string">
            <text:p>2021-05-16T16:38:54.9991430Z</text:p>
          </table:table-cell>
          <table:table-cell office:value-type="string" calcext:value-type="string">
            <text:p>2021-05-16-16:40:04.1831430</text:p>
          </table:table-cell>
          <table:table-cell table:number-columns-repeated="2"/>
        </table:table-row>
        <table:table-row table:style-name="ro1">
          <table:table-cell office:value-type="float" office:value="483568221" calcext:value-type="float">
            <text:p>483568221</text:p>
          </table:table-cell>
          <table:table-cell office:value-type="float" office:value="674534304.000044" calcext:value-type="float">
            <text:p>674534304.000044</text:p>
          </table:table-cell>
          <table:table-cell/>
          <table:table-cell office:value-type="string" calcext:value-type="string">
            <text:p>2021-05-17T14:38:24.0000439Z</text:p>
          </table:table-cell>
          <table:table-cell office:value-type="string" calcext:value-type="string">
            <text:p>2021-05-17-14:39:33.1840440</text:p>
          </table:table-cell>
          <table:table-cell table:number-columns-repeated="2"/>
        </table:table-row>
        <table:table-row table:style-name="ro1">
          <table:table-cell office:value-type="float" office:value="483647420" calcext:value-type="float">
            <text:p>483647420</text:p>
          </table:table-cell>
          <table:table-cell office:value-type="float" office:value="674613503.000933" calcext:value-type="float">
            <text:p>674613503.000933</text:p>
          </table:table-cell>
          <table:table-cell/>
          <table:table-cell office:value-type="string" calcext:value-type="string">
            <text:p>2021-05-18T12:38:23.0009329Z</text:p>
          </table:table-cell>
          <table:table-cell office:value-type="string" calcext:value-type="string">
            <text:p>2021-05-18-12:39:32.1849329</text:p>
          </table:table-cell>
          <table:table-cell table:number-columns-repeated="2"/>
        </table:table-row>
        <table:table-row table:style-name="ro1">
          <table:table-cell office:value-type="float" office:value="483748261" calcext:value-type="float">
            <text:p>483748261</text:p>
          </table:table-cell>
          <table:table-cell office:value-type="float" office:value="674714344.002071" calcext:value-type="float">
            <text:p>674714344.002071</text:p>
          </table:table-cell>
          <table:table-cell/>
          <table:table-cell office:value-type="string" calcext:value-type="string">
            <text:p>2021-05-19T16:39:04.0020710Z</text:p>
          </table:table-cell>
          <table:table-cell office:value-type="string" calcext:value-type="string">
            <text:p>2021-05-19-16:40:13.1860710</text:p>
          </table:table-cell>
          <table:table-cell table:number-columns-repeated="2"/>
        </table:table-row>
        <table:table-row table:style-name="ro1">
          <table:table-cell office:value-type="float" office:value="483802249" calcext:value-type="float">
            <text:p>483802249</text:p>
          </table:table-cell>
          <table:table-cell office:value-type="float" office:value="674768332.002688" calcext:value-type="float">
            <text:p>674768332.002688</text:p>
          </table:table-cell>
          <table:table-cell/>
          <table:table-cell office:value-type="string" calcext:value-type="string">
            <text:p>2021-05-20T07:38:52.0026879Z</text:p>
          </table:table-cell>
          <table:table-cell office:value-type="string" calcext:value-type="string">
            <text:p>2021-05-20-07:40:01.1866879</text:p>
          </table:table-cell>
          <table:table-cell table:number-columns-repeated="2"/>
        </table:table-row>
        <table:table-row table:style-name="ro1">
          <table:table-cell office:value-type="float" office:value="483913833" calcext:value-type="float">
            <text:p>483913833</text:p>
          </table:table-cell>
          <table:table-cell office:value-type="float" office:value="674879916.003963" calcext:value-type="float">
            <text:p>674879916.003963</text:p>
          </table:table-cell>
          <table:table-cell/>
          <table:table-cell office:value-type="string" calcext:value-type="string">
            <text:p>2021-05-21T14:38:36.0039629Z</text:p>
          </table:table-cell>
          <table:table-cell office:value-type="string" calcext:value-type="string">
            <text:p>2021-05-21-14:39:45.1879630</text:p>
          </table:table-cell>
          <table:table-cell table:number-columns-repeated="2"/>
        </table:table-row>
        <table:table-row table:style-name="ro1">
          <table:table-cell office:value-type="float" office:value="484003848" calcext:value-type="float">
            <text:p>484003848</text:p>
          </table:table-cell>
          <table:table-cell office:value-type="float" office:value="674969931.004989" calcext:value-type="float">
            <text:p>674969931.004989</text:p>
          </table:table-cell>
          <table:table-cell/>
          <table:table-cell office:value-type="string" calcext:value-type="string">
            <text:p>2021-05-22T15:38:51.0049890Z</text:p>
          </table:table-cell>
          <table:table-cell office:value-type="string" calcext:value-type="string">
            <text:p>2021-05-22-15:40:00.1889890</text:p>
          </table:table-cell>
          <table:table-cell table:number-columns-repeated="2"/>
        </table:table-row>
        <table:table-row table:style-name="ro1">
          <table:table-cell office:value-type="float" office:value="484090285" calcext:value-type="float">
            <text:p>484090285</text:p>
          </table:table-cell>
          <table:table-cell office:value-type="float" office:value="675056368.005965" calcext:value-type="float">
            <text:p>675056368.005965</text:p>
          </table:table-cell>
          <table:table-cell/>
          <table:table-cell office:value-type="string" calcext:value-type="string">
            <text:p>2021-05-23T15:39:28.0059649Z</text:p>
          </table:table-cell>
          <table:table-cell office:value-type="string" calcext:value-type="string">
            <text:p>2021-05-23-15:40:37.1899650</text:p>
          </table:table-cell>
          <table:table-cell table:number-columns-repeated="2"/>
        </table:table-row>
        <table:table-row table:style-name="ro1">
          <table:table-cell office:value-type="float" office:value="484147857" calcext:value-type="float">
            <text:p>484147857</text:p>
          </table:table-cell>
          <table:table-cell office:value-type="float" office:value="675113940.006617" calcext:value-type="float">
            <text:p>675113940.006617</text:p>
          </table:table-cell>
          <table:table-cell/>
          <table:table-cell office:value-type="string" calcext:value-type="string">
            <text:p>2021-05-24T07:39:00.0066169Z</text:p>
          </table:table-cell>
          <table:table-cell office:value-type="string" calcext:value-type="string">
            <text:p>2021-05-24-07:40:09.1906169</text:p>
          </table:table-cell>
          <table:table-cell table:number-columns-repeated="2"/>
        </table:table-row>
        <table:table-row table:style-name="ro1">
          <table:table-cell office:value-type="float" office:value="484267331" calcext:value-type="float">
            <text:p>484267331</text:p>
          </table:table-cell>
          <table:table-cell office:value-type="float" office:value="675233414.007952" calcext:value-type="float">
            <text:p>675233414.007952</text:p>
          </table:table-cell>
          <table:table-cell/>
          <table:table-cell office:value-type="string" calcext:value-type="string">
            <text:p>2021-05-25T16:50:14.0079519Z</text:p>
          </table:table-cell>
          <table:table-cell office:value-type="string" calcext:value-type="string">
            <text:p>2021-05-25-16:51:23.1919519</text:p>
          </table:table-cell>
          <table:table-cell table:number-columns-repeated="2"/>
        </table:table-row>
        <table:table-row table:style-name="ro1">
          <table:table-cell office:value-type="float" office:value="484345846" calcext:value-type="float">
            <text:p>484345846</text:p>
          </table:table-cell>
          <table:table-cell office:value-type="float" office:value="675311929.00887" calcext:value-type="float">
            <text:p>675311929.00887</text:p>
          </table:table-cell>
          <table:table-cell/>
          <table:table-cell office:value-type="string" calcext:value-type="string">
            <text:p>2021-05-26T14:38:49.0088700Z</text:p>
          </table:table-cell>
          <table:table-cell office:value-type="string" calcext:value-type="string">
            <text:p>2021-05-26-14:39:58.1928700</text:p>
          </table:table-cell>
          <table:table-cell table:number-columns-repeated="2"/>
        </table:table-row>
        <table:table-row table:style-name="ro1">
          <table:table-cell office:value-type="float" office:value="484407073" calcext:value-type="float">
            <text:p>484407073</text:p>
          </table:table-cell>
          <table:table-cell office:value-type="float" office:value="675373156.009568" calcext:value-type="float">
            <text:p>675373156.009568</text:p>
          </table:table-cell>
          <table:table-cell/>
          <table:table-cell office:value-type="string" calcext:value-type="string">
            <text:p>2021-05-27T07:39:16.0095679Z</text:p>
          </table:table-cell>
          <table:table-cell office:value-type="string" calcext:value-type="string">
            <text:p>2021-05-27-07:40:25.1935679</text:p>
          </table:table-cell>
          <table:table-cell table:number-columns-repeated="2"/>
        </table:table-row>
        <table:table-row table:style-name="ro1">
          <table:table-cell office:value-type="float" office:value="484515045" calcext:value-type="float">
            <text:p>484515045</text:p>
          </table:table-cell>
          <table:table-cell office:value-type="float" office:value="675481128.010799" calcext:value-type="float">
            <text:p>675481128.010799</text:p>
          </table:table-cell>
          <table:table-cell/>
          <table:table-cell office:value-type="string" calcext:value-type="string">
            <text:p>2021-05-28T13:38:48.0107989Z</text:p>
          </table:table-cell>
          <table:table-cell office:value-type="string" calcext:value-type="string">
            <text:p>2021-05-28-13:39:57.1947989</text:p>
          </table:table-cell>
          <table:table-cell table:number-columns-repeated="2"/>
        </table:table-row>
        <table:table-row table:style-name="ro1">
          <table:table-cell office:value-type="float" office:value="484612312" calcext:value-type="float">
            <text:p>484612312</text:p>
          </table:table-cell>
          <table:table-cell office:value-type="float" office:value="675578395.011883" calcext:value-type="float">
            <text:p>675578395.011883</text:p>
          </table:table-cell>
          <table:table-cell/>
          <table:table-cell office:value-type="string" calcext:value-type="string">
            <text:p>2021-05-29T16:39:55.0118830Z</text:p>
          </table:table-cell>
          <table:table-cell office:value-type="string" calcext:value-type="string">
            <text:p>2021-05-29-16:41:04.1958830</text:p>
          </table:table-cell>
          <table:table-cell table:number-columns-repeated="2"/>
        </table:table-row>
        <table:table-row table:style-name="ro1">
          <table:table-cell office:value-type="float" office:value="484695075" calcext:value-type="float">
            <text:p>484695075</text:p>
          </table:table-cell>
          <table:table-cell office:value-type="float" office:value="675661158.012846" calcext:value-type="float">
            <text:p>675661158.012846</text:p>
          </table:table-cell>
          <table:table-cell/>
          <table:table-cell office:value-type="string" calcext:value-type="string">
            <text:p>2021-05-30T15:39:18.0128459Z</text:p>
          </table:table-cell>
          <table:table-cell office:value-type="string" calcext:value-type="string">
            <text:p>2021-05-30-15:40:27.1968460</text:p>
          </table:table-cell>
          <table:table-cell table:number-columns-repeated="2"/>
        </table:table-row>
        <table:table-row table:style-name="ro1">
          <table:table-cell office:value-type="float" office:value="484767044" calcext:value-type="float">
            <text:p>484767044</text:p>
          </table:table-cell>
          <table:table-cell office:value-type="float" office:value="675733127.013641" calcext:value-type="float">
            <text:p>675733127.013641</text:p>
          </table:table-cell>
          <table:table-cell/>
          <table:table-cell office:value-type="string" calcext:value-type="string">
            <text:p>2021-05-31T11:38:47.0136409Z</text:p>
          </table:table-cell>
          <table:table-cell office:value-type="string" calcext:value-type="string">
            <text:p>2021-05-31-11:39:56.1976410</text:p>
          </table:table-cell>
          <table:table-cell table:number-columns-repeated="2"/>
        </table:table-row>
        <table:table-row table:style-name="ro1">
          <table:table-cell office:value-type="float" office:value="484831848" calcext:value-type="float">
            <text:p>484831848</text:p>
          </table:table-cell>
          <table:table-cell office:value-type="float" office:value="675797931.014393" calcext:value-type="float">
            <text:p>675797931.014393</text:p>
          </table:table-cell>
          <table:table-cell/>
          <table:table-cell office:value-type="string" calcext:value-type="string">
            <text:p>2021-06-01T05:38:51.0143929Z</text:p>
          </table:table-cell>
          <table:table-cell office:value-type="string" calcext:value-type="string">
            <text:p>2021-06-01-05:40:00.1983929</text:p>
          </table:table-cell>
          <table:table-cell table:number-columns-repeated="2"/>
        </table:table-row>
        <table:table-row table:style-name="ro1">
          <table:table-cell office:value-type="float" office:value="484918252" calcext:value-type="float">
            <text:p>484918252</text:p>
          </table:table-cell>
          <table:table-cell office:value-type="float" office:value="675884335.015377" calcext:value-type="float">
            <text:p>675884335.015377</text:p>
          </table:table-cell>
          <table:table-cell/>
          <table:table-cell office:value-type="string" calcext:value-type="string">
            <text:p>2021-06-02T05:38:55.0153769Z</text:p>
          </table:table-cell>
          <table:table-cell office:value-type="string" calcext:value-type="string">
            <text:p>2021-06-02-05:40:04.1993769</text:p>
          </table:table-cell>
          <table:table-cell table:number-columns-repeated="2"/>
        </table:table-row>
        <table:table-row table:style-name="ro1">
          <table:table-cell office:value-type="float" office:value="485033455" calcext:value-type="float">
            <text:p>485033455</text:p>
          </table:table-cell>
          <table:table-cell office:value-type="float" office:value="675999538.01669" calcext:value-type="float">
            <text:p>675999538.01669</text:p>
          </table:table-cell>
          <table:table-cell/>
          <table:table-cell office:value-type="string" calcext:value-type="string">
            <text:p>2021-06-03T13:38:58.0166900Z</text:p>
          </table:table-cell>
          <table:table-cell office:value-type="string" calcext:value-type="string">
            <text:p>2021-06-03-13:40:07.2006900</text:p>
          </table:table-cell>
          <table:table-cell table:number-columns-repeated="2"/>
        </table:table-row>
        <table:table-row table:style-name="ro1">
          <table:table-cell office:value-type="float" office:value="485130720" calcext:value-type="float">
            <text:p>485130720</text:p>
          </table:table-cell>
          <table:table-cell office:value-type="float" office:value="676096803.017754" calcext:value-type="float">
            <text:p>676096803.017754</text:p>
          </table:table-cell>
          <table:table-cell/>
          <table:table-cell office:value-type="string" calcext:value-type="string">
            <text:p>2021-06-04T16:40:03.0177539Z</text:p>
          </table:table-cell>
          <table:table-cell office:value-type="string" calcext:value-type="string">
            <text:p>2021-06-04-16:41:12.2017539</text:p>
          </table:table-cell>
          <table:table-cell table:number-columns-repeated="2"/>
        </table:table-row>
        <table:table-row table:style-name="ro1">
          <table:table-cell office:value-type="float" office:value="485209863" calcext:value-type="float">
            <text:p>485209863</text:p>
          </table:table-cell>
          <table:table-cell office:value-type="float" office:value="676175946.018708" calcext:value-type="float">
            <text:p>676175946.018708</text:p>
          </table:table-cell>
          <table:table-cell/>
          <table:table-cell office:value-type="string" calcext:value-type="string">
            <text:p>2021-06-05T14:39:06.0187079Z</text:p>
          </table:table-cell>
          <table:table-cell office:value-type="string" calcext:value-type="string">
            <text:p>2021-06-05-14:40:15.2027080</text:p>
          </table:table-cell>
          <table:table-cell table:number-columns-repeated="2"/>
        </table:table-row>
        <table:table-row table:style-name="ro1">
          <table:table-cell office:value-type="float" office:value="485289053" calcext:value-type="float">
            <text:p>485289053</text:p>
          </table:table-cell>
          <table:table-cell office:value-type="float" office:value="676255136.019593" calcext:value-type="float">
            <text:p>676255136.019593</text:p>
          </table:table-cell>
          <table:table-cell/>
          <table:table-cell office:value-type="string" calcext:value-type="string">
            <text:p>2021-06-06T12:38:56.0195930Z</text:p>
          </table:table-cell>
          <table:table-cell office:value-type="string" calcext:value-type="string">
            <text:p>2021-06-06-12:40:05.2035930</text:p>
          </table:table-cell>
          <table:table-cell table:number-columns-repeated="2"/>
        </table:table-row>
        <table:table-row table:style-name="ro1">
          <table:table-cell office:value-type="float" office:value="485555471" calcext:value-type="float">
            <text:p>485555471</text:p>
          </table:table-cell>
          <table:table-cell office:value-type="float" office:value="676521554.022646" calcext:value-type="float">
            <text:p>676521554.022646</text:p>
          </table:table-cell>
          <table:table-cell/>
          <table:table-cell office:value-type="string" calcext:value-type="string">
            <text:p>2021-06-09T14:39:14.0226459Z</text:p>
          </table:table-cell>
          <table:table-cell office:value-type="string" calcext:value-type="string">
            <text:p>2021-06-09-14:40:23.2066459</text:p>
          </table:table-cell>
          <table:table-cell table:number-columns-repeated="2"/>
        </table:table-row>
        <table:table-row table:style-name="ro1">
          <table:table-cell office:value-type="float" office:value="485641873" calcext:value-type="float">
            <text:p>485641873</text:p>
          </table:table-cell>
          <table:table-cell office:value-type="float" office:value="676607956.02364" calcext:value-type="float">
            <text:p>676607956.02364</text:p>
          </table:table-cell>
          <table:table-cell/>
          <table:table-cell office:value-type="string" calcext:value-type="string">
            <text:p>2021-06-10T14:39:16.0236400Z</text:p>
          </table:table-cell>
          <table:table-cell office:value-type="string" calcext:value-type="string">
            <text:p>2021-06-10-14:40:25.2076400</text:p>
          </table:table-cell>
          <table:table-cell table:number-columns-repeated="2"/>
        </table:table-row>
        <table:table-row table:style-name="ro1">
          <table:table-cell office:value-type="float" office:value="485724662" calcext:value-type="float">
            <text:p>485724662</text:p>
          </table:table-cell>
          <table:table-cell office:value-type="float" office:value="676690745.024573" calcext:value-type="float">
            <text:p>676690745.024573</text:p>
          </table:table-cell>
          <table:table-cell/>
          <table:table-cell office:value-type="string" calcext:value-type="string">
            <text:p>2021-06-11T13:39:05.0245729Z</text:p>
          </table:table-cell>
          <table:table-cell office:value-type="string" calcext:value-type="string">
            <text:p>2021-06-11-13:40:14.2085729</text:p>
          </table:table-cell>
          <table:table-cell table:number-columns-repeated="2"/>
        </table:table-row>
        <table:table-row table:style-name="ro1">
          <table:table-cell office:value-type="float" office:value="485814687" calcext:value-type="float">
            <text:p>485814687</text:p>
          </table:table-cell>
          <table:table-cell office:value-type="float" office:value="676780770.025609" calcext:value-type="float">
            <text:p>676780770.025609</text:p>
          </table:table-cell>
          <table:table-cell/>
          <table:table-cell office:value-type="string" calcext:value-type="string">
            <text:p>2021-06-12T14:39:30.0256090Z</text:p>
          </table:table-cell>
          <table:table-cell office:value-type="string" calcext:value-type="string">
            <text:p>2021-06-12-14:40:39.2096090</text:p>
          </table:table-cell>
          <table:table-cell table:number-columns-repeated="2"/>
        </table:table-row>
        <table:table-row table:style-name="ro1">
          <table:table-cell office:value-type="float" office:value="485890251" calcext:value-type="float">
            <text:p>485890251</text:p>
          </table:table-cell>
          <table:table-cell office:value-type="float" office:value="676856334.026466" calcext:value-type="float">
            <text:p>676856334.026466</text:p>
          </table:table-cell>
          <table:table-cell/>
          <table:table-cell office:value-type="string" calcext:value-type="string">
            <text:p>2021-06-13T11:38:54.0264660Z</text:p>
          </table:table-cell>
          <table:table-cell office:value-type="string" calcext:value-type="string">
            <text:p>2021-06-13-11:40:03.2104660</text:p>
          </table:table-cell>
          <table:table-cell table:number-columns-repeated="2"/>
        </table:table-row>
        <table:table-row table:style-name="ro1">
          <table:table-cell office:value-type="float" office:value="485987485" calcext:value-type="float">
            <text:p>485987485</text:p>
          </table:table-cell>
          <table:table-cell office:value-type="float" office:value="676953568.02758" calcext:value-type="float">
            <text:p>676953568.02758</text:p>
          </table:table-cell>
          <table:table-cell/>
          <table:table-cell office:value-type="string" calcext:value-type="string">
            <text:p>2021-06-14T14:39:28.0275800Z</text:p>
          </table:table-cell>
          <table:table-cell office:value-type="string" calcext:value-type="string">
            <text:p>2021-06-14-14:40:37.2115800</text:p>
          </table:table-cell>
          <table:table-cell table:number-columns-repeated="2"/>
        </table:table-row>
        <table:table-row table:style-name="ro1">
          <table:table-cell office:value-type="float" office:value="486034246" calcext:value-type="float">
            <text:p>486034246</text:p>
          </table:table-cell>
          <table:table-cell office:value-type="float" office:value="677000329.028084" calcext:value-type="float">
            <text:p>677000329.028084</text:p>
          </table:table-cell>
          <table:table-cell/>
          <table:table-cell office:value-type="string" calcext:value-type="string">
            <text:p>2021-06-15T03:38:49.0280840Z</text:p>
          </table:table-cell>
          <table:table-cell office:value-type="string" calcext:value-type="string">
            <text:p>2021-06-15-03:39:58.2120840</text:p>
          </table:table-cell>
          <table:table-cell table:number-columns-repeated="2"/>
        </table:table-row>
        <table:table-row table:style-name="ro1">
          <table:table-cell office:value-type="float" office:value="486135046" calcext:value-type="float">
            <text:p>486135046</text:p>
          </table:table-cell>
          <table:table-cell office:value-type="float" office:value="677101129.029231" calcext:value-type="float">
            <text:p>677101129.029231</text:p>
          </table:table-cell>
          <table:table-cell/>
          <table:table-cell office:value-type="string" calcext:value-type="string">
            <text:p>2021-06-16T07:38:49.0292309Z</text:p>
          </table:table-cell>
          <table:table-cell office:value-type="string" calcext:value-type="string">
            <text:p>2021-06-16-07:39:58.2132309</text:p>
          </table:table-cell>
          <table:table-cell table:number-columns-repeated="2"/>
        </table:table-row>
        <table:table-row table:style-name="ro1">
          <table:table-cell office:value-type="float" office:value="486221445" calcext:value-type="float">
            <text:p>486221445</text:p>
          </table:table-cell>
          <table:table-cell office:value-type="float" office:value="677187528.03022" calcext:value-type="float">
            <text:p>677187528.03022</text:p>
          </table:table-cell>
          <table:table-cell/>
          <table:table-cell office:value-type="string" calcext:value-type="string">
            <text:p>2021-06-17T07:38:48.0302200Z</text:p>
          </table:table-cell>
          <table:table-cell office:value-type="string" calcext:value-type="string">
            <text:p>2021-06-17-07:39:57.2142200</text:p>
          </table:table-cell>
          <table:table-cell table:number-columns-repeated="2"/>
        </table:table-row>
        <table:table-row table:style-name="ro1">
          <table:table-cell office:value-type="float" office:value="486340919" calcext:value-type="float">
            <text:p>486340919</text:p>
          </table:table-cell>
          <table:table-cell office:value-type="float" office:value="677307002.031595" calcext:value-type="float">
            <text:p>677307002.031595</text:p>
          </table:table-cell>
          <table:table-cell/>
          <table:table-cell office:value-type="string" calcext:value-type="string">
            <text:p>2021-06-18T16:50:02.0315949Z</text:p>
          </table:table-cell>
          <table:table-cell office:value-type="string" calcext:value-type="string">
            <text:p>2021-06-18-16:51:11.2155950</text:p>
          </table:table-cell>
          <table:table-cell table:number-columns-repeated="2"/>
        </table:table-row>
        <table:table-row table:style-name="ro1">
          <table:table-cell office:value-type="float" office:value="486415861" calcext:value-type="float">
            <text:p>486415861</text:p>
          </table:table-cell>
          <table:table-cell office:value-type="float" office:value="677381944.032466" calcext:value-type="float">
            <text:p>677381944.032466</text:p>
          </table:table-cell>
          <table:table-cell/>
          <table:table-cell office:value-type="string" calcext:value-type="string">
            <text:p>2021-06-19T13:39:04.0324659Z</text:p>
          </table:table-cell>
          <table:table-cell office:value-type="string" calcext:value-type="string">
            <text:p>2021-06-19-13:40:13.2164659</text:p>
          </table:table-cell>
          <table:table-cell table:number-columns-repeated="2"/>
        </table:table-row>
        <table:table-row table:style-name="ro1">
          <table:table-cell office:value-type="float" office:value="486491443" calcext:value-type="float">
            <text:p>486491443</text:p>
          </table:table-cell>
          <table:table-cell office:value-type="float" office:value="677457526.033327" calcext:value-type="float">
            <text:p>677457526.033327</text:p>
          </table:table-cell>
          <table:table-cell/>
          <table:table-cell office:value-type="string" calcext:value-type="string">
            <text:p>2021-06-20T10:38:46.0333269Z</text:p>
          </table:table-cell>
          <table:table-cell office:value-type="string" calcext:value-type="string">
            <text:p>2021-06-20-10:39:55.2173269</text:p>
          </table:table-cell>
          <table:table-cell table:number-columns-repeated="2"/>
        </table:table-row>
        <table:table-row table:style-name="ro1">
          <table:table-cell office:value-type="float" office:value="486574242" calcext:value-type="float">
            <text:p>486574242</text:p>
          </table:table-cell>
          <table:table-cell office:value-type="float" office:value="677540325.034271" calcext:value-type="float">
            <text:p>677540325.034271</text:p>
          </table:table-cell>
          <table:table-cell/>
          <table:table-cell office:value-type="string" calcext:value-type="string">
            <text:p>2021-06-21T09:38:45.0342710Z</text:p>
          </table:table-cell>
          <table:table-cell office:value-type="string" calcext:value-type="string">
            <text:p>2021-06-21-09:39:54.2182710</text:p>
          </table:table-cell>
          <table:table-cell table:number-columns-repeated="2"/>
        </table:table-row>
        <table:table-row table:style-name="ro1">
          <table:table-cell office:value-type="float" office:value="486671444" calcext:value-type="float">
            <text:p>486671444</text:p>
          </table:table-cell>
          <table:table-cell office:value-type="float" office:value="677637527.035383" calcext:value-type="float">
            <text:p>677637527.035383</text:p>
          </table:table-cell>
          <table:table-cell/>
          <table:table-cell office:value-type="string" calcext:value-type="string">
            <text:p>2021-06-22T12:38:47.0353829Z</text:p>
          </table:table-cell>
          <table:table-cell office:value-type="string" calcext:value-type="string">
            <text:p>2021-06-22-12:39:56.2193830</text:p>
          </table:table-cell>
          <table:table-cell table:number-columns-repeated="2"/>
        </table:table-row>
        <table:table-row table:style-name="ro1">
          <table:table-cell office:value-type="float" office:value="486732665" calcext:value-type="float">
            <text:p>486732665</text:p>
          </table:table-cell>
          <table:table-cell office:value-type="float" office:value="677698748.036073" calcext:value-type="float">
            <text:p>677698748.036073</text:p>
          </table:table-cell>
          <table:table-cell/>
          <table:table-cell office:value-type="string" calcext:value-type="string">
            <text:p>2021-06-23T05:39:08.0360729Z</text:p>
          </table:table-cell>
          <table:table-cell office:value-type="string" calcext:value-type="string">
            <text:p>2021-06-23-05:40:17.2200729</text:p>
          </table:table-cell>
          <table:table-cell table:number-columns-repeated="2"/>
        </table:table-row>
        <table:table-row table:style-name="ro1">
          <table:table-cell office:value-type="float" office:value="486847878" calcext:value-type="float">
            <text:p>486847878</text:p>
          </table:table-cell>
          <table:table-cell office:value-type="float" office:value="677813961.0374" calcext:value-type="float">
            <text:p>677813961.0374</text:p>
          </table:table-cell>
          <table:table-cell/>
          <table:table-cell office:value-type="string" calcext:value-type="string">
            <text:p>2021-06-24T13:39:21.0374000Z</text:p>
          </table:table-cell>
          <table:table-cell office:value-type="string" calcext:value-type="string">
            <text:p>2021-06-24-13:40:30.2214000</text:p>
          </table:table-cell>
          <table:table-cell table:number-columns-repeated="2"/>
        </table:table-row>
        <table:table-row table:style-name="ro1">
          <table:table-cell office:value-type="float" office:value="486945111" calcext:value-type="float">
            <text:p>486945111</text:p>
          </table:table-cell>
          <table:table-cell office:value-type="float" office:value="677911194.03848" calcext:value-type="float">
            <text:p>677911194.03848</text:p>
          </table:table-cell>
          <table:table-cell/>
          <table:table-cell office:value-type="string" calcext:value-type="string">
            <text:p>2021-06-25T16:39:54.0384800Z</text:p>
          </table:table-cell>
          <table:table-cell office:value-type="string" calcext:value-type="string">
            <text:p>2021-06-25-16:41:03.2224800</text:p>
          </table:table-cell>
          <table:table-cell table:number-columns-repeated="2"/>
        </table:table-row>
        <table:table-row table:style-name="ro1">
          <table:table-cell office:value-type="float" office:value="487032695" calcext:value-type="float">
            <text:p>487032695</text:p>
          </table:table-cell>
          <table:table-cell office:value-type="float" office:value="677998778.039491" calcext:value-type="float">
            <text:p>677998778.039491</text:p>
          </table:table-cell>
          <table:table-cell/>
          <table:table-cell office:value-type="string" calcext:value-type="string">
            <text:p>2021-06-26T16:59:38.0394909Z</text:p>
          </table:table-cell>
          <table:table-cell office:value-type="string" calcext:value-type="string">
            <text:p>2021-06-26-17:00:47.2234909</text:p>
          </table:table-cell>
          <table:table-cell table:number-columns-repeated="2"/>
        </table:table-row>
        <table:table-row table:style-name="ro1">
          <table:table-cell office:value-type="float" office:value="487103445" calcext:value-type="float">
            <text:p>487103445</text:p>
          </table:table-cell>
          <table:table-cell office:value-type="float" office:value="678069528.04033" calcext:value-type="float">
            <text:p>678069528.04033</text:p>
          </table:table-cell>
          <table:table-cell/>
          <table:table-cell office:value-type="string" calcext:value-type="string">
            <text:p>2021-06-27T12:38:48.0403299Z</text:p>
          </table:table-cell>
          <table:table-cell office:value-type="string" calcext:value-type="string">
            <text:p>2021-06-27-12:39:57.2243299</text:p>
          </table:table-cell>
          <table:table-cell table:number-columns-repeated="2"/>
        </table:table-row>
        <table:table-row table:style-name="ro1">
          <table:table-cell office:value-type="float" office:value="487164655" calcext:value-type="float">
            <text:p>487164655</text:p>
          </table:table-cell>
          <table:table-cell office:value-type="float" office:value="678130738.041029" calcext:value-type="float">
            <text:p>678130738.041029</text:p>
          </table:table-cell>
          <table:table-cell/>
          <table:table-cell office:value-type="string" calcext:value-type="string">
            <text:p>2021-06-28T05:38:58.0410289Z</text:p>
          </table:table-cell>
          <table:table-cell office:value-type="string" calcext:value-type="string">
            <text:p>2021-06-28-05:40:07.2250289</text:p>
          </table:table-cell>
          <table:table-cell table:number-columns-repeated="2"/>
        </table:table-row>
        <table:table-row table:style-name="ro1">
          <table:table-cell office:value-type="float" office:value="487247452" calcext:value-type="float">
            <text:p>487247452</text:p>
          </table:table-cell>
          <table:table-cell office:value-type="float" office:value="678213535.041966" calcext:value-type="float">
            <text:p>678213535.041966</text:p>
          </table:table-cell>
          <table:table-cell/>
          <table:table-cell office:value-type="string" calcext:value-type="string">
            <text:p>2021-06-29T04:38:55.0419659Z</text:p>
          </table:table-cell>
          <table:table-cell office:value-type="string" calcext:value-type="string">
            <text:p>2021-06-29-04:40:04.2259659</text:p>
          </table:table-cell>
          <table:table-cell table:number-columns-repeated="2"/>
        </table:table-row>
        <table:table-row table:style-name="ro1">
          <table:table-cell office:value-type="float" office:value="487333848" calcext:value-type="float">
            <text:p>487333848</text:p>
          </table:table-cell>
          <table:table-cell office:value-type="float" office:value="678299931.042959" calcext:value-type="float">
            <text:p>678299931.042959</text:p>
          </table:table-cell>
          <table:table-cell/>
          <table:table-cell office:value-type="string" calcext:value-type="string">
            <text:p>2021-06-30T04:38:51.0429589Z</text:p>
          </table:table-cell>
          <table:table-cell office:value-type="string" calcext:value-type="string">
            <text:p>2021-06-30-04:40:00.2269589</text:p>
          </table:table-cell>
          <table:table-cell table:number-columns-repeated="2"/>
        </table:table-row>
        <table:table-row table:style-name="ro1">
          <table:table-cell office:value-type="float" office:value="487463511" calcext:value-type="float">
            <text:p>487463511</text:p>
          </table:table-cell>
          <table:table-cell office:value-type="float" office:value="678429594.044417" calcext:value-type="float">
            <text:p>678429594.044417</text:p>
          </table:table-cell>
          <table:table-cell/>
          <table:table-cell office:value-type="string" calcext:value-type="string">
            <text:p>2021-07-01T16:39:54.0444170Z</text:p>
          </table:table-cell>
          <table:table-cell office:value-type="string" calcext:value-type="string">
            <text:p>2021-07-01-16:41:03.2284170</text:p>
          </table:table-cell>
          <table:table-cell table:number-columns-repeated="2"/>
        </table:table-row>
        <table:table-row table:style-name="ro1">
          <table:table-cell office:value-type="float" office:value="487531825" calcext:value-type="float">
            <text:p>487531825</text:p>
          </table:table-cell>
          <table:table-cell office:value-type="float" office:value="678497908.045213" calcext:value-type="float">
            <text:p>678497908.045213</text:p>
          </table:table-cell>
          <table:table-cell/>
          <table:table-cell office:value-type="string" calcext:value-type="string">
            <text:p>2021-07-02T11:38:28.0452129Z</text:p>
          </table:table-cell>
          <table:table-cell office:value-type="string" calcext:value-type="string">
            <text:p>2021-07-02-11:39:37.2292129</text:p>
          </table:table-cell>
          <table:table-cell table:number-columns-repeated="2"/>
        </table:table-row>
        <table:table-row table:style-name="ro1">
          <table:table-cell office:value-type="float" office:value="487596612" calcext:value-type="float">
            <text:p>487596612</text:p>
          </table:table-cell>
          <table:table-cell office:value-type="float" office:value="678562695.045927" calcext:value-type="float">
            <text:p>678562695.045927</text:p>
          </table:table-cell>
          <table:table-cell/>
          <table:table-cell office:value-type="string" calcext:value-type="string">
            <text:p>2021-07-03T05:38:15.0459269Z</text:p>
          </table:table-cell>
          <table:table-cell office:value-type="string" calcext:value-type="string">
            <text:p>2021-07-03-05:39:24.2299269</text:p>
          </table:table-cell>
          <table:table-cell table:number-columns-repeated="2"/>
        </table:table-row>
        <table:table-row table:style-name="ro1">
          <table:table-cell office:value-type="float" office:value="487704617" calcext:value-type="float">
            <text:p>487704617</text:p>
          </table:table-cell>
          <table:table-cell office:value-type="float" office:value="678670700.047188" calcext:value-type="float">
            <text:p>678670700.047188</text:p>
          </table:table-cell>
          <table:table-cell/>
          <table:table-cell office:value-type="string" calcext:value-type="string">
            <text:p>2021-07-04T11:38:20.0471880Z</text:p>
          </table:table-cell>
          <table:table-cell office:value-type="string" calcext:value-type="string">
            <text:p>2021-07-04-11:39:29.2311880</text:p>
          </table:table-cell>
          <table:table-cell table:number-columns-repeated="2"/>
        </table:table-row>
        <table:table-row table:style-name="ro1">
          <table:table-cell office:value-type="float" office:value="487809112" calcext:value-type="float">
            <text:p>487809112</text:p>
          </table:table-cell>
          <table:table-cell office:value-type="float" office:value="678775195.048363" calcext:value-type="float">
            <text:p>678775195.048363</text:p>
          </table:table-cell>
          <table:table-cell/>
          <table:table-cell office:value-type="string" calcext:value-type="string">
            <text:p>2021-07-05T16:39:55.0483629Z</text:p>
          </table:table-cell>
          <table:table-cell office:value-type="string" calcext:value-type="string">
            <text:p>2021-07-05-16:41:04.2323629</text:p>
          </table:table-cell>
          <table:table-cell table:number-columns-repeated="2"/>
        </table:table-row>
        <table:table-row table:style-name="ro1">
          <table:table-cell office:value-type="float" office:value="487881018" calcext:value-type="float">
            <text:p>487881018</text:p>
          </table:table-cell>
          <table:table-cell office:value-type="float" office:value="678847101.04921" calcext:value-type="float">
            <text:p>678847101.04921</text:p>
          </table:table-cell>
          <table:table-cell/>
          <table:table-cell office:value-type="string" calcext:value-type="string">
            <text:p>2021-07-06T12:38:21.0492099Z</text:p>
          </table:table-cell>
          <table:table-cell office:value-type="string" calcext:value-type="string">
            <text:p>2021-07-06-12:39:30.2332099</text:p>
          </table:table-cell>
          <table:table-cell table:number-columns-repeated="2"/>
        </table:table-row>
        <table:table-row table:style-name="ro1">
          <table:table-cell office:value-type="float" office:value="487938632" calcext:value-type="float">
            <text:p>487938632</text:p>
          </table:table-cell>
          <table:table-cell office:value-type="float" office:value="678904715.049861" calcext:value-type="float">
            <text:p>678904715.049861</text:p>
          </table:table-cell>
          <table:table-cell/>
          <table:table-cell office:value-type="string" calcext:value-type="string">
            <text:p>2021-07-07T04:38:35.0498609Z</text:p>
          </table:table-cell>
          <table:table-cell office:value-type="string" calcext:value-type="string">
            <text:p>2021-07-07-04:39:44.2338609</text:p>
          </table:table-cell>
          <table:table-cell table:number-columns-repeated="2"/>
        </table:table-row>
        <table:table-row table:style-name="ro1">
          <table:table-cell office:value-type="float" office:value="488042994" calcext:value-type="float">
            <text:p>488042994</text:p>
          </table:table-cell>
          <table:table-cell office:value-type="float" office:value="679009077.051046" calcext:value-type="float">
            <text:p>679009077.051046</text:p>
          </table:table-cell>
          <table:table-cell/>
          <table:table-cell office:value-type="string" calcext:value-type="string">
            <text:p>2021-07-08T09:37:57.0510460Z</text:p>
          </table:table-cell>
          <table:table-cell office:value-type="string" calcext:value-type="string">
            <text:p>2021-07-08-09:39:06.2350460</text:p>
          </table:table-cell>
          <table:table-cell table:number-columns-repeated="2"/>
        </table:table-row>
        <table:table-row table:style-name="ro1">
          <table:table-cell office:value-type="float" office:value="488140230" calcext:value-type="float">
            <text:p>488140230</text:p>
          </table:table-cell>
          <table:table-cell office:value-type="float" office:value="679106313.052178" calcext:value-type="float">
            <text:p>679106313.052178</text:p>
          </table:table-cell>
          <table:table-cell/>
          <table:table-cell office:value-type="string" calcext:value-type="string">
            <text:p>2021-07-09T12:38:33.0521780Z</text:p>
          </table:table-cell>
          <table:table-cell office:value-type="string" calcext:value-type="string">
            <text:p>2021-07-09-12:39:42.2361780</text:p>
          </table:table-cell>
          <table:table-cell table:number-columns-repeated="2"/>
        </table:table-row>
        <table:table-row table:style-name="ro1">
          <table:table-cell office:value-type="float" office:value="488241082" calcext:value-type="float">
            <text:p>488241082</text:p>
          </table:table-cell>
          <table:table-cell office:value-type="float" office:value="679207165.053306" calcext:value-type="float">
            <text:p>679207165.053306</text:p>
          </table:table-cell>
          <table:table-cell/>
          <table:table-cell office:value-type="string" calcext:value-type="string">
            <text:p>2021-07-10T16:39:25.0533059Z</text:p>
          </table:table-cell>
          <table:table-cell office:value-type="string" calcext:value-type="string">
            <text:p>2021-07-10-16:40:34.2373059</text:p>
          </table:table-cell>
          <table:table-cell table:number-columns-repeated="2"/>
        </table:table-row>
        <table:table-row table:style-name="ro1">
          <table:table-cell office:value-type="float" office:value="488309391" calcext:value-type="float">
            <text:p>488309391</text:p>
          </table:table-cell>
          <table:table-cell office:value-type="float" office:value="679275474.0541" calcext:value-type="float">
            <text:p>679275474.0541</text:p>
          </table:table-cell>
          <table:table-cell/>
          <table:table-cell office:value-type="string" calcext:value-type="string">
            <text:p>2021-07-11T11:37:54.0541000Z</text:p>
          </table:table-cell>
          <table:table-cell office:value-type="string" calcext:value-type="string">
            <text:p>2021-07-11-11:39:03.2381000</text:p>
          </table:table-cell>
          <table:table-cell table:number-columns-repeated="2"/>
        </table:table-row>
        <table:table-row table:style-name="ro1">
          <table:table-cell office:value-type="float" office:value="488399414" calcext:value-type="float">
            <text:p>488399414</text:p>
          </table:table-cell>
          <table:table-cell office:value-type="float" office:value="679365497.055136" calcext:value-type="float">
            <text:p>679365497.055136</text:p>
          </table:table-cell>
          <table:table-cell/>
          <table:table-cell office:value-type="string" calcext:value-type="string">
            <text:p>2021-07-12T12:38:17.0551359Z</text:p>
          </table:table-cell>
          <table:table-cell office:value-type="string" calcext:value-type="string">
            <text:p>2021-07-12-12:39:26.2391359</text:p>
          </table:table-cell>
          <table:table-cell table:number-columns-repeated="2"/>
        </table:table-row>
        <table:table-row table:style-name="ro1">
          <table:table-cell office:value-type="float" office:value="488471373" calcext:value-type="float">
            <text:p>488471373</text:p>
          </table:table-cell>
          <table:table-cell office:value-type="float" office:value="679437456.055945" calcext:value-type="float">
            <text:p>679437456.055945</text:p>
          </table:table-cell>
          <table:table-cell/>
          <table:table-cell office:value-type="string" calcext:value-type="string">
            <text:p>2021-07-13T08:37:36.0559450Z</text:p>
          </table:table-cell>
          <table:table-cell office:value-type="string" calcext:value-type="string">
            <text:p>2021-07-13-08:38:45.2399450</text:p>
          </table:table-cell>
          <table:table-cell table:number-columns-repeated="2"/>
        </table:table-row>
        <table:table-row table:style-name="ro1">
          <table:table-cell office:value-type="float" office:value="488572203" calcext:value-type="float">
            <text:p>488572203</text:p>
          </table:table-cell>
          <table:table-cell office:value-type="float" office:value="679538286.057114" calcext:value-type="float">
            <text:p>679538286.057114</text:p>
          </table:table-cell>
          <table:table-cell/>
          <table:table-cell office:value-type="string" calcext:value-type="string">
            <text:p>2021-07-14T12:38:06.0571140Z</text:p>
          </table:table-cell>
          <table:table-cell office:value-type="string" calcext:value-type="string">
            <text:p>2021-07-14-12:39:15.2411140</text:p>
          </table:table-cell>
          <table:table-cell table:number-columns-repeated="2"/>
        </table:table-row>
        <table:table-row table:style-name="ro1">
          <table:table-cell office:value-type="float" office:value="488636963" calcext:value-type="float">
            <text:p>488636963</text:p>
          </table:table-cell>
          <table:table-cell office:value-type="float" office:value="679603046.05783" calcext:value-type="float">
            <text:p>679603046.05783</text:p>
          </table:table-cell>
          <table:table-cell/>
          <table:table-cell office:value-type="string" calcext:value-type="string">
            <text:p>2021-07-15T06:37:26.0578299Z</text:p>
          </table:table-cell>
          <table:table-cell office:value-type="string" calcext:value-type="string">
            <text:p>2021-07-15-06:38:35.2418299</text:p>
          </table:table-cell>
          <table:table-cell table:number-columns-repeated="2"/>
        </table:table-row>
        <table:table-row table:style-name="ro1">
          <table:table-cell office:value-type="float" office:value="488759376" calcext:value-type="float">
            <text:p>488759376</text:p>
          </table:table-cell>
          <table:table-cell office:value-type="float" office:value="679725459.059231" calcext:value-type="float">
            <text:p>679725459.059231</text:p>
          </table:table-cell>
          <table:table-cell/>
          <table:table-cell office:value-type="string" calcext:value-type="string">
            <text:p>2021-07-16T16:37:39.0592310Z</text:p>
          </table:table-cell>
          <table:table-cell office:value-type="string" calcext:value-type="string">
            <text:p>2021-07-16-16:38:48.2432310</text:p>
          </table:table-cell>
          <table:table-cell table:number-columns-repeated="2"/>
        </table:table-row>
        <table:table-row table:style-name="ro1">
          <table:table-cell office:value-type="float" office:value="488831396" calcext:value-type="float">
            <text:p>488831396</text:p>
          </table:table-cell>
          <table:table-cell office:value-type="float" office:value="679797479.060064" calcext:value-type="float">
            <text:p>679797479.060064</text:p>
          </table:table-cell>
          <table:table-cell/>
          <table:table-cell office:value-type="string" calcext:value-type="string">
            <text:p>2021-07-17T12:37:59.0600639Z</text:p>
          </table:table-cell>
          <table:table-cell office:value-type="string" calcext:value-type="string">
            <text:p>2021-07-17-12:39:08.2440639</text:p>
          </table:table-cell>
          <table:table-cell table:number-columns-repeated="2"/>
        </table:table-row>
        <table:table-row table:style-name="ro1">
          <table:table-cell office:value-type="float" office:value="488910558" calcext:value-type="float">
            <text:p>488910558</text:p>
          </table:table-cell>
          <table:table-cell office:value-type="float" office:value="679876641.060964" calcext:value-type="float">
            <text:p>679876641.060964</text:p>
          </table:table-cell>
          <table:table-cell/>
          <table:table-cell office:value-type="string" calcext:value-type="string">
            <text:p>2021-07-18T10:37:21.0609639Z</text:p>
          </table:table-cell>
          <table:table-cell office:value-type="string" calcext:value-type="string">
            <text:p>2021-07-18-10:38:30.2449640</text:p>
          </table:table-cell>
          <table:table-cell table:number-columns-repeated="2"/>
        </table:table-row>
        <table:table-row table:style-name="ro1">
          <table:table-cell office:value-type="float" office:value="489000557" calcext:value-type="float">
            <text:p>489000557</text:p>
          </table:table-cell>
          <table:table-cell office:value-type="float" office:value="679966640.062003" calcext:value-type="float">
            <text:p>679966640.062003</text:p>
          </table:table-cell>
          <table:table-cell/>
          <table:table-cell office:value-type="string" calcext:value-type="string">
            <text:p>2021-07-19T11:37:20.0620030Z</text:p>
          </table:table-cell>
          <table:table-cell office:value-type="string" calcext:value-type="string">
            <text:p>2021-07-19-11:38:29.2460030</text:p>
          </table:table-cell>
          <table:table-cell table:number-columns-repeated="2"/>
        </table:table-row>
        <table:table-row table:style-name="ro1">
          <table:table-cell office:value-type="float" office:value="489104949" calcext:value-type="float">
            <text:p>489104949</text:p>
          </table:table-cell>
          <table:table-cell office:value-type="float" office:value="680071032.063173" calcext:value-type="float">
            <text:p>680071032.063173</text:p>
          </table:table-cell>
          <table:table-cell/>
          <table:table-cell office:value-type="string" calcext:value-type="string">
            <text:p>2021-07-20T16:37:12.0631729Z</text:p>
          </table:table-cell>
          <table:table-cell office:value-type="string" calcext:value-type="string">
            <text:p>2021-07-20-16:38:21.2471729</text:p>
          </table:table-cell>
          <table:table-cell table:number-columns-repeated="2"/>
        </table:table-row>
        <table:table-row table:style-name="ro1">
          <table:table-cell office:value-type="float" office:value="489191342" calcext:value-type="float">
            <text:p>489191342</text:p>
          </table:table-cell>
          <table:table-cell office:value-type="float" office:value="680157425.064165" calcext:value-type="float">
            <text:p>680157425.064165</text:p>
          </table:table-cell>
          <table:table-cell/>
          <table:table-cell office:value-type="string" calcext:value-type="string">
            <text:p>2021-07-21T16:37:05.0641649Z</text:p>
          </table:table-cell>
          <table:table-cell office:value-type="string" calcext:value-type="string">
            <text:p>2021-07-21-16:38:14.2481650</text:p>
          </table:table-cell>
          <table:table-cell table:number-columns-repeated="2"/>
        </table:table-row>
        <table:table-row table:style-name="ro1">
          <table:table-cell office:value-type="float" office:value="489277740" calcext:value-type="float">
            <text:p>489277740</text:p>
          </table:table-cell>
          <table:table-cell office:value-type="float" office:value="680243823.06515" calcext:value-type="float">
            <text:p>680243823.06515</text:p>
          </table:table-cell>
          <table:table-cell/>
          <table:table-cell office:value-type="string" calcext:value-type="string">
            <text:p>2021-07-22T16:37:03.0651500Z</text:p>
          </table:table-cell>
          <table:table-cell office:value-type="string" calcext:value-type="string">
            <text:p>2021-07-22-16:38:12.2491500</text:p>
          </table:table-cell>
          <table:table-cell table:number-columns-repeated="2"/>
        </table:table-row>
        <table:table-row table:style-name="ro1">
          <table:table-cell office:value-type="float" office:value="489338922" calcext:value-type="float">
            <text:p>489338922</text:p>
          </table:table-cell>
          <table:table-cell office:value-type="float" office:value="680305005.065868" calcext:value-type="float">
            <text:p>680305005.065868</text:p>
          </table:table-cell>
          <table:table-cell/>
          <table:table-cell office:value-type="string" calcext:value-type="string">
            <text:p>2021-07-23T09:36:45.0658680Z</text:p>
          </table:table-cell>
          <table:table-cell office:value-type="string" calcext:value-type="string">
            <text:p>2021-07-23-09:37:54.2498680</text:p>
          </table:table-cell>
          <table:table-cell table:number-columns-repeated="2"/>
        </table:table-row>
        <table:table-row table:style-name="ro1">
          <table:table-cell office:value-type="float" office:value="489450530" calcext:value-type="float">
            <text:p>489450530</text:p>
          </table:table-cell>
          <table:table-cell office:value-type="float" office:value="680416613.067114" calcext:value-type="float">
            <text:p>680416613.067114</text:p>
          </table:table-cell>
          <table:table-cell/>
          <table:table-cell office:value-type="string" calcext:value-type="string">
            <text:p>2021-07-24T16:36:53.0671139Z</text:p>
          </table:table-cell>
          <table:table-cell office:value-type="string" calcext:value-type="string">
            <text:p>2021-07-24-16:38:02.2511140</text:p>
          </table:table-cell>
          <table:table-cell table:number-columns-repeated="2"/>
        </table:table-row>
        <table:table-row table:style-name="ro1">
          <table:table-cell office:value-type="float" office:value="489536920" calcext:value-type="float">
            <text:p>489536920</text:p>
          </table:table-cell>
          <table:table-cell office:value-type="float" office:value="680503003.068099" calcext:value-type="float">
            <text:p>680503003.068099</text:p>
          </table:table-cell>
          <table:table-cell/>
          <table:table-cell office:value-type="string" calcext:value-type="string">
            <text:p>2021-07-25T16:36:43.0680990Z</text:p>
          </table:table-cell>
          <table:table-cell office:value-type="string" calcext:value-type="string">
            <text:p>2021-07-25-16:37:52.2520990</text:p>
          </table:table-cell>
          <table:table-cell table:number-columns-repeated="2"/>
        </table:table-row>
        <table:table-row table:style-name="ro1">
          <table:table-cell office:value-type="float" office:value="489605337" calcext:value-type="float">
            <text:p>489605337</text:p>
          </table:table-cell>
          <table:table-cell office:value-type="float" office:value="680571420.068895" calcext:value-type="float">
            <text:p>680571420.068895</text:p>
          </table:table-cell>
          <table:table-cell/>
          <table:table-cell office:value-type="string" calcext:value-type="string">
            <text:p>2021-07-26T11:37:00.0688949Z</text:p>
          </table:table-cell>
          <table:table-cell office:value-type="string" calcext:value-type="string">
            <text:p>2021-07-26-11:38:09.2528949</text:p>
          </table:table-cell>
          <table:table-cell table:number-columns-repeated="2"/>
        </table:table-row>
        <table:table-row table:style-name="ro1">
          <table:table-cell office:value-type="float" office:value="489691735" calcext:value-type="float">
            <text:p>489691735</text:p>
          </table:table-cell>
          <table:table-cell office:value-type="float" office:value="680657818.069887" calcext:value-type="float">
            <text:p>680657818.069887</text:p>
          </table:table-cell>
          <table:table-cell/>
          <table:table-cell office:value-type="string" calcext:value-type="string">
            <text:p>2021-07-27T11:36:58.0698870Z</text:p>
          </table:table-cell>
          <table:table-cell office:value-type="string" calcext:value-type="string">
            <text:p>2021-07-27-11:38:07.2538870</text:p>
          </table:table-cell>
          <table:table-cell table:number-columns-repeated="2"/>
        </table:table-row>
        <table:table-row table:style-name="ro1">
          <table:table-cell office:value-type="float" office:value="489778177" calcext:value-type="float">
            <text:p>489778177</text:p>
          </table:table-cell>
          <table:table-cell office:value-type="float" office:value="680744260.070863" calcext:value-type="float">
            <text:p>680744260.070863</text:p>
          </table:table-cell>
          <table:table-cell/>
          <table:table-cell office:value-type="string" calcext:value-type="string">
            <text:p>2021-07-28T11:37:40.0708630Z</text:p>
          </table:table-cell>
          <table:table-cell office:value-type="string" calcext:value-type="string">
            <text:p>2021-07-28-11:38:49.2548630</text:p>
          </table:table-cell>
          <table:table-cell table:number-columns-repeated="2"/>
        </table:table-row>
        <table:table-row table:style-name="ro1">
          <table:table-cell office:value-type="float" office:value="489853744" calcext:value-type="float">
            <text:p>489853744</text:p>
          </table:table-cell>
          <table:table-cell office:value-type="float" office:value="680819827.071729" calcext:value-type="float">
            <text:p>680819827.071729</text:p>
          </table:table-cell>
          <table:table-cell/>
          <table:table-cell office:value-type="string" calcext:value-type="string">
            <text:p>2021-07-29T08:37:07.0717289Z</text:p>
          </table:table-cell>
          <table:table-cell office:value-type="string" calcext:value-type="string">
            <text:p>2021-07-29-08:38:16.2557289</text:p>
          </table:table-cell>
          <table:table-cell table:number-columns-repeated="2"/>
        </table:table-row>
        <table:table-row table:style-name="ro1">
          <table:table-cell office:value-type="float" office:value="489940146" calcext:value-type="float">
            <text:p>489940146</text:p>
          </table:table-cell>
          <table:table-cell office:value-type="float" office:value="680906229.072712" calcext:value-type="float">
            <text:p>680906229.072712</text:p>
          </table:table-cell>
          <table:table-cell/>
          <table:table-cell office:value-type="string" calcext:value-type="string">
            <text:p>2021-07-30T08:37:09.0727119Z</text:p>
          </table:table-cell>
          <table:table-cell office:value-type="string" calcext:value-type="string">
            <text:p>2021-07-30-08:38:18.2567119</text:p>
          </table:table-cell>
          <table:table-cell table:number-columns-repeated="2"/>
        </table:table-row>
        <table:table-row table:style-name="ro1">
          <table:table-cell office:value-type="float" office:value="490037300" calcext:value-type="float">
            <text:p>490037300</text:p>
          </table:table-cell>
          <table:table-cell office:value-type="float" office:value="681003383.073821" calcext:value-type="float">
            <text:p>681003383.073821</text:p>
          </table:table-cell>
          <table:table-cell/>
          <table:table-cell office:value-type="string" calcext:value-type="string">
            <text:p>2021-07-31T11:36:23.0738209Z</text:p>
          </table:table-cell>
          <table:table-cell office:value-type="string" calcext:value-type="string">
            <text:p>2021-07-31-11:37:32.2578209</text:p>
          </table:table-cell>
          <table:table-cell table:number-columns-repeated="2"/>
        </table:table-row>
        <table:table-row table:style-name="ro1">
          <table:table-cell office:value-type="float" office:value="490141672" calcext:value-type="float">
            <text:p>490141672</text:p>
          </table:table-cell>
          <table:table-cell office:value-type="float" office:value="681107755.074993" calcext:value-type="float">
            <text:p>681107755.074993</text:p>
          </table:table-cell>
          <table:table-cell/>
          <table:table-cell office:value-type="string" calcext:value-type="string">
            <text:p>2021-08-01T16:35:55.0749930Z</text:p>
          </table:table-cell>
          <table:table-cell office:value-type="string" calcext:value-type="string">
            <text:p>2021-08-01-16:37:04.2589930</text:p>
          </table:table-cell>
          <table:table-cell table:number-columns-repeated="2"/>
        </table:table-row>
        <table:table-row table:style-name="ro1">
          <table:table-cell office:value-type="float" office:value="490228068" calcext:value-type="float">
            <text:p>490228068</text:p>
          </table:table-cell>
          <table:table-cell office:value-type="float" office:value="681194151.075992" calcext:value-type="float">
            <text:p>681194151.075992</text:p>
          </table:table-cell>
          <table:table-cell/>
          <table:table-cell office:value-type="string" calcext:value-type="string">
            <text:p>2021-08-02T16:35:51.0759919Z</text:p>
          </table:table-cell>
          <table:table-cell office:value-type="string" calcext:value-type="string">
            <text:p>2021-08-02-16:37:00.2599920</text:p>
          </table:table-cell>
          <table:table-cell table:number-columns-repeated="2"/>
        </table:table-row>
        <table:table-row table:style-name="ro1">
          <table:table-cell office:value-type="float" office:value="490314463" calcext:value-type="float">
            <text:p>490314463</text:p>
          </table:table-cell>
          <table:table-cell office:value-type="float" office:value="681280546.076968" calcext:value-type="float">
            <text:p>681280546.076968</text:p>
          </table:table-cell>
          <table:table-cell/>
          <table:table-cell office:value-type="string" calcext:value-type="string">
            <text:p>2021-08-03T16:35:46.0769679Z</text:p>
          </table:table-cell>
          <table:table-cell office:value-type="string" calcext:value-type="string">
            <text:p>2021-08-03-16:36:55.2609679</text:p>
          </table:table-cell>
          <table:table-cell table:number-columns-repeated="2"/>
        </table:table-row>
        <table:table-row table:style-name="ro1">
          <table:table-cell office:value-type="float" office:value="490400851" calcext:value-type="float">
            <text:p>490400851</text:p>
          </table:table-cell>
          <table:table-cell office:value-type="float" office:value="681366934.077955" calcext:value-type="float">
            <text:p>681366934.077955</text:p>
          </table:table-cell>
          <table:table-cell/>
          <table:table-cell office:value-type="string" calcext:value-type="string">
            <text:p>2021-08-04T16:35:34.0779550Z</text:p>
          </table:table-cell>
          <table:table-cell office:value-type="string" calcext:value-type="string">
            <text:p>2021-08-04-16:36:43.2619550</text:p>
          </table:table-cell>
          <table:table-cell table:number-columns-repeated="2"/>
        </table:table-row>
        <table:table-row table:style-name="ro1">
          <table:table-cell office:value-type="float" office:value="490487248" calcext:value-type="float">
            <text:p>490487248</text:p>
          </table:table-cell>
          <table:table-cell office:value-type="float" office:value="681453331.07894" calcext:value-type="float">
            <text:p>681453331.07894</text:p>
          </table:table-cell>
          <table:table-cell/>
          <table:table-cell office:value-type="string" calcext:value-type="string">
            <text:p>2021-08-05T16:35:31.0789400Z</text:p>
          </table:table-cell>
          <table:table-cell office:value-type="string" calcext:value-type="string">
            <text:p>2021-08-05-16:36:40.2629400</text:p>
          </table:table-cell>
          <table:table-cell table:number-columns-repeated="2"/>
        </table:table-row>
        <table:table-row table:style-name="ro1">
          <table:table-cell office:value-type="float" office:value="490552088" calcext:value-type="float">
            <text:p>490552088</text:p>
          </table:table-cell>
          <table:table-cell office:value-type="float" office:value="681518171.079683" calcext:value-type="float">
            <text:p>681518171.079683</text:p>
          </table:table-cell>
          <table:table-cell/>
          <table:table-cell office:value-type="string" calcext:value-type="string">
            <text:p>2021-08-06T10:36:11.0796829Z</text:p>
          </table:table-cell>
          <table:table-cell office:value-type="string" calcext:value-type="string">
            <text:p>2021-08-06-10:37:20.2636829</text:p>
          </table:table-cell>
          <table:table-cell table:number-columns-repeated="2"/>
        </table:table-row>
        <table:table-row table:style-name="ro1">
          <table:table-cell office:value-type="float" office:value="490660033" calcext:value-type="float">
            <text:p>490660033</text:p>
          </table:table-cell>
          <table:table-cell office:value-type="float" office:value="681626116.080892" calcext:value-type="float">
            <text:p>681626116.080892</text:p>
          </table:table-cell>
          <table:table-cell/>
          <table:table-cell office:value-type="string" calcext:value-type="string">
            <text:p>2021-08-07T16:35:16.0808919Z</text:p>
          </table:table-cell>
          <table:table-cell office:value-type="string" calcext:value-type="string">
            <text:p>2021-08-07-16:36:25.2648919</text:p>
          </table:table-cell>
          <table:table-cell table:number-columns-repeated="2"/>
        </table:table-row>
        <table:table-row table:style-name="ro1">
          <table:table-cell office:value-type="float" office:value="490696039" calcext:value-type="float">
            <text:p>490696039</text:p>
          </table:table-cell>
          <table:table-cell office:value-type="float" office:value="681662122.08131" calcext:value-type="float">
            <text:p>681662122.08131</text:p>
          </table:table-cell>
          <table:table-cell/>
          <table:table-cell office:value-type="string" calcext:value-type="string">
            <text:p>2021-08-08T02:35:22.0813100Z</text:p>
          </table:table-cell>
          <table:table-cell office:value-type="string" calcext:value-type="string">
            <text:p>2021-08-08-02:36:31.2653100</text:p>
          </table:table-cell>
          <table:table-cell table:number-columns-repeated="2"/>
        </table:table-row>
        <table:table-row table:style-name="ro1">
          <table:table-cell office:value-type="float" office:value="490832816" calcext:value-type="float">
            <text:p>490832816</text:p>
          </table:table-cell>
          <table:table-cell office:value-type="float" office:value="681798899.082864" calcext:value-type="float">
            <text:p>681798899.082864</text:p>
          </table:table-cell>
          <table:table-cell/>
          <table:table-cell office:value-type="string" calcext:value-type="string">
            <text:p>2021-08-09T16:34:59.0828639Z</text:p>
          </table:table-cell>
          <table:table-cell office:value-type="string" calcext:value-type="string">
            <text:p>2021-08-09-16:36:08.2668639</text:p>
          </table:table-cell>
          <table:table-cell table:number-columns-repeated="2"/>
        </table:table-row>
        <table:table-row table:style-name="ro1">
          <table:table-cell office:value-type="float" office:value="490919322" calcext:value-type="float">
            <text:p>490919322</text:p>
          </table:table-cell>
          <table:table-cell office:value-type="float" office:value="681885405.083841" calcext:value-type="float">
            <text:p>681885405.083841</text:p>
          </table:table-cell>
          <table:table-cell/>
          <table:table-cell office:value-type="string" calcext:value-type="string">
            <text:p>2021-08-10T16:36:45.0838409Z</text:p>
          </table:table-cell>
          <table:table-cell office:value-type="string" calcext:value-type="string">
            <text:p>2021-08-10-16:37:54.2678409</text:p>
          </table:table-cell>
          <table:table-cell table:number-columns-repeated="2"/>
        </table:table-row>
        <table:table-row table:style-name="ro1">
          <table:table-cell office:value-type="float" office:value="491005598" calcext:value-type="float">
            <text:p>491005598</text:p>
          </table:table-cell>
          <table:table-cell office:value-type="float" office:value="681971681.084832" calcext:value-type="float">
            <text:p>681971681.084832</text:p>
          </table:table-cell>
          <table:table-cell/>
          <table:table-cell office:value-type="string" calcext:value-type="string">
            <text:p>2021-08-11T16:34:41.0848319Z</text:p>
          </table:table-cell>
          <table:table-cell office:value-type="string" calcext:value-type="string">
            <text:p>2021-08-11-16:35:50.2688319</text:p>
          </table:table-cell>
          <table:table-cell table:number-columns-repeated="2"/>
        </table:table-row>
        <table:table-row table:style-name="ro1">
          <table:table-cell office:value-type="float" office:value="491091990" calcext:value-type="float">
            <text:p>491091990</text:p>
          </table:table-cell>
          <table:table-cell office:value-type="float" office:value="682058073.085804" calcext:value-type="float">
            <text:p>682058073.085804</text:p>
          </table:table-cell>
          <table:table-cell/>
          <table:table-cell office:value-type="string" calcext:value-type="string">
            <text:p>2021-08-12T16:34:33.0858039Z</text:p>
          </table:table-cell>
          <table:table-cell office:value-type="string" calcext:value-type="string">
            <text:p>2021-08-12-16:35:42.2698040</text:p>
          </table:table-cell>
          <table:table-cell table:number-columns-repeated="2"/>
        </table:table-row>
        <table:table-row table:style-name="ro1">
          <table:table-cell office:value-type="float" office:value="491153174" calcext:value-type="float">
            <text:p>491153174</text:p>
          </table:table-cell>
          <table:table-cell office:value-type="float" office:value="682119257.086512" calcext:value-type="float">
            <text:p>682119257.086512</text:p>
          </table:table-cell>
          <table:table-cell/>
          <table:table-cell office:value-type="string" calcext:value-type="string">
            <text:p>2021-08-13T09:34:17.0865119Z</text:p>
          </table:table-cell>
          <table:table-cell office:value-type="string" calcext:value-type="string">
            <text:p>2021-08-13-09:35:26.2705119</text:p>
          </table:table-cell>
          <table:table-cell table:number-columns-repeated="2"/>
        </table:table-row>
        <table:table-row table:style-name="ro1">
          <table:table-cell office:value-type="float" office:value="491264857" calcext:value-type="float">
            <text:p>491264857</text:p>
          </table:table-cell>
          <table:table-cell office:value-type="float" office:value="682230940.087778" calcext:value-type="float">
            <text:p>682230940.087778</text:p>
          </table:table-cell>
          <table:table-cell/>
          <table:table-cell office:value-type="string" calcext:value-type="string">
            <text:p>2021-08-14T16:35:40.0877779Z</text:p>
          </table:table-cell>
          <table:table-cell office:value-type="string" calcext:value-type="string">
            <text:p>2021-08-14-16:36:49.2717779</text:p>
          </table:table-cell>
          <table:table-cell table:number-columns-repeated="2"/>
        </table:table-row>
        <table:table-row table:style-name="ro1">
          <table:table-cell office:value-type="float" office:value="491351169" calcext:value-type="float">
            <text:p>491351169</text:p>
          </table:table-cell>
          <table:table-cell office:value-type="float" office:value="682317252.088756" calcext:value-type="float">
            <text:p>682317252.088756</text:p>
          </table:table-cell>
          <table:table-cell/>
          <table:table-cell office:value-type="string" calcext:value-type="string">
            <text:p>2021-08-15T16:34:12.0887559Z</text:p>
          </table:table-cell>
          <table:table-cell office:value-type="string" calcext:value-type="string">
            <text:p>2021-08-15-16:35:21.2727559</text:p>
          </table:table-cell>
          <table:table-cell table:number-columns-repeated="2"/>
        </table:table-row>
        <table:table-row table:style-name="ro1">
          <table:table-cell office:value-type="float" office:value="491383576" calcext:value-type="float">
            <text:p>491383576</text:p>
          </table:table-cell>
          <table:table-cell office:value-type="float" office:value="682349659.089126" calcext:value-type="float">
            <text:p>682349659.089126</text:p>
          </table:table-cell>
          <table:table-cell/>
          <table:table-cell office:value-type="string" calcext:value-type="string">
            <text:p>2021-08-16T01:34:19.0891259Z</text:p>
          </table:table-cell>
          <table:table-cell office:value-type="string" calcext:value-type="string">
            <text:p>2021-08-16-01:35:28.2731260</text:p>
          </table:table-cell>
          <table:table-cell table:number-columns-repeated="2"/>
        </table:table-row>
        <table:table-row table:style-name="ro1">
          <table:table-cell office:value-type="float" office:value="491469967" calcext:value-type="float">
            <text:p>491469967</text:p>
          </table:table-cell>
          <table:table-cell office:value-type="float" office:value="682436050.090103" calcext:value-type="float">
            <text:p>682436050.090103</text:p>
          </table:table-cell>
          <table:table-cell/>
          <table:table-cell office:value-type="string" calcext:value-type="string">
            <text:p>2021-08-17T01:34:10.0901030Z</text:p>
          </table:table-cell>
          <table:table-cell office:value-type="string" calcext:value-type="string">
            <text:p>2021-08-17-01:35:19.2741030</text:p>
          </table:table-cell>
          <table:table-cell table:number-columns-repeated="2"/>
        </table:table-row>
        <table:table-row table:style-name="ro1">
          <table:table-cell office:value-type="float" office:value="491610339" calcext:value-type="float">
            <text:p>491610339</text:p>
          </table:table-cell>
          <table:table-cell office:value-type="float" office:value="682576422.091681" calcext:value-type="float">
            <text:p>682576422.091681</text:p>
          </table:table-cell>
          <table:table-cell/>
          <table:table-cell office:value-type="string" calcext:value-type="string">
            <text:p>2021-08-18T16:33:42.0916810Z</text:p>
          </table:table-cell>
          <table:table-cell office:value-type="string" calcext:value-type="string">
            <text:p>2021-08-18-16:34:51.2756810</text:p>
          </table:table-cell>
          <table:table-cell table:number-columns-repeated="2"/>
        </table:table-row>
        <table:table-row table:style-name="ro1">
          <table:table-cell office:value-type="float" office:value="491696735" calcext:value-type="float">
            <text:p>491696735</text:p>
          </table:table-cell>
          <table:table-cell office:value-type="float" office:value="682662818.092672" calcext:value-type="float">
            <text:p>682662818.092672</text:p>
          </table:table-cell>
          <table:table-cell/>
          <table:table-cell office:value-type="string" calcext:value-type="string">
            <text:p>2021-08-19T16:33:38.0926719Z</text:p>
          </table:table-cell>
          <table:table-cell office:value-type="string" calcext:value-type="string">
            <text:p>2021-08-19-16:34:47.2766720</text:p>
          </table:table-cell>
          <table:table-cell table:number-columns-repeated="2"/>
        </table:table-row>
        <table:table-row table:style-name="ro1">
          <table:table-cell office:value-type="float" office:value="491772315" calcext:value-type="float">
            <text:p>491772315</text:p>
          </table:table-cell>
          <table:table-cell office:value-type="float" office:value="682738398.093504" calcext:value-type="float">
            <text:p>682738398.093504</text:p>
          </table:table-cell>
          <table:table-cell/>
          <table:table-cell office:value-type="string" calcext:value-type="string">
            <text:p>2021-08-20T13:33:18.0935039Z</text:p>
          </table:table-cell>
          <table:table-cell office:value-type="string" calcext:value-type="string">
            <text:p>2021-08-20-13:34:27.2775039</text:p>
          </table:table-cell>
          <table:table-cell table:number-columns-repeated="2"/>
        </table:table-row>
        <table:table-row table:style-name="ro1">
          <table:table-cell office:value-type="float" office:value="491840696" calcext:value-type="float">
            <text:p>491840696</text:p>
          </table:table-cell>
          <table:table-cell office:value-type="float" office:value="682806779.094313" calcext:value-type="float">
            <text:p>682806779.094313</text:p>
          </table:table-cell>
          <table:table-cell/>
          <table:table-cell office:value-type="string" calcext:value-type="string">
            <text:p>2021-08-21T08:32:59.0943130Z</text:p>
          </table:table-cell>
          <table:table-cell office:value-type="string" calcext:value-type="string">
            <text:p>2021-08-21-08:34:08.2783130</text:p>
          </table:table-cell>
          <table:table-cell table:number-columns-repeated="2"/>
        </table:table-row>
        <table:table-row table:style-name="ro1">
          <table:table-cell office:value-type="float" office:value="491955905" calcext:value-type="float">
            <text:p>491955905</text:p>
          </table:table-cell>
          <table:table-cell office:value-type="float" office:value="682921988.095603" calcext:value-type="float">
            <text:p>682921988.095603</text:p>
          </table:table-cell>
          <table:table-cell/>
          <table:table-cell office:value-type="string" calcext:value-type="string">
            <text:p>2021-08-22T16:33:08.0956029Z</text:p>
          </table:table-cell>
          <table:table-cell office:value-type="string" calcext:value-type="string">
            <text:p>2021-08-22-16:34:17.2796030</text:p>
          </table:table-cell>
          <table:table-cell table:number-columns-repeated="2"/>
        </table:table-row>
        <table:table-row table:style-name="ro1">
          <table:table-cell office:value-type="float" office:value="491988300" calcext:value-type="float">
            <text:p>491988300</text:p>
          </table:table-cell>
          <table:table-cell office:value-type="float" office:value="682954383.095966" calcext:value-type="float">
            <text:p>682954383.095966</text:p>
          </table:table-cell>
          <table:table-cell/>
          <table:table-cell office:value-type="string" calcext:value-type="string">
            <text:p>2021-08-23T01:33:03.0959659Z</text:p>
          </table:table-cell>
          <table:table-cell office:value-type="string" calcext:value-type="string">
            <text:p>2021-08-23-01:34:12.2799659</text:p>
          </table:table-cell>
          <table:table-cell table:number-columns-repeated="2"/>
        </table:table-row>
        <table:table-row table:style-name="ro1">
          <table:table-cell office:value-type="float" office:value="492128687" calcext:value-type="float">
            <text:p>492128687</text:p>
          </table:table-cell>
          <table:table-cell office:value-type="float" office:value="683094770.09756" calcext:value-type="float">
            <text:p>683094770.09756</text:p>
          </table:table-cell>
          <table:table-cell/>
          <table:table-cell office:value-type="string" calcext:value-type="string">
            <text:p>2021-08-24T16:32:50.0975599Z</text:p>
          </table:table-cell>
          <table:table-cell office:value-type="string" calcext:value-type="string">
            <text:p>2021-08-24-16:33:59.2815599</text:p>
          </table:table-cell>
          <table:table-cell table:number-columns-repeated="2"/>
        </table:table-row>
        <table:table-row table:style-name="ro1">
          <table:table-cell office:value-type="float" office:value="492175452" calcext:value-type="float">
            <text:p>492175452</text:p>
          </table:table-cell>
          <table:table-cell office:value-type="float" office:value="683141535.098081" calcext:value-type="float">
            <text:p>683141535.098081</text:p>
          </table:table-cell>
          <table:table-cell/>
          <table:table-cell office:value-type="string" calcext:value-type="string">
            <text:p>2021-08-25T05:32:15.0980809Z</text:p>
          </table:table-cell>
          <table:table-cell office:value-type="string" calcext:value-type="string">
            <text:p>2021-08-25-05:33:24.2820810</text:p>
          </table:table-cell>
          <table:table-cell table:number-columns-repeated="2"/>
        </table:table-row>
        <table:table-row table:style-name="ro1">
          <table:table-cell office:value-type="float" office:value="492387857" calcext:value-type="float">
            <text:p>492387857</text:p>
          </table:table-cell>
          <table:table-cell office:value-type="float" office:value="683353940.100485" calcext:value-type="float">
            <text:p>683353940.100485</text:p>
          </table:table-cell>
          <table:table-cell/>
          <table:table-cell office:value-type="string" calcext:value-type="string">
            <text:p>2021-08-27T16:32:20.1004849Z</text:p>
          </table:table-cell>
          <table:table-cell office:value-type="string" calcext:value-type="string">
            <text:p>2021-08-27-16:33:29.2844849</text:p>
          </table:table-cell>
          <table:table-cell table:number-columns-repeated="2"/>
        </table:table-row>
        <table:table-row table:style-name="ro1">
          <table:table-cell office:value-type="float" office:value="492474243" calcext:value-type="float">
            <text:p>492474243</text:p>
          </table:table-cell>
          <table:table-cell office:value-type="float" office:value="683440326.104157" calcext:value-type="float">
            <text:p>683440326.104157</text:p>
          </table:table-cell>
          <table:table-cell/>
          <table:table-cell office:value-type="string" calcext:value-type="string">
            <text:p>2021-08-28T16:32:06.1041569Z</text:p>
          </table:table-cell>
          <table:table-cell office:value-type="string" calcext:value-type="string">
            <text:p>2021-08-28-16:33:15.2881569</text:p>
          </table:table-cell>
          <table:table-cell table:number-columns-repeated="2"/>
        </table:table-row>
        <table:table-row table:style-name="ro1">
          <table:table-cell office:value-type="float" office:value="492524607" calcext:value-type="float">
            <text:p>492524607</text:p>
          </table:table-cell>
          <table:table-cell office:value-type="float" office:value="683490690.104744" calcext:value-type="float">
            <text:p>683490690.104744</text:p>
          </table:table-cell>
          <table:table-cell/>
          <table:table-cell office:value-type="string" calcext:value-type="string">
            <text:p>2021-08-29T06:31:30.1047439Z</text:p>
          </table:table-cell>
          <table:table-cell office:value-type="string" calcext:value-type="string">
            <text:p>2021-08-29-06:32:39.2887439</text:p>
          </table:table-cell>
          <table:table-cell table:number-columns-repeated="2"/>
        </table:table-row>
        <table:table-row table:style-name="ro1">
          <table:table-cell office:value-type="float" office:value="492618212" calcext:value-type="float">
            <text:p>492618212</text:p>
          </table:table-cell>
          <table:table-cell office:value-type="float" office:value="683584295.105821" calcext:value-type="float">
            <text:p>683584295.105821</text:p>
          </table:table-cell>
          <table:table-cell/>
          <table:table-cell office:value-type="string" calcext:value-type="string">
            <text:p>2021-08-30T08:31:35.1058210Z</text:p>
          </table:table-cell>
          <table:table-cell office:value-type="string" calcext:value-type="string">
            <text:p>2021-08-30-08:32:44.2898210</text:p>
          </table:table-cell>
          <table:table-cell table:number-columns-repeated="2"/>
        </table:table-row>
        <table:table-row table:style-name="ro1">
          <table:table-cell office:value-type="float" office:value="492675818" calcext:value-type="float">
            <text:p>492675818</text:p>
          </table:table-cell>
          <table:table-cell office:value-type="float" office:value="683641901.106467" calcext:value-type="float">
            <text:p>683641901.106467</text:p>
          </table:table-cell>
          <table:table-cell/>
          <table:table-cell office:value-type="string" calcext:value-type="string">
            <text:p>2021-08-31T00:31:41.1064670Z</text:p>
          </table:table-cell>
          <table:table-cell office:value-type="string" calcext:value-type="string">
            <text:p>2021-08-31-00:32:50.2904670</text:p>
          </table:table-cell>
          <table:table-cell table:number-columns-repeated="2"/>
        </table:table-row>
        <table:table-row table:style-name="ro1">
          <table:table-cell office:value-type="float" office:value="492819800" calcext:value-type="float">
            <text:p>492819800</text:p>
          </table:table-cell>
          <table:table-cell office:value-type="float" office:value="683785883.108098" calcext:value-type="float">
            <text:p>683785883.108098</text:p>
          </table:table-cell>
          <table:table-cell/>
          <table:table-cell office:value-type="string" calcext:value-type="string">
            <text:p>2021-09-01T16:31:23.1080980Z</text:p>
          </table:table-cell>
          <table:table-cell office:value-type="string" calcext:value-type="string">
            <text:p>2021-09-01-16:32:32.2920980</text:p>
          </table:table-cell>
          <table:table-cell table:number-columns-repeated="2"/>
        </table:table-row>
        <table:table-row table:style-name="ro1">
          <table:table-cell office:value-type="float" office:value="492877390" calcext:value-type="float">
            <text:p>492877390</text:p>
          </table:table-cell>
          <table:table-cell office:value-type="float" office:value="683843473.108781" calcext:value-type="float">
            <text:p>683843473.108781</text:p>
          </table:table-cell>
          <table:table-cell/>
          <table:table-cell office:value-type="string" calcext:value-type="string">
            <text:p>2021-09-02T08:31:13.1087809Z</text:p>
          </table:table-cell>
          <table:table-cell office:value-type="string" calcext:value-type="string">
            <text:p>2021-09-02-08:32:22.2927809</text:p>
          </table:table-cell>
          <table:table-cell table:number-columns-repeated="2"/>
        </table:table-row>
        <table:table-row table:style-name="ro1">
          <table:table-cell office:value-type="float" office:value="492992591" calcext:value-type="float">
            <text:p>492992591</text:p>
          </table:table-cell>
          <table:table-cell office:value-type="float" office:value="683958674.110069" calcext:value-type="float">
            <text:p>683958674.110069</text:p>
          </table:table-cell>
          <table:table-cell/>
          <table:table-cell office:value-type="string" calcext:value-type="string">
            <text:p>2021-09-03T16:31:14.1100690Z</text:p>
          </table:table-cell>
          <table:table-cell office:value-type="string" calcext:value-type="string">
            <text:p>2021-09-03-16:32:23.2940690</text:p>
          </table:table-cell>
          <table:table-cell table:number-columns-repeated="2"/>
        </table:table-row>
        <table:table-row table:style-name="ro1">
          <table:table-cell office:value-type="float" office:value="493078973" calcext:value-type="float">
            <text:p>493078973</text:p>
          </table:table-cell>
          <table:table-cell office:value-type="float" office:value="684045056.111063" calcext:value-type="float">
            <text:p>684045056.111063</text:p>
          </table:table-cell>
          <table:table-cell/>
          <table:table-cell office:value-type="string" calcext:value-type="string">
            <text:p>2021-09-04T16:30:56.1110630Z</text:p>
          </table:table-cell>
          <table:table-cell office:value-type="string" calcext:value-type="string">
            <text:p>2021-09-04-16:32:05.2950630</text:p>
          </table:table-cell>
          <table:table-cell table:number-columns-repeated="2"/>
        </table:table-row>
        <table:table-row table:style-name="ro1">
          <table:table-cell office:value-type="float" office:value="493100601" calcext:value-type="float">
            <text:p>493100601</text:p>
          </table:table-cell>
          <table:table-cell office:value-type="float" office:value="684066684.111298" calcext:value-type="float">
            <text:p>684066684.111298</text:p>
          </table:table-cell>
          <table:table-cell/>
          <table:table-cell office:value-type="string" calcext:value-type="string">
            <text:p>2021-09-04T22:31:24.1112979Z</text:p>
          </table:table-cell>
          <table:table-cell office:value-type="string" calcext:value-type="string">
            <text:p>2021-09-04-22:32:33.2952979</text:p>
          </table:table-cell>
          <table:table-cell table:number-columns-repeated="2"/>
        </table:table-row>
        <table:table-row table:style-name="ro1">
          <table:table-cell office:value-type="float" office:value="493251760" calcext:value-type="float">
            <text:p>493251760</text:p>
          </table:table-cell>
          <table:table-cell office:value-type="float" office:value="684217843.11304" calcext:value-type="float">
            <text:p>684217843.11304</text:p>
          </table:table-cell>
          <table:table-cell/>
          <table:table-cell office:value-type="string" calcext:value-type="string">
            <text:p>2021-09-06T16:30:43.1130399Z</text:p>
          </table:table-cell>
          <table:table-cell office:value-type="string" calcext:value-type="string">
            <text:p>2021-09-06-16:31:52.2970399</text:p>
          </table:table-cell>
          <table:table-cell table:number-columns-repeated="2"/>
        </table:table-row>
        <table:table-row table:style-name="ro1">
          <table:table-cell office:value-type="float" office:value="493269709" calcext:value-type="float">
            <text:p>493269709</text:p>
          </table:table-cell>
          <table:table-cell office:value-type="float" office:value="684235792.113234" calcext:value-type="float">
            <text:p>684235792.113234</text:p>
          </table:table-cell>
          <table:table-cell/>
          <table:table-cell office:value-type="string" calcext:value-type="string">
            <text:p>2021-09-06T21:29:52.1132340Z</text:p>
          </table:table-cell>
          <table:table-cell office:value-type="string" calcext:value-type="string">
            <text:p>2021-09-06-21:31:01.2972340</text:p>
          </table:table-cell>
          <table:table-cell table:number-columns-repeated="2"/>
        </table:table-row>
        <table:table-row table:style-name="ro1">
          <table:table-cell office:value-type="float" office:value="493420925" calcext:value-type="float">
            <text:p>493420925</text:p>
          </table:table-cell>
          <table:table-cell office:value-type="float" office:value="684387008.114957" calcext:value-type="float">
            <text:p>684387008.114957</text:p>
          </table:table-cell>
          <table:table-cell/>
          <table:table-cell office:value-type="string" calcext:value-type="string">
            <text:p>2021-09-08T15:30:08.1149569Z</text:p>
          </table:table-cell>
          <table:table-cell office:value-type="string" calcext:value-type="string">
            <text:p>2021-09-08-15:31:17.2989569</text:p>
          </table:table-cell>
          <table:table-cell table:number-columns-repeated="2"/>
        </table:table-row>
        <table:table-row table:style-name="ro1">
          <table:table-cell office:value-type="float" office:value="493474892" calcext:value-type="float">
            <text:p>493474892</text:p>
          </table:table-cell>
          <table:table-cell office:value-type="float" office:value="684440975.115567" calcext:value-type="float">
            <text:p>684440975.115567</text:p>
          </table:table-cell>
          <table:table-cell/>
          <table:table-cell office:value-type="string" calcext:value-type="string">
            <text:p>2021-09-09T06:29:35.1155669Z</text:p>
          </table:table-cell>
          <table:table-cell office:value-type="string" calcext:value-type="string">
            <text:p>2021-09-09-06:30:44.2995669</text:p>
          </table:table-cell>
          <table:table-cell table:number-columns-repeated="2"/>
        </table:table-row>
        <table:table-row table:style-name="ro1">
          <table:table-cell office:value-type="float" office:value="493593695" calcext:value-type="float">
            <text:p>493593695</text:p>
          </table:table-cell>
          <table:table-cell office:value-type="float" office:value="684559778.116923" calcext:value-type="float">
            <text:p>684559778.116923</text:p>
          </table:table-cell>
          <table:table-cell/>
          <table:table-cell office:value-type="string" calcext:value-type="string">
            <text:p>2021-09-10T15:29:38.1169229Z</text:p>
          </table:table-cell>
          <table:table-cell office:value-type="string" calcext:value-type="string">
            <text:p>2021-09-10-15:30:47.3009229</text:p>
          </table:table-cell>
          <table:table-cell table:number-columns-repeated="2"/>
        </table:table-row>
        <table:table-row table:style-name="ro1">
          <table:table-cell office:value-type="float" office:value="493683700" calcext:value-type="float">
            <text:p>493683700</text:p>
          </table:table-cell>
          <table:table-cell office:value-type="float" office:value="684649783.117952" calcext:value-type="float">
            <text:p>684649783.117952</text:p>
          </table:table-cell>
          <table:table-cell/>
          <table:table-cell office:value-type="string" calcext:value-type="string">
            <text:p>2021-09-11T16:29:43.1179519Z</text:p>
          </table:table-cell>
          <table:table-cell office:value-type="string" calcext:value-type="string">
            <text:p>2021-09-11-16:30:52.3019520</text:p>
          </table:table-cell>
          <table:table-cell table:number-columns-repeated="2"/>
        </table:table-row>
        <table:table-row table:style-name="ro1">
          <table:table-cell office:value-type="float" office:value="493771733" calcext:value-type="float">
            <text:p>493771733</text:p>
          </table:table-cell>
          <table:table-cell office:value-type="float" office:value="684737816.118903" calcext:value-type="float">
            <text:p>684737816.118903</text:p>
          </table:table-cell>
          <table:table-cell/>
          <table:table-cell office:value-type="string" calcext:value-type="string">
            <text:p>2021-09-12T16:56:56.1189030Z</text:p>
          </table:table-cell>
          <table:table-cell office:value-type="string" calcext:value-type="string">
            <text:p>2021-09-12-16:58:05.3029030</text:p>
          </table:table-cell>
          <table:table-cell table:number-columns-repeated="2"/>
        </table:table-row>
        <table:table-row table:style-name="ro1">
          <table:table-cell office:value-type="float" office:value="493856482" calcext:value-type="float">
            <text:p>493856482</text:p>
          </table:table-cell>
          <table:table-cell office:value-type="float" office:value="684822565.119902" calcext:value-type="float">
            <text:p>684822565.119902</text:p>
          </table:table-cell>
          <table:table-cell/>
          <table:table-cell office:value-type="string" calcext:value-type="string">
            <text:p>2021-09-13T16:29:25.1199020Z</text:p>
          </table:table-cell>
          <table:table-cell office:value-type="string" calcext:value-type="string">
            <text:p>2021-09-13-16:30:34.3039020</text:p>
          </table:table-cell>
          <table:table-cell table:number-columns-repeated="2"/>
        </table:table-row>
        <table:table-row table:style-name="ro1">
          <table:table-cell office:value-type="float" office:value="493939252" calcext:value-type="float">
            <text:p>493939252</text:p>
          </table:table-cell>
          <table:table-cell office:value-type="float" office:value="684905335.120843" calcext:value-type="float">
            <text:p>684905335.120843</text:p>
          </table:table-cell>
          <table:table-cell/>
          <table:table-cell office:value-type="string" calcext:value-type="string">
            <text:p>2021-09-14T15:28:55.1208429Z</text:p>
          </table:table-cell>
          <table:table-cell office:value-type="string" calcext:value-type="string">
            <text:p>2021-09-14-15:30:04.3048429</text:p>
          </table:table-cell>
          <table:table-cell table:number-columns-repeated="2"/>
        </table:table-row>
        <table:table-row table:style-name="ro1">
          <table:table-cell office:value-type="float" office:value="494025656" calcext:value-type="float">
            <text:p>494025656</text:p>
          </table:table-cell>
          <table:table-cell office:value-type="float" office:value="684991739.121822" calcext:value-type="float">
            <text:p>684991739.121822</text:p>
          </table:table-cell>
          <table:table-cell/>
          <table:table-cell office:value-type="string" calcext:value-type="string">
            <text:p>2021-09-15T15:28:59.1218219Z</text:p>
          </table:table-cell>
          <table:table-cell office:value-type="string" calcext:value-type="string">
            <text:p>2021-09-15-15:30:08.3058220</text:p>
          </table:table-cell>
          <table:table-cell table:number-columns-repeated="2"/>
        </table:table-row>
        <table:table-row table:style-name="ro1">
          <table:table-cell office:value-type="float" office:value="494083231" calcext:value-type="float">
            <text:p>494083231</text:p>
          </table:table-cell>
          <table:table-cell office:value-type="float" office:value="685049314.122473" calcext:value-type="float">
            <text:p>685049314.122473</text:p>
          </table:table-cell>
          <table:table-cell/>
          <table:table-cell office:value-type="string" calcext:value-type="string">
            <text:p>2021-09-16T07:28:34.1224730Z</text:p>
          </table:table-cell>
          <table:table-cell office:value-type="string" calcext:value-type="string">
            <text:p>2021-09-16-07:29:43.3064730</text:p>
          </table:table-cell>
          <table:table-cell table:number-columns-repeated="2"/>
        </table:table-row>
        <table:table-row table:style-name="ro1">
          <table:table-cell office:value-type="float" office:value="494137199" calcext:value-type="float">
            <text:p>494137199</text:p>
          </table:table-cell>
          <table:table-cell office:value-type="float" office:value="685103282.123076" calcext:value-type="float">
            <text:p>685103282.123076</text:p>
          </table:table-cell>
          <table:table-cell/>
          <table:table-cell office:value-type="string" calcext:value-type="string">
            <text:p>2021-09-16T22:28:02.1230759Z</text:p>
          </table:table-cell>
          <table:table-cell office:value-type="string" calcext:value-type="string">
            <text:p>2021-09-16-22:29:11.3070759</text:p>
          </table:table-cell>
          <table:table-cell table:number-columns-repeated="2"/>
        </table:table-row>
        <table:table-row table:style-name="ro1">
          <table:table-cell office:value-type="float" office:value="494281204" calcext:value-type="float">
            <text:p>494281204</text:p>
          </table:table-cell>
          <table:table-cell office:value-type="float" office:value="685247287.124716" calcext:value-type="float">
            <text:p>685247287.124716</text:p>
          </table:table-cell>
          <table:table-cell/>
          <table:table-cell office:value-type="string" calcext:value-type="string">
            <text:p>2021-09-18T14:28:07.1247160Z</text:p>
          </table:table-cell>
          <table:table-cell office:value-type="string" calcext:value-type="string">
            <text:p>2021-09-18-14:29:16.3087160</text:p>
          </table:table-cell>
          <table:table-cell table:number-columns-repeated="2"/>
        </table:table-row>
        <table:table-row table:style-name="ro1">
          <table:table-cell office:value-type="float" office:value="494371197" calcext:value-type="float">
            <text:p>494371197</text:p>
          </table:table-cell>
          <table:table-cell office:value-type="float" office:value="685337280.125735" calcext:value-type="float">
            <text:p>685337280.125735</text:p>
          </table:table-cell>
          <table:table-cell/>
          <table:table-cell office:value-type="string" calcext:value-type="string">
            <text:p>2021-09-19T15:28:00.1257349Z</text:p>
          </table:table-cell>
          <table:table-cell office:value-type="string" calcext:value-type="string">
            <text:p>2021-09-19-15:29:09.3097349</text:p>
          </table:table-cell>
          <table:table-cell table:number-columns-repeated="2"/>
        </table:table-row>
        <table:table-row table:style-name="ro1">
          <table:table-cell office:value-type="float" office:value="494457589" calcext:value-type="float">
            <text:p>494457589</text:p>
          </table:table-cell>
          <table:table-cell office:value-type="float" office:value="685423672.126714" calcext:value-type="float">
            <text:p>685423672.126714</text:p>
          </table:table-cell>
          <table:table-cell/>
          <table:table-cell office:value-type="string" calcext:value-type="string">
            <text:p>2021-09-20T15:27:52.1267139Z</text:p>
          </table:table-cell>
          <table:table-cell office:value-type="string" calcext:value-type="string">
            <text:p>2021-09-20-15:29:01.3107140</text:p>
          </table:table-cell>
          <table:table-cell table:number-columns-repeated="2"/>
        </table:table-row>
        <table:table-row table:style-name="ro1">
          <table:table-cell office:value-type="float" office:value="494504347" calcext:value-type="float">
            <text:p>494504347</text:p>
          </table:table-cell>
          <table:table-cell office:value-type="float" office:value="685470430.127249" calcext:value-type="float">
            <text:p>685470430.127249</text:p>
          </table:table-cell>
          <table:table-cell/>
          <table:table-cell office:value-type="string" calcext:value-type="string">
            <text:p>2021-09-21T04:27:10.1272490Z</text:p>
          </table:table-cell>
          <table:table-cell office:value-type="string" calcext:value-type="string">
            <text:p>2021-09-21-04:28:19.3112490</text:p>
          </table:table-cell>
          <table:table-cell table:number-columns-repeated="2"/>
        </table:table-row>
        <table:table-row table:style-name="ro1">
          <table:table-cell office:value-type="float" office:value="494893173" calcext:value-type="float">
            <text:p>494893173</text:p>
          </table:table-cell>
          <table:table-cell office:value-type="float" office:value="685859256.131599" calcext:value-type="float">
            <text:p>685859256.131599</text:p>
          </table:table-cell>
          <table:table-cell/>
          <table:table-cell office:value-type="string" calcext:value-type="string">
            <text:p>2021-09-25T16:27:36.1315989Z</text:p>
          </table:table-cell>
          <table:table-cell office:value-type="string" calcext:value-type="string">
            <text:p>2021-09-25-16:28:45.3155989</text:p>
          </table:table-cell>
          <table:table-cell table:number-columns-repeated="2"/>
        </table:table-row>
        <table:table-row table:style-name="ro1">
          <table:table-cell office:value-type="float" office:value="494914981" calcext:value-type="float">
            <text:p>494914981</text:p>
          </table:table-cell>
          <table:table-cell office:value-type="float" office:value="685881064.131871" calcext:value-type="float">
            <text:p>685881064.131871</text:p>
          </table:table-cell>
          <table:table-cell/>
          <table:table-cell office:value-type="string" calcext:value-type="string">
            <text:p>2021-09-25T22:31:04.1318709Z</text:p>
          </table:table-cell>
          <table:table-cell office:value-type="string" calcext:value-type="string">
            <text:p>2021-09-25-22:32:13.3158710</text:p>
          </table:table-cell>
          <table:table-cell table:number-columns-repeated="2"/>
        </table:table-row>
        <table:table-row table:style-name="ro1">
          <table:table-cell office:value-type="float" office:value="495375433" calcext:value-type="float">
            <text:p>495375433</text:p>
          </table:table-cell>
          <table:table-cell office:value-type="float" office:value="686341516.137063" calcext:value-type="float">
            <text:p>686341516.137063</text:p>
          </table:table-cell>
          <table:table-cell/>
          <table:table-cell office:value-type="string" calcext:value-type="string">
            <text:p>2021-10-01T06:25:16.1370630Z</text:p>
          </table:table-cell>
          <table:table-cell office:value-type="string" calcext:value-type="string">
            <text:p>2021-10-01-06:26:25.3210630</text:p>
          </table:table-cell>
          <table:table-cell table:number-columns-repeated="2"/>
        </table:table-row>
        <table:table-row table:style-name="ro1">
          <table:table-cell office:value-type="float" office:value="495490639" calcext:value-type="float">
            <text:p>495490639</text:p>
          </table:table-cell>
          <table:table-cell office:value-type="float" office:value="686456722.138345" calcext:value-type="float">
            <text:p>686456722.138345</text:p>
          </table:table-cell>
          <table:table-cell/>
          <table:table-cell office:value-type="string" calcext:value-type="string">
            <text:p>2021-10-02T14:25:22.1383450Z</text:p>
          </table:table-cell>
          <table:table-cell office:value-type="string" calcext:value-type="string">
            <text:p>2021-10-02-14:26:31.3223450</text:p>
          </table:table-cell>
          <table:table-cell table:number-columns-repeated="2"/>
        </table:table-row>
        <table:table-row table:style-name="ro1">
          <table:table-cell office:value-type="float" office:value="495584219" calcext:value-type="float">
            <text:p>495584219</text:p>
          </table:table-cell>
          <table:table-cell office:value-type="float" office:value="686550302.139377" calcext:value-type="float">
            <text:p>686550302.139377</text:p>
          </table:table-cell>
          <table:table-cell/>
          <table:table-cell office:value-type="string" calcext:value-type="string">
            <text:p>2021-10-03T16:25:02.1393769Z</text:p>
          </table:table-cell>
          <table:table-cell office:value-type="string" calcext:value-type="string">
            <text:p>2021-10-03-16:26:11.3233770</text:p>
          </table:table-cell>
          <table:table-cell table:number-columns-repeated="2"/>
        </table:table-row>
        <table:table-row table:style-name="ro1">
          <table:table-cell office:value-type="float" office:value="495605818" calcext:value-type="float">
            <text:p>495605818</text:p>
          </table:table-cell>
          <table:table-cell office:value-type="float" office:value="686571901.13963" calcext:value-type="float">
            <text:p>686571901.13963</text:p>
          </table:table-cell>
          <table:table-cell/>
          <table:table-cell office:value-type="string" calcext:value-type="string">
            <text:p>2021-10-03T22:25:01.1396299Z</text:p>
          </table:table-cell>
          <table:table-cell office:value-type="string" calcext:value-type="string">
            <text:p>2021-10-03-22:26:10.3236299</text:p>
          </table:table-cell>
          <table:table-cell table:number-columns-repeated="2"/>
        </table:table-row>
        <table:table-row table:style-name="ro1">
          <table:table-cell office:value-type="float" office:value="495756994" calcext:value-type="float">
            <text:p>495756994</text:p>
          </table:table-cell>
          <table:table-cell office:value-type="float" office:value="686723077.141298" calcext:value-type="float">
            <text:p>686723077.141298</text:p>
          </table:table-cell>
          <table:table-cell/>
          <table:table-cell office:value-type="string" calcext:value-type="string">
            <text:p>2021-10-05T16:24:37.1412979Z</text:p>
          </table:table-cell>
          <table:table-cell office:value-type="string" calcext:value-type="string">
            <text:p>2021-10-05-16:25:46.3252979</text:p>
          </table:table-cell>
          <table:table-cell table:number-columns-repeated="2"/>
        </table:table-row>
        <table:table-row table:style-name="ro1">
          <table:table-cell office:value-type="float" office:value="495836252" calcext:value-type="float">
            <text:p>495836252</text:p>
          </table:table-cell>
          <table:table-cell office:value-type="float" office:value="686802335.142211" calcext:value-type="float">
            <text:p>686802335.142211</text:p>
          </table:table-cell>
          <table:table-cell/>
          <table:table-cell office:value-type="string" calcext:value-type="string">
            <text:p>2021-10-06T14:25:35.1422109Z</text:p>
          </table:table-cell>
          <table:table-cell office:value-type="string" calcext:value-type="string">
            <text:p>2021-10-06-14:26:44.3262109</text:p>
          </table:table-cell>
          <table:table-cell table:number-columns-repeated="2"/>
        </table:table-row>
        <table:table-row table:style-name="ro1">
          <table:table-cell office:value-type="float" office:value="495886547" calcext:value-type="float">
            <text:p>495886547</text:p>
          </table:table-cell>
          <table:table-cell office:value-type="float" office:value="686852630.142779" calcext:value-type="float">
            <text:p>686852630.142779</text:p>
          </table:table-cell>
          <table:table-cell/>
          <table:table-cell office:value-type="string" calcext:value-type="string">
            <text:p>2021-10-07T04:23:50.1427789Z</text:p>
          </table:table-cell>
          <table:table-cell office:value-type="string" calcext:value-type="string">
            <text:p>2021-10-07-04:24:59.3267790</text:p>
          </table:table-cell>
          <table:table-cell table:number-columns-repeated="2"/>
        </table:table-row>
        <table:table-row table:style-name="ro1">
          <table:table-cell office:value-type="float" office:value="495976548" calcext:value-type="float">
            <text:p>495976548</text:p>
          </table:table-cell>
          <table:table-cell office:value-type="float" office:value="686942631.143782" calcext:value-type="float">
            <text:p>686942631.143782</text:p>
          </table:table-cell>
          <table:table-cell/>
          <table:table-cell office:value-type="string" calcext:value-type="string">
            <text:p>2021-10-08T05:23:51.1437820Z</text:p>
          </table:table-cell>
          <table:table-cell office:value-type="string" calcext:value-type="string">
            <text:p>2021-10-08-05:25:00.3277820</text:p>
          </table:table-cell>
          <table:table-cell table:number-columns-repeated="2"/>
        </table:table-row>
        <table:table-row table:style-name="ro1">
          <table:table-cell office:value-type="float" office:value="496095364" calcext:value-type="float">
            <text:p>496095364</text:p>
          </table:table-cell>
          <table:table-cell office:value-type="float" office:value="687061447.145105" calcext:value-type="float">
            <text:p>687061447.145105</text:p>
          </table:table-cell>
          <table:table-cell/>
          <table:table-cell office:value-type="string" calcext:value-type="string">
            <text:p>2021-10-09T14:24:07.1451050Z</text:p>
          </table:table-cell>
          <table:table-cell office:value-type="string" calcext:value-type="string">
            <text:p>2021-10-09-14:25:16.3291050</text:p>
          </table:table-cell>
          <table:table-cell table:number-columns-repeated="2"/>
        </table:table-row>
        <table:table-row table:style-name="ro1">
          <table:table-cell office:value-type="float" office:value="496275313" calcext:value-type="float">
            <text:p>496275313</text:p>
          </table:table-cell>
          <table:table-cell office:value-type="float" office:value="687241396.147088" calcext:value-type="float">
            <text:p>687241396.147088</text:p>
          </table:table-cell>
          <table:table-cell/>
          <table:table-cell office:value-type="string" calcext:value-type="string">
            <text:p>2021-10-11T16:23:16.1470879Z</text:p>
          </table:table-cell>
          <table:table-cell office:value-type="string" calcext:value-type="string">
            <text:p>2021-10-11-16:24:25.3310879</text:p>
          </table:table-cell>
          <table:table-cell table:number-columns-repeated="2"/>
        </table:table-row>
        <table:table-row table:style-name="ro1">
          <table:table-cell office:value-type="float" office:value="496350906" calcext:value-type="float">
            <text:p>496350906</text:p>
          </table:table-cell>
          <table:table-cell office:value-type="float" office:value="687316989.147955" calcext:value-type="float">
            <text:p>687316989.147955</text:p>
          </table:table-cell>
          <table:table-cell/>
          <table:table-cell office:value-type="string" calcext:value-type="string">
            <text:p>2021-10-12T13:23:09.1479549Z</text:p>
          </table:table-cell>
          <table:table-cell office:value-type="string" calcext:value-type="string">
            <text:p>2021-10-12-13:24:18.3319549</text:p>
          </table:table-cell>
          <table:table-cell table:number-columns-repeated="2"/>
        </table:table-row>
        <table:table-row table:style-name="ro1">
          <table:table-cell office:value-type="float" office:value="496440909" calcext:value-type="float">
            <text:p>496440909</text:p>
          </table:table-cell>
          <table:table-cell office:value-type="float" office:value="687406992.148959" calcext:value-type="float">
            <text:p>687406992.148959</text:p>
          </table:table-cell>
          <table:table-cell/>
          <table:table-cell office:value-type="string" calcext:value-type="string">
            <text:p>2021-10-13T14:23:12.1489590Z</text:p>
          </table:table-cell>
          <table:table-cell office:value-type="string" calcext:value-type="string">
            <text:p>2021-10-13-14:24:21.3329590</text:p>
          </table:table-cell>
          <table:table-cell table:number-columns-repeated="2"/>
        </table:table-row>
        <table:table-row table:style-name="ro1">
          <table:table-cell office:value-type="float" office:value="496498501" calcext:value-type="float">
            <text:p>496498501</text:p>
          </table:table-cell>
          <table:table-cell office:value-type="float" office:value="687464584.149608" calcext:value-type="float">
            <text:p>687464584.149608</text:p>
          </table:table-cell>
          <table:table-cell/>
          <table:table-cell office:value-type="string" calcext:value-type="string">
            <text:p>2021-10-14T06:23:04.1496080Z</text:p>
          </table:table-cell>
          <table:table-cell office:value-type="string" calcext:value-type="string">
            <text:p>2021-10-14-06:24:13.3336080</text:p>
          </table:table-cell>
          <table:table-cell table:number-columns-repeated="2"/>
        </table:table-row>
        <table:table-row table:style-name="ro1">
          <table:table-cell office:value-type="float" office:value="496620865" calcext:value-type="float">
            <text:p>496620865</text:p>
          </table:table-cell>
          <table:table-cell office:value-type="float" office:value="687586948.150933" calcext:value-type="float">
            <text:p>687586948.150933</text:p>
          </table:table-cell>
          <table:table-cell/>
          <table:table-cell office:value-type="string" calcext:value-type="string">
            <text:p>2021-10-15T16:22:28.1509330Z</text:p>
          </table:table-cell>
          <table:table-cell office:value-type="string" calcext:value-type="string">
            <text:p>2021-10-15-16:23:37.3349330</text:p>
          </table:table-cell>
          <table:table-cell table:number-columns-repeated="2"/>
        </table:table-row>
        <table:table-row table:style-name="ro1">
          <table:table-cell office:value-type="float" office:value="496635248" calcext:value-type="float">
            <text:p>496635248</text:p>
          </table:table-cell>
          <table:table-cell office:value-type="float" office:value="687601331.151109" calcext:value-type="float">
            <text:p>687601331.151109</text:p>
          </table:table-cell>
          <table:table-cell/>
          <table:table-cell office:value-type="string" calcext:value-type="string">
            <text:p>2021-10-15T20:22:11.1511089Z</text:p>
          </table:table-cell>
          <table:table-cell office:value-type="string" calcext:value-type="string">
            <text:p>2021-10-15-20:23:20.3351089</text:p>
          </table:table-cell>
          <table:table-cell table:number-columns-repeated="2"/>
        </table:table-row>
        <table:table-row table:style-name="ro1">
          <table:table-cell office:value-type="float" office:value="496793635" calcext:value-type="float">
            <text:p>496793635</text:p>
          </table:table-cell>
          <table:table-cell office:value-type="float" office:value="687759718.152851" calcext:value-type="float">
            <text:p>687759718.152851</text:p>
          </table:table-cell>
          <table:table-cell/>
          <table:table-cell office:value-type="string" calcext:value-type="string">
            <text:p>2021-10-17T16:21:58.1528509Z</text:p>
          </table:table-cell>
          <table:table-cell office:value-type="string" calcext:value-type="string">
            <text:p>2021-10-17-16:23:07.3368510</text:p>
          </table:table-cell>
          <table:table-cell table:number-columns-repeated="2"/>
        </table:table-row>
        <table:table-row table:style-name="ro1">
          <table:table-cell office:value-type="float" office:value="496811641" calcext:value-type="float">
            <text:p>496811641</text:p>
          </table:table-cell>
          <table:table-cell office:value-type="float" office:value="687777724.153074" calcext:value-type="float">
            <text:p>687777724.153074</text:p>
          </table:table-cell>
          <table:table-cell/>
          <table:table-cell office:value-type="string" calcext:value-type="string">
            <text:p>2021-10-17T21:22:04.1530740Z</text:p>
          </table:table-cell>
          <table:table-cell office:value-type="string" calcext:value-type="string">
            <text:p>2021-10-17-21:23:13.3370740</text:p>
          </table:table-cell>
          <table:table-cell table:number-columns-repeated="2"/>
        </table:table-row>
        <table:table-row table:style-name="ro1">
          <table:table-cell office:value-type="float" office:value="496952014" calcext:value-type="float">
            <text:p>496952014</text:p>
          </table:table-cell>
          <table:table-cell office:value-type="float" office:value="687918097.154631" calcext:value-type="float">
            <text:p>687918097.154631</text:p>
          </table:table-cell>
          <table:table-cell/>
          <table:table-cell office:value-type="string" calcext:value-type="string">
            <text:p>2021-10-19T12:21:37.1546310Z</text:p>
          </table:table-cell>
          <table:table-cell office:value-type="string" calcext:value-type="string">
            <text:p>2021-10-19-12:22:46.3386310</text:p>
          </table:table-cell>
          <table:table-cell table:number-columns-repeated="2"/>
        </table:table-row>
        <table:table-row table:style-name="ro1">
          <table:table-cell office:value-type="float" office:value="497013203" calcext:value-type="float">
            <text:p>497013203</text:p>
          </table:table-cell>
          <table:table-cell office:value-type="float" office:value="687979286.155314" calcext:value-type="float">
            <text:p>687979286.155314</text:p>
          </table:table-cell>
          <table:table-cell/>
          <table:table-cell office:value-type="string" calcext:value-type="string">
            <text:p>2021-10-20T05:21:26.1553139Z</text:p>
          </table:table-cell>
          <table:table-cell office:value-type="string" calcext:value-type="string">
            <text:p>2021-10-20-05:22:35.3393139</text:p>
          </table:table-cell>
          <table:table-cell table:number-columns-repeated="2"/>
        </table:table-row>
        <table:table-row table:style-name="ro1">
          <table:table-cell office:value-type="float" office:value="497099598" calcext:value-type="float">
            <text:p>497099598</text:p>
          </table:table-cell>
          <table:table-cell office:value-type="float" office:value="688065681.15628" calcext:value-type="float">
            <text:p>688065681.15628</text:p>
          </table:table-cell>
          <table:table-cell/>
          <table:table-cell office:value-type="string" calcext:value-type="string">
            <text:p>2021-10-21T05:21:21.1562800Z</text:p>
          </table:table-cell>
          <table:table-cell office:value-type="string" calcext:value-type="string">
            <text:p>2021-10-21-05:22:30.3402800</text:p>
          </table:table-cell>
          <table:table-cell table:number-columns-repeated="2"/>
        </table:table-row>
        <table:table-row table:style-name="ro1">
          <table:table-cell office:value-type="float" office:value="497225572" calcext:value-type="float">
            <text:p>497225572</text:p>
          </table:table-cell>
          <table:table-cell office:value-type="float" office:value="688191655.15764" calcext:value-type="float">
            <text:p>688191655.15764</text:p>
          </table:table-cell>
          <table:table-cell/>
          <table:table-cell office:value-type="string" calcext:value-type="string">
            <text:p>2021-10-22T16:20:55.1576399Z</text:p>
          </table:table-cell>
          <table:table-cell office:value-type="string" calcext:value-type="string">
            <text:p>2021-10-22-16:22:04.3416399</text:p>
          </table:table-cell>
          <table:table-cell table:number-columns-repeated="2"/>
        </table:table-row>
        <table:table-row table:style-name="ro1">
          <table:table-cell office:value-type="float" office:value="497301183" calcext:value-type="float">
            <text:p>497301183</text:p>
          </table:table-cell>
          <table:table-cell office:value-type="float" office:value="688267266.158504" calcext:value-type="float">
            <text:p>688267266.158504</text:p>
          </table:table-cell>
          <table:table-cell/>
          <table:table-cell office:value-type="string" calcext:value-type="string">
            <text:p>2021-10-23T13:21:06.1585040Z</text:p>
          </table:table-cell>
          <table:table-cell office:value-type="string" calcext:value-type="string">
            <text:p>2021-10-23-13:22:15.3425040</text:p>
          </table:table-cell>
          <table:table-cell table:number-columns-repeated="2"/>
        </table:table-row>
        <table:table-row table:style-name="ro1">
          <table:table-cell office:value-type="float" office:value="497398347" calcext:value-type="float">
            <text:p>497398347</text:p>
          </table:table-cell>
          <table:table-cell office:value-type="float" office:value="688364430.159567" calcext:value-type="float">
            <text:p>688364430.159567</text:p>
          </table:table-cell>
          <table:table-cell/>
          <table:table-cell office:value-type="string" calcext:value-type="string">
            <text:p>2021-10-24T16:20:30.1595669Z</text:p>
          </table:table-cell>
          <table:table-cell office:value-type="string" calcext:value-type="string">
            <text:p>2021-10-24-16:21:39.3435670</text:p>
          </table:table-cell>
          <table:table-cell table:number-columns-repeated="2"/>
        </table:table-row>
        <table:table-row table:style-name="ro1">
          <table:table-cell office:value-type="float" office:value="497484735" calcext:value-type="float">
            <text:p>497484735</text:p>
          </table:table-cell>
          <table:table-cell office:value-type="float" office:value="688450818.160529" calcext:value-type="float">
            <text:p>688450818.160529</text:p>
          </table:table-cell>
          <table:table-cell/>
          <table:table-cell office:value-type="string" calcext:value-type="string">
            <text:p>2021-10-25T16:20:18.1605290Z</text:p>
          </table:table-cell>
          <table:table-cell office:value-type="string" calcext:value-type="string">
            <text:p>2021-10-25-16:21:27.3445290</text:p>
          </table:table-cell>
          <table:table-cell table:number-columns-repeated="2"/>
        </table:table-row>
        <table:table-row table:style-name="ro1">
          <table:table-cell office:value-type="float" office:value="497560350" calcext:value-type="float">
            <text:p>497560350</text:p>
          </table:table-cell>
          <table:table-cell office:value-type="float" office:value="688526433.161382" calcext:value-type="float">
            <text:p>688526433.161382</text:p>
          </table:table-cell>
          <table:table-cell/>
          <table:table-cell office:value-type="string" calcext:value-type="string">
            <text:p>2021-10-26T13:20:33.1613819Z</text:p>
          </table:table-cell>
          <table:table-cell office:value-type="string" calcext:value-type="string">
            <text:p>2021-10-26-13:21:42.3453819</text:p>
          </table:table-cell>
          <table:table-cell table:number-columns-repeated="2"/>
        </table:table-row>
        <table:table-row table:style-name="ro1">
          <table:table-cell office:value-type="float" office:value="497657512" calcext:value-type="float">
            <text:p>497657512</text:p>
          </table:table-cell>
          <table:table-cell office:value-type="float" office:value="688623595.162434" calcext:value-type="float">
            <text:p>688623595.162434</text:p>
          </table:table-cell>
          <table:table-cell/>
          <table:table-cell office:value-type="string" calcext:value-type="string">
            <text:p>2021-10-27T16:19:55.1624339Z</text:p>
          </table:table-cell>
          <table:table-cell office:value-type="string" calcext:value-type="string">
            <text:p>2021-10-27-16:21:04.3464339</text:p>
          </table:table-cell>
          <table:table-cell table:number-columns-repeated="2"/>
        </table:table-row>
        <table:table-row table:style-name="ro1">
          <table:table-cell office:value-type="float" office:value="497725994" calcext:value-type="float">
            <text:p>497725994</text:p>
          </table:table-cell>
          <table:table-cell office:value-type="float" office:value="688692077.163231" calcext:value-type="float">
            <text:p>688692077.163231</text:p>
          </table:table-cell>
          <table:table-cell/>
          <table:table-cell office:value-type="string" calcext:value-type="string">
            <text:p>2021-10-28T11:21:17.1632310Z</text:p>
          </table:table-cell>
          <table:table-cell office:value-type="string" calcext:value-type="string">
            <text:p>2021-10-28-11:22:26.3472310</text:p>
          </table:table-cell>
          <table:table-cell table:number-columns-repeated="2"/>
        </table:table-row>
        <table:table-row table:style-name="ro1">
          <table:table-cell office:value-type="float" office:value="497787083" calcext:value-type="float">
            <text:p>497787083</text:p>
          </table:table-cell>
          <table:table-cell office:value-type="float" office:value="688753166.163895" calcext:value-type="float">
            <text:p>688753166.163895</text:p>
          </table:table-cell>
          <table:table-cell/>
          <table:table-cell office:value-type="string" calcext:value-type="string">
            <text:p>2021-10-29T04:19:26.1638950Z</text:p>
          </table:table-cell>
          <table:table-cell office:value-type="string" calcext:value-type="string">
            <text:p>2021-10-29-04:20:35.3478950</text:p>
          </table:table-cell>
          <table:table-cell table:number-columns-repeated="2"/>
        </table:table-row>
        <table:table-row table:style-name="ro1">
          <table:table-cell office:value-type="float" office:value="497916677" calcext:value-type="float">
            <text:p>497916677</text:p>
          </table:table-cell>
          <table:table-cell office:value-type="float" office:value="688882760.165303" calcext:value-type="float">
            <text:p>688882760.165303</text:p>
          </table:table-cell>
          <table:table-cell/>
          <table:table-cell office:value-type="string" calcext:value-type="string">
            <text:p>2021-10-30T16:19:20.1653029Z</text:p>
          </table:table-cell>
          <table:table-cell office:value-type="string" calcext:value-type="string">
            <text:p>2021-10-30-16:20:29.3493030</text:p>
          </table:table-cell>
          <table:table-cell table:number-columns-repeated="2"/>
        </table:table-row>
        <table:table-row table:style-name="ro1">
          <table:table-cell office:value-type="float" office:value="497931080" calcext:value-type="float">
            <text:p>497931080</text:p>
          </table:table-cell>
          <table:table-cell office:value-type="float" office:value="688897163.165465" calcext:value-type="float">
            <text:p>688897163.165465</text:p>
          </table:table-cell>
          <table:table-cell/>
          <table:table-cell office:value-type="string" calcext:value-type="string">
            <text:p>2021-10-30T20:19:23.1654649Z</text:p>
          </table:table-cell>
          <table:table-cell office:value-type="string" calcext:value-type="string">
            <text:p>2021-10-30-20:20:32.3494650</text:p>
          </table:table-cell>
          <table:table-cell table:number-columns-repeated="2"/>
        </table:table-row>
        <table:table-row table:style-name="ro1">
          <table:table-cell office:value-type="float" office:value="498075065" calcext:value-type="float">
            <text:p>498075065</text:p>
          </table:table-cell>
          <table:table-cell office:value-type="float" office:value="689041148.167055" calcext:value-type="float">
            <text:p>689041148.167055</text:p>
          </table:table-cell>
          <table:table-cell/>
          <table:table-cell office:value-type="string" calcext:value-type="string">
            <text:p>2021-11-01T12:19:08.1670550Z</text:p>
          </table:table-cell>
          <table:table-cell office:value-type="string" calcext:value-type="string">
            <text:p>2021-11-01-12:20:17.3510550</text:p>
          </table:table-cell>
          <table:table-cell table:number-columns-repeated="2"/>
        </table:table-row>
        <table:table-row table:style-name="ro1">
          <table:table-cell office:value-type="float" office:value="498175840" calcext:value-type="float">
            <text:p>498175840</text:p>
          </table:table-cell>
          <table:table-cell office:value-type="float" office:value="689141923.168147" calcext:value-type="float">
            <text:p>689141923.168147</text:p>
          </table:table-cell>
          <table:table-cell/>
          <table:table-cell office:value-type="string" calcext:value-type="string">
            <text:p>2021-11-02T16:18:43.1681469Z</text:p>
          </table:table-cell>
          <table:table-cell office:value-type="string" calcext:value-type="string">
            <text:p>2021-11-02-16:19:52.3521469</text:p>
          </table:table-cell>
          <table:table-cell table:number-columns-repeated="2"/>
        </table:table-row>
        <table:table-row table:style-name="ro1">
          <table:table-cell office:value-type="float" office:value="498190253" calcext:value-type="float">
            <text:p>498190253</text:p>
          </table:table-cell>
          <table:table-cell office:value-type="float" office:value="689156336.168337" calcext:value-type="float">
            <text:p>689156336.168337</text:p>
          </table:table-cell>
          <table:table-cell/>
          <table:table-cell office:value-type="string" calcext:value-type="string">
            <text:p>2021-11-02T20:18:56.1683369Z</text:p>
          </table:table-cell>
          <table:table-cell office:value-type="string" calcext:value-type="string">
            <text:p>2021-11-02-20:20:05.3523370</text:p>
          </table:table-cell>
          <table:table-cell table:number-columns-repeated="2"/>
        </table:table-row>
        <table:table-row table:style-name="ro1">
          <table:table-cell office:value-type="float" office:value="498280198" calcext:value-type="float">
            <text:p>498280198</text:p>
          </table:table-cell>
          <table:table-cell office:value-type="float" office:value="689246281.169294" calcext:value-type="float">
            <text:p>689246281.169294</text:p>
          </table:table-cell>
          <table:table-cell/>
          <table:table-cell office:value-type="string" calcext:value-type="string">
            <text:p>2021-11-03T21:18:01.1692939Z</text:p>
          </table:table-cell>
          <table:table-cell office:value-type="string" calcext:value-type="string">
            <text:p>2021-11-03-21:19:10.3532940</text:p>
          </table:table-cell>
          <table:table-cell table:number-columns-repeated="2"/>
        </table:table-row>
        <table:table-row table:style-name="ro1">
          <table:table-cell office:value-type="float" office:value="498420621" calcext:value-type="float">
            <text:p>498420621</text:p>
          </table:table-cell>
          <table:table-cell office:value-type="float" office:value="689386704.170853" calcext:value-type="float">
            <text:p>689386704.170853</text:p>
          </table:table-cell>
          <table:table-cell/>
          <table:table-cell office:value-type="string" calcext:value-type="string">
            <text:p>2021-11-05T12:18:24.1708530Z</text:p>
          </table:table-cell>
          <table:table-cell office:value-type="string" calcext:value-type="string">
            <text:p>2021-11-05-12:19:33.3548530</text:p>
          </table:table-cell>
          <table:table-cell table:number-columns-repeated="2"/>
        </table:table-row>
        <table:table-row table:style-name="ro1">
          <table:table-cell office:value-type="float" office:value="498607782" calcext:value-type="float">
            <text:p>498607782</text:p>
          </table:table-cell>
          <table:table-cell office:value-type="float" office:value="689573865.172894" calcext:value-type="float">
            <text:p>689573865.172894</text:p>
          </table:table-cell>
          <table:table-cell/>
          <table:table-cell office:value-type="string" calcext:value-type="string">
            <text:p>2021-11-07T16:17:45.1728940Z</text:p>
          </table:table-cell>
          <table:table-cell office:value-type="string" calcext:value-type="string">
            <text:p>2021-11-07-16:18:54.3568940</text:p>
          </table:table-cell>
          <table:table-cell table:number-columns-repeated="2"/>
        </table:table-row>
        <table:table-row table:style-name="ro1">
          <table:table-cell office:value-type="float" office:value="498694171" calcext:value-type="float">
            <text:p>498694171</text:p>
          </table:table-cell>
          <table:table-cell office:value-type="float" office:value="689660254.173858" calcext:value-type="float">
            <text:p>689660254.173858</text:p>
          </table:table-cell>
          <table:table-cell/>
          <table:table-cell office:value-type="string" calcext:value-type="string">
            <text:p>2021-11-08T16:17:34.1738579Z</text:p>
          </table:table-cell>
          <table:table-cell office:value-type="string" calcext:value-type="string">
            <text:p>2021-11-08-16:18:43.3578579</text:p>
          </table:table-cell>
          <table:table-cell table:number-columns-repeated="2"/>
        </table:table-row>
        <table:table-row table:style-name="ro1">
          <table:table-cell office:value-type="float" office:value="498762574" calcext:value-type="float">
            <text:p>498762574</text:p>
          </table:table-cell>
          <table:table-cell office:value-type="float" office:value="689728657.174618" calcext:value-type="float">
            <text:p>689728657.174618</text:p>
          </table:table-cell>
          <table:table-cell/>
          <table:table-cell office:value-type="string" calcext:value-type="string">
            <text:p>2021-11-09T11:17:37.1746180Z</text:p>
          </table:table-cell>
          <table:table-cell office:value-type="string" calcext:value-type="string">
            <text:p>2021-11-09-11:18:46.3586180</text:p>
          </table:table-cell>
          <table:table-cell table:number-columns-repeated="2"/>
        </table:table-row>
        <table:table-row table:style-name="ro1">
          <table:table-cell office:value-type="float" office:value="498820142" calcext:value-type="float">
            <text:p>498820142</text:p>
          </table:table-cell>
          <table:table-cell office:value-type="float" office:value="689786225.175253" calcext:value-type="float">
            <text:p>689786225.175253</text:p>
          </table:table-cell>
          <table:table-cell/>
          <table:table-cell office:value-type="string" calcext:value-type="string">
            <text:p>2021-11-10T03:17:05.1752530Z</text:p>
          </table:table-cell>
          <table:table-cell office:value-type="string" calcext:value-type="string">
            <text:p>2021-11-10-03:18:14.3592530</text:p>
          </table:table-cell>
          <table:table-cell table:number-columns-repeated="2"/>
        </table:table-row>
        <table:table-row table:style-name="ro1">
          <table:table-cell office:value-type="float" office:value="498895724" calcext:value-type="float">
            <text:p>498895724</text:p>
          </table:table-cell>
          <table:table-cell office:value-type="float" office:value="689861807.176081" calcext:value-type="float">
            <text:p>689861807.176081</text:p>
          </table:table-cell>
          <table:table-cell/>
          <table:table-cell office:value-type="string" calcext:value-type="string">
            <text:p>2021-11-11T00:16:47.1760809Z</text:p>
          </table:table-cell>
          <table:table-cell office:value-type="string" calcext:value-type="string">
            <text:p>2021-11-11-00:17:56.3600809</text:p>
          </table:table-cell>
          <table:table-cell table:number-columns-repeated="2"/>
        </table:table-row>
        <table:table-row table:style-name="ro1">
          <table:table-cell office:value-type="float" office:value="499126748" calcext:value-type="float">
            <text:p>499126748</text:p>
          </table:table-cell>
          <table:table-cell office:value-type="float" office:value="690092831.178568" calcext:value-type="float">
            <text:p>690092831.178568</text:p>
          </table:table-cell>
          <table:table-cell/>
          <table:table-cell office:value-type="string" calcext:value-type="string">
            <text:p>2021-11-13T16:27:11.1785680Z</text:p>
          </table:table-cell>
          <table:table-cell office:value-type="string" calcext:value-type="string">
            <text:p>2021-11-13-16:28:20.3625680</text:p>
          </table:table-cell>
          <table:table-cell table:number-columns-repeated="2"/>
        </table:table-row>
        <table:table-row table:style-name="ro1">
          <table:table-cell office:value-type="float" office:value="499212505" calcext:value-type="float">
            <text:p>499212505</text:p>
          </table:table-cell>
          <table:table-cell office:value-type="float" office:value="690178588.179542" calcext:value-type="float">
            <text:p>690178588.179542</text:p>
          </table:table-cell>
          <table:table-cell/>
          <table:table-cell office:value-type="string" calcext:value-type="string">
            <text:p>2021-11-14T16:16:28.1795419Z</text:p>
          </table:table-cell>
          <table:table-cell office:value-type="string" calcext:value-type="string">
            <text:p>2021-11-14-16:17:37.3635419</text:p>
          </table:table-cell>
          <table:table-cell table:number-columns-repeated="2"/>
        </table:table-row>
        <table:table-row table:style-name="ro1">
          <table:table-cell office:value-type="float" office:value="499223319" calcext:value-type="float">
            <text:p>499223319</text:p>
          </table:table-cell>
          <table:table-cell office:value-type="float" office:value="690189402.179673" calcext:value-type="float">
            <text:p>690189402.179673</text:p>
          </table:table-cell>
          <table:table-cell/>
          <table:table-cell office:value-type="string" calcext:value-type="string">
            <text:p>2021-11-14T19:16:42.1796729Z</text:p>
          </table:table-cell>
          <table:table-cell office:value-type="string" calcext:value-type="string">
            <text:p>2021-11-14-19:17:51.3636729</text:p>
          </table:table-cell>
          <table:table-cell table:number-columns-repeated="2"/>
        </table:table-row>
        <table:table-row table:style-name="ro1">
          <table:table-cell office:value-type="float" office:value="499367315" calcext:value-type="float">
            <text:p>499367315</text:p>
          </table:table-cell>
          <table:table-cell office:value-type="float" office:value="690333398.181246" calcext:value-type="float">
            <text:p>690333398.181246</text:p>
          </table:table-cell>
          <table:table-cell/>
          <table:table-cell office:value-type="string" calcext:value-type="string">
            <text:p>2021-11-16T11:16:38.1812460Z</text:p>
          </table:table-cell>
          <table:table-cell office:value-type="string" calcext:value-type="string">
            <text:p>2021-11-16-11:17:47.3652460</text:p>
          </table:table-cell>
          <table:table-cell table:number-columns-repeated="2"/>
        </table:table-row>
        <table:table-row table:style-name="ro1">
          <table:table-cell office:value-type="float" office:value="499471669" calcext:value-type="float">
            <text:p>499471669</text:p>
          </table:table-cell>
          <table:table-cell office:value-type="float" office:value="690437752.182366" calcext:value-type="float">
            <text:p>690437752.182366</text:p>
          </table:table-cell>
          <table:table-cell/>
          <table:table-cell office:value-type="string" calcext:value-type="string">
            <text:p>2021-11-17T16:15:52.1823660Z</text:p>
          </table:table-cell>
          <table:table-cell office:value-type="string" calcext:value-type="string">
            <text:p>2021-11-17-16:17:01.3663660</text:p>
          </table:table-cell>
          <table:table-cell table:number-columns-repeated="2"/>
        </table:table-row>
        <table:table-row table:style-name="ro1">
          <table:table-cell office:value-type="float" office:value="499496849" calcext:value-type="float">
            <text:p>499496849</text:p>
          </table:table-cell>
          <table:table-cell office:value-type="float" office:value="690462932.182653" calcext:value-type="float">
            <text:p>690462932.182653</text:p>
          </table:table-cell>
          <table:table-cell/>
          <table:table-cell office:value-type="string" calcext:value-type="string">
            <text:p>2021-11-17T23:15:32.1826529Z</text:p>
          </table:table-cell>
          <table:table-cell office:value-type="string" calcext:value-type="string">
            <text:p>2021-11-17-23:16:41.3666529</text:p>
          </table:table-cell>
          <table:table-cell table:number-columns-repeated="2"/>
        </table:table-row>
        <table:table-row table:style-name="ro1">
          <table:table-cell office:value-type="float" office:value="499730840" calcext:value-type="float">
            <text:p>499730840</text:p>
          </table:table-cell>
          <table:table-cell office:value-type="float" office:value="690696923.185207" calcext:value-type="float">
            <text:p>690696923.185207</text:p>
          </table:table-cell>
          <table:table-cell/>
          <table:table-cell office:value-type="string" calcext:value-type="string">
            <text:p>2021-11-20T16:15:23.1852070Z</text:p>
          </table:table-cell>
          <table:table-cell office:value-type="string" calcext:value-type="string">
            <text:p>2021-11-20-16:16:32.3692070</text:p>
          </table:table-cell>
          <table:table-cell table:number-columns-repeated="2"/>
        </table:table-row>
        <table:table-row table:style-name="ro1">
          <table:table-cell office:value-type="float" office:value="499795641" calcext:value-type="float">
            <text:p>499795641</text:p>
          </table:table-cell>
          <table:table-cell office:value-type="float" office:value="690761724.185917" calcext:value-type="float">
            <text:p>690761724.185917</text:p>
          </table:table-cell>
          <table:table-cell/>
          <table:table-cell office:value-type="string" calcext:value-type="string">
            <text:p>2021-11-21T10:15:24.1859170Z</text:p>
          </table:table-cell>
          <table:table-cell office:value-type="string" calcext:value-type="string">
            <text:p>2021-11-21-10:16:33.3699170</text:p>
          </table:table-cell>
          <table:table-cell table:number-columns-repeated="2"/>
        </table:table-row>
        <table:table-row table:style-name="ro1">
          <table:table-cell office:value-type="float" office:value="499903619" calcext:value-type="float">
            <text:p>499903619</text:p>
          </table:table-cell>
          <table:table-cell office:value-type="float" office:value="690869702.187101" calcext:value-type="float">
            <text:p>690869702.187101</text:p>
          </table:table-cell>
          <table:table-cell/>
          <table:table-cell office:value-type="string" calcext:value-type="string">
            <text:p>2021-11-22T16:15:02.1871010Z</text:p>
          </table:table-cell>
          <table:table-cell office:value-type="string" calcext:value-type="string">
            <text:p>2021-11-22-16:16:11.3711010</text:p>
          </table:table-cell>
          <table:table-cell table:number-columns-repeated="2"/>
        </table:table-row>
        <table:table-row table:style-name="ro1">
          <table:table-cell office:value-type="float" office:value="499964804" calcext:value-type="float">
            <text:p>499964804</text:p>
          </table:table-cell>
          <table:table-cell office:value-type="float" office:value="690930887.187774" calcext:value-type="float">
            <text:p>690930887.187774</text:p>
          </table:table-cell>
          <table:table-cell/>
          <table:table-cell office:value-type="string" calcext:value-type="string">
            <text:p>2021-11-23T09:14:47.1877739Z</text:p>
          </table:table-cell>
          <table:table-cell office:value-type="string" calcext:value-type="string">
            <text:p>2021-11-23-09:15:56.3717739</text:p>
          </table:table-cell>
          <table:table-cell table:number-columns-repeated="2"/>
        </table:table-row>
        <table:table-row table:style-name="ro1">
          <table:table-cell office:value-type="float" office:value="500026007" calcext:value-type="float">
            <text:p>500026007</text:p>
          </table:table-cell>
          <table:table-cell office:value-type="float" office:value="690992090.188451" calcext:value-type="float">
            <text:p>690992090.188451</text:p>
          </table:table-cell>
          <table:table-cell/>
          <table:table-cell office:value-type="string" calcext:value-type="string">
            <text:p>2021-11-24T02:14:50.1884509Z</text:p>
          </table:table-cell>
          <table:table-cell office:value-type="string" calcext:value-type="string">
            <text:p>2021-11-24-02:15:59.3724509</text:p>
          </table:table-cell>
          <table:table-cell table:number-columns-repeated="2"/>
        </table:table-row>
        <table:table-row table:style-name="ro1">
          <table:table-cell office:value-type="float" office:value="500162787" calcext:value-type="float">
            <text:p>500162787</text:p>
          </table:table-cell>
          <table:table-cell office:value-type="float" office:value="691128870.189919" calcext:value-type="float">
            <text:p>691128870.189919</text:p>
          </table:table-cell>
          <table:table-cell/>
          <table:table-cell office:value-type="string" calcext:value-type="string">
            <text:p>2021-11-25T16:14:30.1899189Z</text:p>
          </table:table-cell>
          <table:table-cell office:value-type="string" calcext:value-type="string">
            <text:p>2021-11-25-16:15:39.3739190</text:p>
          </table:table-cell>
          <table:table-cell table:number-columns-repeated="2"/>
        </table:table-row>
        <table:table-row table:style-name="ro1">
          <table:table-cell office:value-type="float" office:value="500173597" calcext:value-type="float">
            <text:p>500173597</text:p>
          </table:table-cell>
          <table:table-cell office:value-type="float" office:value="691139680.190048" calcext:value-type="float">
            <text:p>691139680.190048</text:p>
          </table:table-cell>
          <table:table-cell/>
          <table:table-cell office:value-type="string" calcext:value-type="string">
            <text:p>2021-11-25T19:14:40.1900479Z</text:p>
          </table:table-cell>
          <table:table-cell office:value-type="string" calcext:value-type="string">
            <text:p>2021-11-25-19:15:49.3740479</text:p>
          </table:table-cell>
          <table:table-cell table:number-columns-repeated="2"/>
        </table:table-row>
        <table:table-row table:style-name="ro1">
          <table:table-cell office:value-type="float" office:value="500403986" calcext:value-type="float">
            <text:p>500403986</text:p>
          </table:table-cell>
          <table:table-cell office:value-type="float" office:value="691370069.192567" calcext:value-type="float">
            <text:p>691370069.192567</text:p>
          </table:table-cell>
          <table:table-cell/>
          <table:table-cell office:value-type="string" calcext:value-type="string">
            <text:p>2021-11-28T11:14:29.1925669Z</text:p>
          </table:table-cell>
          <table:table-cell office:value-type="string" calcext:value-type="string">
            <text:p>2021-11-28-11:15:38.3765670</text:p>
          </table:table-cell>
          <table:table-cell table:number-columns-repeated="2"/>
        </table:table-row>
        <table:table-row table:style-name="ro1">
          <table:table-cell office:value-type="float" office:value="500573158" calcext:value-type="float">
            <text:p>500573158</text:p>
          </table:table-cell>
          <table:table-cell office:value-type="float" office:value="691539241.194402" calcext:value-type="float">
            <text:p>691539241.194402</text:p>
          </table:table-cell>
          <table:table-cell/>
          <table:table-cell office:value-type="string" calcext:value-type="string">
            <text:p>2021-11-30T10:14:01.1944019Z</text:p>
          </table:table-cell>
          <table:table-cell office:value-type="string" calcext:value-type="string">
            <text:p>2021-11-30-10:15:10.3784019</text:p>
          </table:table-cell>
          <table:table-cell table:number-columns-repeated="2"/>
        </table:table-row>
        <table:table-row table:style-name="ro1">
          <table:table-cell office:value-type="float" office:value="500767527" calcext:value-type="float">
            <text:p>500767527</text:p>
          </table:table-cell>
          <table:table-cell office:value-type="float" office:value="691733610.196518" calcext:value-type="float">
            <text:p>691733610.196518</text:p>
          </table:table-cell>
          <table:table-cell/>
          <table:table-cell office:value-type="string" calcext:value-type="string">
            <text:p>2021-12-02T16:13:30.1965179Z</text:p>
          </table:table-cell>
          <table:table-cell office:value-type="string" calcext:value-type="string">
            <text:p>2021-12-02-16:14:39.3805179</text:p>
          </table:table-cell>
          <table:table-cell table:number-columns-repeated="2"/>
        </table:table-row>
        <table:table-row table:style-name="ro1">
          <table:table-cell office:value-type="float" office:value="500853916" calcext:value-type="float">
            <text:p>500853916</text:p>
          </table:table-cell>
          <table:table-cell office:value-type="float" office:value="691819999.197455" calcext:value-type="float">
            <text:p>691819999.197455</text:p>
          </table:table-cell>
          <table:table-cell/>
          <table:table-cell office:value-type="string" calcext:value-type="string">
            <text:p>2021-12-03T16:13:19.1974549Z</text:p>
          </table:table-cell>
          <table:table-cell office:value-type="string" calcext:value-type="string">
            <text:p>2021-12-03-16:14:28.3814549</text:p>
          </table:table-cell>
          <table:table-cell table:number-columns-repeated="2"/>
        </table:table-row>
        <table:table-row table:style-name="ro1">
          <table:table-cell office:value-type="float" office:value="500915119" calcext:value-type="float">
            <text:p>500915119</text:p>
          </table:table-cell>
          <table:table-cell office:value-type="float" office:value="691881202.198113" calcext:value-type="float">
            <text:p>691881202.198113</text:p>
          </table:table-cell>
          <table:table-cell/>
          <table:table-cell office:value-type="string" calcext:value-type="string">
            <text:p>2021-12-04T09:13:22.1981129Z</text:p>
          </table:table-cell>
          <table:table-cell office:value-type="string" calcext:value-type="string">
            <text:p>2021-12-04-09:14:31.3821129</text:p>
          </table:table-cell>
          <table:table-cell table:number-columns-repeated="2"/>
        </table:table-row>
        <table:table-row table:style-name="ro1">
          <table:table-cell office:value-type="float" office:value="501005110" calcext:value-type="float">
            <text:p>501005110</text:p>
          </table:table-cell>
          <table:table-cell office:value-type="float" office:value="691971193.199106" calcext:value-type="float">
            <text:p>691971193.199106</text:p>
          </table:table-cell>
          <table:table-cell/>
          <table:table-cell office:value-type="string" calcext:value-type="string">
            <text:p>2021-12-05T10:13:13.1991059Z</text:p>
          </table:table-cell>
          <table:table-cell office:value-type="string" calcext:value-type="string">
            <text:p>2021-12-05-10:14:22.3831059</text:p>
          </table:table-cell>
          <table:table-cell table:number-columns-repeated="2"/>
        </table:table-row>
        <table:table-row table:style-name="ro1">
          <table:table-cell office:value-type="float" office:value="501087897" calcext:value-type="float">
            <text:p>501087897</text:p>
          </table:table-cell>
          <table:table-cell office:value-type="float" office:value="692053980.200002" calcext:value-type="float">
            <text:p>692053980.200002</text:p>
          </table:table-cell>
          <table:table-cell/>
          <table:table-cell office:value-type="string" calcext:value-type="string">
            <text:p>2021-12-06T09:13:00.2000019Z</text:p>
          </table:table-cell>
          <table:table-cell office:value-type="string" calcext:value-type="string">
            <text:p>2021-12-06-09:14:09.3840019</text:p>
          </table:table-cell>
          <table:table-cell table:number-columns-repeated="2"/>
        </table:table-row>
        <table:table-row table:style-name="ro1">
          <table:table-cell office:value-type="float" office:value="501285879" calcext:value-type="float">
            <text:p>501285879</text:p>
          </table:table-cell>
          <table:table-cell office:value-type="float" office:value="692251962.202151" calcext:value-type="float">
            <text:p>692251962.202151</text:p>
          </table:table-cell>
          <table:table-cell/>
          <table:table-cell office:value-type="string" calcext:value-type="string">
            <text:p>2021-12-08T16:12:42.2021509Z</text:p>
          </table:table-cell>
          <table:table-cell office:value-type="string" calcext:value-type="string">
            <text:p>2021-12-08-16:13:51.3861509</text:p>
          </table:table-cell>
          <table:table-cell table:number-columns-repeated="2"/>
        </table:table-row>
        <table:table-row table:style-name="ro1">
          <table:table-cell office:value-type="float" office:value="501293086" calcext:value-type="float">
            <text:p>501293086</text:p>
          </table:table-cell>
          <table:table-cell office:value-type="float" office:value="692259169.202238" calcext:value-type="float">
            <text:p>692259169.202238</text:p>
          </table:table-cell>
          <table:table-cell/>
          <table:table-cell office:value-type="string" calcext:value-type="string">
            <text:p>2021-12-08T18:12:49.2022379Z</text:p>
          </table:table-cell>
          <table:table-cell office:value-type="string" calcext:value-type="string">
            <text:p>2021-12-08-18:13:58.3862379</text:p>
          </table:table-cell>
          <table:table-cell table:number-columns-repeated="2"/>
        </table:table-row>
        <table:table-row table:style-name="ro1">
          <table:table-cell office:value-type="float" office:value="501437079" calcext:value-type="float">
            <text:p>501437079</text:p>
          </table:table-cell>
          <table:table-cell office:value-type="float" office:value="692403162.203785" calcext:value-type="float">
            <text:p>692403162.203785</text:p>
          </table:table-cell>
          <table:table-cell/>
          <table:table-cell office:value-type="string" calcext:value-type="string">
            <text:p>2021-12-10T10:12:42.2037849Z</text:p>
          </table:table-cell>
          <table:table-cell office:value-type="string" calcext:value-type="string">
            <text:p>2021-12-10-10:13:51.3877849</text:p>
          </table:table-cell>
          <table:table-cell table:number-columns-repeated="2"/>
        </table:table-row>
        <table:table-row table:style-name="ro1">
          <table:table-cell office:value-type="float" office:value="501545054" calcext:value-type="float">
            <text:p>501545054</text:p>
          </table:table-cell>
          <table:table-cell office:value-type="float" office:value="692511137.204953" calcext:value-type="float">
            <text:p>692511137.204953</text:p>
          </table:table-cell>
          <table:table-cell/>
          <table:table-cell office:value-type="string" calcext:value-type="string">
            <text:p>2021-12-11T16:12:17.2049529Z</text:p>
          </table:table-cell>
          <table:table-cell office:value-type="string" calcext:value-type="string">
            <text:p>2021-12-11-16:13:26.3889529</text:p>
          </table:table-cell>
          <table:table-cell table:number-columns-repeated="2"/>
        </table:table-row>
        <table:table-row table:style-name="ro1">
          <table:table-cell office:value-type="float" office:value="501631450" calcext:value-type="float">
            <text:p>501631450</text:p>
          </table:table-cell>
          <table:table-cell office:value-type="float" office:value="692597533.205897" calcext:value-type="float">
            <text:p>692597533.205897</text:p>
          </table:table-cell>
          <table:table-cell/>
          <table:table-cell office:value-type="string" calcext:value-type="string">
            <text:p>2021-12-12T16:12:13.2058969Z</text:p>
          </table:table-cell>
          <table:table-cell office:value-type="string" calcext:value-type="string">
            <text:p>2021-12-12-16:13:22.3898969</text:p>
          </table:table-cell>
          <table:table-cell table:number-columns-repeated="2"/>
        </table:table-row>
        <table:table-row table:style-name="ro1">
          <table:table-cell office:value-type="float" office:value="501635052" calcext:value-type="float">
            <text:p>501635052</text:p>
          </table:table-cell>
          <table:table-cell office:value-type="float" office:value="692601135.205942" calcext:value-type="float">
            <text:p>692601135.205942</text:p>
          </table:table-cell>
          <table:table-cell/>
          <table:table-cell office:value-type="string" calcext:value-type="string">
            <text:p>2021-12-12T17:12:15.2059420Z</text:p>
          </table:table-cell>
          <table:table-cell office:value-type="string" calcext:value-type="string">
            <text:p>2021-12-12-17:13:24.3899420</text:p>
          </table:table-cell>
          <table:table-cell table:number-columns-repeated="2"/>
        </table:table-row>
        <table:table-row table:style-name="ro1">
          <table:table-cell office:value-type="float" office:value="501782652" calcext:value-type="float">
            <text:p>501782652</text:p>
          </table:table-cell>
          <table:table-cell office:value-type="float" office:value="692748735.207538" calcext:value-type="float">
            <text:p>692748735.207538</text:p>
          </table:table-cell>
          <table:table-cell/>
          <table:table-cell office:value-type="string" calcext:value-type="string">
            <text:p>2021-12-14T10:12:15.2075380Z</text:p>
          </table:table-cell>
          <table:table-cell office:value-type="string" calcext:value-type="string">
            <text:p>2021-12-14-10:13:24.3915380</text:p>
          </table:table-cell>
          <table:table-cell table:number-columns-repeated="2"/>
        </table:table-row>
        <table:table-row table:style-name="ro1">
          <table:table-cell office:value-type="float" office:value="502038233" calcext:value-type="float">
            <text:p>502038233</text:p>
          </table:table-cell>
          <table:table-cell office:value-type="float" office:value="693004316.210311" calcext:value-type="float">
            <text:p>693004316.210311</text:p>
          </table:table-cell>
          <table:table-cell/>
          <table:table-cell office:value-type="string" calcext:value-type="string">
            <text:p>2021-12-17T09:11:56.2103109Z</text:p>
          </table:table-cell>
          <table:table-cell office:value-type="string" calcext:value-type="string">
            <text:p>2021-12-17-09:13:05.3943109</text:p>
          </table:table-cell>
          <table:table-cell table:number-columns-repeated="2"/>
        </table:table-row>
        <table:table-row table:style-name="ro1">
          <table:table-cell office:value-type="float" office:value="502095806" calcext:value-type="float">
            <text:p>502095806</text:p>
          </table:table-cell>
          <table:table-cell office:value-type="float" office:value="693061889.210953" calcext:value-type="float">
            <text:p>693061889.210953</text:p>
          </table:table-cell>
          <table:table-cell/>
          <table:table-cell office:value-type="string" calcext:value-type="string">
            <text:p>2021-12-18T01:11:29.2109529Z</text:p>
          </table:table-cell>
          <table:table-cell office:value-type="string" calcext:value-type="string">
            <text:p>2021-12-18-01:12:38.3949530</text:p>
          </table:table-cell>
          <table:table-cell table:number-columns-repeated="2"/>
        </table:table-row>
        <table:table-row table:style-name="ro1">
          <table:table-cell office:value-type="float" office:value="502211013" calcext:value-type="float">
            <text:p>502211013</text:p>
          </table:table-cell>
          <table:table-cell office:value-type="float" office:value="693177096.212179" calcext:value-type="float">
            <text:p>693177096.212179</text:p>
          </table:table-cell>
          <table:table-cell/>
          <table:table-cell office:value-type="string" calcext:value-type="string">
            <text:p>2021-12-19T09:11:36.2121789Z</text:p>
          </table:table-cell>
          <table:table-cell office:value-type="string" calcext:value-type="string">
            <text:p>2021-12-19-09:12:45.3961789</text:p>
          </table:table-cell>
          <table:table-cell table:number-columns-repeated="2"/>
        </table:table-row>
        <table:table-row table:style-name="ro1">
          <table:table-cell office:value-type="float" office:value="502383809" calcext:value-type="float">
            <text:p>502383809</text:p>
          </table:table-cell>
          <table:table-cell office:value-type="float" office:value="693349892.21407" calcext:value-type="float">
            <text:p>693349892.21407</text:p>
          </table:table-cell>
          <table:table-cell/>
          <table:table-cell office:value-type="string" calcext:value-type="string">
            <text:p>2021-12-21T09:11:32.2140699Z</text:p>
          </table:table-cell>
          <table:table-cell office:value-type="string" calcext:value-type="string">
            <text:p>2021-12-21-09:12:41.3980699</text:p>
          </table:table-cell>
          <table:table-cell table:number-columns-repeated="2"/>
        </table:table-row>
        <table:table-row table:style-name="ro1">
          <table:table-cell office:value-type="float" office:value="502495376" calcext:value-type="float">
            <text:p>502495376</text:p>
          </table:table-cell>
          <table:table-cell office:value-type="float" office:value="693461459.215274" calcext:value-type="float">
            <text:p>693461459.215274</text:p>
          </table:table-cell>
          <table:table-cell/>
          <table:table-cell office:value-type="string" calcext:value-type="string">
            <text:p>2021-12-22T16:10:59.2152739Z</text:p>
          </table:table-cell>
          <table:table-cell office:value-type="string" calcext:value-type="string">
            <text:p>2021-12-22-16:12:08.3992739</text:p>
          </table:table-cell>
          <table:table-cell table:number-columns-repeated="2"/>
        </table:table-row>
        <table:table-row table:style-name="ro1">
          <table:table-cell office:value-type="float" office:value="502498981" calcext:value-type="float">
            <text:p>502498981</text:p>
          </table:table-cell>
          <table:table-cell office:value-type="float" office:value="693465064.215307" calcext:value-type="float">
            <text:p>693465064.215307</text:p>
          </table:table-cell>
          <table:table-cell/>
          <table:table-cell office:value-type="string" calcext:value-type="string">
            <text:p>2021-12-22T17:11:04.2153069Z</text:p>
          </table:table-cell>
          <table:table-cell office:value-type="string" calcext:value-type="string">
            <text:p>2021-12-22-17:12:13.3993070</text:p>
          </table:table-cell>
          <table:table-cell table:number-columns-repeated="2"/>
        </table:table-row>
        <table:table-row table:style-name="ro1">
          <table:table-cell office:value-type="float" office:value="502754553" calcext:value-type="float">
            <text:p>502754553</text:p>
          </table:table-cell>
          <table:table-cell office:value-type="float" office:value="693720636.218043" calcext:value-type="float">
            <text:p>693720636.218043</text:p>
          </table:table-cell>
          <table:table-cell/>
          <table:table-cell office:value-type="string" calcext:value-type="string">
            <text:p>2021-12-25T16:10:36.2180429Z</text:p>
          </table:table-cell>
          <table:table-cell office:value-type="string" calcext:value-type="string">
            <text:p>2021-12-25-16:11:45.4020429</text:p>
          </table:table-cell>
          <table:table-cell table:number-columns-repeated="2"/>
        </table:table-row>
        <table:table-row table:style-name="ro1">
          <table:table-cell office:value-type="float" office:value="502776125" calcext:value-type="float">
            <text:p>502776125</text:p>
          </table:table-cell>
          <table:table-cell office:value-type="float" office:value="693742208.218305" calcext:value-type="float">
            <text:p>693742208.218305</text:p>
          </table:table-cell>
          <table:table-cell/>
          <table:table-cell office:value-type="string" calcext:value-type="string">
            <text:p>2021-12-25T22:10:08.2183049Z</text:p>
          </table:table-cell>
          <table:table-cell office:value-type="string" calcext:value-type="string">
            <text:p>2021-12-25-22:11:17.4023050</text:p>
          </table:table-cell>
          <table:table-cell table:number-columns-repeated="2"/>
        </table:table-row>
        <table:table-row table:style-name="ro1">
          <table:table-cell office:value-type="float" office:value="502927482" calcext:value-type="float">
            <text:p>502927482</text:p>
          </table:table-cell>
          <table:table-cell office:value-type="float" office:value="693893565.219953" calcext:value-type="float">
            <text:p>693893565.219953</text:p>
          </table:table-cell>
          <table:table-cell/>
          <table:table-cell office:value-type="string" calcext:value-type="string">
            <text:p>2021-12-27T16:12:45.2199529Z</text:p>
          </table:table-cell>
          <table:table-cell office:value-type="string" calcext:value-type="string">
            <text:p>2021-12-27-16:13:54.4039529</text:p>
          </table:table-cell>
          <table:table-cell table:number-columns-repeated="2"/>
        </table:table-row>
        <table:table-row table:style-name="ro1">
          <table:table-cell office:value-type="float" office:value="502988564" calcext:value-type="float">
            <text:p>502988564</text:p>
          </table:table-cell>
          <table:table-cell office:value-type="float" office:value="693954647.220621" calcext:value-type="float">
            <text:p>693954647.220621</text:p>
          </table:table-cell>
          <table:table-cell/>
          <table:table-cell office:value-type="string" calcext:value-type="string">
            <text:p>2021-12-28T09:10:47.2206209Z</text:p>
          </table:table-cell>
          <table:table-cell office:value-type="string" calcext:value-type="string">
            <text:p>2021-12-28-09:11:56.4046210</text:p>
          </table:table-cell>
          <table:table-cell table:number-columns-repeated="2"/>
        </table:table-row>
        <table:table-row table:style-name="ro1">
          <table:table-cell office:value-type="float" office:value="503074957" calcext:value-type="float">
            <text:p>503074957</text:p>
          </table:table-cell>
          <table:table-cell office:value-type="float" office:value="694041040.221559" calcext:value-type="float">
            <text:p>694041040.221559</text:p>
          </table:table-cell>
          <table:table-cell/>
          <table:table-cell office:value-type="string" calcext:value-type="string">
            <text:p>2021-12-29T09:10:40.2215589Z</text:p>
          </table:table-cell>
          <table:table-cell office:value-type="string" calcext:value-type="string">
            <text:p>2021-12-29-09:11:49.4055589</text:p>
          </table:table-cell>
          <table:table-cell table:number-columns-repeated="2"/>
        </table:table-row>
        <table:table-row table:style-name="ro1">
          <table:table-cell office:value-type="float" office:value="503330522" calcext:value-type="float">
            <text:p>503330522</text:p>
          </table:table-cell>
          <table:table-cell office:value-type="float" office:value="694296605.224313" calcext:value-type="float">
            <text:p>694296605.224313</text:p>
          </table:table-cell>
          <table:table-cell/>
          <table:table-cell office:value-type="string" calcext:value-type="string">
            <text:p>2022-01-01T08:10:05.2243130Z</text:p>
          </table:table-cell>
          <table:table-cell office:value-type="string" calcext:value-type="string">
            <text:p>2022-01-01-08:11:14.4083130</text:p>
          </table:table-cell>
          <table:table-cell table:number-columns-repeated="2"/>
        </table:table-row>
        <table:table-row table:style-name="ro1">
          <table:table-cell office:value-type="float" office:value="503445701" calcext:value-type="float">
            <text:p>503445701</text:p>
          </table:table-cell>
          <table:table-cell office:value-type="float" office:value="694411784.225534" calcext:value-type="float">
            <text:p>694411784.225534</text:p>
          </table:table-cell>
          <table:table-cell/>
          <table:table-cell office:value-type="string" calcext:value-type="string">
            <text:p>2022-01-02T16:09:44.2255339Z</text:p>
          </table:table-cell>
          <table:table-cell office:value-type="string" calcext:value-type="string">
            <text:p>2022-01-02-16:10:53.4095339</text:p>
          </table:table-cell>
          <table:table-cell table:number-columns-repeated="2"/>
        </table:table-row>
        <table:table-row table:style-name="ro1">
          <table:table-cell office:value-type="float" office:value="503503312" calcext:value-type="float">
            <text:p>503503312</text:p>
          </table:table-cell>
          <table:table-cell office:value-type="float" office:value="694469395.22619" calcext:value-type="float">
            <text:p>694469395.22619</text:p>
          </table:table-cell>
          <table:table-cell/>
          <table:table-cell office:value-type="string" calcext:value-type="string">
            <text:p>2022-01-03T08:09:55.2261899Z</text:p>
          </table:table-cell>
          <table:table-cell office:value-type="string" calcext:value-type="string">
            <text:p>2022-01-03-08:11:04.4101899</text:p>
          </table:table-cell>
          <table:table-cell table:number-columns-repeated="2"/>
        </table:table-row>
        <table:table-row table:style-name="ro1">
          <table:table-cell office:value-type="float" office:value="503647303" calcext:value-type="float">
            <text:p>503647303</text:p>
          </table:table-cell>
          <table:table-cell office:value-type="float" office:value="694613386.227762" calcext:value-type="float">
            <text:p>694613386.227762</text:p>
          </table:table-cell>
          <table:table-cell/>
          <table:table-cell office:value-type="string" calcext:value-type="string">
            <text:p>2022-01-05T00:09:46.2277619Z</text:p>
          </table:table-cell>
          <table:table-cell office:value-type="string" calcext:value-type="string">
            <text:p>2022-01-05-00:10:55.4117619</text:p>
          </table:table-cell>
          <table:table-cell table:number-columns-repeated="2"/>
        </table:table-row>
        <table:table-row table:style-name="ro1">
          <table:table-cell office:value-type="float" office:value="503791288" calcext:value-type="float">
            <text:p>503791288</text:p>
          </table:table-cell>
          <table:table-cell office:value-type="float" office:value="694757371.229287" calcext:value-type="float">
            <text:p>694757371.229287</text:p>
          </table:table-cell>
          <table:table-cell/>
          <table:table-cell office:value-type="string" calcext:value-type="string">
            <text:p>2022-01-06T16:09:31.2292870Z</text:p>
          </table:table-cell>
          <table:table-cell office:value-type="string" calcext:value-type="string">
            <text:p>2022-01-06-16:10:40.4132870</text:p>
          </table:table-cell>
          <table:table-cell table:number-columns-repeated="2"/>
        </table:table-row>
        <table:table-row table:style-name="ro1">
          <table:table-cell office:value-type="float" office:value="503935313" calcext:value-type="float">
            <text:p>503935313</text:p>
          </table:table-cell>
          <table:table-cell office:value-type="float" office:value="694901396.23088" calcext:value-type="float">
            <text:p>694901396.23088</text:p>
          </table:table-cell>
          <table:table-cell/>
          <table:table-cell office:value-type="string" calcext:value-type="string">
            <text:p>2022-01-08T08:09:56.2308800Z</text:p>
          </table:table-cell>
          <table:table-cell office:value-type="string" calcext:value-type="string">
            <text:p>2022-01-08-08:11:05.4148800</text:p>
          </table:table-cell>
          <table:table-cell table:number-columns-repeated="2"/>
        </table:table-row>
        <table:table-row table:style-name="ro1">
          <table:table-cell office:value-type="float" office:value="504021706" calcext:value-type="float">
            <text:p>504021706</text:p>
          </table:table-cell>
          <table:table-cell office:value-type="float" office:value="694987789.231799" calcext:value-type="float">
            <text:p>694987789.231799</text:p>
          </table:table-cell>
          <table:table-cell/>
          <table:table-cell office:value-type="string" calcext:value-type="string">
            <text:p>2022-01-09T08:09:49.2317990Z</text:p>
          </table:table-cell>
          <table:table-cell office:value-type="string" calcext:value-type="string">
            <text:p>2022-01-09-08:10:58.4157990</text:p>
          </table:table-cell>
          <table:table-cell table:number-columns-repeated="2"/>
        </table:table-row>
        <table:table-row table:style-name="ro1">
          <table:table-cell office:value-type="float" office:value="504072062" calcext:value-type="float">
            <text:p>504072062</text:p>
          </table:table-cell>
          <table:table-cell office:value-type="float" office:value="695038145.232334" calcext:value-type="float">
            <text:p>695038145.232334</text:p>
          </table:table-cell>
          <table:table-cell/>
          <table:table-cell office:value-type="string" calcext:value-type="string">
            <text:p>2022-01-09T22:09:05.2323340Z</text:p>
          </table:table-cell>
          <table:table-cell office:value-type="string" calcext:value-type="string">
            <text:p>2022-01-09-22:10:14.4163340</text:p>
          </table:table-cell>
          <table:table-cell table:number-columns-repeated="2"/>
        </table:table-row>
        <table:table-row table:style-name="ro1">
          <table:table-cell office:value-type="float" office:value="504306067" calcext:value-type="float">
            <text:p>504306067</text:p>
          </table:table-cell>
          <table:table-cell office:value-type="float" office:value="695272150.234815" calcext:value-type="float">
            <text:p>695272150.234815</text:p>
          </table:table-cell>
          <table:table-cell/>
          <table:table-cell office:value-type="string" calcext:value-type="string">
            <text:p>2022-01-12T15:09:10.2348150Z</text:p>
          </table:table-cell>
          <table:table-cell office:value-type="string" calcext:value-type="string">
            <text:p>2022-01-12-15:10:19.4188150</text:p>
          </table:table-cell>
          <table:table-cell table:number-columns-repeated="2"/>
        </table:table-row>
        <table:table-row table:style-name="ro1">
          <table:table-cell office:value-type="float" office:value="504482458" calcext:value-type="float">
            <text:p>504482458</text:p>
          </table:table-cell>
          <table:table-cell office:value-type="float" office:value="695448541.236726" calcext:value-type="float">
            <text:p>695448541.236726</text:p>
          </table:table-cell>
          <table:table-cell/>
          <table:table-cell office:value-type="string" calcext:value-type="string">
            <text:p>2022-01-14T16:09:01.2367259Z</text:p>
          </table:table-cell>
          <table:table-cell office:value-type="string" calcext:value-type="string">
            <text:p>2022-01-14-16:10:10.4207259</text:p>
          </table:table-cell>
          <table:table-cell table:number-columns-repeated="2"/>
        </table:table-row>
        <table:table-row table:style-name="ro1">
          <table:table-cell office:value-type="float" office:value="504568854" calcext:value-type="float">
            <text:p>504568854</text:p>
          </table:table-cell>
          <table:table-cell office:value-type="float" office:value="695534937.237652" calcext:value-type="float">
            <text:p>695534937.237652</text:p>
          </table:table-cell>
          <table:table-cell/>
          <table:table-cell office:value-type="string" calcext:value-type="string">
            <text:p>2022-01-15T16:08:57.2376519Z</text:p>
          </table:table-cell>
          <table:table-cell office:value-type="string" calcext:value-type="string">
            <text:p>2022-01-15-16:10:06.4216519</text:p>
          </table:table-cell>
          <table:table-cell table:number-columns-repeated="2"/>
        </table:table-row>
        <table:table-row table:style-name="ro1">
          <table:table-cell office:value-type="float" office:value="504655251" calcext:value-type="float">
            <text:p>504655251</text:p>
          </table:table-cell>
          <table:table-cell office:value-type="float" office:value="695621334.238585" calcext:value-type="float">
            <text:p>695621334.238585</text:p>
          </table:table-cell>
          <table:table-cell/>
          <table:table-cell office:value-type="string" calcext:value-type="string">
            <text:p>2022-01-16T16:08:54.2385849Z</text:p>
          </table:table-cell>
          <table:table-cell office:value-type="string" calcext:value-type="string">
            <text:p>2022-01-16-16:10:03.4225850</text:p>
          </table:table-cell>
          <table:table-cell table:number-columns-repeated="2"/>
        </table:table-row>
        <table:table-row table:style-name="ro1">
          <table:table-cell office:value-type="float" office:value="504676852" calcext:value-type="float">
            <text:p>504676852</text:p>
          </table:table-cell>
          <table:table-cell office:value-type="float" office:value="695642935.238866" calcext:value-type="float">
            <text:p>695642935.238866</text:p>
          </table:table-cell>
          <table:table-cell/>
          <table:table-cell office:value-type="string" calcext:value-type="string">
            <text:p>2022-01-16T22:08:55.2388659Z</text:p>
          </table:table-cell>
          <table:table-cell office:value-type="string" calcext:value-type="string">
            <text:p>2022-01-16-22:10:04.4228659</text:p>
          </table:table-cell>
          <table:table-cell table:number-columns-repeated="2"/>
        </table:table-row>
        <table:table-row table:style-name="ro1">
          <table:table-cell office:value-type="float" office:value="505083643" calcext:value-type="float">
            <text:p>505083643</text:p>
          </table:table-cell>
          <table:table-cell office:value-type="float" office:value="696049726.24321" calcext:value-type="float">
            <text:p>696049726.24321</text:p>
          </table:table-cell>
          <table:table-cell/>
          <table:table-cell office:value-type="string" calcext:value-type="string">
            <text:p>2022-01-21T15:08:46.2432099Z</text:p>
          </table:table-cell>
          <table:table-cell office:value-type="string" calcext:value-type="string">
            <text:p>2022-01-21-15:09:55.4272099</text:p>
          </table:table-cell>
          <table:table-cell table:number-columns-repeated="2"/>
        </table:table-row>
        <table:table-row table:style-name="ro1">
          <table:table-cell office:value-type="float" office:value="505173638" calcext:value-type="float">
            <text:p>505173638</text:p>
          </table:table-cell>
          <table:table-cell office:value-type="float" office:value="696139721.244178" calcext:value-type="float">
            <text:p>696139721.244178</text:p>
          </table:table-cell>
          <table:table-cell/>
          <table:table-cell office:value-type="string" calcext:value-type="string">
            <text:p>2022-01-22T16:08:41.2441779Z</text:p>
          </table:table-cell>
          <table:table-cell office:value-type="string" calcext:value-type="string">
            <text:p>2022-01-22-16:09:50.4281779</text:p>
          </table:table-cell>
          <table:table-cell table:number-columns-repeated="2"/>
        </table:table-row>
        <table:table-row table:style-name="ro1">
          <table:table-cell office:value-type="float" office:value="505198861" calcext:value-type="float">
            <text:p>505198861</text:p>
          </table:table-cell>
          <table:table-cell office:value-type="float" office:value="696164944.244487" calcext:value-type="float">
            <text:p>696164944.244487</text:p>
          </table:table-cell>
          <table:table-cell/>
          <table:table-cell office:value-type="string" calcext:value-type="string">
            <text:p>2022-01-22T23:09:04.2444869Z</text:p>
          </table:table-cell>
          <table:table-cell office:value-type="string" calcext:value-type="string">
            <text:p>2022-01-22-23:10:13.4284869</text:p>
          </table:table-cell>
          <table:table-cell table:number-columns-repeated="2"/>
        </table:table-row>
        <table:table-row table:style-name="ro1">
          <table:table-cell office:value-type="float" office:value="505281626" calcext:value-type="float">
            <text:p>505281626</text:p>
          </table:table-cell>
          <table:table-cell office:value-type="float" office:value="696247709.245384" calcext:value-type="float">
            <text:p>696247709.245384</text:p>
          </table:table-cell>
          <table:table-cell/>
          <table:table-cell office:value-type="string" calcext:value-type="string">
            <text:p>2022-01-23T22:08:29.2453839Z</text:p>
          </table:table-cell>
          <table:table-cell office:value-type="string" calcext:value-type="string">
            <text:p>2022-01-23-22:09:38.4293839</text:p>
          </table:table-cell>
          <table:table-cell table:number-columns-repeated="2"/>
        </table:table-row>
        <table:table-row table:style-name="ro1">
          <table:table-cell office:value-type="float" office:value="505396837" calcext:value-type="float">
            <text:p>505396837</text:p>
          </table:table-cell>
          <table:table-cell office:value-type="float" office:value="696362920.246623" calcext:value-type="float">
            <text:p>696362920.246623</text:p>
          </table:table-cell>
          <table:table-cell/>
          <table:table-cell office:value-type="string" calcext:value-type="string">
            <text:p>2022-01-25T06:08:40.2466230Z</text:p>
          </table:table-cell>
          <table:table-cell office:value-type="string" calcext:value-type="string">
            <text:p>2022-01-25-06:09:49.4306230</text:p>
          </table:table-cell>
          <table:table-cell table:number-columns-repeated="2"/>
        </table:table-row>
        <table:table-row table:style-name="ro1">
          <table:table-cell office:value-type="float" office:value="505476028" calcext:value-type="float">
            <text:p>505476028</text:p>
          </table:table-cell>
          <table:table-cell office:value-type="float" office:value="696442111.247459" calcext:value-type="float">
            <text:p>696442111.247459</text:p>
          </table:table-cell>
          <table:table-cell/>
          <table:table-cell office:value-type="string" calcext:value-type="string">
            <text:p>2022-01-26T04:08:31.2474589Z</text:p>
          </table:table-cell>
          <table:table-cell office:value-type="string" calcext:value-type="string">
            <text:p>2022-01-26-04:09:40.4314589</text:p>
          </table:table-cell>
          <table:table-cell table:number-columns-repeated="2"/>
        </table:table-row>
        <table:table-row table:style-name="ro1">
          <table:table-cell office:value-type="float" office:value="505627231" calcext:value-type="float">
            <text:p>505627231</text:p>
          </table:table-cell>
          <table:table-cell office:value-type="float" office:value="696593314.249112" calcext:value-type="float">
            <text:p>696593314.249112</text:p>
          </table:table-cell>
          <table:table-cell/>
          <table:table-cell office:value-type="string" calcext:value-type="string">
            <text:p>2022-01-27T22:08:34.2491120Z</text:p>
          </table:table-cell>
          <table:table-cell office:value-type="string" calcext:value-type="string">
            <text:p>2022-01-27-22:09:43.4331120</text:p>
          </table:table-cell>
          <table:table-cell table:number-columns-repeated="2"/>
        </table:table-row>
        <table:table-row table:style-name="ro1">
          <table:table-cell office:value-type="float" office:value="505746066" calcext:value-type="float">
            <text:p>505746066</text:p>
          </table:table-cell>
          <table:table-cell office:value-type="float" office:value="696712149.250403" calcext:value-type="float">
            <text:p>696712149.250403</text:p>
          </table:table-cell>
          <table:table-cell/>
          <table:table-cell office:value-type="string" calcext:value-type="string">
            <text:p>2022-01-29T07:09:09.2504029Z</text:p>
          </table:table-cell>
          <table:table-cell office:value-type="string" calcext:value-type="string">
            <text:p>2022-01-29-07:10:18.4344029</text:p>
          </table:table-cell>
          <table:table-cell table:number-columns-repeated="2"/>
        </table:table-row>
        <table:table-row table:style-name="ro1">
          <table:table-cell office:value-type="float" office:value="505828847" calcext:value-type="float">
            <text:p>505828847</text:p>
          </table:table-cell>
          <table:table-cell office:value-type="float" office:value="696794930.251284" calcext:value-type="float">
            <text:p>696794930.251284</text:p>
          </table:table-cell>
          <table:table-cell/>
          <table:table-cell office:value-type="string" calcext:value-type="string">
            <text:p>2022-01-30T06:08:50.2512840Z</text:p>
          </table:table-cell>
          <table:table-cell office:value-type="string" calcext:value-type="string">
            <text:p>2022-01-30-06:09:59.4352840</text:p>
          </table:table-cell>
          <table:table-cell table:number-columns-repeated="2"/>
        </table:table-row>
        <table:table-row table:style-name="ro1">
          <table:table-cell office:value-type="float" office:value="505915261" calcext:value-type="float">
            <text:p>505915261</text:p>
          </table:table-cell>
          <table:table-cell office:value-type="float" office:value="696881344.252216" calcext:value-type="float">
            <text:p>696881344.252216</text:p>
          </table:table-cell>
          <table:table-cell/>
          <table:table-cell office:value-type="string" calcext:value-type="string">
            <text:p>2022-01-31T06:09:04.2522159Z</text:p>
          </table:table-cell>
          <table:table-cell office:value-type="string" calcext:value-type="string">
            <text:p>2022-01-31-06:10:13.4362159</text:p>
          </table:table-cell>
          <table:table-cell table:number-columns-repeated="2"/>
        </table:table-row>
        <table:table-row table:style-name="ro1">
          <table:table-cell office:value-type="float" office:value="506037627" calcext:value-type="float">
            <text:p>506037627</text:p>
          </table:table-cell>
          <table:table-cell office:value-type="float" office:value="697003710.253525" calcext:value-type="float">
            <text:p>697003710.253525</text:p>
          </table:table-cell>
          <table:table-cell/>
          <table:table-cell office:value-type="string" calcext:value-type="string">
            <text:p>2022-02-01T16:08:30.2535250Z</text:p>
          </table:table-cell>
          <table:table-cell office:value-type="string" calcext:value-type="string">
            <text:p>2022-02-01-16:09:39.4375250</text:p>
          </table:table-cell>
          <table:table-cell table:number-columns-repeated="2"/>
        </table:table-row>
        <table:table-row table:style-name="ro1">
          <table:table-cell office:value-type="float" office:value="506048411" calcext:value-type="float">
            <text:p>506048411</text:p>
          </table:table-cell>
          <table:table-cell office:value-type="float" office:value="697014494.253662" calcext:value-type="float">
            <text:p>697014494.253662</text:p>
          </table:table-cell>
          <table:table-cell/>
          <table:table-cell office:value-type="string" calcext:value-type="string">
            <text:p>2022-02-01T19:08:14.2536619Z</text:p>
          </table:table-cell>
          <table:table-cell office:value-type="string" calcext:value-type="string">
            <text:p>2022-02-01-19:09:23.4376620</text:p>
          </table:table-cell>
          <table:table-cell table:number-columns-repeated="2"/>
        </table:table-row>
        <table:table-row table:style-name="ro1">
          <table:table-cell office:value-type="float" office:value="506296832" calcext:value-type="float">
            <text:p>506296832</text:p>
          </table:table-cell>
          <table:table-cell office:value-type="float" office:value="697262915.256335" calcext:value-type="float">
            <text:p>697262915.256335</text:p>
          </table:table-cell>
          <table:table-cell/>
          <table:table-cell office:value-type="string" calcext:value-type="string">
            <text:p>2022-02-04T16:08:35.2563350Z</text:p>
          </table:table-cell>
          <table:table-cell office:value-type="string" calcext:value-type="string">
            <text:p>2022-02-04-16:09:44.4403350</text:p>
          </table:table-cell>
          <table:table-cell table:number-columns-repeated="2"/>
        </table:table-row>
        <table:table-row table:style-name="ro1">
          <table:table-cell office:value-type="float" office:value="506376050" calcext:value-type="float">
            <text:p>506376050</text:p>
          </table:table-cell>
          <table:table-cell office:value-type="float" office:value="697342133.257218" calcext:value-type="float">
            <text:p>697342133.257218</text:p>
          </table:table-cell>
          <table:table-cell/>
          <table:table-cell office:value-type="string" calcext:value-type="string">
            <text:p>2022-02-05T14:08:53.2572180Z</text:p>
          </table:table-cell>
          <table:table-cell office:value-type="string" calcext:value-type="string">
            <text:p>2022-02-05-14:10:02.4412180</text:p>
          </table:table-cell>
          <table:table-cell table:number-columns-repeated="2"/>
        </table:table-row>
        <table:table-row table:style-name="ro1">
          <table:table-cell office:value-type="float" office:value="506469631" calcext:value-type="float">
            <text:p>506469631</text:p>
          </table:table-cell>
          <table:table-cell office:value-type="float" office:value="697435714.258199" calcext:value-type="float">
            <text:p>697435714.258199</text:p>
          </table:table-cell>
          <table:table-cell/>
          <table:table-cell office:value-type="string" calcext:value-type="string">
            <text:p>2022-02-06T16:08:34.2581989Z</text:p>
          </table:table-cell>
          <table:table-cell office:value-type="string" calcext:value-type="string">
            <text:p>2022-02-06-16:09:43.4421989</text:p>
          </table:table-cell>
          <table:table-cell table:number-columns-repeated="2"/>
        </table:table-row>
        <table:table-row table:style-name="ro1">
          <table:table-cell office:value-type="float" office:value="506545236" calcext:value-type="float">
            <text:p>506545236</text:p>
          </table:table-cell>
          <table:table-cell office:value-type="float" office:value="697511319.259012" calcext:value-type="float">
            <text:p>697511319.259012</text:p>
          </table:table-cell>
          <table:table-cell/>
          <table:table-cell office:value-type="string" calcext:value-type="string">
            <text:p>2022-02-07T13:08:39.2590119Z</text:p>
          </table:table-cell>
          <table:table-cell office:value-type="string" calcext:value-type="string">
            <text:p>2022-02-07-13:09:48.4430119</text:p>
          </table:table-cell>
          <table:table-cell table:number-columns-repeated="2"/>
        </table:table-row>
        <table:table-row table:style-name="ro1">
          <table:table-cell office:value-type="float" office:value="506635263" calcext:value-type="float">
            <text:p>506635263</text:p>
          </table:table-cell>
          <table:table-cell office:value-type="float" office:value="697601346.26002" calcext:value-type="float">
            <text:p>697601346.26002</text:p>
          </table:table-cell>
          <table:table-cell/>
          <table:table-cell office:value-type="string" calcext:value-type="string">
            <text:p>2022-02-08T14:09:06.2600200Z</text:p>
          </table:table-cell>
          <table:table-cell office:value-type="string" calcext:value-type="string">
            <text:p>2022-02-08-14:10:15.4440200</text:p>
          </table:table-cell>
          <table:table-cell table:number-columns-repeated="2"/>
        </table:table-row>
        <table:table-row table:style-name="ro1">
          <table:table-cell office:value-type="float" office:value="506730029" calcext:value-type="float">
            <text:p>506730029</text:p>
          </table:table-cell>
          <table:table-cell office:value-type="float" office:value="697696112.261033" calcext:value-type="float">
            <text:p>697696112.261033</text:p>
          </table:table-cell>
          <table:table-cell/>
          <table:table-cell office:value-type="string" calcext:value-type="string">
            <text:p>2022-02-09T16:28:32.2610329Z</text:p>
          </table:table-cell>
          <table:table-cell office:value-type="string" calcext:value-type="string">
            <text:p>2022-02-09-16:29:41.4450329</text:p>
          </table:table-cell>
          <table:table-cell table:number-columns-repeated="2"/>
        </table:table-row>
        <table:table-row table:style-name="ro1">
          <table:table-cell office:value-type="float" office:value="506739612" calcext:value-type="float">
            <text:p>506739612</text:p>
          </table:table-cell>
          <table:table-cell office:value-type="float" office:value="697705695.261143" calcext:value-type="float">
            <text:p>697705695.261143</text:p>
          </table:table-cell>
          <table:table-cell/>
          <table:table-cell office:value-type="string" calcext:value-type="string">
            <text:p>2022-02-09T19:08:15.2611429Z</text:p>
          </table:table-cell>
          <table:table-cell office:value-type="string" calcext:value-type="string">
            <text:p>2022-02-09-19:09:24.4451429</text:p>
          </table:table-cell>
          <table:table-cell table:number-columns-repeated="2"/>
        </table:table-row>
        <table:table-row table:style-name="ro1">
          <table:table-cell office:value-type="float" office:value="506826048" calcext:value-type="float">
            <text:p>506826048</text:p>
          </table:table-cell>
          <table:table-cell office:value-type="float" office:value="697792131.26208" calcext:value-type="float">
            <text:p>697792131.26208</text:p>
          </table:table-cell>
          <table:table-cell/>
          <table:table-cell office:value-type="string" calcext:value-type="string">
            <text:p>2022-02-10T19:08:51.2620799Z</text:p>
          </table:table-cell>
          <table:table-cell office:value-type="string" calcext:value-type="string">
            <text:p>2022-02-10-19:10:00.4460799</text:p>
          </table:table-cell>
          <table:table-cell table:number-columns-repeated="2"/>
        </table:table-row>
        <table:table-row table:style-name="ro1">
          <table:table-cell office:value-type="float" office:value="506988064" calcext:value-type="float">
            <text:p>506988064</text:p>
          </table:table-cell>
          <table:table-cell office:value-type="float" office:value="697954147.263833" calcext:value-type="float">
            <text:p>697954147.263833</text:p>
          </table:table-cell>
          <table:table-cell/>
          <table:table-cell office:value-type="string" calcext:value-type="string">
            <text:p>2022-02-12T16:09:07.2638329Z</text:p>
          </table:table-cell>
          <table:table-cell office:value-type="string" calcext:value-type="string">
            <text:p>2022-02-12-16:10:16.4478329</text:p>
          </table:table-cell>
          <table:table-cell table:number-columns-repeated="2"/>
        </table:table-row>
        <table:table-row table:style-name="ro1">
          <table:table-cell office:value-type="float" office:value="507074433" calcext:value-type="float">
            <text:p>507074433</text:p>
          </table:table-cell>
          <table:table-cell office:value-type="float" office:value="698040516.264761" calcext:value-type="float">
            <text:p>698040516.264761</text:p>
          </table:table-cell>
          <table:table-cell/>
          <table:table-cell office:value-type="string" calcext:value-type="string">
            <text:p>2022-02-13T16:08:36.2647609Z</text:p>
          </table:table-cell>
          <table:table-cell office:value-type="string" calcext:value-type="string">
            <text:p>2022-02-13-16:09:45.4487609</text:p>
          </table:table-cell>
          <table:table-cell table:number-columns-repeated="2"/>
        </table:table-row>
        <table:table-row table:style-name="ro1">
          <table:table-cell office:value-type="float" office:value="507135635" calcext:value-type="float">
            <text:p>507135635</text:p>
          </table:table-cell>
          <table:table-cell office:value-type="float" office:value="698101718.265428" calcext:value-type="float">
            <text:p>698101718.265428</text:p>
          </table:table-cell>
          <table:table-cell/>
          <table:table-cell office:value-type="string" calcext:value-type="string">
            <text:p>2022-02-14T09:08:38.2654279Z</text:p>
          </table:table-cell>
          <table:table-cell office:value-type="string" calcext:value-type="string">
            <text:p>2022-02-14-09:09:47.4494279</text:p>
          </table:table-cell>
          <table:table-cell table:number-columns-repeated="2"/>
        </table:table-row>
        <table:table-row table:style-name="ro1">
          <table:table-cell office:value-type="float" office:value="507283234" calcext:value-type="float">
            <text:p>507283234</text:p>
          </table:table-cell>
          <table:table-cell office:value-type="float" office:value="698249317.26754" calcext:value-type="float">
            <text:p>698249317.26754</text:p>
          </table:table-cell>
          <table:table-cell/>
          <table:table-cell office:value-type="string" calcext:value-type="string">
            <text:p>2022-02-16T02:08:37.2675399Z</text:p>
          </table:table-cell>
          <table:table-cell office:value-type="string" calcext:value-type="string">
            <text:p>2022-02-16-02:09:46.4515399</text:p>
          </table:table-cell>
          <table:table-cell table:number-columns-repeated="2"/>
        </table:table-row>
        <table:table-row table:style-name="ro1">
          <table:table-cell office:value-type="float" office:value="507420039" calcext:value-type="float">
            <text:p>507420039</text:p>
          </table:table-cell>
          <table:table-cell office:value-type="float" office:value="698386122.26903" calcext:value-type="float">
            <text:p>698386122.26903</text:p>
          </table:table-cell>
          <table:table-cell/>
          <table:table-cell office:value-type="string" calcext:value-type="string">
            <text:p>2022-02-17T16:08:42.2690299Z</text:p>
          </table:table-cell>
          <table:table-cell office:value-type="string" calcext:value-type="string">
            <text:p>2022-02-17-16:09:51.4530299</text:p>
          </table:table-cell>
          <table:table-cell table:number-columns-repeated="2"/>
        </table:table-row>
        <table:table-row table:style-name="ro1">
          <table:table-cell office:value-type="float" office:value="507502842" calcext:value-type="float">
            <text:p>507502842</text:p>
          </table:table-cell>
          <table:table-cell office:value-type="float" office:value="698468925.269922" calcext:value-type="float">
            <text:p>698468925.269922</text:p>
          </table:table-cell>
          <table:table-cell/>
          <table:table-cell office:value-type="string" calcext:value-type="string">
            <text:p>2022-02-18T15:08:45.2699220Z</text:p>
          </table:table-cell>
          <table:table-cell office:value-type="string" calcext:value-type="string">
            <text:p>2022-02-18-15:09:54.4539220</text:p>
          </table:table-cell>
          <table:table-cell table:number-columns-repeated="2"/>
        </table:table-row>
        <table:table-row table:style-name="ro1">
          <table:table-cell office:value-type="float" office:value="507592841" calcext:value-type="float">
            <text:p>507592841</text:p>
          </table:table-cell>
          <table:table-cell office:value-type="float" office:value="698558924.270914" calcext:value-type="float">
            <text:p>698558924.270914</text:p>
          </table:table-cell>
          <table:table-cell/>
          <table:table-cell office:value-type="string" calcext:value-type="string">
            <text:p>2022-02-19T16:08:44.2709139Z</text:p>
          </table:table-cell>
          <table:table-cell office:value-type="string" calcext:value-type="string">
            <text:p>2022-02-19-16:09:53.4549139</text:p>
          </table:table-cell>
          <table:table-cell table:number-columns-repeated="2"/>
        </table:table-row>
        <table:table-row table:style-name="ro1">
          <table:table-cell office:value-type="float" office:value="507679246" calcext:value-type="float">
            <text:p>507679246</text:p>
          </table:table-cell>
          <table:table-cell office:value-type="float" office:value="698645329.271867" calcext:value-type="float">
            <text:p>698645329.271867</text:p>
          </table:table-cell>
          <table:table-cell/>
          <table:table-cell office:value-type="string" calcext:value-type="string">
            <text:p>2022-02-20T16:08:49.2718670Z</text:p>
          </table:table-cell>
          <table:table-cell office:value-type="string" calcext:value-type="string">
            <text:p>2022-02-20-16:09:58.4558670</text:p>
          </table:table-cell>
          <table:table-cell table:number-columns-repeated="2"/>
        </table:table-row>
        <table:table-row table:style-name="ro1">
          <table:table-cell office:value-type="float" office:value="507722457" calcext:value-type="float">
            <text:p>507722457</text:p>
          </table:table-cell>
          <table:table-cell office:value-type="float" office:value="698688540.272338" calcext:value-type="float">
            <text:p>698688540.272338</text:p>
          </table:table-cell>
          <table:table-cell/>
          <table:table-cell office:value-type="string" calcext:value-type="string">
            <text:p>2022-02-21T04:09:00.2723380Z</text:p>
          </table:table-cell>
          <table:table-cell office:value-type="string" calcext:value-type="string">
            <text:p>2022-02-21-04:10:09.4563380</text:p>
          </table:table-cell>
          <table:table-cell table:number-columns-repeated="2"/>
        </table:table-row>
        <table:table-row table:style-name="ro1">
          <table:table-cell office:value-type="float" office:value="507826843" calcext:value-type="float">
            <text:p>507826843</text:p>
          </table:table-cell>
          <table:table-cell office:value-type="float" office:value="698792926.273467" calcext:value-type="float">
            <text:p>698792926.273467</text:p>
          </table:table-cell>
          <table:table-cell/>
          <table:table-cell office:value-type="string" calcext:value-type="string">
            <text:p>2022-02-22T09:08:46.2734669Z</text:p>
          </table:table-cell>
          <table:table-cell office:value-type="string" calcext:value-type="string">
            <text:p>2022-02-22-09:09:55.4574669</text:p>
          </table:table-cell>
          <table:table-cell table:number-columns-repeated="2"/>
        </table:table-row>
        <table:table-row table:style-name="ro1">
          <table:table-cell office:value-type="float" office:value="507895251" calcext:value-type="float">
            <text:p>507895251</text:p>
          </table:table-cell>
          <table:table-cell office:value-type="float" office:value="698861334.27423" calcext:value-type="float">
            <text:p>698861334.27423</text:p>
          </table:table-cell>
          <table:table-cell/>
          <table:table-cell office:value-type="string" calcext:value-type="string">
            <text:p>2022-02-23T04:08:54.2742300Z</text:p>
          </table:table-cell>
          <table:table-cell office:value-type="string" calcext:value-type="string">
            <text:p>2022-02-23-04:10:03.4582300</text:p>
          </table:table-cell>
          <table:table-cell table:number-columns-repeated="2"/>
        </table:table-row>
        <table:table-row table:style-name="ro1">
          <table:table-cell office:value-type="float" office:value="507956478" calcext:value-type="float">
            <text:p>507956478</text:p>
          </table:table-cell>
          <table:table-cell office:value-type="float" office:value="698922561.274916" calcext:value-type="float">
            <text:p>698922561.274916</text:p>
          </table:table-cell>
          <table:table-cell/>
          <table:table-cell office:value-type="string" calcext:value-type="string">
            <text:p>2022-02-23T21:09:21.2749159Z</text:p>
          </table:table-cell>
          <table:table-cell office:value-type="string" calcext:value-type="string">
            <text:p>2022-02-23-21:10:30.4589159</text:p>
          </table:table-cell>
          <table:table-cell table:number-columns-repeated="2"/>
        </table:table-row>
        <table:table-row table:style-name="ro1">
          <table:table-cell office:value-type="float" office:value="508197656" calcext:value-type="float">
            <text:p>508197656</text:p>
          </table:table-cell>
          <table:table-cell office:value-type="float" office:value="699163739.27753" calcext:value-type="float">
            <text:p>699163739.27753</text:p>
          </table:table-cell>
          <table:table-cell/>
          <table:table-cell office:value-type="string" calcext:value-type="string">
            <text:p>2022-02-26T16:08:59.2775299Z</text:p>
          </table:table-cell>
          <table:table-cell office:value-type="string" calcext:value-type="string">
            <text:p>2022-02-26-16:10:08.4615299</text:p>
          </table:table-cell>
          <table:table-cell table:number-columns-repeated="2"/>
        </table:table-row>
        <table:table-row table:style-name="ro1">
          <table:table-cell office:value-type="float" office:value="508266074" calcext:value-type="float">
            <text:p>508266074</text:p>
          </table:table-cell>
          <table:table-cell office:value-type="float" office:value="699232157.278295" calcext:value-type="float">
            <text:p>699232157.278295</text:p>
          </table:table-cell>
          <table:table-cell/>
          <table:table-cell office:value-type="string" calcext:value-type="string">
            <text:p>2022-02-27T11:09:17.2782950Z</text:p>
          </table:table-cell>
          <table:table-cell office:value-type="string" calcext:value-type="string">
            <text:p>2022-02-27-11:10:26.4622950</text:p>
          </table:table-cell>
          <table:table-cell table:number-columns-repeated="2"/>
        </table:table-row>
        <table:table-row table:style-name="ro1">
          <table:table-cell office:value-type="float" office:value="508320056" calcext:value-type="float">
            <text:p>508320056</text:p>
          </table:table-cell>
          <table:table-cell office:value-type="float" office:value="699286139.278871" calcext:value-type="float">
            <text:p>699286139.278871</text:p>
          </table:table-cell>
          <table:table-cell/>
          <table:table-cell office:value-type="string" calcext:value-type="string">
            <text:p>2022-02-28T02:08:59.2788709Z</text:p>
          </table:table-cell>
          <table:table-cell office:value-type="string" calcext:value-type="string">
            <text:p>2022-02-28-02:10:08.4628709</text:p>
          </table:table-cell>
          <table:table-cell table:number-columns-repeated="2"/>
        </table:table-row>
        <table:table-row table:style-name="ro1">
          <table:table-cell office:value-type="float" office:value="508413679" calcext:value-type="float">
            <text:p>508413679</text:p>
          </table:table-cell>
          <table:table-cell office:value-type="float" office:value="699379762.279911" calcext:value-type="float">
            <text:p>699379762.279911</text:p>
          </table:table-cell>
          <table:table-cell/>
          <table:table-cell office:value-type="string" calcext:value-type="string">
            <text:p>2022-03-01T04:09:22.2799110Z</text:p>
          </table:table-cell>
          <table:table-cell office:value-type="string" calcext:value-type="string">
            <text:p>2022-03-01-04:10:31.4639110</text:p>
          </table:table-cell>
          <table:table-cell table:number-columns-repeated="2"/>
        </table:table-row>
        <table:table-row table:style-name="ro1">
          <table:table-cell office:value-type="float" office:value="508503694" calcext:value-type="float">
            <text:p>508503694</text:p>
          </table:table-cell>
          <table:table-cell office:value-type="float" office:value="699469777.2809" calcext:value-type="float">
            <text:p>699469777.2809</text:p>
          </table:table-cell>
          <table:table-cell/>
          <table:table-cell office:value-type="string" calcext:value-type="string">
            <text:p>2022-03-02T05:09:37.2809000Z</text:p>
          </table:table-cell>
          <table:table-cell office:value-type="string" calcext:value-type="string">
            <text:p>2022-03-02-05:10:46.4649000</text:p>
          </table:table-cell>
          <table:table-cell table:number-columns-repeated="2"/>
        </table:table-row>
        <table:table-row table:style-name="ro1">
          <table:table-cell office:value-type="float" office:value="508701694" calcext:value-type="float">
            <text:p>508701694</text:p>
          </table:table-cell>
          <table:table-cell office:value-type="float" office:value="699667777.283075" calcext:value-type="float">
            <text:p>699667777.283075</text:p>
          </table:table-cell>
          <table:table-cell/>
          <table:table-cell office:value-type="string" calcext:value-type="string">
            <text:p>2022-03-04T12:09:37.2830749Z</text:p>
          </table:table-cell>
          <table:table-cell office:value-type="string" calcext:value-type="string">
            <text:p>2022-03-04-12:10:46.4670749</text:p>
          </table:table-cell>
          <table:table-cell table:number-columns-repeated="2"/>
        </table:table-row>
        <table:table-row table:style-name="ro1">
          <table:table-cell office:value-type="float" office:value="508802480" calcext:value-type="float">
            <text:p>508802480</text:p>
          </table:table-cell>
          <table:table-cell office:value-type="float" office:value="699768563.284174" calcext:value-type="float">
            <text:p>699768563.284174</text:p>
          </table:table-cell>
          <table:table-cell/>
          <table:table-cell office:value-type="string" calcext:value-type="string">
            <text:p>2022-03-05T16:09:23.2841739Z</text:p>
          </table:table-cell>
          <table:table-cell office:value-type="string" calcext:value-type="string">
            <text:p>2022-03-05-16:10:32.4681739</text:p>
          </table:table-cell>
          <table:table-cell table:number-columns-repeated="2"/>
        </table:table-row>
        <table:table-row table:style-name="ro1">
          <table:table-cell office:value-type="float" office:value="508863680" calcext:value-type="float">
            <text:p>508863680</text:p>
          </table:table-cell>
          <table:table-cell office:value-type="float" office:value="699829763.284832" calcext:value-type="float">
            <text:p>699829763.284832</text:p>
          </table:table-cell>
          <table:table-cell/>
          <table:table-cell office:value-type="string" calcext:value-type="string">
            <text:p>2022-03-06T09:09:23.2848320Z</text:p>
          </table:table-cell>
          <table:table-cell office:value-type="string" calcext:value-type="string">
            <text:p>2022-03-06-09:10:32.4688320</text:p>
          </table:table-cell>
          <table:table-cell table:number-columns-repeated="2"/>
        </table:table-row>
        <table:table-row table:style-name="ro1">
          <table:table-cell office:value-type="float" office:value="508960899" calcext:value-type="float">
            <text:p>508960899</text:p>
          </table:table-cell>
          <table:table-cell office:value-type="float" office:value="699926982.285916" calcext:value-type="float">
            <text:p>699926982.285916</text:p>
          </table:table-cell>
          <table:table-cell/>
          <table:table-cell office:value-type="string" calcext:value-type="string">
            <text:p>2022-03-07T12:09:42.2859159Z</text:p>
          </table:table-cell>
          <table:table-cell office:value-type="string" calcext:value-type="string">
            <text:p>2022-03-07-12:10:51.4699159</text:p>
          </table:table-cell>
          <table:table-cell table:number-columns-repeated="2"/>
        </table:table-row>
        <table:table-row table:style-name="ro1">
          <table:table-cell office:value-type="float" office:value="509047438" calcext:value-type="float">
            <text:p>509047438</text:p>
          </table:table-cell>
          <table:table-cell office:value-type="float" office:value="700013521.286877" calcext:value-type="float">
            <text:p>700013521.286877</text:p>
          </table:table-cell>
          <table:table-cell/>
          <table:table-cell office:value-type="string" calcext:value-type="string">
            <text:p>2022-03-08T12:12:01.2868770Z</text:p>
          </table:table-cell>
          <table:table-cell office:value-type="string" calcext:value-type="string">
            <text:p>2022-03-08-12:13:10.4708770</text:p>
          </table:table-cell>
          <table:table-cell table:number-columns-repeated="2"/>
        </table:table-row>
        <table:table-row table:style-name="ro1">
          <table:table-cell office:value-type="float" office:value="509101291" calcext:value-type="float">
            <text:p>509101291</text:p>
          </table:table-cell>
          <table:table-cell office:value-type="float" office:value="700067374.287464" calcext:value-type="float">
            <text:p>700067374.287464</text:p>
          </table:table-cell>
          <table:table-cell/>
          <table:table-cell office:value-type="string" calcext:value-type="string">
            <text:p>2022-03-09T03:09:34.2874640Z</text:p>
          </table:table-cell>
          <table:table-cell office:value-type="string" calcext:value-type="string">
            <text:p>2022-03-09-03:10:43.4714640</text:p>
          </table:table-cell>
          <table:table-cell table:number-columns-repeated="2"/>
        </table:table-row>
        <table:table-row table:style-name="ro1">
          <table:table-cell office:value-type="float" office:value="509320900" calcext:value-type="float">
            <text:p>509320900</text:p>
          </table:table-cell>
          <table:table-cell office:value-type="float" office:value="700286983.289864" calcext:value-type="float">
            <text:p>700286983.289864</text:p>
          </table:table-cell>
          <table:table-cell/>
          <table:table-cell office:value-type="string" calcext:value-type="string">
            <text:p>2022-03-11T16:09:43.2898639Z</text:p>
          </table:table-cell>
          <table:table-cell office:value-type="string" calcext:value-type="string">
            <text:p>2022-03-11-16:10:52.4738639</text:p>
          </table:table-cell>
          <table:table-cell table:number-columns-repeated="2"/>
        </table:table-row>
        <table:table-row table:style-name="ro1">
          <table:table-cell office:value-type="float" office:value="509331690" calcext:value-type="float">
            <text:p>509331690</text:p>
          </table:table-cell>
          <table:table-cell office:value-type="float" office:value="700297773.290012" calcext:value-type="float">
            <text:p>700297773.290012</text:p>
          </table:table-cell>
          <table:table-cell/>
          <table:table-cell office:value-type="string" calcext:value-type="string">
            <text:p>2022-03-11T19:09:33.2900120Z</text:p>
          </table:table-cell>
          <table:table-cell office:value-type="string" calcext:value-type="string">
            <text:p>2022-03-11-19:10:42.4740120</text:p>
          </table:table-cell>
          <table:table-cell table:number-columns-repeated="2"/>
        </table:table-row>
        <table:table-row table:style-name="ro1">
          <table:table-cell office:value-type="float" office:value="509565704" calcext:value-type="float">
            <text:p>509565704</text:p>
          </table:table-cell>
          <table:table-cell office:value-type="float" office:value="700531787.292548" calcext:value-type="float">
            <text:p>700531787.292548</text:p>
          </table:table-cell>
          <table:table-cell/>
          <table:table-cell office:value-type="string" calcext:value-type="string">
            <text:p>2022-03-14T12:09:47.2925479Z</text:p>
          </table:table-cell>
          <table:table-cell office:value-type="string" calcext:value-type="string">
            <text:p>2022-03-14-12:10:56.4765479</text:p>
          </table:table-cell>
          <table:table-cell table:number-columns-repeated="2"/>
        </table:table-row>
        <table:table-row table:style-name="ro1">
          <table:table-cell office:value-type="float" office:value="509641313" calcext:value-type="float">
            <text:p>509641313</text:p>
          </table:table-cell>
          <table:table-cell office:value-type="float" office:value="700607396.293398" calcext:value-type="float">
            <text:p>700607396.293398</text:p>
          </table:table-cell>
          <table:table-cell/>
          <table:table-cell office:value-type="string" calcext:value-type="string">
            <text:p>2022-03-15T09:09:56.2933980Z</text:p>
          </table:table-cell>
          <table:table-cell office:value-type="string" calcext:value-type="string">
            <text:p>2022-03-15-09:11:05.4773980</text:p>
          </table:table-cell>
          <table:table-cell table:number-columns-repeated="2"/>
        </table:table-row>
        <table:table-row table:style-name="ro1">
          <table:table-cell office:value-type="float" office:value="509706122" calcext:value-type="float">
            <text:p>509706122</text:p>
          </table:table-cell>
          <table:table-cell office:value-type="float" office:value="700672205.294134" calcext:value-type="float">
            <text:p>700672205.294134</text:p>
          </table:table-cell>
          <table:table-cell/>
          <table:table-cell office:value-type="string" calcext:value-type="string">
            <text:p>2022-03-16T03:10:05.2941340Z</text:p>
          </table:table-cell>
          <table:table-cell office:value-type="string" calcext:value-type="string">
            <text:p>2022-03-16-03:11:14.4781340</text:p>
          </table:table-cell>
          <table:table-cell table:number-columns-repeated="2"/>
        </table:table-row>
        <table:table-row table:style-name="ro1">
          <table:table-cell office:value-type="float" office:value="509806914" calcext:value-type="float">
            <text:p>509806914</text:p>
          </table:table-cell>
          <table:table-cell office:value-type="float" office:value="700772997.295231" calcext:value-type="float">
            <text:p>700772997.295231</text:p>
          </table:table-cell>
          <table:table-cell/>
          <table:table-cell office:value-type="string" calcext:value-type="string">
            <text:p>2022-03-17T07:09:57.2952309Z</text:p>
          </table:table-cell>
          <table:table-cell office:value-type="string" calcext:value-type="string">
            <text:p>2022-03-17-07:11:06.4792309</text:p>
          </table:table-cell>
          <table:table-cell table:number-columns-repeated="2"/>
        </table:table-row>
        <table:table-row table:style-name="ro1">
          <table:table-cell office:value-type="float" office:value="509911325" calcext:value-type="float">
            <text:p>509911325</text:p>
          </table:table-cell>
          <table:table-cell office:value-type="float" office:value="700877408.296378" calcext:value-type="float">
            <text:p>700877408.296378</text:p>
          </table:table-cell>
          <table:table-cell/>
          <table:table-cell office:value-type="string" calcext:value-type="string">
            <text:p>2022-03-18T12:10:08.2963780Z</text:p>
          </table:table-cell>
          <table:table-cell office:value-type="string" calcext:value-type="string">
            <text:p>2022-03-18-12:11:17.4803780</text:p>
          </table:table-cell>
          <table:table-cell table:number-columns-repeated="2"/>
        </table:table-row>
        <table:table-row table:style-name="ro1">
          <table:table-cell office:value-type="float" office:value="510012131" calcext:value-type="float">
            <text:p>510012131</text:p>
          </table:table-cell>
          <table:table-cell office:value-type="float" office:value="700978214.297513" calcext:value-type="float">
            <text:p>700978214.297513</text:p>
          </table:table-cell>
          <table:table-cell/>
          <table:table-cell office:value-type="string" calcext:value-type="string">
            <text:p>2022-03-19T16:10:14.2975130Z</text:p>
          </table:table-cell>
          <table:table-cell office:value-type="string" calcext:value-type="string">
            <text:p>2022-03-19-16:11:23.4815130</text:p>
          </table:table-cell>
          <table:table-cell table:number-columns-repeated="2"/>
        </table:table-row>
        <table:table-row table:style-name="ro1">
          <table:table-cell office:value-type="float" office:value="510080563" calcext:value-type="float">
            <text:p>510080563</text:p>
          </table:table-cell>
          <table:table-cell office:value-type="float" office:value="701046646.298268" calcext:value-type="float">
            <text:p>701046646.298268</text:p>
          </table:table-cell>
          <table:table-cell/>
          <table:table-cell office:value-type="string" calcext:value-type="string">
            <text:p>2022-03-20T11:10:46.2982679Z</text:p>
          </table:table-cell>
          <table:table-cell office:value-type="string" calcext:value-type="string">
            <text:p>2022-03-20-11:11:55.4822679</text:p>
          </table:table-cell>
          <table:table-cell table:number-columns-repeated="2"/>
        </table:table-row>
        <table:table-row table:style-name="ro1">
          <table:table-cell office:value-type="float" office:value="510134541" calcext:value-type="float">
            <text:p>510134541</text:p>
          </table:table-cell>
          <table:table-cell office:value-type="float" office:value="701100624.298857" calcext:value-type="float">
            <text:p>701100624.298857</text:p>
          </table:table-cell>
          <table:table-cell/>
          <table:table-cell office:value-type="string" calcext:value-type="string">
            <text:p>2022-03-21T02:10:24.2988569Z</text:p>
          </table:table-cell>
          <table:table-cell office:value-type="string" calcext:value-type="string">
            <text:p>2022-03-21-02:11:33.4828569</text:p>
          </table:table-cell>
          <table:table-cell table:number-columns-repeated="2"/>
        </table:table-row>
        <table:table-row table:style-name="ro1">
          <table:table-cell office:value-type="float" office:value="510264143" calcext:value-type="float">
            <text:p>510264143</text:p>
          </table:table-cell>
          <table:table-cell office:value-type="float" office:value="701230226.300287" calcext:value-type="float">
            <text:p>701230226.300287</text:p>
          </table:table-cell>
          <table:table-cell/>
          <table:table-cell office:value-type="string" calcext:value-type="string">
            <text:p>2022-03-22T14:10:26.3002870Z</text:p>
          </table:table-cell>
          <table:table-cell office:value-type="string" calcext:value-type="string">
            <text:p>2022-03-22-14:11:35.4842870</text:p>
          </table:table-cell>
          <table:table-cell table:number-columns-repeated="2"/>
        </table:table-row>
        <table:table-row table:style-name="ro1">
          <table:table-cell office:value-type="float" office:value="510307346" calcext:value-type="float">
            <text:p>510307346</text:p>
          </table:table-cell>
          <table:table-cell office:value-type="float" office:value="701273429.300764" calcext:value-type="float">
            <text:p>701273429.300764</text:p>
          </table:table-cell>
          <table:table-cell/>
          <table:table-cell office:value-type="string" calcext:value-type="string">
            <text:p>2022-03-23T02:10:29.3007639Z</text:p>
          </table:table-cell>
          <table:table-cell office:value-type="string" calcext:value-type="string">
            <text:p>2022-03-23-02:11:38.4847639</text:p>
          </table:table-cell>
          <table:table-cell table:number-columns-repeated="2"/>
        </table:table-row>
        <table:table-row table:style-name="ro1">
          <table:table-cell office:value-type="float" office:value="510382939" calcext:value-type="float">
            <text:p>510382939</text:p>
          </table:table-cell>
          <table:table-cell office:value-type="float" office:value="701349022.301583" calcext:value-type="float">
            <text:p>701349022.301583</text:p>
          </table:table-cell>
          <table:table-cell/>
          <table:table-cell office:value-type="string" calcext:value-type="string">
            <text:p>2022-03-23T23:10:22.3015829Z</text:p>
          </table:table-cell>
          <table:table-cell office:value-type="string" calcext:value-type="string">
            <text:p>2022-03-23-23:11:31.4855829</text:p>
          </table:table-cell>
          <table:table-cell table:number-columns-repeated="2"/>
        </table:table-row>
        <table:table-row table:style-name="ro1">
          <table:table-cell office:value-type="float" office:value="510595378" calcext:value-type="float">
            <text:p>510595378</text:p>
          </table:table-cell>
          <table:table-cell office:value-type="float" office:value="701561461.303978" calcext:value-type="float">
            <text:p>701561461.303978</text:p>
          </table:table-cell>
          <table:table-cell/>
          <table:table-cell office:value-type="string" calcext:value-type="string">
            <text:p>2022-03-26T10:11:01.3039779Z</text:p>
          </table:table-cell>
          <table:table-cell office:value-type="string" calcext:value-type="string">
            <text:p>2022-03-26-10:12:10.4879779</text:p>
          </table:table-cell>
          <table:table-cell table:number-columns-repeated="2"/>
        </table:table-row>
        <table:table-row table:style-name="ro1">
          <table:table-cell office:value-type="float" office:value="510703365" calcext:value-type="float">
            <text:p>510703365</text:p>
          </table:table-cell>
          <table:table-cell office:value-type="float" office:value="701669448.305173" calcext:value-type="float">
            <text:p>701669448.305173</text:p>
          </table:table-cell>
          <table:table-cell/>
          <table:table-cell office:value-type="string" calcext:value-type="string">
            <text:p>2022-03-27T16:10:48.3051730Z</text:p>
          </table:table-cell>
          <table:table-cell office:value-type="string" calcext:value-type="string">
            <text:p>2022-03-27-16:11:57.4891730</text:p>
          </table:table-cell>
          <table:table-cell table:number-columns-repeated="2"/>
        </table:table-row>
        <table:table-row table:style-name="ro1">
          <table:table-cell office:value-type="float" office:value="510764573" calcext:value-type="float">
            <text:p>510764573</text:p>
          </table:table-cell>
          <table:table-cell office:value-type="float" office:value="701730656.305837" calcext:value-type="float">
            <text:p>701730656.305837</text:p>
          </table:table-cell>
          <table:table-cell/>
          <table:table-cell office:value-type="string" calcext:value-type="string">
            <text:p>2022-03-28T09:10:56.3058370Z</text:p>
          </table:table-cell>
          <table:table-cell office:value-type="string" calcext:value-type="string">
            <text:p>2022-03-28-09:12:05.4898370</text:p>
          </table:table-cell>
          <table:table-cell table:number-columns-repeated="2"/>
        </table:table-row>
        <table:table-row table:style-name="ro1">
          <table:table-cell office:value-type="float" office:value="510814966" calcext:value-type="float">
            <text:p>510814966</text:p>
          </table:table-cell>
          <table:table-cell office:value-type="float" office:value="701781049.306385" calcext:value-type="float">
            <text:p>701781049.306385</text:p>
          </table:table-cell>
          <table:table-cell/>
          <table:table-cell office:value-type="string" calcext:value-type="string">
            <text:p>2022-03-28T23:10:49.3063850Z</text:p>
          </table:table-cell>
          <table:table-cell office:value-type="string" calcext:value-type="string">
            <text:p>2022-03-28-23:11:58.4903850</text:p>
          </table:table-cell>
          <table:table-cell table:number-columns-repeated="2"/>
        </table:table-row>
        <table:table-row table:style-name="ro1">
          <table:table-cell office:value-type="float" office:value="510955377" calcext:value-type="float">
            <text:p>510955377</text:p>
          </table:table-cell>
          <table:table-cell office:value-type="float" office:value="701921460.307957" calcext:value-type="float">
            <text:p>701921460.307957</text:p>
          </table:table-cell>
          <table:table-cell/>
          <table:table-cell office:value-type="string" calcext:value-type="string">
            <text:p>2022-03-30T14:11:00.3079569Z</text:p>
          </table:table-cell>
          <table:table-cell office:value-type="string" calcext:value-type="string">
            <text:p>2022-03-30-14:12:09.4919569</text:p>
          </table:table-cell>
          <table:table-cell table:number-columns-repeated="2"/>
        </table:table-row>
        <table:table-row table:style-name="ro1">
          <table:table-cell office:value-type="float" office:value="510984170" calcext:value-type="float">
            <text:p>510984170</text:p>
          </table:table-cell>
          <table:table-cell office:value-type="float" office:value="701950253.308256" calcext:value-type="float">
            <text:p>701950253.308256</text:p>
          </table:table-cell>
          <table:table-cell/>
          <table:table-cell office:value-type="string" calcext:value-type="string">
            <text:p>2022-03-30T22:10:53.3082560Z</text:p>
          </table:table-cell>
          <table:table-cell office:value-type="string" calcext:value-type="string">
            <text:p>2022-03-30-22:12:02.4922560</text:p>
          </table:table-cell>
          <table:table-cell table:number-columns-repeated="2"/>
        </table:table-row>
        <table:table-row table:style-name="ro1">
          <table:table-cell office:value-type="float" office:value="511117383" calcext:value-type="float">
            <text:p>511117383</text:p>
          </table:table-cell>
          <table:table-cell office:value-type="float" office:value="702083466.309726" calcext:value-type="float">
            <text:p>702083466.309726</text:p>
          </table:table-cell>
          <table:table-cell/>
          <table:table-cell office:value-type="string" calcext:value-type="string">
            <text:p>2022-04-01T11:11:06.3097259Z</text:p>
          </table:table-cell>
          <table:table-cell office:value-type="string" calcext:value-type="string">
            <text:p>2022-04-01-11:12:15.4937260</text:p>
          </table:table-cell>
          <table:table-cell table:number-columns-repeated="2"/>
        </table:table-row>
        <table:table-row table:style-name="ro1">
          <table:table-cell office:value-type="float" office:value="511221795" calcext:value-type="float">
            <text:p>511221795</text:p>
          </table:table-cell>
          <table:table-cell office:value-type="float" office:value="702187878.310921" calcext:value-type="float">
            <text:p>702187878.310921</text:p>
          </table:table-cell>
          <table:table-cell/>
          <table:table-cell office:value-type="string" calcext:value-type="string">
            <text:p>2022-04-02T16:11:18.3109209Z</text:p>
          </table:table-cell>
          <table:table-cell office:value-type="string" calcext:value-type="string">
            <text:p>2022-04-02-16:12:27.4949209</text:p>
          </table:table-cell>
          <table:table-cell table:number-columns-repeated="2"/>
        </table:table-row>
        <table:table-row table:style-name="ro1">
          <table:table-cell office:value-type="float" office:value="511286608" calcext:value-type="float">
            <text:p>511286608</text:p>
          </table:table-cell>
          <table:table-cell office:value-type="float" office:value="702252691.311641" calcext:value-type="float">
            <text:p>702252691.311641</text:p>
          </table:table-cell>
          <table:table-cell/>
          <table:table-cell office:value-type="string" calcext:value-type="string">
            <text:p>2022-04-03T10:11:31.3116409Z</text:p>
          </table:table-cell>
          <table:table-cell office:value-type="string" calcext:value-type="string">
            <text:p>2022-04-03-10:12:40.4956409</text:p>
          </table:table-cell>
          <table:table-cell table:number-columns-repeated="2"/>
        </table:table-row>
        <table:table-row table:style-name="ro1">
          <table:table-cell office:value-type="float" office:value="511387400" calcext:value-type="float">
            <text:p>511387400</text:p>
          </table:table-cell>
          <table:table-cell office:value-type="float" office:value="702353483.312765" calcext:value-type="float">
            <text:p>702353483.312765</text:p>
          </table:table-cell>
          <table:table-cell/>
          <table:table-cell office:value-type="string" calcext:value-type="string">
            <text:p>2022-04-04T14:11:23.3127650Z</text:p>
          </table:table-cell>
          <table:table-cell office:value-type="string" calcext:value-type="string">
            <text:p>2022-04-04-14:12:32.4967650</text:p>
          </table:table-cell>
          <table:table-cell table:number-columns-repeated="2"/>
        </table:table-row>
        <table:table-row table:style-name="ro1">
          <table:table-cell office:value-type="float" office:value="511423401" calcext:value-type="float">
            <text:p>511423401</text:p>
          </table:table-cell>
          <table:table-cell office:value-type="float" office:value="702389484.313153" calcext:value-type="float">
            <text:p>702389484.313153</text:p>
          </table:table-cell>
          <table:table-cell/>
          <table:table-cell office:value-type="string" calcext:value-type="string">
            <text:p>2022-04-05T00:11:24.3131530Z</text:p>
          </table:table-cell>
          <table:table-cell office:value-type="string" calcext:value-type="string">
            <text:p>2022-04-05-00:12:33.4971530</text:p>
          </table:table-cell>
          <table:table-cell table:number-columns-repeated="2"/>
        </table:table-row>
        <table:table-row table:style-name="ro1">
          <table:table-cell office:value-type="float" office:value="511621415" calcext:value-type="float">
            <text:p>511621415</text:p>
          </table:table-cell>
          <table:table-cell office:value-type="float" office:value="702587498.315363" calcext:value-type="float">
            <text:p>702587498.315363</text:p>
          </table:table-cell>
          <table:table-cell/>
          <table:table-cell office:value-type="string" calcext:value-type="string">
            <text:p>2022-04-07T07:11:38.3153629Z</text:p>
          </table:table-cell>
          <table:table-cell office:value-type="string" calcext:value-type="string">
            <text:p>2022-04-07-07:12:47.4993629</text:p>
          </table:table-cell>
          <table:table-cell table:number-columns-repeated="2"/>
        </table:table-row>
        <table:table-row table:style-name="ro1">
          <table:table-cell office:value-type="float" office:value="511707820" calcext:value-type="float">
            <text:p>511707820</text:p>
          </table:table-cell>
          <table:table-cell office:value-type="float" office:value="702673903.316318" calcext:value-type="float">
            <text:p>702673903.316318</text:p>
          </table:table-cell>
          <table:table-cell/>
          <table:table-cell office:value-type="string" calcext:value-type="string">
            <text:p>2022-04-08T07:11:43.3163180Z</text:p>
          </table:table-cell>
          <table:table-cell office:value-type="string" calcext:value-type="string">
            <text:p>2022-04-08-07:12:52.5003180</text:p>
          </table:table-cell>
          <table:table-cell table:number-columns-repeated="2"/>
        </table:table-row>
        <table:table-row table:style-name="ro1">
          <table:table-cell office:value-type="float" office:value="511819422" calcext:value-type="float">
            <text:p>511819422</text:p>
          </table:table-cell>
          <table:table-cell office:value-type="float" office:value="702785505.317581" calcext:value-type="float">
            <text:p>702785505.317581</text:p>
          </table:table-cell>
          <table:table-cell/>
          <table:table-cell office:value-type="string" calcext:value-type="string">
            <text:p>2022-04-09T14:11:45.3175809Z</text:p>
          </table:table-cell>
          <table:table-cell office:value-type="string" calcext:value-type="string">
            <text:p>2022-04-09-14:12:54.5015809</text:p>
          </table:table-cell>
          <table:table-cell table:number-columns-repeated="2"/>
        </table:table-row>
        <table:table-row table:style-name="ro1">
          <table:table-cell office:value-type="float" office:value="511877022" calcext:value-type="float">
            <text:p>511877022</text:p>
          </table:table-cell>
          <table:table-cell office:value-type="float" office:value="702843105.318218" calcext:value-type="float">
            <text:p>702843105.318218</text:p>
          </table:table-cell>
          <table:table-cell/>
          <table:table-cell office:value-type="string" calcext:value-type="string">
            <text:p>2022-04-10T06:11:45.3182179Z</text:p>
          </table:table-cell>
          <table:table-cell office:value-type="string" calcext:value-type="string">
            <text:p>2022-04-10-06:12:54.5022180</text:p>
          </table:table-cell>
          <table:table-cell table:number-columns-repeated="2"/>
        </table:table-row>
        <table:table-row table:style-name="ro1">
          <table:table-cell office:value-type="float" office:value="511992232" calcext:value-type="float">
            <text:p>511992232</text:p>
          </table:table-cell>
          <table:table-cell office:value-type="float" office:value="702958315.319504" calcext:value-type="float">
            <text:p>702958315.319504</text:p>
          </table:table-cell>
          <table:table-cell/>
          <table:table-cell office:value-type="string" calcext:value-type="string">
            <text:p>2022-04-11T14:11:55.3195040Z</text:p>
          </table:table-cell>
          <table:table-cell office:value-type="string" calcext:value-type="string">
            <text:p>2022-04-11-14:13:04.5035040</text:p>
          </table:table-cell>
          <table:table-cell table:number-columns-repeated="2"/>
        </table:table-row>
        <table:table-row table:style-name="ro1">
          <table:table-cell office:value-type="float" office:value="512085846" calcext:value-type="float">
            <text:p>512085846</text:p>
          </table:table-cell>
          <table:table-cell office:value-type="float" office:value="703051929.320571" calcext:value-type="float">
            <text:p>703051929.320571</text:p>
          </table:table-cell>
          <table:table-cell/>
          <table:table-cell office:value-type="string" calcext:value-type="string">
            <text:p>2022-04-12T16:12:09.3205709Z</text:p>
          </table:table-cell>
          <table:table-cell office:value-type="string" calcext:value-type="string">
            <text:p>2022-04-12-16:13:18.5045709</text:p>
          </table:table-cell>
          <table:table-cell table:number-columns-repeated="2"/>
        </table:table-row>
        <table:table-row table:style-name="ro1">
          <table:table-cell office:value-type="float" office:value="512165042" calcext:value-type="float">
            <text:p>512165042</text:p>
          </table:table-cell>
          <table:table-cell office:value-type="float" office:value="703131125.321451" calcext:value-type="float">
            <text:p>703131125.321451</text:p>
          </table:table-cell>
          <table:table-cell/>
          <table:table-cell office:value-type="string" calcext:value-type="string">
            <text:p>2022-04-13T14:12:05.3214509Z</text:p>
          </table:table-cell>
          <table:table-cell office:value-type="string" calcext:value-type="string">
            <text:p>2022-04-13-14:13:14.5054509</text:p>
          </table:table-cell>
          <table:table-cell table:number-columns-repeated="2"/>
        </table:table-row>
        <table:table-row table:style-name="ro1">
          <table:table-cell office:value-type="float" office:value="512193835" calcext:value-type="float">
            <text:p>512193835</text:p>
          </table:table-cell>
          <table:table-cell office:value-type="float" office:value="703159918.321761" calcext:value-type="float">
            <text:p>703159918.321761</text:p>
          </table:table-cell>
          <table:table-cell/>
          <table:table-cell office:value-type="string" calcext:value-type="string">
            <text:p>2022-04-13T22:11:58.3217610Z</text:p>
          </table:table-cell>
          <table:table-cell office:value-type="string" calcext:value-type="string">
            <text:p>2022-04-13-22:13:07.5057610</text:p>
          </table:table-cell>
          <table:table-cell table:number-columns-repeated="2"/>
        </table:table-row>
        <table:table-row table:style-name="ro1">
          <table:table-cell office:value-type="float" office:value="512345061" calcext:value-type="float">
            <text:p>512345061</text:p>
          </table:table-cell>
          <table:table-cell office:value-type="float" office:value="703311144.323465" calcext:value-type="float">
            <text:p>703311144.323465</text:p>
          </table:table-cell>
          <table:table-cell/>
          <table:table-cell office:value-type="string" calcext:value-type="string">
            <text:p>2022-04-15T16:12:24.3234649Z</text:p>
          </table:table-cell>
          <table:table-cell office:value-type="string" calcext:value-type="string">
            <text:p>2022-04-15-16:13:33.5074650</text:p>
          </table:table-cell>
          <table:table-cell table:number-columns-repeated="2"/>
        </table:table-row>
        <table:table-row table:style-name="ro1">
          <table:table-cell office:value-type="float" office:value="512406276" calcext:value-type="float">
            <text:p>512406276</text:p>
          </table:table-cell>
          <table:table-cell office:value-type="float" office:value="703372359.324146" calcext:value-type="float">
            <text:p>703372359.324146</text:p>
          </table:table-cell>
          <table:table-cell/>
          <table:table-cell office:value-type="string" calcext:value-type="string">
            <text:p>2022-04-16T09:12:39.3241460Z</text:p>
          </table:table-cell>
          <table:table-cell office:value-type="string" calcext:value-type="string">
            <text:p>2022-04-16-09:13:48.5081460</text:p>
          </table:table-cell>
          <table:table-cell table:number-columns-repeated="2"/>
        </table:table-row>
        <table:table-row table:style-name="ro1">
          <table:table-cell office:value-type="float" office:value="512489062" calcext:value-type="float">
            <text:p>512489062</text:p>
          </table:table-cell>
          <table:table-cell office:value-type="float" office:value="703455145.325069" calcext:value-type="float">
            <text:p>703455145.325069</text:p>
          </table:table-cell>
          <table:table-cell/>
          <table:table-cell office:value-type="string" calcext:value-type="string">
            <text:p>2022-04-17T08:12:25.3250689Z</text:p>
          </table:table-cell>
          <table:table-cell office:value-type="string" calcext:value-type="string">
            <text:p>2022-04-17-08:13:34.5090689</text:p>
          </table:table-cell>
          <table:table-cell table:number-columns-repeated="2"/>
        </table:table-row>
        <table:table-row table:style-name="ro1">
          <table:table-cell office:value-type="float" office:value="512597064" calcext:value-type="float">
            <text:p>512597064</text:p>
          </table:table-cell>
          <table:table-cell office:value-type="float" office:value="703563147.326292" calcext:value-type="float">
            <text:p>703563147.326292</text:p>
          </table:table-cell>
          <table:table-cell/>
          <table:table-cell office:value-type="string" calcext:value-type="string">
            <text:p>2022-04-18T14:12:27.3262920Z</text:p>
          </table:table-cell>
          <table:table-cell office:value-type="string" calcext:value-type="string">
            <text:p>2022-04-18-14:13:36.5102920</text:p>
          </table:table-cell>
          <table:table-cell table:number-columns-repeated="2"/>
        </table:table-row>
        <table:table-row table:style-name="ro1">
          <table:table-cell office:value-type="float" office:value="512683468" calcext:value-type="float">
            <text:p>512683468</text:p>
          </table:table-cell>
          <table:table-cell office:value-type="float" office:value="703649551.327248" calcext:value-type="float">
            <text:p>703649551.327248</text:p>
          </table:table-cell>
          <table:table-cell/>
          <table:table-cell office:value-type="string" calcext:value-type="string">
            <text:p>2022-04-19T14:12:31.3272479Z</text:p>
          </table:table-cell>
          <table:table-cell office:value-type="string" calcext:value-type="string">
            <text:p>2022-04-19-14:13:40.5112479</text:p>
          </table:table-cell>
          <table:table-cell table:number-columns-repeated="2"/>
        </table:table-row>
        <table:table-row table:style-name="ro1">
          <table:table-cell office:value-type="float" office:value="512715870" calcext:value-type="float">
            <text:p>512715870</text:p>
          </table:table-cell>
          <table:table-cell office:value-type="float" office:value="703681953.327619" calcext:value-type="float">
            <text:p>703681953.327619</text:p>
          </table:table-cell>
          <table:table-cell/>
          <table:table-cell office:value-type="string" calcext:value-type="string">
            <text:p>2022-04-19T23:12:33.3276189Z</text:p>
          </table:table-cell>
          <table:table-cell office:value-type="string" calcext:value-type="string">
            <text:p>2022-04-19-23:13:42.5116189</text:p>
          </table:table-cell>
          <table:table-cell table:number-columns-repeated="2"/>
        </table:table-row>
        <table:table-row table:style-name="ro1">
          <table:table-cell office:value-type="float" office:value="512888672" calcext:value-type="float">
            <text:p>512888672</text:p>
          </table:table-cell>
          <table:table-cell office:value-type="float" office:value="703854755.329549" calcext:value-type="float">
            <text:p>703854755.329549</text:p>
          </table:table-cell>
          <table:table-cell/>
          <table:table-cell office:value-type="string" calcext:value-type="string">
            <text:p>2022-04-21T23:12:35.3295489Z</text:p>
          </table:table-cell>
          <table:table-cell office:value-type="string" calcext:value-type="string">
            <text:p>2022-04-21-23:13:44.5135489</text:p>
          </table:table-cell>
          <table:table-cell table:number-columns-repeated="2"/>
        </table:table-row>
        <table:table-row table:style-name="ro1">
          <table:table-cell office:value-type="float" office:value="512982299" calcext:value-type="float">
            <text:p>512982299</text:p>
          </table:table-cell>
          <table:table-cell office:value-type="float" office:value="703948382.330611" calcext:value-type="float">
            <text:p>703948382.330611</text:p>
          </table:table-cell>
          <table:table-cell/>
          <table:table-cell office:value-type="string" calcext:value-type="string">
            <text:p>2022-04-23T01:13:02.3306109Z</text:p>
          </table:table-cell>
          <table:table-cell office:value-type="string" calcext:value-type="string">
            <text:p>2022-04-23-01:14:11.5146110</text:p>
          </table:table-cell>
          <table:table-cell table:number-columns-repeated="2"/>
        </table:table-row>
        <table:table-row table:style-name="ro1">
          <table:table-cell office:value-type="float" office:value="513111890" calcext:value-type="float">
            <text:p>513111890</text:p>
          </table:table-cell>
          <table:table-cell office:value-type="float" office:value="704077973.332058" calcext:value-type="float">
            <text:p>704077973.332058</text:p>
          </table:table-cell>
          <table:table-cell/>
          <table:table-cell office:value-type="string" calcext:value-type="string">
            <text:p>2022-04-24T13:12:53.3320579Z</text:p>
          </table:table-cell>
          <table:table-cell office:value-type="string" calcext:value-type="string">
            <text:p>2022-04-24-13:14:02.5160579</text:p>
          </table:table-cell>
          <table:table-cell table:number-columns-repeated="2"/>
        </table:table-row>
        <table:table-row table:style-name="ro1">
          <table:table-cell office:value-type="float" office:value="513180301" calcext:value-type="float">
            <text:p>513180301</text:p>
          </table:table-cell>
          <table:table-cell office:value-type="float" office:value="704146384.332834" calcext:value-type="float">
            <text:p>704146384.332834</text:p>
          </table:table-cell>
          <table:table-cell/>
          <table:table-cell office:value-type="string" calcext:value-type="string">
            <text:p>2022-04-25T08:13:04.3328340Z</text:p>
          </table:table-cell>
          <table:table-cell office:value-type="string" calcext:value-type="string">
            <text:p>2022-04-25-08:14:13.5168340</text:p>
          </table:table-cell>
          <table:table-cell table:number-columns-repeated="2"/>
        </table:table-row>
        <table:table-row table:style-name="ro1">
          <table:table-cell office:value-type="float" office:value="513255893" calcext:value-type="float">
            <text:p>513255893</text:p>
          </table:table-cell>
          <table:table-cell office:value-type="float" office:value="704221976.333666" calcext:value-type="float">
            <text:p>704221976.333666</text:p>
          </table:table-cell>
          <table:table-cell/>
          <table:table-cell office:value-type="string" calcext:value-type="string">
            <text:p>2022-04-26T05:12:56.3336659Z</text:p>
          </table:table-cell>
          <table:table-cell office:value-type="string" calcext:value-type="string">
            <text:p>2022-04-26-05:14:05.5176659</text:p>
          </table:table-cell>
          <table:table-cell table:number-columns-repeated="2"/>
        </table:table-row>
        <table:table-row table:style-name="ro1">
          <table:table-cell office:value-type="float" office:value="513374703" calcext:value-type="float">
            <text:p>513374703</text:p>
          </table:table-cell>
          <table:table-cell office:value-type="float" office:value="704340786.335018" calcext:value-type="float">
            <text:p>704340786.335018</text:p>
          </table:table-cell>
          <table:table-cell/>
          <table:table-cell office:value-type="string" calcext:value-type="string">
            <text:p>2022-04-27T14:13:06.3350180Z</text:p>
          </table:table-cell>
          <table:table-cell office:value-type="string" calcext:value-type="string">
            <text:p>2022-04-27-14:14:15.5190180</text:p>
          </table:table-cell>
          <table:table-cell table:number-columns-repeated="2"/>
        </table:table-row>
        <table:table-row table:style-name="ro1">
          <table:table-cell office:value-type="float" office:value="513464710" calcext:value-type="float">
            <text:p>513464710</text:p>
          </table:table-cell>
          <table:table-cell office:value-type="float" office:value="704430793.336033" calcext:value-type="float">
            <text:p>704430793.336033</text:p>
          </table:table-cell>
          <table:table-cell/>
          <table:table-cell office:value-type="string" calcext:value-type="string">
            <text:p>2022-04-28T15:13:13.3360329Z</text:p>
          </table:table-cell>
          <table:table-cell office:value-type="string" calcext:value-type="string">
            <text:p>2022-04-28-15:14:22.5200330</text:p>
          </table:table-cell>
          <table:table-cell table:number-columns-repeated="2"/>
        </table:table-row>
        <table:table-row table:style-name="ro1">
          <table:table-cell office:value-type="float" office:value="513554723" calcext:value-type="float">
            <text:p>513554723</text:p>
          </table:table-cell>
          <table:table-cell office:value-type="float" office:value="704520806.337068" calcext:value-type="float">
            <text:p>704520806.337068</text:p>
          </table:table-cell>
          <table:table-cell/>
          <table:table-cell office:value-type="string" calcext:value-type="string">
            <text:p>2022-04-29T16:13:26.3370679Z</text:p>
          </table:table-cell>
          <table:table-cell office:value-type="string" calcext:value-type="string">
            <text:p>2022-04-29-16:14:35.5210679</text:p>
          </table:table-cell>
          <table:table-cell table:number-columns-repeated="2"/>
        </table:table-row>
        <table:table-row table:style-name="ro1">
          <table:table-cell office:value-type="float" office:value="513641135" calcext:value-type="float">
            <text:p>513641135</text:p>
          </table:table-cell>
          <table:table-cell office:value-type="float" office:value="704607218.338029" calcext:value-type="float">
            <text:p>704607218.338029</text:p>
          </table:table-cell>
          <table:table-cell/>
          <table:table-cell office:value-type="string" calcext:value-type="string">
            <text:p>2022-04-30T16:13:38.3380290Z</text:p>
          </table:table-cell>
          <table:table-cell office:value-type="string" calcext:value-type="string">
            <text:p>2022-04-30-16:14:47.5220290</text:p>
          </table:table-cell>
          <table:table-cell table:number-columns-repeated="2"/>
        </table:table-row>
        <table:table-row table:style-name="ro1">
          <table:table-cell office:value-type="float" office:value="513716719" calcext:value-type="float">
            <text:p>513716719</text:p>
          </table:table-cell>
          <table:table-cell office:value-type="float" office:value="704682802.338868" calcext:value-type="float">
            <text:p>704682802.338868</text:p>
          </table:table-cell>
          <table:table-cell/>
          <table:table-cell office:value-type="string" calcext:value-type="string">
            <text:p>2022-05-01T13:13:22.3388680Z</text:p>
          </table:table-cell>
          <table:table-cell office:value-type="string" calcext:value-type="string">
            <text:p>2022-05-01-13:14:31.5228680</text:p>
          </table:table-cell>
          <table:table-cell table:number-columns-repeated="2"/>
        </table:table-row>
        <table:table-row table:style-name="ro1">
          <table:table-cell office:value-type="float" office:value="513806745" calcext:value-type="float">
            <text:p>513806745</text:p>
          </table:table-cell>
          <table:table-cell office:value-type="float" office:value="704772828.339889" calcext:value-type="float">
            <text:p>704772828.339889</text:p>
          </table:table-cell>
          <table:table-cell/>
          <table:table-cell office:value-type="string" calcext:value-type="string">
            <text:p>2022-05-02T14:13:48.3398889Z</text:p>
          </table:table-cell>
          <table:table-cell office:value-type="string" calcext:value-type="string">
            <text:p>2022-05-02-14:14:57.5238889</text:p>
          </table:table-cell>
          <table:table-cell table:number-columns-repeated="2"/>
        </table:table-row>
        <table:table-row table:style-name="ro1">
          <table:table-cell office:value-type="float" office:value="513835556" calcext:value-type="float">
            <text:p>513835556</text:p>
          </table:table-cell>
          <table:table-cell office:value-type="float" office:value="704801639.340211" calcext:value-type="float">
            <text:p>704801639.340211</text:p>
          </table:table-cell>
          <table:table-cell/>
          <table:table-cell office:value-type="string" calcext:value-type="string">
            <text:p>2022-05-02T22:13:59.3402110Z</text:p>
          </table:table-cell>
          <table:table-cell office:value-type="string" calcext:value-type="string">
            <text:p>2022-05-02-22:15:08.5242110</text:p>
          </table:table-cell>
          <table:table-cell table:number-columns-repeated="2"/>
        </table:table-row>
        <table:table-row table:style-name="ro1">
          <table:table-cell office:value-type="float" office:value="513925573" calcext:value-type="float">
            <text:p>513925573</text:p>
          </table:table-cell>
          <table:table-cell office:value-type="float" office:value="704891656.341223" calcext:value-type="float">
            <text:p>704891656.341223</text:p>
          </table:table-cell>
          <table:table-cell/>
          <table:table-cell office:value-type="string" calcext:value-type="string">
            <text:p>2022-05-03T23:14:16.3412230Z</text:p>
          </table:table-cell>
          <table:table-cell office:value-type="string" calcext:value-type="string">
            <text:p>2022-05-03-23:15:25.5252230</text:p>
          </table:table-cell>
          <table:table-cell table:number-columns-repeated="2"/>
        </table:table-row>
        <table:table-row table:style-name="ro1">
          <table:table-cell office:value-type="float" office:value="514101996" calcext:value-type="float">
            <text:p>514101996</text:p>
          </table:table-cell>
          <table:table-cell office:value-type="float" office:value="705068079.343228" calcext:value-type="float">
            <text:p>705068079.343228</text:p>
          </table:table-cell>
          <table:table-cell/>
          <table:table-cell office:value-type="string" calcext:value-type="string">
            <text:p>2022-05-06T00:14:39.3432279Z</text:p>
          </table:table-cell>
          <table:table-cell office:value-type="string" calcext:value-type="string">
            <text:p>2022-05-06-00:15:48.5272279</text:p>
          </table:table-cell>
          <table:table-cell table:number-columns-repeated="2"/>
        </table:table-row>
        <table:table-row table:style-name="ro1">
          <table:table-cell office:value-type="float" office:value="514246007" calcext:value-type="float">
            <text:p>514246007</text:p>
          </table:table-cell>
          <table:table-cell office:value-type="float" office:value="705212090.344865" calcext:value-type="float">
            <text:p>705212090.344865</text:p>
          </table:table-cell>
          <table:table-cell/>
          <table:table-cell office:value-type="string" calcext:value-type="string">
            <text:p>2022-05-07T16:14:50.3448649Z</text:p>
          </table:table-cell>
          <table:table-cell office:value-type="string" calcext:value-type="string">
            <text:p>2022-05-07-16:15:59.5288649</text:p>
          </table:table-cell>
          <table:table-cell table:number-columns-repeated="2"/>
        </table:table-row>
        <table:table-row table:style-name="ro1">
          <table:table-cell office:value-type="float" office:value="514325174" calcext:value-type="float">
            <text:p>514325174</text:p>
          </table:table-cell>
          <table:table-cell office:value-type="float" office:value="705291257.345748" calcext:value-type="float">
            <text:p>705291257.345748</text:p>
          </table:table-cell>
          <table:table-cell/>
          <table:table-cell office:value-type="string" calcext:value-type="string">
            <text:p>2022-05-08T14:14:17.3457479Z</text:p>
          </table:table-cell>
          <table:table-cell office:value-type="string" calcext:value-type="string">
            <text:p>2022-05-08-14:15:26.5297479</text:p>
          </table:table-cell>
          <table:table-cell table:number-columns-repeated="2"/>
        </table:table-row>
        <table:table-row table:style-name="ro1">
          <table:table-cell office:value-type="float" office:value="514357605" calcext:value-type="float">
            <text:p>514357605</text:p>
          </table:table-cell>
          <table:table-cell office:value-type="float" office:value="705323688.346115" calcext:value-type="float">
            <text:p>705323688.346115</text:p>
          </table:table-cell>
          <table:table-cell/>
          <table:table-cell office:value-type="string" calcext:value-type="string">
            <text:p>2022-05-08T23:14:48.3461149Z</text:p>
          </table:table-cell>
          <table:table-cell office:value-type="string" calcext:value-type="string">
            <text:p>2022-05-08-23:15:57.5301150</text:p>
          </table:table-cell>
          <table:table-cell table:number-columns-repeated="2"/>
        </table:table-row>
        <table:table-row table:style-name="ro1">
          <table:table-cell office:value-type="float" office:value="514447635" calcext:value-type="float">
            <text:p>514447635</text:p>
          </table:table-cell>
          <table:table-cell office:value-type="float" office:value="705413718.347137" calcext:value-type="float">
            <text:p>705413718.347137</text:p>
          </table:table-cell>
          <table:table-cell/>
          <table:table-cell office:value-type="string" calcext:value-type="string">
            <text:p>2022-05-10T00:15:18.3471369Z</text:p>
          </table:table-cell>
          <table:table-cell office:value-type="string" calcext:value-type="string">
            <text:p>2022-05-10-00:16:27.5311369</text:p>
          </table:table-cell>
          <table:table-cell table:number-columns-repeated="2"/>
        </table:table-row>
        <table:table-row table:style-name="ro1">
          <table:table-cell office:value-type="float" office:value="514555595" calcext:value-type="float">
            <text:p>514555595</text:p>
          </table:table-cell>
          <table:table-cell office:value-type="float" office:value="705521678.348346" calcext:value-type="float">
            <text:p>705521678.348346</text:p>
          </table:table-cell>
          <table:table-cell/>
          <table:table-cell office:value-type="string" calcext:value-type="string">
            <text:p>2022-05-11T06:14:38.3483459Z</text:p>
          </table:table-cell>
          <table:table-cell office:value-type="string" calcext:value-type="string">
            <text:p>2022-05-11-06:15:47.5323460</text:p>
          </table:table-cell>
          <table:table-cell table:number-columns-repeated="2"/>
        </table:table-row>
        <table:table-row table:style-name="ro1">
          <table:table-cell office:value-type="float" office:value="514613183" calcext:value-type="float">
            <text:p>514613183</text:p>
          </table:table-cell>
          <table:table-cell office:value-type="float" office:value="705579266.34899" calcext:value-type="float">
            <text:p>705579266.34899</text:p>
          </table:table-cell>
          <table:table-cell/>
          <table:table-cell office:value-type="string" calcext:value-type="string">
            <text:p>2022-05-11T22:14:26.3489899Z</text:p>
          </table:table-cell>
          <table:table-cell office:value-type="string" calcext:value-type="string">
            <text:p>2022-05-11-22:15:35.5329899</text:p>
          </table:table-cell>
          <table:table-cell table:number-columns-repeated="2"/>
        </table:table-row>
        <table:table-row table:style-name="ro1">
          <table:table-cell office:value-type="float" office:value="514735647" calcext:value-type="float">
            <text:p>514735647</text:p>
          </table:table-cell>
          <table:table-cell office:value-type="float" office:value="705701730.350406" calcext:value-type="float">
            <text:p>705701730.350406</text:p>
          </table:table-cell>
          <table:table-cell/>
          <table:table-cell office:value-type="string" calcext:value-type="string">
            <text:p>2022-05-13T08:15:30.3504059Z</text:p>
          </table:table-cell>
          <table:table-cell office:value-type="string" calcext:value-type="string">
            <text:p>2022-05-13-08:16:39.5344059</text:p>
          </table:table-cell>
          <table:table-cell table:number-columns-repeated="2"/>
        </table:table-row>
        <table:table-row table:style-name="ro1">
          <table:table-cell office:value-type="float" office:value="514814804" calcext:value-type="float">
            <text:p>514814804</text:p>
          </table:table-cell>
          <table:table-cell office:value-type="float" office:value="705780887.351291" calcext:value-type="float">
            <text:p>705780887.351291</text:p>
          </table:table-cell>
          <table:table-cell/>
          <table:table-cell office:value-type="string" calcext:value-type="string">
            <text:p>2022-05-14T06:14:47.3512909Z</text:p>
          </table:table-cell>
          <table:table-cell office:value-type="string" calcext:value-type="string">
            <text:p>2022-05-14-06:15:56.5352909</text:p>
          </table:table-cell>
          <table:table-cell table:number-columns-repeated="2"/>
        </table:table-row>
        <table:table-row table:style-name="ro1">
          <table:table-cell office:value-type="float" office:value="514904973" calcext:value-type="float">
            <text:p>514904973</text:p>
          </table:table-cell>
          <table:table-cell office:value-type="float" office:value="705871056.35232" calcext:value-type="float">
            <text:p>705871056.35232</text:p>
          </table:table-cell>
          <table:table-cell/>
          <table:table-cell office:value-type="string" calcext:value-type="string">
            <text:p>2022-05-15T07:17:36.3523199Z</text:p>
          </table:table-cell>
          <table:table-cell office:value-type="string" calcext:value-type="string">
            <text:p>2022-05-15-07:18:45.5363199</text:p>
          </table:table-cell>
          <table:table-cell table:number-columns-repeated="2"/>
        </table:table-row>
        <table:table-row table:style-name="ro1">
          <table:table-cell office:value-type="float" office:value="514984007" calcext:value-type="float">
            <text:p>514984007</text:p>
          </table:table-cell>
          <table:table-cell office:value-type="float" office:value="705950090.353196" calcext:value-type="float">
            <text:p>705950090.353196</text:p>
          </table:table-cell>
          <table:table-cell/>
          <table:table-cell office:value-type="string" calcext:value-type="string">
            <text:p>2022-05-16T05:14:50.3531960Z</text:p>
          </table:table-cell>
          <table:table-cell office:value-type="string" calcext:value-type="string">
            <text:p>2022-05-16-05:15:59.5371960</text:p>
          </table:table-cell>
          <table:table-cell table:number-columns-repeated="2"/>
        </table:table-row>
        <table:table-row table:style-name="ro1">
          <table:table-cell office:value-type="float" office:value="515041592" calcext:value-type="float">
            <text:p>515041592</text:p>
          </table:table-cell>
          <table:table-cell office:value-type="float" office:value="706007675.353843" calcext:value-type="float">
            <text:p>706007675.353843</text:p>
          </table:table-cell>
          <table:table-cell/>
          <table:table-cell office:value-type="string" calcext:value-type="string">
            <text:p>2022-05-16T21:14:35.3538429Z</text:p>
          </table:table-cell>
          <table:table-cell office:value-type="string" calcext:value-type="string">
            <text:p>2022-05-16-21:15:44.5378429</text:p>
          </table:table-cell>
          <table:table-cell table:number-columns-repeated="2"/>
        </table:table-row>
        <table:table-row table:style-name="ro1">
          <table:table-cell office:value-type="float" office:value="515164041" calcext:value-type="float">
            <text:p>515164041</text:p>
          </table:table-cell>
          <table:table-cell office:value-type="float" office:value="706130124.355262" calcext:value-type="float">
            <text:p>706130124.355262</text:p>
          </table:table-cell>
          <table:table-cell/>
          <table:table-cell office:value-type="string" calcext:value-type="string">
            <text:p>2022-05-18T07:15:24.3552620Z</text:p>
          </table:table-cell>
          <table:table-cell office:value-type="string" calcext:value-type="string">
            <text:p>2022-05-18-07:16:33.5392620</text:p>
          </table:table-cell>
          <table:table-cell table:number-columns-repeated="2"/>
        </table:table-row>
        <table:table-row table:style-name="ro1">
          <table:table-cell office:value-type="float" office:value="515214399" calcext:value-type="float">
            <text:p>515214399</text:p>
          </table:table-cell>
          <table:table-cell office:value-type="float" office:value="706180482.355814" calcext:value-type="float">
            <text:p>706180482.355814</text:p>
          </table:table-cell>
          <table:table-cell/>
          <table:table-cell office:value-type="string" calcext:value-type="string">
            <text:p>2022-05-18T21:14:42.3558139Z</text:p>
          </table:table-cell>
          <table:table-cell office:value-type="string" calcext:value-type="string">
            <text:p>2022-05-18-21:15:51.5398139</text:p>
          </table:table-cell>
          <table:table-cell table:number-columns-repeated="2"/>
        </table:table-row>
        <table:table-row table:style-name="ro1">
          <table:table-cell office:value-type="float" office:value="515326015" calcext:value-type="float">
            <text:p>515326015</text:p>
          </table:table-cell>
          <table:table-cell office:value-type="float" office:value="706292098.357078" calcext:value-type="float">
            <text:p>706292098.357078</text:p>
          </table:table-cell>
          <table:table-cell/>
          <table:table-cell office:value-type="string" calcext:value-type="string">
            <text:p>2022-05-20T04:14:58.3570779Z</text:p>
          </table:table-cell>
          <table:table-cell office:value-type="string" calcext:value-type="string">
            <text:p>2022-05-20-04:16:07.5410779</text:p>
          </table:table-cell>
          <table:table-cell table:number-columns-repeated="2"/>
        </table:table-row>
        <table:table-row table:style-name="ro1">
          <table:table-cell office:value-type="float" office:value="515445699" calcext:value-type="float">
            <text:p>515445699</text:p>
          </table:table-cell>
          <table:table-cell office:value-type="float" office:value="706411782.357793" calcext:value-type="float">
            <text:p>706411782.357793</text:p>
          </table:table-cell>
          <table:table-cell/>
          <table:table-cell office:value-type="string" calcext:value-type="string">
            <text:p>2022-05-21T13:29:42.3577929Z</text:p>
          </table:table-cell>
          <table:table-cell office:value-type="string" calcext:value-type="string">
            <text:p>2022-05-21-13:30:51.5417929</text:p>
          </table:table-cell>
          <table:table-cell table:number-columns-repeated="2"/>
        </table:table-row>
        <table:table-row table:style-name="ro1">
          <table:table-cell office:value-type="float" office:value="515509684" calcext:value-type="float">
            <text:p>515509684</text:p>
          </table:table-cell>
          <table:table-cell office:value-type="float" office:value="706475767.359189" calcext:value-type="float">
            <text:p>706475767.359189</text:p>
          </table:table-cell>
          <table:table-cell/>
          <table:table-cell office:value-type="string" calcext:value-type="string">
            <text:p>2022-05-22T07:16:07.3591890Z</text:p>
          </table:table-cell>
          <table:table-cell office:value-type="string" calcext:value-type="string">
            <text:p>2022-05-22-07:17:16.5431890</text:p>
          </table:table-cell>
          <table:table-cell table:number-columns-repeated="2"/>
        </table:table-row>
        <table:table-row table:style-name="ro1">
          <table:table-cell office:value-type="float" office:value="515585217" calcext:value-type="float">
            <text:p>515585217</text:p>
          </table:table-cell>
          <table:table-cell office:value-type="float" office:value="706551300.360027" calcext:value-type="float">
            <text:p>706551300.360027</text:p>
          </table:table-cell>
          <table:table-cell/>
          <table:table-cell office:value-type="string" calcext:value-type="string">
            <text:p>2022-05-23T04:15:00.3600269Z</text:p>
          </table:table-cell>
          <table:table-cell office:value-type="string" calcext:value-type="string">
            <text:p>2022-05-23-04:16:09.5440269</text:p>
          </table:table-cell>
          <table:table-cell table:number-columns-repeated="2"/>
        </table:table-row>
        <table:table-row table:style-name="ro1">
          <table:table-cell office:value-type="float" office:value="515650023" calcext:value-type="float">
            <text:p>515650023</text:p>
          </table:table-cell>
          <table:table-cell office:value-type="float" office:value="706616106.360774" calcext:value-type="float">
            <text:p>706616106.360774</text:p>
          </table:table-cell>
          <table:table-cell/>
          <table:table-cell office:value-type="string" calcext:value-type="string">
            <text:p>2022-05-23T22:15:06.3607740Z</text:p>
          </table:table-cell>
          <table:table-cell office:value-type="string" calcext:value-type="string">
            <text:p>2022-05-23-22:16:15.5447740</text:p>
          </table:table-cell>
          <table:table-cell table:number-columns-repeated="2"/>
        </table:table-row>
        <table:table-row table:style-name="ro1">
          <table:table-cell office:value-type="float" office:value="515736500" calcext:value-type="float">
            <text:p>515736500</text:p>
          </table:table-cell>
          <table:table-cell office:value-type="float" office:value="706702583.361762" calcext:value-type="float">
            <text:p>706702583.361762</text:p>
          </table:table-cell>
          <table:table-cell/>
          <table:table-cell office:value-type="string" calcext:value-type="string">
            <text:p>2022-05-24T22:16:23.3617619Z</text:p>
          </table:table-cell>
          <table:table-cell office:value-type="string" calcext:value-type="string">
            <text:p>2022-05-24-22:17:32.5457619</text:p>
          </table:table-cell>
          <table:table-cell table:number-columns-repeated="2"/>
        </table:table-row>
        <table:table-row table:style-name="ro1">
          <table:table-cell office:value-type="float" office:value="515851707" calcext:value-type="float">
            <text:p>515851707</text:p>
          </table:table-cell>
          <table:table-cell office:value-type="float" office:value="706817790.363075" calcext:value-type="float">
            <text:p>706817790.363075</text:p>
          </table:table-cell>
          <table:table-cell/>
          <table:table-cell office:value-type="string" calcext:value-type="string">
            <text:p>2022-05-26T06:16:30.3630750Z</text:p>
          </table:table-cell>
          <table:table-cell office:value-type="string" calcext:value-type="string">
            <text:p>2022-05-26-06:17:39.5470750</text:p>
          </table:table-cell>
          <table:table-cell table:number-columns-repeated="2"/>
        </table:table-row>
        <table:table-row table:style-name="ro1">
          <table:table-cell office:value-type="float" office:value="515960510" calcext:value-type="float">
            <text:p>515960510</text:p>
          </table:table-cell>
          <table:table-cell office:value-type="float" office:value="706926593.363727" calcext:value-type="float">
            <text:p>706926593.363727</text:p>
          </table:table-cell>
          <table:table-cell/>
          <table:table-cell office:value-type="string" calcext:value-type="string">
            <text:p>2022-05-27T12:29:53.3637269Z</text:p>
          </table:table-cell>
          <table:table-cell office:value-type="string" calcext:value-type="string">
            <text:p>2022-05-27-12:31:02.5477269</text:p>
          </table:table-cell>
          <table:table-cell table:number-columns-repeated="2"/>
        </table:table-row>
        <table:table-row table:style-name="ro1">
          <table:table-cell office:value-type="float" office:value="516049736" calcext:value-type="float">
            <text:p>516049736</text:p>
          </table:table-cell>
          <table:table-cell office:value-type="float" office:value="707015819.365332" calcext:value-type="float">
            <text:p>707015819.365332</text:p>
          </table:table-cell>
          <table:table-cell/>
          <table:table-cell office:value-type="string" calcext:value-type="string">
            <text:p>2022-05-28T13:16:59.3653320Z</text:p>
          </table:table-cell>
          <table:table-cell office:value-type="string" calcext:value-type="string">
            <text:p>2022-05-28-13:18:08.5493320</text:p>
          </table:table-cell>
          <table:table-cell table:number-columns-repeated="2"/>
        </table:table-row>
        <table:table-row table:style-name="ro1">
          <table:table-cell office:value-type="float" office:value="516110911" calcext:value-type="float">
            <text:p>516110911</text:p>
          </table:table-cell>
          <table:table-cell office:value-type="float" office:value="707076994.366025" calcext:value-type="float">
            <text:p>707076994.366025</text:p>
          </table:table-cell>
          <table:table-cell/>
          <table:table-cell office:value-type="string" calcext:value-type="string">
            <text:p>2022-05-29T06:16:34.3660249Z</text:p>
          </table:table-cell>
          <table:table-cell office:value-type="string" calcext:value-type="string">
            <text:p>2022-05-29-06:17:43.5500249</text:p>
          </table:table-cell>
          <table:table-cell table:number-columns-repeated="2"/>
        </table:table-row>
        <table:table-row table:style-name="ro1">
          <table:table-cell office:value-type="float" office:value="516218929" calcext:value-type="float">
            <text:p>516218929</text:p>
          </table:table-cell>
          <table:table-cell office:value-type="float" office:value="707185012.367241" calcext:value-type="float">
            <text:p>707185012.367241</text:p>
          </table:table-cell>
          <table:table-cell/>
          <table:table-cell office:value-type="string" calcext:value-type="string">
            <text:p>2022-05-30T12:16:52.3672410Z</text:p>
          </table:table-cell>
          <table:table-cell office:value-type="string" calcext:value-type="string">
            <text:p>2022-05-30-12:18:01.5512410</text:p>
          </table:table-cell>
          <table:table-cell table:number-columns-repeated="2"/>
        </table:table-row>
        <table:table-row table:style-name="ro1">
          <table:table-cell office:value-type="float" office:value="516287328" calcext:value-type="float">
            <text:p>516287328</text:p>
          </table:table-cell>
          <table:table-cell office:value-type="float" office:value="707253411.368001" calcext:value-type="float">
            <text:p>707253411.368001</text:p>
          </table:table-cell>
          <table:table-cell/>
          <table:table-cell office:value-type="string" calcext:value-type="string">
            <text:p>2022-05-31T07:16:51.3680009Z</text:p>
          </table:table-cell>
          <table:table-cell office:value-type="string" calcext:value-type="string">
            <text:p>2022-05-31-07:18:00.5520009</text:p>
          </table:table-cell>
          <table:table-cell table:number-columns-repeated="2"/>
        </table:table-row>
        <table:table-row table:style-name="ro1">
          <table:table-cell office:value-type="float" office:value="516395247" calcext:value-type="float">
            <text:p>516395247</text:p>
          </table:table-cell>
          <table:table-cell office:value-type="float" office:value="707361330.369257" calcext:value-type="float">
            <text:p>707361330.369257</text:p>
          </table:table-cell>
          <table:table-cell/>
          <table:table-cell office:value-type="string" calcext:value-type="string">
            <text:p>2022-06-01T13:15:30.3692569Z</text:p>
          </table:table-cell>
          <table:table-cell office:value-type="string" calcext:value-type="string">
            <text:p>2022-06-01-13:16:39.5532569</text:p>
          </table:table-cell>
          <table:table-cell table:number-columns-repeated="2"/>
        </table:table-row>
        <table:table-row table:style-name="ro1">
          <table:table-cell office:value-type="float" office:value="539991576" calcext:value-type="float">
            <text:p>539991576</text:p>
          </table:table-cell>
          <table:table-cell office:value-type="float" office:value="730957659.629997" calcext:value-type="float">
            <text:p>730957659.629997</text:p>
          </table:table-cell>
          <table:table-cell/>
          <table:table-cell office:value-type="string" calcext:value-type="string">
            <text:p>2023-03-01T15:47:39.6299970Z</text:p>
          </table:table-cell>
          <table:table-cell office:value-type="string" calcext:value-type="string">
            <text:p>2023-03-01-15:48:48.8139970</text:p>
          </table:table-cell>
          <table:table-cell table:number-columns-repeated="2"/>
        </table:table-row>
        <table:table-row table:style-name="ro1">
          <table:table-cell office:value-type="float" office:value="540057121" calcext:value-type="float">
            <text:p>540057121</text:p>
          </table:table-cell>
          <table:table-cell office:value-type="float" office:value="731023204.630116" calcext:value-type="float">
            <text:p>731023204.630116</text:p>
          </table:table-cell>
          <table:table-cell/>
          <table:table-cell office:value-type="string" calcext:value-type="string">
            <text:p>2023-03-02T10:00:04.6301159Z</text:p>
          </table:table-cell>
          <table:table-cell office:value-type="string" calcext:value-type="string">
            <text:p>2023-03-02-10:01:13.8141160</text:p>
          </table:table-cell>
          <table:table-cell table:number-columns-repeated="2"/>
        </table:table-row>
        <table:table-row table:style-name="ro1">
          <table:table-cell office:value-type="float" office:value="540164401" calcext:value-type="float">
            <text:p>540164401</text:p>
          </table:table-cell>
          <table:table-cell office:value-type="float" office:value="731130484.631914" calcext:value-type="float">
            <text:p>731130484.631914</text:p>
          </table:table-cell>
          <table:table-cell/>
          <table:table-cell office:value-type="string" calcext:value-type="string">
            <text:p>2023-03-03T15:48:04.6319140Z</text:p>
          </table:table-cell>
          <table:table-cell office:value-type="string" calcext:value-type="string">
            <text:p>2023-03-03-15:49:13.8159140</text:p>
          </table:table-cell>
          <table:table-cell table:number-columns-repeated="2"/>
        </table:table-row>
        <table:table-row table:style-name="ro1">
          <table:table-cell office:value-type="float" office:value="540236397" calcext:value-type="float">
            <text:p>540236397</text:p>
          </table:table-cell>
          <table:table-cell office:value-type="float" office:value="731202480.632691" calcext:value-type="float">
            <text:p>731202480.632691</text:p>
          </table:table-cell>
          <table:table-cell/>
          <table:table-cell office:value-type="string" calcext:value-type="string">
            <text:p>2023-03-04T11:48:00.6326910Z</text:p>
          </table:table-cell>
          <table:table-cell office:value-type="string" calcext:value-type="string">
            <text:p>2023-03-04-11:49:09.8166910</text:p>
          </table:table-cell>
          <table:table-cell table:number-columns-repeated="2"/>
        </table:table-row>
        <table:table-row table:style-name="ro1">
          <table:table-cell office:value-type="float" office:value="540322807" calcext:value-type="float">
            <text:p>540322807</text:p>
          </table:table-cell>
          <table:table-cell office:value-type="float" office:value="731288890.633585" calcext:value-type="float">
            <text:p>731288890.633585</text:p>
          </table:table-cell>
          <table:table-cell/>
          <table:table-cell office:value-type="string" calcext:value-type="string">
            <text:p>2023-03-05T11:48:10.6335849Z</text:p>
          </table:table-cell>
          <table:table-cell office:value-type="string" calcext:value-type="string">
            <text:p>2023-03-05-11:49:19.8175849</text:p>
          </table:table-cell>
          <table:table-cell table:number-columns-repeated="2"/>
        </table:table-row>
        <table:table-row table:style-name="ro1">
          <table:table-cell office:value-type="float" office:value="540495478" calcext:value-type="float">
            <text:p>540495478</text:p>
          </table:table-cell>
          <table:table-cell office:value-type="float" office:value="731461561.635516" calcext:value-type="float">
            <text:p>731461561.635516</text:p>
          </table:table-cell>
          <table:table-cell/>
          <table:table-cell office:value-type="string" calcext:value-type="string">
            <text:p>2023-03-07T11:46:01.6355159Z</text:p>
          </table:table-cell>
          <table:table-cell office:value-type="string" calcext:value-type="string">
            <text:p>2023-03-07-11:47:10.8195159</text:p>
          </table:table-cell>
          <table:table-cell table:number-columns-repeated="2"/>
        </table:table-row>
        <table:table-row table:style-name="ro1">
          <table:table-cell office:value-type="float" office:value="540545956" calcext:value-type="float">
            <text:p>540545956</text:p>
          </table:table-cell>
          <table:table-cell office:value-type="float" office:value="731512039.636061" calcext:value-type="float">
            <text:p>731512039.636061</text:p>
          </table:table-cell>
          <table:table-cell/>
          <table:table-cell office:value-type="string" calcext:value-type="string">
            <text:p>2023-03-08T01:47:19.6360609Z</text:p>
          </table:table-cell>
          <table:table-cell office:value-type="string" calcext:value-type="string">
            <text:p>2023-03-08-01:48:28.8200609</text:p>
          </table:table-cell>
          <table:table-cell table:number-columns-repeated="2"/>
        </table:table-row>
        <table:table-row table:style-name="ro1">
          <table:table-cell office:value-type="float" office:value="540653846" calcext:value-type="float">
            <text:p>540653846</text:p>
          </table:table-cell>
          <table:table-cell office:value-type="float" office:value="731619929.637204" calcext:value-type="float">
            <text:p>731619929.637204</text:p>
          </table:table-cell>
          <table:table-cell/>
          <table:table-cell office:value-type="string" calcext:value-type="string">
            <text:p>2023-03-09T07:45:29.6372039Z</text:p>
          </table:table-cell>
          <table:table-cell office:value-type="string" calcext:value-type="string">
            <text:p>2023-03-09-07:46:38.8212039</text:p>
          </table:table-cell>
          <table:table-cell table:number-columns-repeated="2"/>
        </table:table-row>
        <table:table-row table:style-name="ro1">
          <table:table-cell office:value-type="float" office:value="540754690" calcext:value-type="float">
            <text:p>540754690</text:p>
          </table:table-cell>
          <table:table-cell office:value-type="float" office:value="731720773.638325" calcext:value-type="float">
            <text:p>731720773.638325</text:p>
          </table:table-cell>
          <table:table-cell/>
          <table:table-cell office:value-type="string" calcext:value-type="string">
            <text:p>2023-03-10T11:46:13.6383249Z</text:p>
          </table:table-cell>
          <table:table-cell office:value-type="string" calcext:value-type="string">
            <text:p>2023-03-10-11:47:22.8223249</text:p>
          </table:table-cell>
          <table:table-cell table:number-columns-repeated="2"/>
        </table:table-row>
        <table:table-row table:style-name="ro1">
          <table:table-cell office:value-type="float" office:value="540833862" calcext:value-type="float">
            <text:p>540833862</text:p>
          </table:table-cell>
          <table:table-cell office:value-type="float" office:value="731799945.639187" calcext:value-type="float">
            <text:p>731799945.639187</text:p>
          </table:table-cell>
          <table:table-cell/>
          <table:table-cell office:value-type="string" calcext:value-type="string">
            <text:p>2023-03-11T09:45:45.6391869Z</text:p>
          </table:table-cell>
          <table:table-cell office:value-type="string" calcext:value-type="string">
            <text:p>2023-03-11-09:46:54.8231869</text:p>
          </table:table-cell>
          <table:table-cell table:number-columns-repeated="2"/>
        </table:table-row>
        <table:table-row table:style-name="ro1">
          <table:table-cell office:value-type="float" office:value="540941999" calcext:value-type="float">
            <text:p>540941999</text:p>
          </table:table-cell>
          <table:table-cell office:value-type="float" office:value="731908082.640339" calcext:value-type="float">
            <text:p>731908082.640339</text:p>
          </table:table-cell>
          <table:table-cell/>
          <table:table-cell office:value-type="string" calcext:value-type="string">
            <text:p>2023-03-12T15:48:02.6403390Z</text:p>
          </table:table-cell>
          <table:table-cell office:value-type="string" calcext:value-type="string">
            <text:p>2023-03-12-15:49:11.8243390</text:p>
          </table:table-cell>
          <table:table-cell table:number-columns-repeated="2"/>
        </table:table-row>
        <table:table-row table:style-name="ro1">
          <table:table-cell office:value-type="float" office:value="541013901" calcext:value-type="float">
            <text:p>541013901</text:p>
          </table:table-cell>
          <table:table-cell office:value-type="float" office:value="731979984.641141" calcext:value-type="float">
            <text:p>731979984.641141</text:p>
          </table:table-cell>
          <table:table-cell/>
          <table:table-cell office:value-type="string" calcext:value-type="string">
            <text:p>2023-03-13T11:46:24.6411409Z</text:p>
          </table:table-cell>
          <table:table-cell office:value-type="string" calcext:value-type="string">
            <text:p>2023-03-13-11:47:33.8251409</text:p>
          </table:table-cell>
          <table:table-cell table:number-columns-repeated="2"/>
        </table:table-row>
        <table:table-row table:style-name="ro1">
          <table:table-cell office:value-type="float" office:value="541089463" calcext:value-type="float">
            <text:p>541089463</text:p>
          </table:table-cell>
          <table:table-cell office:value-type="float" office:value="732055546.64196" calcext:value-type="float">
            <text:p>732055546.64196</text:p>
          </table:table-cell>
          <table:table-cell/>
          <table:table-cell office:value-type="string" calcext:value-type="string">
            <text:p>2023-03-14T08:45:46.6419600Z</text:p>
          </table:table-cell>
          <table:table-cell office:value-type="string" calcext:value-type="string">
            <text:p>2023-03-14-08:46:55.8259600</text:p>
          </table:table-cell>
          <table:table-cell table:number-columns-repeated="2"/>
        </table:table-row>
        <table:table-row table:style-name="ro1">
          <table:table-cell office:value-type="float" office:value="541186707" calcext:value-type="float">
            <text:p>541186707</text:p>
          </table:table-cell>
          <table:table-cell office:value-type="float" office:value="732152790.64303" calcext:value-type="float">
            <text:p>732152790.64303</text:p>
          </table:table-cell>
          <table:table-cell/>
          <table:table-cell office:value-type="string" calcext:value-type="string">
            <text:p>2023-03-15T11:46:30.6430299Z</text:p>
          </table:table-cell>
          <table:table-cell office:value-type="string" calcext:value-type="string">
            <text:p>2023-03-15-11:47:39.8270299</text:p>
          </table:table-cell>
          <table:table-cell table:number-columns-repeated="2"/>
        </table:table-row>
        <table:table-row table:style-name="ro1">
          <table:table-cell office:value-type="float" office:value="541287599" calcext:value-type="float">
            <text:p>541287599</text:p>
          </table:table-cell>
          <table:table-cell office:value-type="float" office:value="732253682.644118" calcext:value-type="float">
            <text:p>732253682.644118</text:p>
          </table:table-cell>
          <table:table-cell/>
          <table:table-cell office:value-type="string" calcext:value-type="string">
            <text:p>2023-03-16T15:48:02.6441179Z</text:p>
          </table:table-cell>
          <table:table-cell office:value-type="string" calcext:value-type="string">
            <text:p>2023-03-16-15:49:11.8281179</text:p>
          </table:table-cell>
          <table:table-cell table:number-columns-repeated="2"/>
        </table:table-row>
        <table:table-row table:style-name="ro1">
          <table:table-cell office:value-type="float" office:value="541355926" calcext:value-type="float">
            <text:p>541355926</text:p>
          </table:table-cell>
          <table:table-cell office:value-type="float" office:value="732322009.644875" calcext:value-type="float">
            <text:p>732322009.644875</text:p>
          </table:table-cell>
          <table:table-cell/>
          <table:table-cell office:value-type="string" calcext:value-type="string">
            <text:p>2023-03-17T10:46:49.6448749Z</text:p>
          </table:table-cell>
          <table:table-cell office:value-type="string" calcext:value-type="string">
            <text:p>2023-03-17-10:47:58.8288749</text:p>
          </table:table-cell>
          <table:table-cell table:number-columns-repeated="2"/>
        </table:table-row>
        <table:table-row table:style-name="ro1">
          <table:table-cell office:value-type="float" office:value="541402806" calcext:value-type="float">
            <text:p>541402806</text:p>
          </table:table-cell>
          <table:table-cell office:value-type="float" office:value="732368889.645348" calcext:value-type="float">
            <text:p>732368889.645348</text:p>
          </table:table-cell>
          <table:table-cell/>
          <table:table-cell office:value-type="string" calcext:value-type="string">
            <text:p>2023-03-17T23:48:09.6453479Z</text:p>
          </table:table-cell>
          <table:table-cell office:value-type="string" calcext:value-type="string">
            <text:p>2023-03-17-23:49:18.8293479</text:p>
          </table:table-cell>
          <table:table-cell table:number-columns-repeated="2"/>
        </table:table-row>
        <table:table-row table:style-name="ro1">
          <table:table-cell office:value-type="float" office:value="541514286" calcext:value-type="float">
            <text:p>541514286</text:p>
          </table:table-cell>
          <table:table-cell office:value-type="float" office:value="732480369.646579" calcext:value-type="float">
            <text:p>732480369.646579</text:p>
          </table:table-cell>
          <table:table-cell/>
          <table:table-cell office:value-type="string" calcext:value-type="string">
            <text:p>2023-03-19T06:46:09.6465790Z</text:p>
          </table:table-cell>
          <table:table-cell office:value-type="string" calcext:value-type="string">
            <text:p>2023-03-19-06:47:18.8305790</text:p>
          </table:table-cell>
          <table:table-cell table:number-columns-repeated="2"/>
        </table:table-row>
        <table:table-row table:style-name="ro1">
          <table:table-cell office:value-type="float" office:value="541607888" calcext:value-type="float">
            <text:p>541607888</text:p>
          </table:table-cell>
          <table:table-cell office:value-type="float" office:value="732573971.647606" calcext:value-type="float">
            <text:p>732573971.647606</text:p>
          </table:table-cell>
          <table:table-cell/>
          <table:table-cell office:value-type="string" calcext:value-type="string">
            <text:p>2023-03-20T08:46:11.6476060Z</text:p>
          </table:table-cell>
          <table:table-cell office:value-type="string" calcext:value-type="string">
            <text:p>2023-03-20-08:47:20.8316060</text:p>
          </table:table-cell>
          <table:table-cell table:number-columns-repeated="2"/>
        </table:table-row>
        <table:table-row table:style-name="ro1">
          <table:table-cell office:value-type="float" office:value="541806026" calcext:value-type="float">
            <text:p>541806026</text:p>
          </table:table-cell>
          <table:table-cell office:value-type="float" office:value="732772109.649768" calcext:value-type="float">
            <text:p>732772109.649768</text:p>
          </table:table-cell>
          <table:table-cell/>
          <table:table-cell office:value-type="string" calcext:value-type="string">
            <text:p>2023-03-22T15:48:29.6497679Z</text:p>
          </table:table-cell>
          <table:table-cell office:value-type="string" calcext:value-type="string">
            <text:p>2023-03-22-15:49:38.8337680</text:p>
          </table:table-cell>
          <table:table-cell table:number-columns-repeated="2"/>
        </table:table-row>
        <table:table-row table:style-name="ro1">
          <table:table-cell office:value-type="float" office:value="541874350" calcext:value-type="float">
            <text:p>541874350</text:p>
          </table:table-cell>
          <table:table-cell office:value-type="float" office:value="732840433.650524" calcext:value-type="float">
            <text:p>732840433.650524</text:p>
          </table:table-cell>
          <table:table-cell/>
          <table:table-cell office:value-type="string" calcext:value-type="string">
            <text:p>2023-03-23T10:47:13.6505240Z</text:p>
          </table:table-cell>
          <table:table-cell office:value-type="string" calcext:value-type="string">
            <text:p>2023-03-23-10:48:22.8345240</text:p>
          </table:table-cell>
          <table:table-cell table:number-columns-repeated="2"/>
        </table:table-row>
        <table:table-row table:style-name="ro1">
          <table:table-cell office:value-type="float" office:value="541960744" calcext:value-type="float">
            <text:p>541960744</text:p>
          </table:table-cell>
          <table:table-cell office:value-type="float" office:value="732926827.651474" calcext:value-type="float">
            <text:p>732926827.651474</text:p>
          </table:table-cell>
          <table:table-cell/>
          <table:table-cell office:value-type="string" calcext:value-type="string">
            <text:p>2023-03-24T10:47:07.6514739Z</text:p>
          </table:table-cell>
          <table:table-cell office:value-type="string" calcext:value-type="string">
            <text:p>2023-03-24-10:48:16.8354740</text:p>
          </table:table-cell>
          <table:table-cell table:number-columns-repeated="2"/>
        </table:table-row>
        <table:table-row table:style-name="ro1">
          <table:table-cell office:value-type="float" office:value="542011108" calcext:value-type="float">
            <text:p>542011108</text:p>
          </table:table-cell>
          <table:table-cell office:value-type="float" office:value="732977191.652013" calcext:value-type="float">
            <text:p>732977191.652013</text:p>
          </table:table-cell>
          <table:table-cell/>
          <table:table-cell office:value-type="string" calcext:value-type="string">
            <text:p>2023-03-25T00:46:31.6520129Z</text:p>
          </table:table-cell>
          <table:table-cell office:value-type="string" calcext:value-type="string">
            <text:p>2023-03-25-00:47:40.8360129</text:p>
          </table:table-cell>
          <table:table-cell table:number-columns-repeated="2"/>
        </table:table-row>
        <table:table-row table:style-name="ro1">
          <table:table-cell office:value-type="float" office:value="542122714" calcext:value-type="float">
            <text:p>542122714</text:p>
          </table:table-cell>
          <table:table-cell office:value-type="float" office:value="733088797.653239" calcext:value-type="float">
            <text:p>733088797.653239</text:p>
          </table:table-cell>
          <table:table-cell/>
          <table:table-cell office:value-type="string" calcext:value-type="string">
            <text:p>2023-03-26T07:46:37.6532390Z</text:p>
          </table:table-cell>
          <table:table-cell office:value-type="string" calcext:value-type="string">
            <text:p>2023-03-26-07:47:46.8372390</text:p>
          </table:table-cell>
          <table:table-cell table:number-columns-repeated="2"/>
        </table:table-row>
        <table:table-row table:style-name="ro1">
          <table:table-cell office:value-type="float" office:value="542306368" calcext:value-type="float">
            <text:p>542306368</text:p>
          </table:table-cell>
          <table:table-cell office:value-type="float" office:value="733272451.655264" calcext:value-type="float">
            <text:p>733272451.655264</text:p>
          </table:table-cell>
          <table:table-cell/>
          <table:table-cell office:value-type="string" calcext:value-type="string">
            <text:p>2023-03-28T10:47:31.6552640Z</text:p>
          </table:table-cell>
          <table:table-cell office:value-type="string" calcext:value-type="string">
            <text:p>2023-03-28-10:48:40.8392640</text:p>
          </table:table-cell>
          <table:table-cell table:number-columns-repeated="2"/>
        </table:table-row>
        <table:table-row table:style-name="ro1">
          <table:table-cell office:value-type="float" office:value="542360343" calcext:value-type="float">
            <text:p>542360343</text:p>
          </table:table-cell>
          <table:table-cell office:value-type="float" office:value="733326426.655844" calcext:value-type="float">
            <text:p>733326426.655844</text:p>
          </table:table-cell>
          <table:table-cell/>
          <table:table-cell office:value-type="string" calcext:value-type="string">
            <text:p>2023-03-29T01:47:06.6558439Z</text:p>
          </table:table-cell>
          <table:table-cell office:value-type="string" calcext:value-type="string">
            <text:p>2023-03-29-01:48:15.8398439</text:p>
          </table:table-cell>
          <table:table-cell table:number-columns-repeated="2"/>
        </table:table-row>
        <table:table-row table:style-name="ro1">
          <table:table-cell office:value-type="float" office:value="542464729" calcext:value-type="float">
            <text:p>542464729</text:p>
          </table:table-cell>
          <table:table-cell office:value-type="float" office:value="733430812.656982" calcext:value-type="float">
            <text:p>733430812.656982</text:p>
          </table:table-cell>
          <table:table-cell/>
          <table:table-cell office:value-type="string" calcext:value-type="string">
            <text:p>2023-03-30T06:46:52.6569819Z</text:p>
          </table:table-cell>
          <table:table-cell office:value-type="string" calcext:value-type="string">
            <text:p>2023-03-30-06:48:01.8409819</text:p>
          </table:table-cell>
          <table:table-cell table:number-columns-repeated="2"/>
        </table:table-row>
        <table:table-row table:style-name="ro1">
          <table:table-cell office:value-type="float" office:value="542583664" calcext:value-type="float">
            <text:p>542583664</text:p>
          </table:table-cell>
          <table:table-cell office:value-type="float" office:value="733549747.658268" calcext:value-type="float">
            <text:p>733549747.658268</text:p>
          </table:table-cell>
          <table:table-cell/>
          <table:table-cell office:value-type="string" calcext:value-type="string">
            <text:p>2023-03-31T15:49:07.6582679Z</text:p>
          </table:table-cell>
          <table:table-cell office:value-type="string" calcext:value-type="string">
            <text:p>2023-03-31-15:50:16.8422679</text:p>
          </table:table-cell>
          <table:table-cell table:number-columns-repeated="2"/>
        </table:table-row>
        <table:table-row table:style-name="ro1">
          <table:table-cell office:value-type="float" office:value="542648385" calcext:value-type="float">
            <text:p>542648385</text:p>
          </table:table-cell>
          <table:table-cell office:value-type="float" office:value="733614468.659014" calcext:value-type="float">
            <text:p>733614468.659014</text:p>
          </table:table-cell>
          <table:table-cell/>
          <table:table-cell office:value-type="string" calcext:value-type="string">
            <text:p>2023-04-01T09:47:48.6590139Z</text:p>
          </table:table-cell>
          <table:table-cell office:value-type="string" calcext:value-type="string">
            <text:p>2023-04-01-09:48:57.8430140</text:p>
          </table:table-cell>
          <table:table-cell table:number-columns-repeated="2"/>
        </table:table-row>
        <table:table-row table:style-name="ro1">
          <table:table-cell office:value-type="float" office:value="542723944" calcext:value-type="float">
            <text:p>542723944</text:p>
          </table:table-cell>
          <table:table-cell office:value-type="float" office:value="733690027.659813" calcext:value-type="float">
            <text:p>733690027.659813</text:p>
          </table:table-cell>
          <table:table-cell/>
          <table:table-cell office:value-type="string" calcext:value-type="string">
            <text:p>2023-04-02T06:47:07.6598129Z</text:p>
          </table:table-cell>
          <table:table-cell office:value-type="string" calcext:value-type="string">
            <text:p>2023-04-02-06:48:16.8438129</text:p>
          </table:table-cell>
          <table:table-cell table:number-columns-repeated="2"/>
        </table:table-row>
        <table:table-row table:style-name="ro1">
          <table:table-cell office:value-type="float" office:value="542821191" calcext:value-type="float">
            <text:p>542821191</text:p>
          </table:table-cell>
          <table:table-cell office:value-type="float" office:value="733787274.660908" calcext:value-type="float">
            <text:p>733787274.660908</text:p>
          </table:table-cell>
          <table:table-cell/>
          <table:table-cell office:value-type="string" calcext:value-type="string">
            <text:p>2023-04-03T09:47:54.6609079Z</text:p>
          </table:table-cell>
          <table:table-cell office:value-type="string" calcext:value-type="string">
            <text:p>2023-04-03-09:49:03.8449079</text:p>
          </table:table-cell>
          <table:table-cell table:number-columns-repeated="2"/>
        </table:table-row>
        <table:table-row table:style-name="ro1">
          <table:table-cell office:value-type="float" office:value="542893148" calcext:value-type="float">
            <text:p>542893148</text:p>
          </table:table-cell>
          <table:table-cell office:value-type="float" office:value="733859231.661673" calcext:value-type="float">
            <text:p>733859231.661673</text:p>
          </table:table-cell>
          <table:table-cell/>
          <table:table-cell office:value-type="string" calcext:value-type="string">
            <text:p>2023-04-04T05:47:11.6616729Z</text:p>
          </table:table-cell>
          <table:table-cell office:value-type="string" calcext:value-type="string">
            <text:p>2023-04-04-05:48:20.8456729</text:p>
          </table:table-cell>
          <table:table-cell table:number-columns-repeated="2"/>
        </table:table-row>
        <table:table-row table:style-name="ro1">
          <table:table-cell office:value-type="float" office:value="542983160" calcext:value-type="float">
            <text:p>542983160</text:p>
          </table:table-cell>
          <table:table-cell office:value-type="float" office:value="733949243.662666" calcext:value-type="float">
            <text:p>733949243.662666</text:p>
          </table:table-cell>
          <table:table-cell/>
          <table:table-cell office:value-type="string" calcext:value-type="string">
            <text:p>2023-04-05T06:47:23.6626659Z</text:p>
          </table:table-cell>
          <table:table-cell office:value-type="string" calcext:value-type="string">
            <text:p>2023-04-05-06:48:32.8466659</text:p>
          </table:table-cell>
          <table:table-cell table:number-columns-repeated="2"/>
        </table:table-row>
        <table:table-row table:style-name="ro1">
          <table:table-cell office:value-type="float" office:value="543069564" calcext:value-type="float">
            <text:p>543069564</text:p>
          </table:table-cell>
          <table:table-cell office:value-type="float" office:value="734035647.663632" calcext:value-type="float">
            <text:p>734035647.663632</text:p>
          </table:table-cell>
          <table:table-cell/>
          <table:table-cell office:value-type="string" calcext:value-type="string">
            <text:p>2023-04-06T06:47:27.6636320Z</text:p>
          </table:table-cell>
          <table:table-cell office:value-type="string" calcext:value-type="string">
            <text:p>2023-04-06-06:48:36.8476320</text:p>
          </table:table-cell>
          <table:table-cell table:number-columns-repeated="2"/>
        </table:table-row>
        <table:table-row table:style-name="ro1">
          <table:table-cell office:value-type="float" office:value="543249583" calcext:value-type="float">
            <text:p>543249583</text:p>
          </table:table-cell>
          <table:table-cell office:value-type="float" office:value="734215666.665615" calcext:value-type="float">
            <text:p>734215666.665615</text:p>
          </table:table-cell>
          <table:table-cell/>
          <table:table-cell office:value-type="string" calcext:value-type="string">
            <text:p>2023-04-08T08:47:46.6656149Z</text:p>
          </table:table-cell>
          <table:table-cell office:value-type="string" calcext:value-type="string">
            <text:p>2023-04-08-08:48:55.8496149</text:p>
          </table:table-cell>
          <table:table-cell table:number-columns-repeated="2"/>
        </table:table-row>
        <table:table-row table:style-name="ro1">
          <table:table-cell office:value-type="float" office:value="543357728" calcext:value-type="float">
            <text:p>543357728</text:p>
          </table:table-cell>
          <table:table-cell office:value-type="float" office:value="734323811.666766" calcext:value-type="float">
            <text:p>734323811.666766</text:p>
          </table:table-cell>
          <table:table-cell/>
          <table:table-cell office:value-type="string" calcext:value-type="string">
            <text:p>2023-04-09T14:50:11.6667659Z</text:p>
          </table:table-cell>
          <table:table-cell office:value-type="string" calcext:value-type="string">
            <text:p>2023-04-09-14:51:20.8507659</text:p>
          </table:table-cell>
          <table:table-cell table:number-columns-repeated="2"/>
        </table:table-row>
        <table:table-row table:style-name="ro1">
          <table:table-cell office:value-type="float" office:value="543415184" calcext:value-type="float">
            <text:p>543415184</text:p>
          </table:table-cell>
          <table:table-cell office:value-type="float" office:value="734381267.667441" calcext:value-type="float">
            <text:p>734381267.667441</text:p>
          </table:table-cell>
          <table:table-cell/>
          <table:table-cell office:value-type="string" calcext:value-type="string">
            <text:p>2023-04-10T06:47:47.6674410Z</text:p>
          </table:table-cell>
          <table:table-cell office:value-type="string" calcext:value-type="string">
            <text:p>2023-04-10-06:48:56.8514410</text:p>
          </table:table-cell>
          <table:table-cell table:number-columns-repeated="2"/>
        </table:table-row>
        <table:table-row table:style-name="ro1">
          <table:table-cell office:value-type="float" office:value="543512427" calcext:value-type="float">
            <text:p>543512427</text:p>
          </table:table-cell>
          <table:table-cell office:value-type="float" office:value="734478510.66852" calcext:value-type="float">
            <text:p>734478510.66852</text:p>
          </table:table-cell>
          <table:table-cell/>
          <table:table-cell office:value-type="string" calcext:value-type="string">
            <text:p>2023-04-11T09:48:30.6685199Z</text:p>
          </table:table-cell>
          <table:table-cell office:value-type="string" calcext:value-type="string">
            <text:p>2023-04-11-09:49:39.8525199</text:p>
          </table:table-cell>
          <table:table-cell table:number-columns-repeated="2"/>
        </table:table-row>
        <table:table-row table:style-name="ro1">
          <table:table-cell office:value-type="float" office:value="543566397" calcext:value-type="float">
            <text:p>543566397</text:p>
          </table:table-cell>
          <table:table-cell office:value-type="float" office:value="734532480.669101" calcext:value-type="float">
            <text:p>734532480.669101</text:p>
          </table:table-cell>
          <table:table-cell/>
          <table:table-cell office:value-type="string" calcext:value-type="string">
            <text:p>2023-04-12T00:48:00.6691009Z</text:p>
          </table:table-cell>
          <table:table-cell office:value-type="string" calcext:value-type="string">
            <text:p>2023-04-12-00:49:09.8531010</text:p>
          </table:table-cell>
          <table:table-cell table:number-columns-repeated="2"/>
        </table:table-row>
        <table:table-row table:style-name="ro1">
          <table:table-cell office:value-type="float" office:value="543685230" calcext:value-type="float">
            <text:p>543685230</text:p>
          </table:table-cell>
          <table:table-cell office:value-type="float" office:value="734651313.670427" calcext:value-type="float">
            <text:p>734651313.670427</text:p>
          </table:table-cell>
          <table:table-cell/>
          <table:table-cell office:value-type="string" calcext:value-type="string">
            <text:p>2023-04-13T09:48:33.6704269Z</text:p>
          </table:table-cell>
          <table:table-cell office:value-type="string" calcext:value-type="string">
            <text:p>2023-04-13-09:49:42.8544269</text:p>
          </table:table-cell>
          <table:table-cell table:number-columns-repeated="2"/>
        </table:table-row>
        <table:table-row table:style-name="ro1">
          <table:table-cell office:value-type="float" office:value="543764409" calcext:value-type="float">
            <text:p>543764409</text:p>
          </table:table-cell>
          <table:table-cell office:value-type="float" office:value="734730492.671304" calcext:value-type="float">
            <text:p>734730492.671304</text:p>
          </table:table-cell>
          <table:table-cell/>
          <table:table-cell office:value-type="string" calcext:value-type="string">
            <text:p>2023-04-14T07:48:12.6713039Z</text:p>
          </table:table-cell>
          <table:table-cell office:value-type="string" calcext:value-type="string">
            <text:p>2023-04-14-07:49:21.8553040</text:p>
          </table:table-cell>
          <table:table-cell table:number-columns-repeated="2"/>
        </table:table-row>
        <table:table-row table:style-name="ro1">
          <table:table-cell office:value-type="float" office:value="543879739" calcext:value-type="float">
            <text:p>543879739</text:p>
          </table:table-cell>
          <table:table-cell office:value-type="float" office:value="734845822.672547" calcext:value-type="float">
            <text:p>734845822.672547</text:p>
          </table:table-cell>
          <table:table-cell/>
          <table:table-cell office:value-type="string" calcext:value-type="string">
            <text:p>2023-04-15T15:50:22.6725469Z</text:p>
          </table:table-cell>
          <table:table-cell office:value-type="string" calcext:value-type="string">
            <text:p>2023-04-15-15:51:31.8565469</text:p>
          </table:table-cell>
          <table:table-cell table:number-columns-repeated="2"/>
        </table:table-row>
        <table:table-row table:style-name="ro1">
          <table:table-cell office:value-type="float" office:value="543937221" calcext:value-type="float">
            <text:p>543937221</text:p>
          </table:table-cell>
          <table:table-cell office:value-type="float" office:value="734903304.673199" calcext:value-type="float">
            <text:p>734903304.673199</text:p>
          </table:table-cell>
          <table:table-cell/>
          <table:table-cell office:value-type="string" calcext:value-type="string">
            <text:p>2023-04-16T07:48:24.6731989Z</text:p>
          </table:table-cell>
          <table:table-cell office:value-type="string" calcext:value-type="string">
            <text:p>2023-04-16-07:49:33.8571989</text:p>
          </table:table-cell>
          <table:table-cell table:number-columns-repeated="2"/>
        </table:table-row>
        <table:table-row table:style-name="ro1">
          <table:table-cell office:value-type="float" office:value="544027256" calcext:value-type="float">
            <text:p>544027256</text:p>
          </table:table-cell>
          <table:table-cell office:value-type="float" office:value="734993339.674214" calcext:value-type="float">
            <text:p>734993339.674214</text:p>
          </table:table-cell>
          <table:table-cell/>
          <table:table-cell office:value-type="string" calcext:value-type="string">
            <text:p>2023-04-17T08:48:59.6742140Z</text:p>
          </table:table-cell>
          <table:table-cell office:value-type="string" calcext:value-type="string">
            <text:p>2023-04-17-08:50:08.8582140</text:p>
          </table:table-cell>
          <table:table-cell table:number-columns-repeated="2"/>
        </table:table-row>
        <table:table-row table:style-name="ro1">
          <table:table-cell office:value-type="float" office:value="544106414" calcext:value-type="float">
            <text:p>544106414</text:p>
          </table:table-cell>
          <table:table-cell office:value-type="float" office:value="735072497.675067" calcext:value-type="float">
            <text:p>735072497.675067</text:p>
          </table:table-cell>
          <table:table-cell/>
          <table:table-cell office:value-type="string" calcext:value-type="string">
            <text:p>2023-04-18T06:48:17.6750669Z</text:p>
          </table:table-cell>
          <table:table-cell office:value-type="string" calcext:value-type="string">
            <text:p>2023-04-18-06:49:26.8590669</text:p>
          </table:table-cell>
          <table:table-cell table:number-columns-repeated="2"/>
        </table:table-row>
        <table:table-row table:style-name="ro1">
          <table:table-cell office:value-type="float" office:value="544552963" calcext:value-type="float">
            <text:p>544552963</text:p>
          </table:table-cell>
          <table:table-cell office:value-type="float" office:value="735519046.680033" calcext:value-type="float">
            <text:p>735519046.680033</text:p>
          </table:table-cell>
          <table:table-cell/>
          <table:table-cell office:value-type="string" calcext:value-type="string">
            <text:p>2023-04-23T10:50:46.6800329Z</text:p>
          </table:table-cell>
          <table:table-cell office:value-type="string" calcext:value-type="string">
            <text:p>2023-04-23-10:51:55.8640329</text:p>
          </table:table-cell>
          <table:table-cell table:number-columns-repeated="2"/>
        </table:table-row>
        <table:table-row table:style-name="ro1">
          <table:table-cell office:value-type="float" office:value="544646595" calcext:value-type="float">
            <text:p>544646595</text:p>
          </table:table-cell>
          <table:table-cell office:value-type="float" office:value="735612678.681107" calcext:value-type="float">
            <text:p>735612678.681107</text:p>
          </table:table-cell>
          <table:table-cell/>
          <table:table-cell office:value-type="string" calcext:value-type="string">
            <text:p>2023-04-24T12:51:18.6811070Z</text:p>
          </table:table-cell>
          <table:table-cell office:value-type="string" calcext:value-type="string">
            <text:p>2023-04-24-12:52:27.8651070</text:p>
          </table:table-cell>
          <table:table-cell table:number-columns-repeated="2"/>
        </table:table-row>
        <table:table-row table:style-name="ro1">
          <table:table-cell office:value-type="float" office:value="545168616" calcext:value-type="float">
            <text:p>545168616</text:p>
          </table:table-cell>
          <table:table-cell office:value-type="float" office:value="736134699.686882" calcext:value-type="float">
            <text:p>736134699.686882</text:p>
          </table:table-cell>
          <table:table-cell/>
          <table:table-cell office:value-type="string" calcext:value-type="string">
            <text:p>2023-04-30T13:51:39.6868820Z</text:p>
          </table:table-cell>
          <table:table-cell office:value-type="string" calcext:value-type="string">
            <text:p>2023-04-30-13:52:48.8708820</text:p>
          </table:table-cell>
          <table:table-cell table:number-columns-repeated="2"/>
        </table:table-row>
        <table:table-row table:style-name="ro1">
          <table:table-cell office:value-type="float" office:value="545251400" calcext:value-type="float">
            <text:p>545251400</text:p>
          </table:table-cell>
          <table:table-cell office:value-type="float" office:value="736217483.687761" calcext:value-type="float">
            <text:p>736217483.687761</text:p>
          </table:table-cell>
          <table:table-cell/>
          <table:table-cell office:value-type="string" calcext:value-type="string">
            <text:p>2023-05-01T12:51:23.6877609Z</text:p>
          </table:table-cell>
          <table:table-cell office:value-type="string" calcext:value-type="string">
            <text:p>2023-05-01-12:52:32.8717609</text:p>
          </table:table-cell>
          <table:table-cell table:number-columns-repeated="2"/>
        </table:table-row>
        <table:table-row table:style-name="ro1">
          <table:table-cell office:value-type="float" office:value="545755418" calcext:value-type="float">
            <text:p>545755418</text:p>
          </table:table-cell>
          <table:table-cell office:value-type="float" office:value="736721501.693377" calcext:value-type="float">
            <text:p>736721501.693377</text:p>
          </table:table-cell>
          <table:table-cell/>
          <table:table-cell office:value-type="string" calcext:value-type="string">
            <text:p>2023-05-07T08:51:41.6933770Z</text:p>
          </table:table-cell>
          <table:table-cell office:value-type="string" calcext:value-type="string">
            <text:p>2023-05-07-08:52:50.8773770</text:p>
          </table:table-cell>
          <table:table-cell table:number-columns-repeated="2"/>
        </table:table-row>
        <table:table-row table:style-name="ro1">
          <table:table-cell office:value-type="float" office:value="545856242" calcext:value-type="float">
            <text:p>545856242</text:p>
          </table:table-cell>
          <table:table-cell office:value-type="float" office:value="736822325.69456" calcext:value-type="float">
            <text:p>736822325.69456</text:p>
          </table:table-cell>
          <table:table-cell/>
          <table:table-cell office:value-type="string" calcext:value-type="string">
            <text:p>2023-05-08T12:52:05.6945599Z</text:p>
          </table:table-cell>
          <table:table-cell office:value-type="string" calcext:value-type="string">
            <text:p>2023-05-08-12:53:14.8785599</text:p>
          </table:table-cell>
          <table:table-cell table:number-columns-repeated="2"/>
        </table:table-row>
        <table:table-row table:style-name="ro1">
          <table:table-cell office:value-type="float" office:value="546381862" calcext:value-type="float">
            <text:p>546381862</text:p>
          </table:table-cell>
          <table:table-cell office:value-type="float" office:value="737347945.70043" calcext:value-type="float">
            <text:p>737347945.70043</text:p>
          </table:table-cell>
          <table:table-cell/>
          <table:table-cell office:value-type="string" calcext:value-type="string">
            <text:p>2023-05-14T14:52:25.7004300Z</text:p>
          </table:table-cell>
          <table:table-cell office:value-type="string" calcext:value-type="string">
            <text:p>2023-05-14-14:53:34.8844300</text:p>
          </table:table-cell>
          <table:table-cell table:number-columns-repeated="2"/>
        </table:table-row>
        <table:table-row table:style-name="ro1">
          <table:table-cell office:value-type="float" office:value="546464646" calcext:value-type="float">
            <text:p>546464646</text:p>
          </table:table-cell>
          <table:table-cell office:value-type="float" office:value="737430729.701356" calcext:value-type="float">
            <text:p>737430729.701356</text:p>
          </table:table-cell>
          <table:table-cell/>
          <table:table-cell office:value-type="string" calcext:value-type="string">
            <text:p>2023-05-15T13:52:09.7013559Z</text:p>
          </table:table-cell>
          <table:table-cell office:value-type="string" calcext:value-type="string">
            <text:p>2023-05-15-13:53:18.8853559</text:p>
          </table:table-cell>
          <table:table-cell table:number-columns-repeated="2"/>
        </table:table-row>
        <table:table-row table:style-name="ro1">
          <table:table-cell office:value-type="float" office:value="546991438" calcext:value-type="float">
            <text:p>546991438</text:p>
          </table:table-cell>
          <table:table-cell office:value-type="float" office:value="737957521.707215" calcext:value-type="float">
            <text:p>737957521.707215</text:p>
          </table:table-cell>
          <table:table-cell/>
          <table:table-cell office:value-type="string" calcext:value-type="string">
            <text:p>2023-05-21T16:12:01.7072149Z</text:p>
          </table:table-cell>
          <table:table-cell office:value-type="string" calcext:value-type="string">
            <text:p>2023-05-21-16:13:10.8912149</text:p>
          </table:table-cell>
          <table:table-cell table:number-columns-repeated="2"/>
        </table:table-row>
        <table:table-row table:style-name="ro1">
          <table:table-cell office:value-type="float" office:value="547069493" calcext:value-type="float">
            <text:p>547069493</text:p>
          </table:table-cell>
          <table:table-cell office:value-type="float" office:value="738035576.708087" calcext:value-type="float">
            <text:p>738035576.708087</text:p>
          </table:table-cell>
          <table:table-cell/>
          <table:table-cell office:value-type="string" calcext:value-type="string">
            <text:p>2023-05-22T13:52:56.7080869Z</text:p>
          </table:table-cell>
          <table:table-cell office:value-type="string" calcext:value-type="string">
            <text:p>2023-05-22-13:54:05.8920869</text:p>
          </table:table-cell>
          <table:table-cell table:number-columns-repeated="2"/>
        </table:table-row>
        <table:table-row table:style-name="ro1">
          <table:table-cell office:value-type="float" office:value="547681405" calcext:value-type="float">
            <text:p>547681405</text:p>
          </table:table-cell>
          <table:table-cell office:value-type="float" office:value="738647488.714965" calcext:value-type="float">
            <text:p>738647488.714965</text:p>
          </table:table-cell>
          <table:table-cell/>
          <table:table-cell office:value-type="string" calcext:value-type="string">
            <text:p>2023-05-29T15:51:28.7149649Z</text:p>
          </table:table-cell>
          <table:table-cell office:value-type="string" calcext:value-type="string">
            <text:p>2023-05-29-15:52:37.8989650</text:p>
          </table:table-cell>
          <table:table-cell table:number-columns-repeated="2"/>
        </table:table-row>
        <table:table-row table:style-name="ro1">
          <table:table-cell office:value-type="float" office:value="547724550" calcext:value-type="float">
            <text:p>547724550</text:p>
          </table:table-cell>
          <table:table-cell office:value-type="float" office:value="738690633.715477" calcext:value-type="float">
            <text:p>738690633.715477</text:p>
          </table:table-cell>
          <table:table-cell/>
          <table:table-cell office:value-type="string" calcext:value-type="string">
            <text:p>2023-05-30T03:50:33.7154769Z</text:p>
          </table:table-cell>
          <table:table-cell office:value-type="string" calcext:value-type="string">
            <text:p>2023-05-30-03:51:42.8994770</text:p>
          </table:table-cell>
          <table:table-cell table:number-columns-repeated="2"/>
        </table:table-row>
        <table:table-row table:style-name="ro1">
          <table:table-cell office:value-type="float" office:value="547814562" calcext:value-type="float">
            <text:p>547814562</text:p>
          </table:table-cell>
          <table:table-cell office:value-type="float" office:value="738780645.716505" calcext:value-type="float">
            <text:p>738780645.716505</text:p>
          </table:table-cell>
          <table:table-cell/>
          <table:table-cell office:value-type="string" calcext:value-type="string">
            <text:p>2023-05-31T04:50:45.7165049Z</text:p>
          </table:table-cell>
          <table:table-cell office:value-type="string" calcext:value-type="string">
            <text:p>2023-05-31-04:51:54.9005049</text:p>
          </table:table-cell>
          <table:table-cell table:number-columns-repeated="2"/>
        </table:table-row>
        <table:table-row table:style-name="ro1">
          <table:table-cell office:value-type="float" office:value="547875772" calcext:value-type="float">
            <text:p>547875772</text:p>
          </table:table-cell>
          <table:table-cell office:value-type="float" office:value="738841855.717181" calcext:value-type="float">
            <text:p>738841855.717181</text:p>
          </table:table-cell>
          <table:table-cell/>
          <table:table-cell office:value-type="string" calcext:value-type="string">
            <text:p>2023-05-31T21:50:55.7171809Z</text:p>
          </table:table-cell>
          <table:table-cell office:value-type="string" calcext:value-type="string">
            <text:p>2023-05-31-21:52:04.9011809</text:p>
          </table:table-cell>
          <table:table-cell table:number-columns-repeated="2"/>
        </table:table-row>
        <table:table-row table:style-name="ro1">
          <table:table-cell office:value-type="float" office:value="548019779" calcext:value-type="float">
            <text:p>548019779</text:p>
          </table:table-cell>
          <table:table-cell office:value-type="float" office:value="738985862.718808" calcext:value-type="float">
            <text:p>738985862.718808</text:p>
          </table:table-cell>
          <table:table-cell/>
          <table:table-cell office:value-type="string" calcext:value-type="string">
            <text:p>2023-06-02T13:51:02.7188079Z</text:p>
          </table:table-cell>
          <table:table-cell office:value-type="string" calcext:value-type="string">
            <text:p>2023-06-02-13:52:11.9028079</text:p>
          </table:table-cell>
          <table:table-cell table:number-columns-repeated="2"/>
        </table:table-row>
        <table:table-row table:style-name="ro1">
          <table:table-cell office:value-type="float" office:value="548098965" calcext:value-type="float">
            <text:p>548098965</text:p>
          </table:table-cell>
          <table:table-cell office:value-type="float" office:value="739065048.719707" calcext:value-type="float">
            <text:p>739065048.719707</text:p>
          </table:table-cell>
          <table:table-cell/>
          <table:table-cell office:value-type="string" calcext:value-type="string">
            <text:p>2023-06-03T11:50:48.7197070Z</text:p>
          </table:table-cell>
          <table:table-cell office:value-type="string" calcext:value-type="string">
            <text:p>2023-06-03-11:51:57.9037070</text:p>
          </table:table-cell>
          <table:table-cell table:number-columns-repeated="2"/>
        </table:table-row>
        <table:table-row table:style-name="ro1">
          <table:table-cell office:value-type="float" office:value="548196214" calcext:value-type="float">
            <text:p>548196214</text:p>
          </table:table-cell>
          <table:table-cell office:value-type="float" office:value="739162297.720811" calcext:value-type="float">
            <text:p>739162297.720811</text:p>
          </table:table-cell>
          <table:table-cell/>
          <table:table-cell office:value-type="string" calcext:value-type="string">
            <text:p>2023-06-04T14:51:37.7208110Z</text:p>
          </table:table-cell>
          <table:table-cell office:value-type="string" calcext:value-type="string">
            <text:p>2023-06-04-14:52:46.9048110</text:p>
          </table:table-cell>
          <table:table-cell table:number-columns-repeated="2"/>
        </table:table-row>
        <table:table-row table:style-name="ro1">
          <table:table-cell office:value-type="float" office:value="548271764" calcext:value-type="float">
            <text:p>548271764</text:p>
          </table:table-cell>
          <table:table-cell office:value-type="float" office:value="739237847.72164" calcext:value-type="float">
            <text:p>739237847.72164</text:p>
          </table:table-cell>
          <table:table-cell/>
          <table:table-cell office:value-type="string" calcext:value-type="string">
            <text:p>2023-06-05T11:50:47.7216399Z</text:p>
          </table:table-cell>
          <table:table-cell office:value-type="string" calcext:value-type="string">
            <text:p>2023-06-05-11:51:56.9056400</text:p>
          </table:table-cell>
          <table:table-cell table:number-columns-repeated="2"/>
        </table:table-row>
        <table:table-row table:style-name="ro1">
          <table:table-cell office:value-type="float" office:value="548372596" calcext:value-type="float">
            <text:p>548372596</text:p>
          </table:table-cell>
          <table:table-cell office:value-type="float" office:value="739338679.722761" calcext:value-type="float">
            <text:p>739338679.722761</text:p>
          </table:table-cell>
          <table:table-cell/>
          <table:table-cell office:value-type="string" calcext:value-type="string">
            <text:p>2023-06-06T15:51:19.7227610Z</text:p>
          </table:table-cell>
          <table:table-cell office:value-type="string" calcext:value-type="string">
            <text:p>2023-06-06-15:52:28.9067610</text:p>
          </table:table-cell>
          <table:table-cell table:number-columns-repeated="2"/>
        </table:table-row>
        <table:table-row table:style-name="ro1">
          <table:table-cell office:value-type="float" office:value="548433759" calcext:value-type="float">
            <text:p>548433759</text:p>
          </table:table-cell>
          <table:table-cell office:value-type="float" office:value="739399842.723468" calcext:value-type="float">
            <text:p>739399842.723468</text:p>
          </table:table-cell>
          <table:table-cell/>
          <table:table-cell office:value-type="string" calcext:value-type="string">
            <text:p>2023-06-07T08:50:42.7234679Z</text:p>
          </table:table-cell>
          <table:table-cell office:value-type="string" calcext:value-type="string">
            <text:p>2023-06-07-08:51:51.9074679</text:p>
          </table:table-cell>
          <table:table-cell table:number-columns-repeated="2"/>
        </table:table-row>
        <table:table-row table:style-name="ro1">
          <table:table-cell office:value-type="float" office:value="548480581" calcext:value-type="float">
            <text:p>548480581</text:p>
          </table:table-cell>
          <table:table-cell office:value-type="float" office:value="739446664.724005" calcext:value-type="float">
            <text:p>739446664.724005</text:p>
          </table:table-cell>
          <table:table-cell/>
          <table:table-cell office:value-type="string" calcext:value-type="string">
            <text:p>2023-06-07T21:51:04.7240049Z</text:p>
          </table:table-cell>
          <table:table-cell office:value-type="string" calcext:value-type="string">
            <text:p>2023-06-07-21:52:13.9080049</text:p>
          </table:table-cell>
          <table:table-cell table:number-columns-repeated="2"/>
        </table:table-row>
        <table:table-row table:style-name="ro1">
          <table:table-cell office:value-type="float" office:value="548632993" calcext:value-type="float">
            <text:p>548632993</text:p>
          </table:table-cell>
          <table:table-cell office:value-type="float" office:value="739599076.725685" calcext:value-type="float">
            <text:p>739599076.725685</text:p>
          </table:table-cell>
          <table:table-cell/>
          <table:table-cell office:value-type="string" calcext:value-type="string">
            <text:p>2023-06-09T16:11:16.7256850Z</text:p>
          </table:table-cell>
          <table:table-cell office:value-type="string" calcext:value-type="string">
            <text:p>2023-06-09-16:12:25.9096850</text:p>
          </table:table-cell>
          <table:table-cell table:number-columns-repeated="2"/>
        </table:table-row>
        <table:table-row table:style-name="ro1">
          <table:table-cell office:value-type="float" office:value="548671366" calcext:value-type="float">
            <text:p>548671366</text:p>
          </table:table-cell>
          <table:table-cell office:value-type="float" office:value="739637449.726152" calcext:value-type="float">
            <text:p>739637449.726152</text:p>
          </table:table-cell>
          <table:table-cell/>
          <table:table-cell office:value-type="string" calcext:value-type="string">
            <text:p>2023-06-10T02:50:49.7261519Z</text:p>
          </table:table-cell>
          <table:table-cell office:value-type="string" calcext:value-type="string">
            <text:p>2023-06-10-02:51:58.9101519</text:p>
          </table:table-cell>
          <table:table-cell table:number-columns-repeated="2"/>
        </table:table-row>
        <table:table-row table:style-name="ro1">
          <table:table-cell office:value-type="float" office:value="548797402" calcext:value-type="float">
            <text:p>548797402</text:p>
          </table:table-cell>
          <table:table-cell office:value-type="float" office:value="739763485.72758" calcext:value-type="float">
            <text:p>739763485.72758</text:p>
          </table:table-cell>
          <table:table-cell/>
          <table:table-cell office:value-type="string" calcext:value-type="string">
            <text:p>2023-06-11T13:51:25.7275799Z</text:p>
          </table:table-cell>
          <table:table-cell office:value-type="string" calcext:value-type="string">
            <text:p>2023-06-11-13:52:34.9115799</text:p>
          </table:table-cell>
          <table:table-cell table:number-columns-repeated="2"/>
        </table:table-row>
        <table:table-row table:style-name="ro1">
          <table:table-cell office:value-type="float" office:value="548891598" calcext:value-type="float">
            <text:p>548891598</text:p>
          </table:table-cell>
          <table:table-cell office:value-type="float" office:value="739857681.7286" calcext:value-type="float">
            <text:p>739857681.7286</text:p>
          </table:table-cell>
          <table:table-cell/>
          <table:table-cell office:value-type="string" calcext:value-type="string">
            <text:p>2023-06-12T16:01:21.7286000Z</text:p>
          </table:table-cell>
          <table:table-cell office:value-type="string" calcext:value-type="string">
            <text:p>2023-06-12-16:02:30.9126000</text:p>
          </table:table-cell>
          <table:table-cell table:number-columns-repeated="2"/>
        </table:table-row>
        <table:table-row table:style-name="ro1">
          <table:table-cell office:value-type="float" office:value="548937774" calcext:value-type="float">
            <text:p>548937774</text:p>
          </table:table-cell>
          <table:table-cell office:value-type="float" office:value="739903857.729163" calcext:value-type="float">
            <text:p>739903857.729163</text:p>
          </table:table-cell>
          <table:table-cell/>
          <table:table-cell office:value-type="string" calcext:value-type="string">
            <text:p>2023-06-13T04:50:57.7291629Z</text:p>
          </table:table-cell>
          <table:table-cell office:value-type="string" calcext:value-type="string">
            <text:p>2023-06-13-04:52:06.9131629</text:p>
          </table:table-cell>
          <table:table-cell table:number-columns-repeated="2"/>
        </table:table-row>
        <table:table-row table:style-name="ro1">
          <table:table-cell office:value-type="float" office:value="549042162" calcext:value-type="float">
            <text:p>549042162</text:p>
          </table:table-cell>
          <table:table-cell office:value-type="float" office:value="740008245.730332" calcext:value-type="float">
            <text:p>740008245.730332</text:p>
          </table:table-cell>
          <table:table-cell/>
          <table:table-cell office:value-type="string" calcext:value-type="string">
            <text:p>2023-06-14T09:50:45.7303320Z</text:p>
          </table:table-cell>
          <table:table-cell office:value-type="string" calcext:value-type="string">
            <text:p>2023-06-14-09:51:54.9143320</text:p>
          </table:table-cell>
          <table:table-cell table:number-columns-repeated="2"/>
        </table:table-row>
        <table:table-row table:style-name="ro1">
          <table:table-cell office:value-type="float" office:value="549103364" calcext:value-type="float">
            <text:p>549103364</text:p>
          </table:table-cell>
          <table:table-cell office:value-type="float" office:value="740069447.731012" calcext:value-type="float">
            <text:p>740069447.731012</text:p>
          </table:table-cell>
          <table:table-cell/>
          <table:table-cell office:value-type="string" calcext:value-type="string">
            <text:p>2023-06-15T02:50:47.7310119Z</text:p>
          </table:table-cell>
          <table:table-cell office:value-type="string" calcext:value-type="string">
            <text:p>2023-06-15-02:51:56.9150120</text:p>
          </table:table-cell>
          <table:table-cell table:number-columns-repeated="2"/>
        </table:table-row>
        <table:table-row table:style-name="ro1">
          <table:table-cell office:value-type="float" office:value="549236600" calcext:value-type="float">
            <text:p>549236600</text:p>
          </table:table-cell>
          <table:table-cell office:value-type="float" office:value="740202683.732492" calcext:value-type="float">
            <text:p>740202683.732492</text:p>
          </table:table-cell>
          <table:table-cell/>
          <table:table-cell office:value-type="string" calcext:value-type="string">
            <text:p>2023-06-16T15:51:23.7324919Z</text:p>
          </table:table-cell>
          <table:table-cell office:value-type="string" calcext:value-type="string">
            <text:p>2023-06-16-15:52:32.9164919</text:p>
          </table:table-cell>
          <table:table-cell table:number-columns-repeated="2"/>
        </table:table-row>
        <table:table-row table:style-name="ro1">
          <table:table-cell office:value-type="float" office:value="549312183" calcext:value-type="float">
            <text:p>549312183</text:p>
          </table:table-cell>
          <table:table-cell office:value-type="float" office:value="740278266.733392" calcext:value-type="float">
            <text:p>740278266.733392</text:p>
          </table:table-cell>
          <table:table-cell/>
          <table:table-cell office:value-type="string" calcext:value-type="string">
            <text:p>2023-06-17T12:51:06.7333920Z</text:p>
          </table:table-cell>
          <table:table-cell office:value-type="string" calcext:value-type="string">
            <text:p>2023-06-17-12:52:15.9173920</text:p>
          </table:table-cell>
          <table:table-cell table:number-columns-repeated="2"/>
        </table:table-row>
        <table:table-row table:style-name="ro1">
          <table:table-cell office:value-type="float" office:value="549384159" calcext:value-type="float">
            <text:p>549384159</text:p>
          </table:table-cell>
          <table:table-cell office:value-type="float" office:value="740350242.734181" calcext:value-type="float">
            <text:p>740350242.734181</text:p>
          </table:table-cell>
          <table:table-cell/>
          <table:table-cell office:value-type="string" calcext:value-type="string">
            <text:p>2023-06-18T08:50:42.7341809Z</text:p>
          </table:table-cell>
          <table:table-cell office:value-type="string" calcext:value-type="string">
            <text:p>2023-06-18-08:51:51.9181809</text:p>
          </table:table-cell>
          <table:table-cell table:number-columns-repeated="2"/>
        </table:table-row>
        <table:table-row table:style-name="ro1">
          <table:table-cell office:value-type="float" office:value="549488607" calcext:value-type="float">
            <text:p>549488607</text:p>
          </table:table-cell>
          <table:table-cell office:value-type="float" office:value="740454690.735383" calcext:value-type="float">
            <text:p>740454690.735383</text:p>
          </table:table-cell>
          <table:table-cell/>
          <table:table-cell office:value-type="string" calcext:value-type="string">
            <text:p>2023-06-19T13:51:30.7353830Z</text:p>
          </table:table-cell>
          <table:table-cell office:value-type="string" calcext:value-type="string">
            <text:p>2023-06-19-13:52:39.9193830</text:p>
          </table:table-cell>
          <table:table-cell table:number-columns-repeated="2"/>
        </table:table-row>
        <table:table-row table:style-name="ro1">
          <table:table-cell office:value-type="float" office:value="549582180" calcext:value-type="float">
            <text:p>549582180</text:p>
          </table:table-cell>
          <table:table-cell office:value-type="float" office:value="740548263.736404" calcext:value-type="float">
            <text:p>740548263.736404</text:p>
          </table:table-cell>
          <table:table-cell/>
          <table:table-cell office:value-type="string" calcext:value-type="string">
            <text:p>2023-06-20T15:51:03.7364039Z</text:p>
          </table:table-cell>
          <table:table-cell office:value-type="string" calcext:value-type="string">
            <text:p>2023-06-20-15:52:12.9204039</text:p>
          </table:table-cell>
          <table:table-cell table:number-columns-repeated="2"/>
        </table:table-row>
        <table:table-row table:style-name="ro1">
          <table:table-cell office:value-type="float" office:value="549657775" calcext:value-type="float">
            <text:p>549657775</text:p>
          </table:table-cell>
          <table:table-cell office:value-type="float" office:value="740623858.737279" calcext:value-type="float">
            <text:p>740623858.737279</text:p>
          </table:table-cell>
          <table:table-cell/>
          <table:table-cell office:value-type="string" calcext:value-type="string">
            <text:p>2023-06-21T12:50:58.7372789Z</text:p>
          </table:table-cell>
          <table:table-cell office:value-type="string" calcext:value-type="string">
            <text:p>2023-06-21-12:52:07.9212789</text:p>
          </table:table-cell>
          <table:table-cell table:number-columns-repeated="2"/>
        </table:table-row>
        <table:table-row table:style-name="ro1">
          <table:table-cell office:value-type="float" office:value="549697475" calcext:value-type="float">
            <text:p>549697475</text:p>
          </table:table-cell>
          <table:table-cell office:value-type="float" office:value="740663558.737864" calcext:value-type="float">
            <text:p>740663558.737864</text:p>
          </table:table-cell>
          <table:table-cell/>
          <table:table-cell office:value-type="string" calcext:value-type="string">
            <text:p>2023-06-21T23:52:38.7378640Z</text:p>
          </table:table-cell>
          <table:table-cell office:value-type="string" calcext:value-type="string">
            <text:p>2023-06-21-23:53:47.9218640</text:p>
          </table:table-cell>
          <table:table-cell table:number-columns-repeated="2"/>
        </table:table-row>
        <table:table-row table:style-name="ro1">
          <table:table-cell office:value-type="float" office:value="549830648" calcext:value-type="float">
            <text:p>549830648</text:p>
          </table:table-cell>
          <table:table-cell office:value-type="float" office:value="740796731.739411" calcext:value-type="float">
            <text:p>740796731.739411</text:p>
          </table:table-cell>
          <table:table-cell/>
          <table:table-cell office:value-type="string" calcext:value-type="string">
            <text:p>2023-06-23T12:52:11.7394109Z</text:p>
          </table:table-cell>
          <table:table-cell office:value-type="string" calcext:value-type="string">
            <text:p>2023-06-23-12:53:20.9234110</text:p>
          </table:table-cell>
          <table:table-cell table:number-columns-repeated="2"/>
        </table:table-row>
        <table:table-row table:style-name="ro1">
          <table:table-cell office:value-type="float" office:value="549929023" calcext:value-type="float">
            <text:p>549929023</text:p>
          </table:table-cell>
          <table:table-cell office:value-type="float" office:value="740895106.740496" calcext:value-type="float">
            <text:p>740895106.740496</text:p>
          </table:table-cell>
          <table:table-cell/>
          <table:table-cell office:value-type="string" calcext:value-type="string">
            <text:p>2023-06-24T16:11:46.7404960Z</text:p>
          </table:table-cell>
          <table:table-cell office:value-type="string" calcext:value-type="string">
            <text:p>2023-06-24-16:12:55.9244960</text:p>
          </table:table-cell>
          <table:table-cell table:number-columns-repeated="2"/>
        </table:table-row>
        <table:table-row table:style-name="ro1">
          <table:table-cell office:value-type="float" office:value="549996153" calcext:value-type="float">
            <text:p>549996153</text:p>
          </table:table-cell>
          <table:table-cell office:value-type="float" office:value="740962236.741263" calcext:value-type="float">
            <text:p>740962236.741263</text:p>
          </table:table-cell>
          <table:table-cell/>
          <table:table-cell office:value-type="string" calcext:value-type="string">
            <text:p>2023-06-25T10:50:36.7412630Z</text:p>
          </table:table-cell>
          <table:table-cell office:value-type="string" calcext:value-type="string">
            <text:p>2023-06-25-10:51:45.9252630</text:p>
          </table:table-cell>
          <table:table-cell table:number-columns-repeated="2"/>
        </table:table-row>
        <table:table-row table:style-name="ro1">
          <table:table-cell office:value-type="float" office:value="550082550" calcext:value-type="float">
            <text:p>550082550</text:p>
          </table:table-cell>
          <table:table-cell office:value-type="float" office:value="741048633.742239" calcext:value-type="float">
            <text:p>741048633.742239</text:p>
          </table:table-cell>
          <table:table-cell/>
          <table:table-cell office:value-type="string" calcext:value-type="string">
            <text:p>2023-06-26T10:50:33.7422389Z</text:p>
          </table:table-cell>
          <table:table-cell office:value-type="string" calcext:value-type="string">
            <text:p>2023-06-26-10:51:42.9262390</text:p>
          </table:table-cell>
          <table:table-cell table:number-columns-repeated="2"/>
        </table:table-row>
        <table:table-row table:style-name="ro1">
          <table:table-cell office:value-type="float" office:value="550143764" calcext:value-type="float">
            <text:p>550143764</text:p>
          </table:table-cell>
          <table:table-cell office:value-type="float" office:value="741109847.742946" calcext:value-type="float">
            <text:p>741109847.742946</text:p>
          </table:table-cell>
          <table:table-cell/>
          <table:table-cell office:value-type="string" calcext:value-type="string">
            <text:p>2023-06-27T03:50:47.7429460Z</text:p>
          </table:table-cell>
          <table:table-cell office:value-type="string" calcext:value-type="string">
            <text:p>2023-06-27-03:51:56.9269460</text:p>
          </table:table-cell>
          <table:table-cell table:number-columns-repeated="2"/>
        </table:table-row>
        <table:table-row table:style-name="ro1">
          <table:table-cell office:value-type="float" office:value="550251748" calcext:value-type="float">
            <text:p>550251748</text:p>
          </table:table-cell>
          <table:table-cell office:value-type="float" office:value="741217831.744164" calcext:value-type="float">
            <text:p>741217831.744164</text:p>
          </table:table-cell>
          <table:table-cell/>
          <table:table-cell office:value-type="string" calcext:value-type="string">
            <text:p>2023-06-28T09:50:31.7441639Z</text:p>
          </table:table-cell>
          <table:table-cell office:value-type="string" calcext:value-type="string">
            <text:p>2023-06-28-09:51:40.9281640</text:p>
          </table:table-cell>
          <table:table-cell table:number-columns-repeated="2"/>
        </table:table-row>
        <table:table-row table:style-name="ro1">
          <table:table-cell office:value-type="float" office:value="550359758" calcext:value-type="float">
            <text:p>550359758</text:p>
          </table:table-cell>
          <table:table-cell office:value-type="float" office:value="741325841.745361" calcext:value-type="float">
            <text:p>741325841.745361</text:p>
          </table:table-cell>
          <table:table-cell/>
          <table:table-cell office:value-type="string" calcext:value-type="string">
            <text:p>2023-06-29T15:50:41.7453609Z</text:p>
          </table:table-cell>
          <table:table-cell office:value-type="string" calcext:value-type="string">
            <text:p>2023-06-29-15:51:50.9293609</text:p>
          </table:table-cell>
          <table:table-cell table:number-columns-repeated="2"/>
        </table:table-row>
        <table:table-row table:style-name="ro1">
          <table:table-cell office:value-type="float" office:value="550435382" calcext:value-type="float">
            <text:p>550435382</text:p>
          </table:table-cell>
          <table:table-cell office:value-type="float" office:value="741401465.746247" calcext:value-type="float">
            <text:p>741401465.746247</text:p>
          </table:table-cell>
          <table:table-cell/>
          <table:table-cell office:value-type="string" calcext:value-type="string">
            <text:p>2023-06-30T12:51:05.7462469Z</text:p>
          </table:table-cell>
          <table:table-cell office:value-type="string" calcext:value-type="string">
            <text:p>2023-06-30-12:52:14.9302469</text:p>
          </table:table-cell>
          <table:table-cell table:number-columns-repeated="2"/>
        </table:table-row>
        <table:table-row table:style-name="ro1">
          <table:table-cell office:value-type="float" office:value="550510937" calcext:value-type="float">
            <text:p>550510937</text:p>
          </table:table-cell>
          <table:table-cell office:value-type="float" office:value="741477020.747092" calcext:value-type="float">
            <text:p>741477020.747092</text:p>
          </table:table-cell>
          <table:table-cell/>
          <table:table-cell office:value-type="string" calcext:value-type="string">
            <text:p>2023-07-01T09:50:20.7470920Z</text:p>
          </table:table-cell>
          <table:table-cell office:value-type="string" calcext:value-type="string">
            <text:p>2023-07-01-09:51:29.9310920</text:p>
          </table:table-cell>
          <table:table-cell table:number-columns-repeated="2"/>
        </table:table-row>
        <table:table-row table:style-name="ro1">
          <table:table-cell office:value-type="float" office:value="550597338" calcext:value-type="float">
            <text:p>550597338</text:p>
          </table:table-cell>
          <table:table-cell office:value-type="float" office:value="741563421.748061" calcext:value-type="float">
            <text:p>741563421.748061</text:p>
          </table:table-cell>
          <table:table-cell/>
          <table:table-cell office:value-type="string" calcext:value-type="string">
            <text:p>2023-07-02T09:50:21.7480609Z</text:p>
          </table:table-cell>
          <table:table-cell office:value-type="string" calcext:value-type="string">
            <text:p>2023-07-02-09:51:30.9320609</text:p>
          </table:table-cell>
          <table:table-cell table:number-columns-repeated="2"/>
        </table:table-row>
        <table:table-row table:style-name="ro1">
          <table:table-cell office:value-type="float" office:value="550705348" calcext:value-type="float">
            <text:p>550705348</text:p>
          </table:table-cell>
          <table:table-cell office:value-type="float" office:value="741671431.749271" calcext:value-type="float">
            <text:p>741671431.749271</text:p>
          </table:table-cell>
          <table:table-cell/>
          <table:table-cell office:value-type="string" calcext:value-type="string">
            <text:p>2023-07-03T15:50:31.7492710Z</text:p>
          </table:table-cell>
          <table:table-cell office:value-type="string" calcext:value-type="string">
            <text:p>2023-07-03-15:51:40.9332710</text:p>
          </table:table-cell>
          <table:table-cell table:number-columns-repeated="2"/>
        </table:table-row>
        <table:table-row table:style-name="ro1">
          <table:table-cell office:value-type="float" office:value="550780967" calcext:value-type="float">
            <text:p>550780967</text:p>
          </table:table-cell>
          <table:table-cell office:value-type="float" office:value="741747050.750149" calcext:value-type="float">
            <text:p>741747050.750149</text:p>
          </table:table-cell>
          <table:table-cell/>
          <table:table-cell office:value-type="string" calcext:value-type="string">
            <text:p>2023-07-04T12:50:50.7501490Z</text:p>
          </table:table-cell>
          <table:table-cell office:value-type="string" calcext:value-type="string">
            <text:p>2023-07-04-12:51:59.9341490</text:p>
          </table:table-cell>
          <table:table-cell table:number-columns-repeated="2"/>
        </table:table-row>
        <table:table-row table:style-name="ro1">
          <table:table-cell office:value-type="float" office:value="550856527" calcext:value-type="float">
            <text:p>550856527</text:p>
          </table:table-cell>
          <table:table-cell office:value-type="float" office:value="741822610.750987" calcext:value-type="float">
            <text:p>741822610.750987</text:p>
          </table:table-cell>
          <table:table-cell/>
          <table:table-cell office:value-type="string" calcext:value-type="string">
            <text:p>2023-07-05T09:50:10.7509869Z</text:p>
          </table:table-cell>
          <table:table-cell office:value-type="string" calcext:value-type="string">
            <text:p>2023-07-05-09:51:19.9349869</text:p>
          </table:table-cell>
          <table:table-cell table:number-columns-repeated="2"/>
        </table:table-row>
        <table:table-row table:style-name="ro1">
          <table:table-cell office:value-type="float" office:value="551050932" calcext:value-type="float">
            <text:p>551050932</text:p>
          </table:table-cell>
          <table:table-cell office:value-type="float" office:value="742017015.753172" calcext:value-type="float">
            <text:p>742017015.753172</text:p>
          </table:table-cell>
          <table:table-cell/>
          <table:table-cell office:value-type="string" calcext:value-type="string">
            <text:p>2023-07-07T15:50:15.7531720Z</text:p>
          </table:table-cell>
          <table:table-cell office:value-type="string" calcext:value-type="string">
            <text:p>2023-07-07-15:51:24.9371720</text:p>
          </table:table-cell>
          <table:table-cell table:number-columns-repeated="2"/>
        </table:table-row>
        <table:table-row table:style-name="ro1">
          <table:table-cell office:value-type="float" office:value="551137328" calcext:value-type="float">
            <text:p>551137328</text:p>
          </table:table-cell>
          <table:table-cell office:value-type="float" office:value="742103411.754142" calcext:value-type="float">
            <text:p>742103411.754142</text:p>
          </table:table-cell>
          <table:table-cell/>
          <table:table-cell office:value-type="string" calcext:value-type="string">
            <text:p>2023-07-08T15:50:11.7541419Z</text:p>
          </table:table-cell>
          <table:table-cell office:value-type="string" calcext:value-type="string">
            <text:p>2023-07-08-15:51:20.9381419</text:p>
          </table:table-cell>
          <table:table-cell table:number-columns-repeated="2"/>
        </table:table-row>
        <table:table-row table:style-name="ro1">
          <table:table-cell office:value-type="float" office:value="551209342" calcext:value-type="float">
            <text:p>551209342</text:p>
          </table:table-cell>
          <table:table-cell office:value-type="float" office:value="742175425.754989" calcext:value-type="float">
            <text:p>742175425.754989</text:p>
          </table:table-cell>
          <table:table-cell/>
          <table:table-cell office:value-type="string" calcext:value-type="string">
            <text:p>2023-07-09T11:50:25.7549890Z</text:p>
          </table:table-cell>
          <table:table-cell office:value-type="string" calcext:value-type="string">
            <text:p>2023-07-09-11:51:34.9389890</text:p>
          </table:table-cell>
          <table:table-cell table:number-columns-repeated="2"/>
        </table:table-row>
        <table:table-row table:style-name="ro1">
          <table:table-cell office:value-type="float" office:value="551310120" calcext:value-type="float">
            <text:p>551310120</text:p>
          </table:table-cell>
          <table:table-cell office:value-type="float" office:value="742276203.756094" calcext:value-type="float">
            <text:p>742276203.756094</text:p>
          </table:table-cell>
          <table:table-cell/>
          <table:table-cell office:value-type="string" calcext:value-type="string">
            <text:p>2023-07-10T15:50:03.7560939Z</text:p>
          </table:table-cell>
          <table:table-cell office:value-type="string" calcext:value-type="string">
            <text:p>2023-07-10-15:51:12.9400939</text:p>
          </table:table-cell>
          <table:table-cell table:number-columns-repeated="2"/>
        </table:table-row>
        <table:table-row table:style-name="ro1">
          <table:table-cell office:value-type="float" office:value="551396519" calcext:value-type="float">
            <text:p>551396519</text:p>
          </table:table-cell>
          <table:table-cell office:value-type="float" office:value="742362602.757076" calcext:value-type="float">
            <text:p>742362602.757076</text:p>
          </table:table-cell>
          <table:table-cell/>
          <table:table-cell office:value-type="string" calcext:value-type="string">
            <text:p>2023-07-11T15:50:02.7570760Z</text:p>
          </table:table-cell>
          <table:table-cell office:value-type="string" calcext:value-type="string">
            <text:p>2023-07-11-15:51:11.9410760</text:p>
          </table:table-cell>
          <table:table-cell table:number-columns-repeated="2"/>
        </table:table-row>
        <table:table-row table:style-name="ro1">
          <table:table-cell office:value-type="float" office:value="551482921" calcext:value-type="float">
            <text:p>551482921</text:p>
          </table:table-cell>
          <table:table-cell office:value-type="float" office:value="742449004.758058" calcext:value-type="float">
            <text:p>742449004.758058</text:p>
          </table:table-cell>
          <table:table-cell/>
          <table:table-cell office:value-type="string" calcext:value-type="string">
            <text:p>2023-07-12T15:50:04.7580579Z</text:p>
          </table:table-cell>
          <table:table-cell office:value-type="string" calcext:value-type="string">
            <text:p>2023-07-12-15:51:13.9420579</text:p>
          </table:table-cell>
          <table:table-cell table:number-columns-repeated="2"/>
        </table:table-row>
        <table:table-row table:style-name="ro1">
          <table:table-cell office:value-type="float" office:value="551569314" calcext:value-type="float">
            <text:p>551569314</text:p>
          </table:table-cell>
          <table:table-cell office:value-type="float" office:value="742535397.759033" calcext:value-type="float">
            <text:p>742535397.759033</text:p>
          </table:table-cell>
          <table:table-cell/>
          <table:table-cell office:value-type="string" calcext:value-type="string">
            <text:p>2023-07-13T15:49:57.7590329Z</text:p>
          </table:table-cell>
          <table:table-cell office:value-type="string" calcext:value-type="string">
            <text:p>2023-07-13-15:51:06.9430329</text:p>
          </table:table-cell>
          <table:table-cell table:number-columns-repeated="2"/>
        </table:table-row>
        <table:table-row table:style-name="ro1">
          <table:table-cell office:value-type="float" office:value="551655708" calcext:value-type="float">
            <text:p>551655708</text:p>
          </table:table-cell>
          <table:table-cell office:value-type="float" office:value="742621791.759992" calcext:value-type="float">
            <text:p>742621791.759992</text:p>
          </table:table-cell>
          <table:table-cell/>
          <table:table-cell office:value-type="string" calcext:value-type="string">
            <text:p>2023-07-14T15:49:51.7599920Z</text:p>
          </table:table-cell>
          <table:table-cell office:value-type="string" calcext:value-type="string">
            <text:p>2023-07-14-15:51:00.9439920</text:p>
          </table:table-cell>
          <table:table-cell table:number-columns-repeated="2"/>
        </table:table-row>
        <table:table-row table:style-name="ro1">
          <table:table-cell office:value-type="float" office:value="551742102" calcext:value-type="float">
            <text:p>551742102</text:p>
          </table:table-cell>
          <table:table-cell office:value-type="float" office:value="742708185.760972" calcext:value-type="float">
            <text:p>742708185.760972</text:p>
          </table:table-cell>
          <table:table-cell/>
          <table:table-cell office:value-type="string" calcext:value-type="string">
            <text:p>2023-07-15T15:49:45.7609720Z</text:p>
          </table:table-cell>
          <table:table-cell office:value-type="string" calcext:value-type="string">
            <text:p>2023-07-15-15:50:54.9449720</text:p>
          </table:table-cell>
          <table:table-cell table:number-columns-repeated="2"/>
        </table:table-row>
        <table:table-row table:style-name="ro1">
          <table:table-cell office:value-type="float" office:value="551828502" calcext:value-type="float">
            <text:p>551828502</text:p>
          </table:table-cell>
          <table:table-cell office:value-type="float" office:value="742794585.761955" calcext:value-type="float">
            <text:p>742794585.761955</text:p>
          </table:table-cell>
          <table:table-cell/>
          <table:table-cell office:value-type="string" calcext:value-type="string">
            <text:p>2023-07-16T15:49:45.7619550Z</text:p>
          </table:table-cell>
          <table:table-cell office:value-type="string" calcext:value-type="string">
            <text:p>2023-07-16-15:50:54.9459550</text:p>
          </table:table-cell>
          <table:table-cell table:number-columns-repeated="2"/>
        </table:table-row>
        <table:table-row table:style-name="ro1">
          <table:table-cell office:value-type="float" office:value="551914896" calcext:value-type="float">
            <text:p>551914896</text:p>
          </table:table-cell>
          <table:table-cell office:value-type="float" office:value="742880979.762923" calcext:value-type="float">
            <text:p>742880979.762923</text:p>
          </table:table-cell>
          <table:table-cell/>
          <table:table-cell office:value-type="string" calcext:value-type="string">
            <text:p>2023-07-17T15:49:39.7629230Z</text:p>
          </table:table-cell>
          <table:table-cell office:value-type="string" calcext:value-type="string">
            <text:p>2023-07-17-15:50:48.9469230</text:p>
          </table:table-cell>
          <table:table-cell table:number-columns-repeated="2"/>
        </table:table-row>
        <table:table-row table:style-name="ro1">
          <table:table-cell office:value-type="float" office:value="552001295" calcext:value-type="float">
            <text:p>552001295</text:p>
          </table:table-cell>
          <table:table-cell office:value-type="float" office:value="742967378.763896" calcext:value-type="float">
            <text:p>742967378.763896</text:p>
          </table:table-cell>
          <table:table-cell/>
          <table:table-cell office:value-type="string" calcext:value-type="string">
            <text:p>2023-07-18T15:49:38.7638959Z</text:p>
          </table:table-cell>
          <table:table-cell office:value-type="string" calcext:value-type="string">
            <text:p>2023-07-18-15:50:47.9478960</text:p>
          </table:table-cell>
          <table:table-cell table:number-columns-repeated="2"/>
        </table:table-row>
        <table:table-row table:style-name="ro1">
          <table:table-cell office:value-type="float" office:value="552069695" calcext:value-type="float">
            <text:p>552069695</text:p>
          </table:table-cell>
          <table:table-cell office:value-type="float" office:value="743035778.76469" calcext:value-type="float">
            <text:p>743035778.76469</text:p>
          </table:table-cell>
          <table:table-cell/>
          <table:table-cell office:value-type="string" calcext:value-type="string">
            <text:p>2023-07-19T10:49:38.7646900Z</text:p>
          </table:table-cell>
          <table:table-cell office:value-type="string" calcext:value-type="string">
            <text:p>2023-07-19-10:50:47.9486900</text:p>
          </table:table-cell>
          <table:table-cell table:number-columns-repeated="2"/>
        </table:table-row>
        <table:table-row table:style-name="ro1">
          <table:table-cell office:value-type="float" office:value="552174083" calcext:value-type="float">
            <text:p>552174083</text:p>
          </table:table-cell>
          <table:table-cell office:value-type="float" office:value="743140166.76585" calcext:value-type="float">
            <text:p>743140166.76585</text:p>
          </table:table-cell>
          <table:table-cell/>
          <table:table-cell office:value-type="string" calcext:value-type="string">
            <text:p>2023-07-20T15:49:26.7658499Z</text:p>
          </table:table-cell>
          <table:table-cell office:value-type="string" calcext:value-type="string">
            <text:p>2023-07-20-15:50:35.9498499</text:p>
          </table:table-cell>
          <table:table-cell table:number-columns-repeated="2"/>
        </table:table-row>
        <table:table-row table:style-name="ro1">
          <table:table-cell office:value-type="float" office:value="552242483" calcext:value-type="float">
            <text:p>552242483</text:p>
          </table:table-cell>
          <table:table-cell office:value-type="float" office:value="743208566.766643" calcext:value-type="float">
            <text:p>743208566.766643</text:p>
          </table:table-cell>
          <table:table-cell/>
          <table:table-cell office:value-type="string" calcext:value-type="string">
            <text:p>2023-07-21T10:49:26.7666429Z</text:p>
          </table:table-cell>
          <table:table-cell office:value-type="string" calcext:value-type="string">
            <text:p>2023-07-21-10:50:35.9506429</text:p>
          </table:table-cell>
          <table:table-cell table:number-columns-repeated="2"/>
        </table:table-row>
        <table:table-row table:style-name="ro1">
          <table:table-cell office:value-type="float" office:value="552346868" calcext:value-type="float">
            <text:p>552346868</text:p>
          </table:table-cell>
          <table:table-cell office:value-type="float" office:value="743312951.767793" calcext:value-type="float">
            <text:p>743312951.767793</text:p>
          </table:table-cell>
          <table:table-cell/>
          <table:table-cell office:value-type="string" calcext:value-type="string">
            <text:p>2023-07-22T15:49:11.7677929Z</text:p>
          </table:table-cell>
          <table:table-cell office:value-type="string" calcext:value-type="string">
            <text:p>2023-07-22-15:50:20.9517929</text:p>
          </table:table-cell>
          <table:table-cell table:number-columns-repeated="2"/>
        </table:table-row>
        <table:table-row table:style-name="ro1">
          <table:table-cell office:value-type="float" office:value="552433263" calcext:value-type="float">
            <text:p>552433263</text:p>
          </table:table-cell>
          <table:table-cell office:value-type="float" office:value="743399346.768778" calcext:value-type="float">
            <text:p>743399346.768778</text:p>
          </table:table-cell>
          <table:table-cell/>
          <table:table-cell office:value-type="string" calcext:value-type="string">
            <text:p>2023-07-23T15:49:06.7687779Z</text:p>
          </table:table-cell>
          <table:table-cell office:value-type="string" calcext:value-type="string">
            <text:p>2023-07-23-15:50:15.9527779</text:p>
          </table:table-cell>
          <table:table-cell table:number-columns-repeated="2"/>
        </table:table-row>
        <table:table-row table:style-name="ro1">
          <table:table-cell office:value-type="float" office:value="552519659" calcext:value-type="float">
            <text:p>552519659</text:p>
          </table:table-cell>
          <table:table-cell office:value-type="float" office:value="743485742.769739" calcext:value-type="float">
            <text:p>743485742.769739</text:p>
          </table:table-cell>
          <table:table-cell/>
          <table:table-cell office:value-type="string" calcext:value-type="string">
            <text:p>2023-07-24T15:49:02.7697390Z</text:p>
          </table:table-cell>
          <table:table-cell office:value-type="string" calcext:value-type="string">
            <text:p>2023-07-24-15:50:11.9537390</text:p>
          </table:table-cell>
          <table:table-cell table:number-columns-repeated="2"/>
        </table:table-row>
        <table:table-row table:style-name="ro1">
          <table:table-cell office:value-type="float" office:value="552562827" calcext:value-type="float">
            <text:p>552562827</text:p>
          </table:table-cell>
          <table:table-cell office:value-type="float" office:value="743528910.770217" calcext:value-type="float">
            <text:p>743528910.770217</text:p>
          </table:table-cell>
          <table:table-cell/>
          <table:table-cell office:value-type="string" calcext:value-type="string">
            <text:p>2023-07-25T03:48:30.7702169Z</text:p>
          </table:table-cell>
          <table:table-cell office:value-type="string" calcext:value-type="string">
            <text:p>2023-07-25-03:49:39.9542169</text:p>
          </table:table-cell>
          <table:table-cell table:number-columns-repeated="2"/>
        </table:table-row>
        <table:table-row table:style-name="ro1">
          <table:table-cell office:value-type="float" office:value="552692443" calcext:value-type="float">
            <text:p>552692443</text:p>
          </table:table-cell>
          <table:table-cell office:value-type="float" office:value="743658526.771705" calcext:value-type="float">
            <text:p>743658526.771705</text:p>
          </table:table-cell>
          <table:table-cell/>
          <table:table-cell office:value-type="string" calcext:value-type="string">
            <text:p>2023-07-26T15:48:46.7717050Z</text:p>
          </table:table-cell>
          <table:table-cell office:value-type="string" calcext:value-type="string">
            <text:p>2023-07-26-15:49:55.9557050</text:p>
          </table:table-cell>
          <table:table-cell table:number-columns-repeated="2"/>
        </table:table-row>
        <table:table-row table:style-name="ro1">
          <table:table-cell office:value-type="float" office:value="552757243" calcext:value-type="float">
            <text:p>552757243</text:p>
          </table:table-cell>
          <table:table-cell office:value-type="float" office:value="743723326.772448" calcext:value-type="float">
            <text:p>743723326.772448</text:p>
          </table:table-cell>
          <table:table-cell/>
          <table:table-cell office:value-type="string" calcext:value-type="string">
            <text:p>2023-07-27T09:48:46.7724479Z</text:p>
          </table:table-cell>
          <table:table-cell office:value-type="string" calcext:value-type="string">
            <text:p>2023-07-27-09:49:55.9564479</text:p>
          </table:table-cell>
          <table:table-cell table:number-columns-repeated="2"/>
        </table:table-row>
        <table:table-row table:style-name="ro1">
          <table:table-cell office:value-type="float" office:value="552865233" calcext:value-type="float">
            <text:p>552865233</text:p>
          </table:table-cell>
          <table:table-cell office:value-type="float" office:value="743831316.773638" calcext:value-type="float">
            <text:p>743831316.773638</text:p>
          </table:table-cell>
          <table:table-cell/>
          <table:table-cell office:value-type="string" calcext:value-type="string">
            <text:p>2023-07-28T15:48:36.7736380Z</text:p>
          </table:table-cell>
          <table:table-cell office:value-type="string" calcext:value-type="string">
            <text:p>2023-07-28-15:49:45.9576380</text:p>
          </table:table-cell>
          <table:table-cell table:number-columns-repeated="2"/>
        </table:table-row>
        <table:table-row table:style-name="ro1">
          <table:table-cell office:value-type="float" office:value="552948027" calcext:value-type="float">
            <text:p>552948027</text:p>
          </table:table-cell>
          <table:table-cell office:value-type="float" office:value="743914110.77458" calcext:value-type="float">
            <text:p>743914110.77458</text:p>
          </table:table-cell>
          <table:table-cell/>
          <table:table-cell office:value-type="string" calcext:value-type="string">
            <text:p>2023-07-29T14:48:30.7745800Z</text:p>
          </table:table-cell>
          <table:table-cell office:value-type="string" calcext:value-type="string">
            <text:p>2023-07-29-14:49:39.9585800</text:p>
          </table:table-cell>
          <table:table-cell table:number-columns-repeated="2"/>
        </table:table-row>
        <table:table-row table:style-name="ro1">
          <table:table-cell office:value-type="float" office:value="553016407" calcext:value-type="float">
            <text:p>553016407</text:p>
          </table:table-cell>
          <table:table-cell office:value-type="float" office:value="743982490.775355" calcext:value-type="float">
            <text:p>743982490.775355</text:p>
          </table:table-cell>
          <table:table-cell/>
          <table:table-cell office:value-type="string" calcext:value-type="string">
            <text:p>2023-07-30T09:48:10.7753549Z</text:p>
          </table:table-cell>
          <table:table-cell office:value-type="string" calcext:value-type="string">
            <text:p>2023-07-30-09:49:19.9593549</text:p>
          </table:table-cell>
          <table:table-cell table:number-columns-repeated="2"/>
        </table:table-row>
        <table:table-row table:style-name="ro1">
          <table:table-cell office:value-type="float" office:value="553124414" calcext:value-type="float">
            <text:p>553124414</text:p>
          </table:table-cell>
          <table:table-cell office:value-type="float" office:value="744090497.776574" calcext:value-type="float">
            <text:p>744090497.776574</text:p>
          </table:table-cell>
          <table:table-cell/>
          <table:table-cell office:value-type="string" calcext:value-type="string">
            <text:p>2023-07-31T15:48:17.7765740Z</text:p>
          </table:table-cell>
          <table:table-cell office:value-type="string" calcext:value-type="string">
            <text:p>2023-07-31-15:49:26.9605740</text:p>
          </table:table-cell>
          <table:table-cell table:number-columns-repeated="2"/>
        </table:table-row>
        <table:table-row table:style-name="ro1">
          <table:table-cell office:value-type="float" office:value="553160409" calcext:value-type="float">
            <text:p>553160409</text:p>
          </table:table-cell>
          <table:table-cell office:value-type="float" office:value="744126492.776977" calcext:value-type="float">
            <text:p>744126492.776977</text:p>
          </table:table-cell>
          <table:table-cell/>
          <table:table-cell office:value-type="string" calcext:value-type="string">
            <text:p>2023-08-01T01:48:12.7769769Z</text:p>
          </table:table-cell>
          <table:table-cell office:value-type="string" calcext:value-type="string">
            <text:p>2023-08-01-01:49:21.9609769</text:p>
          </table:table-cell>
          <table:table-cell table:number-columns-repeated="2"/>
        </table:table-row>
        <table:table-row table:style-name="ro1">
          <table:table-cell office:value-type="float" office:value="553221620" calcext:value-type="float">
            <text:p>553221620</text:p>
          </table:table-cell>
          <table:table-cell office:value-type="float" office:value="744187703.777669" calcext:value-type="float">
            <text:p>744187703.777669</text:p>
          </table:table-cell>
          <table:table-cell/>
          <table:table-cell office:value-type="string" calcext:value-type="string">
            <text:p>2023-08-01T18:48:23.7776689Z</text:p>
          </table:table-cell>
          <table:table-cell office:value-type="string" calcext:value-type="string">
            <text:p>2023-08-01-18:49:32.9616689</text:p>
          </table:table-cell>
          <table:table-cell table:number-columns-repeated="2"/>
        </table:table-row>
        <table:table-row table:style-name="ro1">
          <table:table-cell office:value-type="float" office:value="553333197" calcext:value-type="float">
            <text:p>553333197</text:p>
          </table:table-cell>
          <table:table-cell office:value-type="float" office:value="744299280.778934" calcext:value-type="float">
            <text:p>744299280.778934</text:p>
          </table:table-cell>
          <table:table-cell/>
          <table:table-cell office:value-type="string" calcext:value-type="string">
            <text:p>2023-08-03T01:48:00.7789340Z</text:p>
          </table:table-cell>
          <table:table-cell office:value-type="string" calcext:value-type="string">
            <text:p>2023-08-03-01:49:09.9629340</text:p>
          </table:table-cell>
          <table:table-cell table:number-columns-repeated="2"/>
        </table:table-row>
        <table:table-row table:style-name="ro1">
          <table:table-cell office:value-type="float" office:value="553448387" calcext:value-type="float">
            <text:p>553448387</text:p>
          </table:table-cell>
          <table:table-cell office:value-type="float" office:value="744414470.780224" calcext:value-type="float">
            <text:p>744414470.780224</text:p>
          </table:table-cell>
          <table:table-cell/>
          <table:table-cell office:value-type="string" calcext:value-type="string">
            <text:p>2023-08-04T09:47:50.7802239Z</text:p>
          </table:table-cell>
          <table:table-cell office:value-type="string" calcext:value-type="string">
            <text:p>2023-08-04-09:48:59.9642239</text:p>
          </table:table-cell>
          <table:table-cell table:number-columns-repeated="2"/>
        </table:table-row>
        <table:table-row table:style-name="ro1">
          <table:table-cell office:value-type="float" office:value="554074770" calcext:value-type="float">
            <text:p>554074770</text:p>
          </table:table-cell>
          <table:table-cell office:value-type="float" office:value="745040853.787259" calcext:value-type="float">
            <text:p>745040853.787259</text:p>
          </table:table-cell>
          <table:table-cell/>
          <table:table-cell office:value-type="string" calcext:value-type="string">
            <text:p>2023-08-11T15:47:33.7872589Z</text:p>
          </table:table-cell>
          <table:table-cell office:value-type="string" calcext:value-type="string">
            <text:p>2023-08-11-15:48:42.9712589</text:p>
          </table:table-cell>
          <table:table-cell table:number-columns-repeated="2"/>
        </table:table-row>
        <table:table-row table:style-name="ro1">
          <table:table-cell office:value-type="float" office:value="554082001" calcext:value-type="float">
            <text:p>554082001</text:p>
          </table:table-cell>
          <table:table-cell office:value-type="float" office:value="745048084.787356" calcext:value-type="float">
            <text:p>745048084.787356</text:p>
          </table:table-cell>
          <table:table-cell/>
          <table:table-cell office:value-type="string" calcext:value-type="string">
            <text:p>2023-08-11T17:48:04.7873560Z</text:p>
          </table:table-cell>
          <table:table-cell office:value-type="string" calcext:value-type="string">
            <text:p>2023-08-11-17:49:13.9713560</text:p>
          </table:table-cell>
          <table:table-cell table:number-columns-repeated="2"/>
        </table:table-row>
        <table:table-row table:style-name="ro1">
          <table:table-cell office:value-type="float" office:value="554679546" calcext:value-type="float">
            <text:p>554679546</text:p>
          </table:table-cell>
          <table:table-cell office:value-type="float" office:value="745645629.794042" calcext:value-type="float">
            <text:p>745645629.794042</text:p>
          </table:table-cell>
          <table:table-cell/>
          <table:table-cell office:value-type="string" calcext:value-type="string">
            <text:p>2023-08-18T15:47:09.7940419Z</text:p>
          </table:table-cell>
          <table:table-cell office:value-type="string" calcext:value-type="string">
            <text:p>2023-08-18-15:48:18.9780420</text:p>
          </table:table-cell>
          <table:table-cell table:number-columns-repeated="2"/>
        </table:table-row>
        <table:table-row table:style-name="ro1">
          <table:table-cell office:value-type="float" office:value="554711963" calcext:value-type="float">
            <text:p>554711963</text:p>
          </table:table-cell>
          <table:table-cell office:value-type="float" office:value="745678046.794419" calcext:value-type="float">
            <text:p>745678046.794419</text:p>
          </table:table-cell>
          <table:table-cell/>
          <table:table-cell office:value-type="string" calcext:value-type="string">
            <text:p>2023-08-19T00:47:26.7944189Z</text:p>
          </table:table-cell>
          <table:table-cell office:value-type="string" calcext:value-type="string">
            <text:p>2023-08-19-00:48:35.9784189</text:p>
          </table:table-cell>
          <table:table-cell table:number-columns-repeated="2"/>
        </table:table-row>
        <table:table-row table:style-name="ro1">
          <table:table-cell office:value-type="float" office:value="555197878" calcext:value-type="float">
            <text:p>555197878</text:p>
          </table:table-cell>
          <table:table-cell office:value-type="float" office:value="746163961.799863" calcext:value-type="float">
            <text:p>746163961.799863</text:p>
          </table:table-cell>
          <table:table-cell/>
          <table:table-cell office:value-type="string" calcext:value-type="string">
            <text:p>2023-08-24T15:46:01.7998629Z</text:p>
          </table:table-cell>
          <table:table-cell office:value-type="string" calcext:value-type="string">
            <text:p>2023-08-24-15:47:10.9838629</text:p>
          </table:table-cell>
          <table:table-cell table:number-columns-repeated="2"/>
        </table:table-row>
        <table:table-row table:style-name="ro1">
          <table:table-cell office:value-type="float" office:value="555284257" calcext:value-type="float">
            <text:p>555284257</text:p>
          </table:table-cell>
          <table:table-cell office:value-type="float" office:value="746250340.800831" calcext:value-type="float">
            <text:p>746250340.800831</text:p>
          </table:table-cell>
          <table:table-cell/>
          <table:table-cell office:value-type="string" calcext:value-type="string">
            <text:p>2023-08-25T15:45:40.8008309Z</text:p>
          </table:table-cell>
          <table:table-cell office:value-type="string" calcext:value-type="string">
            <text:p>2023-08-25-15:46:49.9848309</text:p>
          </table:table-cell>
          <table:table-cell table:number-columns-repeated="2"/>
        </table:table-row>
        <table:table-row table:style-name="ro1">
          <table:table-cell office:value-type="float" office:value="555287885" calcext:value-type="float">
            <text:p>555287885</text:p>
          </table:table-cell>
          <table:table-cell office:value-type="float" office:value="746253968.800883" calcext:value-type="float">
            <text:p>746253968.800883</text:p>
          </table:table-cell>
          <table:table-cell/>
          <table:table-cell office:value-type="string" calcext:value-type="string">
            <text:p>2023-08-25T16:46:08.8008829Z</text:p>
          </table:table-cell>
          <table:table-cell office:value-type="string" calcext:value-type="string">
            <text:p>2023-08-25-16:47:17.9848829</text:p>
          </table:table-cell>
          <table:table-cell table:number-columns-repeated="2"/>
        </table:table-row>
        <table:table-row table:style-name="ro1">
          <table:table-cell office:value-type="float" office:value="555889053" calcext:value-type="float">
            <text:p>555889053</text:p>
          </table:table-cell>
          <table:table-cell office:value-type="float" office:value="746855136.807649" calcext:value-type="float">
            <text:p>746855136.807649</text:p>
          </table:table-cell>
          <table:table-cell/>
          <table:table-cell office:value-type="string" calcext:value-type="string">
            <text:p>2023-09-01T15:45:36.8076490Z</text:p>
          </table:table-cell>
          <table:table-cell office:value-type="string" calcext:value-type="string">
            <text:p>2023-09-01-15:46:45.9916490</text:p>
          </table:table-cell>
          <table:table-cell table:number-columns-repeated="2"/>
        </table:table-row>
        <table:table-row table:style-name="ro1">
          <table:table-cell office:value-type="float" office:value="555917881" calcext:value-type="float">
            <text:p>555917881</text:p>
          </table:table-cell>
          <table:table-cell office:value-type="float" office:value="746883964.807936" calcext:value-type="float">
            <text:p>746883964.807936</text:p>
          </table:table-cell>
          <table:table-cell/>
          <table:table-cell office:value-type="string" calcext:value-type="string">
            <text:p>2023-09-01T23:46:04.8079359Z</text:p>
          </table:table-cell>
          <table:table-cell office:value-type="string" calcext:value-type="string">
            <text:p>2023-09-01-23:47:13.9919359</text:p>
          </table:table-cell>
          <table:table-cell table:number-columns-repeated="2"/>
        </table:table-row>
        <table:table-row table:style-name="ro1">
          <table:table-cell office:value-type="float" office:value="556493758" calcext:value-type="float">
            <text:p>556493758</text:p>
          </table:table-cell>
          <table:table-cell office:value-type="float" office:value="747459841.814323" calcext:value-type="float">
            <text:p>747459841.814323</text:p>
          </table:table-cell>
          <table:table-cell/>
          <table:table-cell office:value-type="string" calcext:value-type="string">
            <text:p>2023-09-08T15:44:01.8143229Z</text:p>
          </table:table-cell>
          <table:table-cell office:value-type="string" calcext:value-type="string">
            <text:p>2023-09-08-15:45:10.9983229</text:p>
          </table:table-cell>
          <table:table-cell table:number-columns-repeated="2"/>
        </table:table-row>
        <table:table-row table:style-name="ro1">
          <table:table-cell office:value-type="float" office:value="557094878" calcext:value-type="float">
            <text:p>557094878</text:p>
          </table:table-cell>
          <table:table-cell office:value-type="float" office:value="748060961.821035" calcext:value-type="float">
            <text:p>748060961.821035</text:p>
          </table:table-cell>
          <table:table-cell/>
          <table:table-cell office:value-type="string" calcext:value-type="string">
            <text:p>2023-09-15T14:42:41.8210350Z</text:p>
          </table:table-cell>
          <table:table-cell office:value-type="string" calcext:value-type="string">
            <text:p>2023-09-15-14:43:51.0050350</text:p>
          </table:table-cell>
          <table:table-cell table:number-columns-repeated="2"/>
        </table:table-row>
        <table:table-row table:style-name="ro1">
          <table:table-cell office:value-type="float" office:value="557123665" calcext:value-type="float">
            <text:p>557123665</text:p>
          </table:table-cell>
          <table:table-cell office:value-type="float" office:value="748089748.821373" calcext:value-type="float">
            <text:p>748089748.821373</text:p>
          </table:table-cell>
          <table:table-cell/>
          <table:table-cell office:value-type="string" calcext:value-type="string">
            <text:p>2023-09-15T22:42:28.8213729Z</text:p>
          </table:table-cell>
          <table:table-cell office:value-type="string" calcext:value-type="string">
            <text:p>2023-09-15-22:43:38.0053730</text:p>
          </table:table-cell>
          <table:table-cell table:number-columns-repeated="2"/>
        </table:table-row>
        <table:table-row table:style-name="ro1">
          <table:table-cell office:value-type="float" office:value="557357510" calcext:value-type="float">
            <text:p>557357510</text:p>
          </table:table-cell>
          <table:table-cell office:value-type="float" office:value="748323593.823944" calcext:value-type="float">
            <text:p>748323593.823944</text:p>
          </table:table-cell>
          <table:table-cell/>
          <table:table-cell office:value-type="string" calcext:value-type="string">
            <text:p>2023-09-18T15:39:53.8239439Z</text:p>
          </table:table-cell>
          <table:table-cell office:value-type="string" calcext:value-type="string">
            <text:p>2023-09-18-15:41:03.0079439</text:p>
          </table:table-cell>
          <table:table-cell table:number-columns-repeated="2"/>
        </table:table-row>
        <table:table-row table:style-name="ro1">
          <table:table-cell office:value-type="float" office:value="557440431" calcext:value-type="float">
            <text:p>557440431</text:p>
          </table:table-cell>
          <table:table-cell office:value-type="float" office:value="748406514.8249" calcext:value-type="float">
            <text:p>748406514.8249</text:p>
          </table:table-cell>
          <table:table-cell/>
          <table:table-cell office:value-type="string" calcext:value-type="string">
            <text:p>2023-09-19T14:41:54.8249000Z</text:p>
          </table:table-cell>
          <table:table-cell office:value-type="string" calcext:value-type="string">
            <text:p>2023-09-19-14:43:04.0089000</text:p>
          </table:table-cell>
          <table:table-cell table:number-columns-repeated="2"/>
        </table:table-row>
        <table:table-row table:style-name="ro1">
          <table:table-cell office:value-type="float" office:value="558102633" calcext:value-type="float">
            <text:p>558102633</text:p>
          </table:table-cell>
          <table:table-cell office:value-type="float" office:value="749068716.832241" calcext:value-type="float">
            <text:p>749068716.832241</text:p>
          </table:table-cell>
          <table:table-cell/>
          <table:table-cell office:value-type="string" calcext:value-type="string">
            <text:p>2023-09-27T06:38:36.8322409Z</text:p>
          </table:table-cell>
          <table:table-cell office:value-type="string" calcext:value-type="string">
            <text:p>2023-09-27-06:39:46.0162409</text:p>
          </table:table-cell>
          <table:table-cell table:number-columns-repeated="2"/>
        </table:table-row>
        <table:table-row table:style-name="ro1">
          <table:table-cell office:value-type="float" office:value="558189047" calcext:value-type="float">
            <text:p>558189047</text:p>
          </table:table-cell>
          <table:table-cell office:value-type="float" office:value="749155130.83321" calcext:value-type="float">
            <text:p>749155130.83321</text:p>
          </table:table-cell>
          <table:table-cell/>
          <table:table-cell office:value-type="string" calcext:value-type="string">
            <text:p>2023-09-28T06:38:50.8332099Z</text:p>
          </table:table-cell>
          <table:table-cell office:value-type="string" calcext:value-type="string">
            <text:p>2023-09-28-06:40:00.0172100</text:p>
          </table:table-cell>
          <table:table-cell table:number-columns-repeated="2"/>
        </table:table-row>
        <table:table-row table:style-name="ro1">
          <table:table-cell office:value-type="float" office:value="558307808" calcext:value-type="float">
            <text:p>558307808</text:p>
          </table:table-cell>
          <table:table-cell office:value-type="float" office:value="749273891.834469" calcext:value-type="float">
            <text:p>749273891.834469</text:p>
          </table:table-cell>
          <table:table-cell/>
          <table:table-cell office:value-type="string" calcext:value-type="string">
            <text:p>2023-09-29T15:38:11.8344689Z</text:p>
          </table:table-cell>
          <table:table-cell office:value-type="string" calcext:value-type="string">
            <text:p>2023-09-29-15:39:21.0184689</text:p>
          </table:table-cell>
          <table:table-cell table:number-columns-repeated="2"/>
        </table:table-row>
        <table:table-row table:style-name="ro1">
          <table:table-cell office:value-type="float" office:value="558394194" calcext:value-type="float">
            <text:p>558394194</text:p>
          </table:table-cell>
          <table:table-cell office:value-type="float" office:value="749360277.835442" calcext:value-type="float">
            <text:p>749360277.835442</text:p>
          </table:table-cell>
          <table:table-cell/>
          <table:table-cell office:value-type="string" calcext:value-type="string">
            <text:p>2023-09-30T15:37:57.8354419Z</text:p>
          </table:table-cell>
          <table:table-cell office:value-type="string" calcext:value-type="string">
            <text:p>2023-09-30-15:39:07.0194419</text:p>
          </table:table-cell>
          <table:table-cell table:number-columns-repeated="2"/>
        </table:table-row>
        <table:table-row table:style-name="ro1">
          <table:table-cell office:value-type="float" office:value="558477012" calcext:value-type="float">
            <text:p>558477012</text:p>
          </table:table-cell>
          <table:table-cell office:value-type="float" office:value="749443095.836373" calcext:value-type="float">
            <text:p>749443095.836373</text:p>
          </table:table-cell>
          <table:table-cell/>
          <table:table-cell office:value-type="string" calcext:value-type="string">
            <text:p>2023-10-01T14:38:15.8363729Z</text:p>
          </table:table-cell>
          <table:table-cell office:value-type="string" calcext:value-type="string">
            <text:p>2023-10-01-14:39:25.0203729</text:p>
          </table:table-cell>
          <table:table-cell table:number-columns-repeated="2"/>
        </table:table-row>
        <table:table-row table:style-name="ro1">
          <table:table-cell office:value-type="float" office:value="558559773" calcext:value-type="float">
            <text:p>558559773</text:p>
          </table:table-cell>
          <table:table-cell office:value-type="float" office:value="749525856.837303" calcext:value-type="float">
            <text:p>749525856.837303</text:p>
          </table:table-cell>
          <table:table-cell/>
          <table:table-cell office:value-type="string" calcext:value-type="string">
            <text:p>2023-10-02T13:37:36.8373030Z</text:p>
          </table:table-cell>
          <table:table-cell office:value-type="string" calcext:value-type="string">
            <text:p>2023-10-02-13:38:46.0213030</text:p>
          </table:table-cell>
          <table:table-cell table:number-columns-repeated="2"/>
        </table:table-row>
        <table:table-row table:style-name="ro1">
          <table:table-cell office:value-type="float" office:value="558646444" calcext:value-type="float">
            <text:p>558646444</text:p>
          </table:table-cell>
          <table:table-cell office:value-type="float" office:value="749612527.838254" calcext:value-type="float">
            <text:p>749612527.838254</text:p>
          </table:table-cell>
          <table:table-cell/>
          <table:table-cell office:value-type="string" calcext:value-type="string">
            <text:p>2023-10-03T13:42:07.8382539Z</text:p>
          </table:table-cell>
          <table:table-cell office:value-type="string" calcext:value-type="string">
            <text:p>2023-10-03-13:43:17.0222539</text:p>
          </table:table-cell>
          <table:table-cell table:number-columns-repeated="2"/>
        </table:table-row>
        <table:table-row table:style-name="ro1">
          <table:table-cell office:value-type="float" office:value="558739744" calcext:value-type="float">
            <text:p>558739744</text:p>
          </table:table-cell>
          <table:table-cell office:value-type="float" office:value="749705827.839252" calcext:value-type="float">
            <text:p>749705827.839252</text:p>
          </table:table-cell>
          <table:table-cell/>
          <table:table-cell office:value-type="string" calcext:value-type="string">
            <text:p>2023-10-04T15:37:07.8392519Z</text:p>
          </table:table-cell>
          <table:table-cell office:value-type="string" calcext:value-type="string">
            <text:p>2023-10-04-15:38:17.0232520</text:p>
          </table:table-cell>
          <table:table-cell table:number-columns-repeated="2"/>
        </table:table-row>
        <table:table-row table:style-name="ro1">
          <table:table-cell office:value-type="float" office:value="558782910" calcext:value-type="float">
            <text:p>558782910</text:p>
          </table:table-cell>
          <table:table-cell office:value-type="float" office:value="749748993.839758" calcext:value-type="float">
            <text:p>749748993.839758</text:p>
          </table:table-cell>
          <table:table-cell/>
          <table:table-cell office:value-type="string" calcext:value-type="string">
            <text:p>2023-10-05T03:36:33.8397580Z</text:p>
          </table:table-cell>
          <table:table-cell office:value-type="string" calcext:value-type="string">
            <text:p>2023-10-05-03:37:43.0237580</text:p>
          </table:table-cell>
          <table:table-cell table:number-columns-repeated="2"/>
        </table:table-row>
        <table:table-row table:style-name="ro1">
          <table:table-cell office:value-type="float" office:value="558905327" calcext:value-type="float">
            <text:p>558905327</text:p>
          </table:table-cell>
          <table:table-cell office:value-type="float" office:value="749871410.841097" calcext:value-type="float">
            <text:p>749871410.841097</text:p>
          </table:table-cell>
          <table:table-cell/>
          <table:table-cell office:value-type="string" calcext:value-type="string">
            <text:p>2023-10-06T13:36:50.8410969Z</text:p>
          </table:table-cell>
          <table:table-cell office:value-type="string" calcext:value-type="string">
            <text:p>2023-10-06-13:38:00.0250970</text:p>
          </table:table-cell>
          <table:table-cell table:number-columns-repeated="2"/>
        </table:table-row>
        <table:table-row table:style-name="ro1">
          <table:table-cell office:value-type="float" office:value="558991886" calcext:value-type="float">
            <text:p>558991886</text:p>
          </table:table-cell>
          <table:table-cell office:value-type="float" office:value="749957969.842057" calcext:value-type="float">
            <text:p>749957969.842057</text:p>
          </table:table-cell>
          <table:table-cell/>
          <table:table-cell office:value-type="string" calcext:value-type="string">
            <text:p>2023-10-07T13:39:29.8420569Z</text:p>
          </table:table-cell>
          <table:table-cell office:value-type="string" calcext:value-type="string">
            <text:p>2023-10-07-13:40:39.0260570</text:p>
          </table:table-cell>
          <table:table-cell table:number-columns-repeated="2"/>
        </table:table-row>
        <table:table-row table:style-name="ro1">
          <table:table-cell office:value-type="float" office:value="559078122" calcext:value-type="float">
            <text:p>559078122</text:p>
          </table:table-cell>
          <table:table-cell office:value-type="float" office:value="750044205.843011" calcext:value-type="float">
            <text:p>750044205.843011</text:p>
          </table:table-cell>
          <table:table-cell/>
          <table:table-cell office:value-type="string" calcext:value-type="string">
            <text:p>2023-10-08T13:36:45.8430110Z</text:p>
          </table:table-cell>
          <table:table-cell office:value-type="string" calcext:value-type="string">
            <text:p>2023-10-08-13:37:55.0270110</text:p>
          </table:table-cell>
          <table:table-cell table:number-columns-repeated="2"/>
        </table:table-row>
        <table:table-row table:style-name="ro1">
          <table:table-cell office:value-type="float" office:value="559171673" calcext:value-type="float">
            <text:p>559171673</text:p>
          </table:table-cell>
          <table:table-cell office:value-type="float" office:value="750137756.844008" calcext:value-type="float">
            <text:p>750137756.844008</text:p>
          </table:table-cell>
          <table:table-cell/>
          <table:table-cell office:value-type="string" calcext:value-type="string">
            <text:p>2023-10-09T15:35:56.8440079Z</text:p>
          </table:table-cell>
          <table:table-cell office:value-type="string" calcext:value-type="string">
            <text:p>2023-10-09-15:37:06.0280079</text:p>
          </table:table-cell>
          <table:table-cell table:number-columns-repeated="2"/>
        </table:table-row>
        <table:table-row table:style-name="ro1">
          <table:table-cell office:value-type="float" office:value="559250898" calcext:value-type="float">
            <text:p>559250898</text:p>
          </table:table-cell>
          <table:table-cell office:value-type="float" office:value="750216981.844894" calcext:value-type="float">
            <text:p>750216981.844894</text:p>
          </table:table-cell>
          <table:table-cell/>
          <table:table-cell office:value-type="string" calcext:value-type="string">
            <text:p>2023-10-10T13:36:21.8448939Z</text:p>
          </table:table-cell>
          <table:table-cell office:value-type="string" calcext:value-type="string">
            <text:p>2023-10-10-13:37:31.0288939</text:p>
          </table:table-cell>
          <table:table-cell table:number-columns-repeated="2"/>
        </table:table-row>
        <table:table-row table:style-name="ro1">
          <table:table-cell office:value-type="float" office:value="559308476" calcext:value-type="float">
            <text:p>559308476</text:p>
          </table:table-cell>
          <table:table-cell office:value-type="float" office:value="750274559.845545" calcext:value-type="float">
            <text:p>750274559.845545</text:p>
          </table:table-cell>
          <table:table-cell/>
          <table:table-cell office:value-type="string" calcext:value-type="string">
            <text:p>2023-10-11T05:35:59.8455449Z</text:p>
          </table:table-cell>
          <table:table-cell office:value-type="string" calcext:value-type="string">
            <text:p>2023-10-11-05:37:09.0295449</text:p>
          </table:table-cell>
          <table:table-cell table:number-columns-repeated="2"/>
        </table:table-row>
        <table:table-row table:style-name="ro1">
          <table:table-cell office:value-type="float" office:value="559420047" calcext:value-type="float">
            <text:p>559420047</text:p>
          </table:table-cell>
          <table:table-cell office:value-type="float" office:value="750386130.846756" calcext:value-type="float">
            <text:p>750386130.846756</text:p>
          </table:table-cell>
          <table:table-cell/>
          <table:table-cell office:value-type="string" calcext:value-type="string">
            <text:p>2023-10-12T12:35:30.8467559Z</text:p>
          </table:table-cell>
          <table:table-cell office:value-type="string" calcext:value-type="string">
            <text:p>2023-10-12-12:36:40.0307559</text:p>
          </table:table-cell>
          <table:table-cell table:number-columns-repeated="2"/>
        </table:table-row>
        <table:table-row table:style-name="ro1">
          <table:table-cell office:value-type="float" office:value="559510061" calcext:value-type="float">
            <text:p>559510061</text:p>
          </table:table-cell>
          <table:table-cell office:value-type="float" office:value="750476144.847742" calcext:value-type="float">
            <text:p>750476144.847742</text:p>
          </table:table-cell>
          <table:table-cell/>
          <table:table-cell office:value-type="string" calcext:value-type="string">
            <text:p>2023-10-13T13:35:44.8477419Z</text:p>
          </table:table-cell>
          <table:table-cell office:value-type="string" calcext:value-type="string">
            <text:p>2023-10-13-13:36:54.0317419</text:p>
          </table:table-cell>
          <table:table-cell table:number-columns-repeated="2"/>
        </table:table-row>
        <table:table-row table:style-name="ro1">
          <table:table-cell office:value-type="float" office:value="559592852" calcext:value-type="float">
            <text:p>559592852</text:p>
          </table:table-cell>
          <table:table-cell office:value-type="float" office:value="750558935.848645" calcext:value-type="float">
            <text:p>750558935.848645</text:p>
          </table:table-cell>
          <table:table-cell/>
          <table:table-cell office:value-type="string" calcext:value-type="string">
            <text:p>2023-10-14T12:35:35.8486449Z</text:p>
          </table:table-cell>
          <table:table-cell office:value-type="string" calcext:value-type="string">
            <text:p>2023-10-14-12:36:45.0326449</text:p>
          </table:table-cell>
          <table:table-cell table:number-columns-repeated="2"/>
        </table:table-row>
        <table:table-row table:style-name="ro1">
          <table:table-cell office:value-type="float" office:value="559668398" calcext:value-type="float">
            <text:p>559668398</text:p>
          </table:table-cell>
          <table:table-cell office:value-type="float" office:value="750634481.849451" calcext:value-type="float">
            <text:p>750634481.849451</text:p>
          </table:table-cell>
          <table:table-cell/>
          <table:table-cell office:value-type="string" calcext:value-type="string">
            <text:p>2023-10-15T09:34:41.8494509Z</text:p>
          </table:table-cell>
          <table:table-cell office:value-type="string" calcext:value-type="string">
            <text:p>2023-10-15-09:35:51.0334509</text:p>
          </table:table-cell>
          <table:table-cell table:number-columns-repeated="2"/>
        </table:table-row>
        <table:table-row table:style-name="ro1">
          <table:table-cell office:value-type="float" office:value="559736795" calcext:value-type="float">
            <text:p>559736795</text:p>
          </table:table-cell>
          <table:table-cell office:value-type="float" office:value="750702878.850228" calcext:value-type="float">
            <text:p>750702878.850228</text:p>
          </table:table-cell>
          <table:table-cell/>
          <table:table-cell office:value-type="string" calcext:value-type="string">
            <text:p>2023-10-16T04:34:38.8502279Z</text:p>
          </table:table-cell>
          <table:table-cell office:value-type="string" calcext:value-type="string">
            <text:p>2023-10-16-04:35:48.0342279</text:p>
          </table:table-cell>
          <table:table-cell table:number-columns-repeated="2"/>
        </table:table-row>
        <table:table-row table:style-name="ro1">
          <table:table-cell office:value-type="float" office:value="559823187" calcext:value-type="float">
            <text:p>559823187</text:p>
          </table:table-cell>
          <table:table-cell office:value-type="float" office:value="750789270.851177" calcext:value-type="float">
            <text:p>750789270.851177</text:p>
          </table:table-cell>
          <table:table-cell/>
          <table:table-cell office:value-type="string" calcext:value-type="string">
            <text:p>2023-10-17T04:34:30.8511769Z</text:p>
          </table:table-cell>
          <table:table-cell office:value-type="string" calcext:value-type="string">
            <text:p>2023-10-17-04:35:40.0351769</text:p>
          </table:table-cell>
          <table:table-cell table:number-columns-repeated="2"/>
        </table:table-row>
        <table:table-row table:style-name="ro1">
          <table:table-cell office:value-type="float" office:value="559913194" calcext:value-type="float">
            <text:p>559913194</text:p>
          </table:table-cell>
          <table:table-cell office:value-type="float" office:value="750879277.852168" calcext:value-type="float">
            <text:p>750879277.852168</text:p>
          </table:table-cell>
          <table:table-cell/>
          <table:table-cell office:value-type="string" calcext:value-type="string">
            <text:p>2023-10-18T05:34:37.8521679Z</text:p>
          </table:table-cell>
          <table:table-cell office:value-type="string" calcext:value-type="string">
            <text:p>2023-10-18-05:35:47.0361679</text:p>
          </table:table-cell>
          <table:table-cell table:number-columns-repeated="2"/>
        </table:table-row>
        <table:table-row table:style-name="ro1">
          <table:table-cell office:value-type="float" office:value="559995952" calcext:value-type="float">
            <text:p>559995952</text:p>
          </table:table-cell>
          <table:table-cell office:value-type="float" office:value="750962035.853059" calcext:value-type="float">
            <text:p>750962035.853059</text:p>
          </table:table-cell>
          <table:table-cell/>
          <table:table-cell office:value-type="string" calcext:value-type="string">
            <text:p>2023-10-19T04:33:55.8530589Z</text:p>
          </table:table-cell>
          <table:table-cell office:value-type="string" calcext:value-type="string">
            <text:p>2023-10-19-04:35:05.0370589</text:p>
          </table:table-cell>
          <table:table-cell table:number-columns-repeated="2"/>
        </table:table-row>
        <table:table-row table:style-name="ro1">
          <table:table-cell office:value-type="float" office:value="560111150" calcext:value-type="float">
            <text:p>560111150</text:p>
          </table:table-cell>
          <table:table-cell office:value-type="float" office:value="751077233.854307" calcext:value-type="float">
            <text:p>751077233.854307</text:p>
          </table:table-cell>
          <table:table-cell/>
          <table:table-cell office:value-type="string" calcext:value-type="string">
            <text:p>2023-10-20T12:33:53.8543069Z</text:p>
          </table:table-cell>
          <table:table-cell office:value-type="string" calcext:value-type="string">
            <text:p>2023-10-20-12:35:03.0383069</text:p>
          </table:table-cell>
          <table:table-cell table:number-columns-repeated="2"/>
        </table:table-row>
        <table:table-row table:style-name="ro1">
          <table:table-cell office:value-type="float" office:value="560197531" calcext:value-type="float">
            <text:p>560197531</text:p>
          </table:table-cell>
          <table:table-cell office:value-type="float" office:value="751163614.855261" calcext:value-type="float">
            <text:p>751163614.855261</text:p>
          </table:table-cell>
          <table:table-cell/>
          <table:table-cell office:value-type="string" calcext:value-type="string">
            <text:p>2023-10-21T12:33:34.8552609Z</text:p>
          </table:table-cell>
          <table:table-cell office:value-type="string" calcext:value-type="string">
            <text:p>2023-10-21-12:34:44.0392609</text:p>
          </table:table-cell>
          <table:table-cell table:number-columns-repeated="2"/>
        </table:table-row>
        <table:table-row table:style-name="ro1">
          <table:table-cell office:value-type="float" office:value="560280329" calcext:value-type="float">
            <text:p>560280329</text:p>
          </table:table-cell>
          <table:table-cell office:value-type="float" office:value="751246412.856161" calcext:value-type="float">
            <text:p>751246412.856161</text:p>
          </table:table-cell>
          <table:table-cell/>
          <table:table-cell office:value-type="string" calcext:value-type="string">
            <text:p>2023-10-22T11:33:32.8561609Z</text:p>
          </table:table-cell>
          <table:table-cell office:value-type="string" calcext:value-type="string">
            <text:p>2023-10-22-11:34:42.0401610</text:p>
          </table:table-cell>
          <table:table-cell table:number-columns-repeated="2"/>
        </table:table-row>
        <table:table-row table:style-name="ro1">
          <table:table-cell office:value-type="float" office:value="560370334" calcext:value-type="float">
            <text:p>560370334</text:p>
          </table:table-cell>
          <table:table-cell office:value-type="float" office:value="751336417.857142" calcext:value-type="float">
            <text:p>751336417.857142</text:p>
          </table:table-cell>
          <table:table-cell/>
          <table:table-cell office:value-type="string" calcext:value-type="string">
            <text:p>2023-10-23T12:33:37.8571419Z</text:p>
          </table:table-cell>
          <table:table-cell office:value-type="string" calcext:value-type="string">
            <text:p>2023-10-23-12:34:47.0411419</text:p>
          </table:table-cell>
          <table:table-cell table:number-columns-repeated="2"/>
        </table:table-row>
        <table:table-row table:style-name="ro1">
          <table:table-cell office:value-type="float" office:value="560420672" calcext:value-type="float">
            <text:p>560420672</text:p>
          </table:table-cell>
          <table:table-cell office:value-type="float" office:value="751386755.857702" calcext:value-type="float">
            <text:p>751386755.857702</text:p>
          </table:table-cell>
          <table:table-cell/>
          <table:table-cell office:value-type="string" calcext:value-type="string">
            <text:p>2023-10-24T02:32:35.8577020Z</text:p>
          </table:table-cell>
          <table:table-cell office:value-type="string" calcext:value-type="string">
            <text:p>2023-10-24-02:33:45.0417020</text:p>
          </table:table-cell>
          <table:table-cell table:number-columns-repeated="2"/>
        </table:table-row>
        <table:table-row table:style-name="ro1">
          <table:table-cell office:value-type="float" office:value="560553871" calcext:value-type="float">
            <text:p>560553871</text:p>
          </table:table-cell>
          <table:table-cell office:value-type="float" office:value="751519954.859117" calcext:value-type="float">
            <text:p>751519954.859117</text:p>
          </table:table-cell>
          <table:table-cell/>
          <table:table-cell office:value-type="string" calcext:value-type="string">
            <text:p>2023-10-25T15:32:34.8591170Z</text:p>
          </table:table-cell>
          <table:table-cell office:value-type="string" calcext:value-type="string">
            <text:p>2023-10-25-15:33:44.0431170</text:p>
          </table:table-cell>
          <table:table-cell table:number-columns-repeated="2"/>
        </table:table-row>
        <table:table-row table:style-name="ro1">
          <table:table-cell office:value-type="float" office:value="560589843" calcext:value-type="float">
            <text:p>560589843</text:p>
          </table:table-cell>
          <table:table-cell office:value-type="float" office:value="751555926.859542" calcext:value-type="float">
            <text:p>751555926.859542</text:p>
          </table:table-cell>
          <table:table-cell/>
          <table:table-cell office:value-type="string" calcext:value-type="string">
            <text:p>2023-10-26T01:32:06.8595420Z</text:p>
          </table:table-cell>
          <table:table-cell office:value-type="string" calcext:value-type="string">
            <text:p>2023-10-26-01:33:16.0435420</text:p>
          </table:table-cell>
          <table:table-cell table:number-columns-repeated="2"/>
        </table:table-row>
        <table:table-row table:style-name="ro1">
          <table:table-cell office:value-type="float" office:value="560676231" calcext:value-type="float">
            <text:p>560676231</text:p>
          </table:table-cell>
          <table:table-cell office:value-type="float" office:value="751642314.860483" calcext:value-type="float">
            <text:p>751642314.860483</text:p>
          </table:table-cell>
          <table:table-cell/>
          <table:table-cell office:value-type="string" calcext:value-type="string">
            <text:p>2023-10-27T01:31:54.8604829Z</text:p>
          </table:table-cell>
          <table:table-cell office:value-type="string" calcext:value-type="string">
            <text:p>2023-10-27-01:33:04.0444829</text:p>
          </table:table-cell>
          <table:table-cell table:number-columns-repeated="2"/>
        </table:table-row>
        <table:table-row table:style-name="ro1">
          <table:table-cell office:value-type="float" office:value="560802282" calcext:value-type="float">
            <text:p>560802282</text:p>
          </table:table-cell>
          <table:table-cell office:value-type="float" office:value="751768365.86184" calcext:value-type="float">
            <text:p>751768365.86184</text:p>
          </table:table-cell>
          <table:table-cell/>
          <table:table-cell office:value-type="string" calcext:value-type="string">
            <text:p>2023-10-28T12:32:45.8618400Z</text:p>
          </table:table-cell>
          <table:table-cell office:value-type="string" calcext:value-type="string">
            <text:p>2023-10-28-12:33:55.0458400</text:p>
          </table:table-cell>
          <table:table-cell table:number-columns-repeated="2"/>
        </table:table-row>
        <table:table-row table:style-name="ro1">
          <table:table-cell office:value-type="float" office:value="560888655" calcext:value-type="float">
            <text:p>560888655</text:p>
          </table:table-cell>
          <table:table-cell office:value-type="float" office:value="751854738.862795" calcext:value-type="float">
            <text:p>751854738.862795</text:p>
          </table:table-cell>
          <table:table-cell/>
          <table:table-cell office:value-type="string" calcext:value-type="string">
            <text:p>2023-10-29T12:32:18.8627949Z</text:p>
          </table:table-cell>
          <table:table-cell office:value-type="string" calcext:value-type="string">
            <text:p>2023-10-29-12:33:28.0467950</text:p>
          </table:table-cell>
          <table:table-cell table:number-columns-repeated="2"/>
        </table:table-row>
        <table:table-row table:style-name="ro1">
          <table:table-cell office:value-type="float" office:value="560946239" calcext:value-type="float">
            <text:p>560946239</text:p>
          </table:table-cell>
          <table:table-cell office:value-type="float" office:value="751912322.863426" calcext:value-type="float">
            <text:p>751912322.863426</text:p>
          </table:table-cell>
          <table:table-cell/>
          <table:table-cell office:value-type="string" calcext:value-type="string">
            <text:p>2023-10-30T04:32:02.8634259Z</text:p>
          </table:table-cell>
          <table:table-cell office:value-type="string" calcext:value-type="string">
            <text:p>2023-10-30-04:33:12.0474259</text:p>
          </table:table-cell>
          <table:table-cell table:number-columns-repeated="2"/>
        </table:table-row>
        <table:table-row table:style-name="ro1">
          <table:table-cell office:value-type="float" office:value="561072196" calcext:value-type="float">
            <text:p>561072196</text:p>
          </table:table-cell>
          <table:table-cell office:value-type="float" office:value="752038279.864767" calcext:value-type="float">
            <text:p>752038279.864767</text:p>
          </table:table-cell>
          <table:table-cell/>
          <table:table-cell office:value-type="string" calcext:value-type="string">
            <text:p>2023-10-31T15:31:19.8647669Z</text:p>
          </table:table-cell>
          <table:table-cell office:value-type="string" calcext:value-type="string">
            <text:p>2023-10-31-15:32:29.0487669</text:p>
          </table:table-cell>
          <table:table-cell table:number-columns-repeated="2"/>
        </table:table-row>
        <table:table-row table:style-name="ro1">
          <table:table-cell office:value-type="float" office:value="561144211" calcext:value-type="float">
            <text:p>561144211</text:p>
          </table:table-cell>
          <table:table-cell office:value-type="float" office:value="752110294.865559" calcext:value-type="float">
            <text:p>752110294.865559</text:p>
          </table:table-cell>
          <table:table-cell/>
          <table:table-cell office:value-type="string" calcext:value-type="string">
            <text:p>2023-11-01T11:31:34.8655589Z</text:p>
          </table:table-cell>
          <table:table-cell office:value-type="string" calcext:value-type="string">
            <text:p>2023-11-01-11:32:44.0495589</text:p>
          </table:table-cell>
          <table:table-cell table:number-columns-repeated="2"/>
        </table:table-row>
        <table:table-row table:style-name="ro1">
          <table:table-cell office:value-type="float" office:value="561230606" calcext:value-type="float">
            <text:p>561230606</text:p>
          </table:table-cell>
          <table:table-cell office:value-type="float" office:value="752196689.866504" calcext:value-type="float">
            <text:p>752196689.866504</text:p>
          </table:table-cell>
          <table:table-cell/>
          <table:table-cell office:value-type="string" calcext:value-type="string">
            <text:p>2023-11-02T11:31:29.8665039Z</text:p>
          </table:table-cell>
          <table:table-cell office:value-type="string" calcext:value-type="string">
            <text:p>2023-11-02-11:32:39.0505039</text:p>
          </table:table-cell>
          <table:table-cell table:number-columns-repeated="2"/>
        </table:table-row>
        <table:table-row table:style-name="ro1">
          <table:table-cell office:value-type="float" office:value="561316997" calcext:value-type="float">
            <text:p>561316997</text:p>
          </table:table-cell>
          <table:table-cell office:value-type="float" office:value="752283080.86743" calcext:value-type="float">
            <text:p>752283080.86743</text:p>
          </table:table-cell>
          <table:table-cell/>
          <table:table-cell office:value-type="string" calcext:value-type="string">
            <text:p>2023-11-03T11:31:20.8674299Z</text:p>
          </table:table-cell>
          <table:table-cell office:value-type="string" calcext:value-type="string">
            <text:p>2023-11-03-11:32:30.0514299</text:p>
          </table:table-cell>
          <table:table-cell table:number-columns-repeated="2"/>
        </table:table-row>
        <table:table-row table:style-name="ro1">
          <table:table-cell office:value-type="float" office:value="561403388" calcext:value-type="float">
            <text:p>561403388</text:p>
          </table:table-cell>
          <table:table-cell office:value-type="float" office:value="752369471.868376" calcext:value-type="float">
            <text:p>752369471.868376</text:p>
          </table:table-cell>
          <table:table-cell/>
          <table:table-cell office:value-type="string" calcext:value-type="string">
            <text:p>2023-11-04T11:31:11.8683760Z</text:p>
          </table:table-cell>
          <table:table-cell office:value-type="string" calcext:value-type="string">
            <text:p>2023-11-04-11:32:21.0523760</text:p>
          </table:table-cell>
          <table:table-cell table:number-columns-repeated="2"/>
        </table:table-row>
        <table:table-row table:style-name="ro1">
          <table:table-cell office:value-type="float" office:value="561489779" calcext:value-type="float">
            <text:p>561489779</text:p>
          </table:table-cell>
          <table:table-cell office:value-type="float" office:value="752455862.869306" calcext:value-type="float">
            <text:p>752455862.869306</text:p>
          </table:table-cell>
          <table:table-cell/>
          <table:table-cell office:value-type="string" calcext:value-type="string">
            <text:p>2023-11-05T11:31:02.8693059Z</text:p>
          </table:table-cell>
          <table:table-cell office:value-type="string" calcext:value-type="string">
            <text:p>2023-11-05-11:32:12.0533059</text:p>
          </table:table-cell>
          <table:table-cell table:number-columns-repeated="2"/>
        </table:table-row>
        <table:table-row table:style-name="ro1">
          <table:table-cell office:value-type="float" office:value="561591438" calcext:value-type="float">
            <text:p>561591438</text:p>
          </table:table-cell>
          <table:table-cell office:value-type="float" office:value="752557521.870393" calcext:value-type="float">
            <text:p>752557521.870393</text:p>
          </table:table-cell>
          <table:table-cell/>
          <table:table-cell office:value-type="string" calcext:value-type="string">
            <text:p>2023-11-06T15:45:21.8703930Z</text:p>
          </table:table-cell>
          <table:table-cell office:value-type="string" calcext:value-type="string">
            <text:p>2023-11-06-15:46:31.0543930</text:p>
          </table:table-cell>
          <table:table-cell table:number-columns-repeated="2"/>
        </table:table-row>
        <table:table-row table:style-name="ro1">
          <table:table-cell office:value-type="float" office:value="561676917" calcext:value-type="float">
            <text:p>561676917</text:p>
          </table:table-cell>
          <table:table-cell office:value-type="float" office:value="752643000.871321" calcext:value-type="float">
            <text:p>752643000.871321</text:p>
          </table:table-cell>
          <table:table-cell/>
          <table:table-cell office:value-type="string" calcext:value-type="string">
            <text:p>2023-11-07T15:30:00.8713209Z</text:p>
          </table:table-cell>
          <table:table-cell office:value-type="string" calcext:value-type="string">
            <text:p>2023-11-07-15:31:10.0553209</text:p>
          </table:table-cell>
          <table:table-cell table:number-columns-repeated="2"/>
        </table:table-row>
        <table:table-row table:style-name="ro1">
          <table:table-cell office:value-type="float" office:value="561720126" calcext:value-type="float">
            <text:p>561720126</text:p>
          </table:table-cell>
          <table:table-cell office:value-type="float" office:value="752686209.8718" calcext:value-type="float">
            <text:p>752686209.8718</text:p>
          </table:table-cell>
          <table:table-cell/>
          <table:table-cell office:value-type="string" calcext:value-type="string">
            <text:p>2023-11-08T03:30:09.8717999Z</text:p>
          </table:table-cell>
          <table:table-cell office:value-type="string" calcext:value-type="string">
            <text:p>2023-11-08-03:31:19.0557999</text:p>
          </table:table-cell>
          <table:table-cell table:number-columns-repeated="2"/>
        </table:table-row>
        <table:table-row table:style-name="ro1">
          <table:table-cell office:value-type="float" office:value="561806510" calcext:value-type="float">
            <text:p>561806510</text:p>
          </table:table-cell>
          <table:table-cell office:value-type="float" office:value="752772593.872739" calcext:value-type="float">
            <text:p>752772593.872739</text:p>
          </table:table-cell>
          <table:table-cell/>
          <table:table-cell office:value-type="string" calcext:value-type="string">
            <text:p>2023-11-09T03:29:53.8727389Z</text:p>
          </table:table-cell>
          <table:table-cell office:value-type="string" calcext:value-type="string">
            <text:p>2023-11-09-03:31:03.0567389</text:p>
          </table:table-cell>
          <table:table-cell table:number-columns-repeated="2"/>
        </table:table-row>
        <table:table-row table:style-name="ro1">
          <table:table-cell office:value-type="float" office:value="561936706" calcext:value-type="float">
            <text:p>561936706</text:p>
          </table:table-cell>
          <table:table-cell office:value-type="float" office:value="752902789.874134" calcext:value-type="float">
            <text:p>752902789.874134</text:p>
          </table:table-cell>
          <table:table-cell/>
          <table:table-cell office:value-type="string" calcext:value-type="string">
            <text:p>2023-11-10T15:39:49.8741339Z</text:p>
          </table:table-cell>
          <table:table-cell office:value-type="string" calcext:value-type="string">
            <text:p>2023-11-10-15:40:59.0581339</text:p>
          </table:table-cell>
          <table:table-cell table:number-columns-repeated="2"/>
        </table:table-row>
        <table:table-row table:style-name="ro1">
          <table:table-cell office:value-type="float" office:value="562008115" calcext:value-type="float">
            <text:p>562008115</text:p>
          </table:table-cell>
          <table:table-cell office:value-type="float" office:value="752974198.874923" calcext:value-type="float">
            <text:p>752974198.874923</text:p>
          </table:table-cell>
          <table:table-cell/>
          <table:table-cell office:value-type="string" calcext:value-type="string">
            <text:p>2023-11-11T11:29:58.8749229Z</text:p>
          </table:table-cell>
          <table:table-cell office:value-type="string" calcext:value-type="string">
            <text:p>2023-11-11-11:31:08.0589230</text:p>
          </table:table-cell>
          <table:table-cell table:number-columns-repeated="2"/>
        </table:table-row>
        <table:table-row table:style-name="ro1">
          <table:table-cell office:value-type="float" office:value="562108864" calcext:value-type="float">
            <text:p>562108864</text:p>
          </table:table-cell>
          <table:table-cell office:value-type="float" office:value="753074947.875986" calcext:value-type="float">
            <text:p>753074947.875986</text:p>
          </table:table-cell>
          <table:table-cell/>
          <table:table-cell office:value-type="string" calcext:value-type="string">
            <text:p>2023-11-12T15:29:07.8759859Z</text:p>
          </table:table-cell>
          <table:table-cell office:value-type="string" calcext:value-type="string">
            <text:p>2023-11-12-15:30:17.0599859</text:p>
          </table:table-cell>
          <table:table-cell table:number-columns-repeated="2"/>
        </table:table-row>
        <table:table-row table:style-name="ro1">
          <table:table-cell office:value-type="float" office:value="562180883" calcext:value-type="float">
            <text:p>562180883</text:p>
          </table:table-cell>
          <table:table-cell office:value-type="float" office:value="753146966.876773" calcext:value-type="float">
            <text:p>753146966.876773</text:p>
          </table:table-cell>
          <table:table-cell/>
          <table:table-cell office:value-type="string" calcext:value-type="string">
            <text:p>2023-11-13T11:29:26.8767729Z</text:p>
          </table:table-cell>
          <table:table-cell office:value-type="string" calcext:value-type="string">
            <text:p>2023-11-13-11:30:36.0607730</text:p>
          </table:table-cell>
          <table:table-cell table:number-columns-repeated="2"/>
        </table:table-row>
        <table:table-row table:style-name="ro1">
          <table:table-cell office:value-type="float" office:value="562267270" calcext:value-type="float">
            <text:p>562267270</text:p>
          </table:table-cell>
          <table:table-cell office:value-type="float" office:value="753233353.877708" calcext:value-type="float">
            <text:p>753233353.877708</text:p>
          </table:table-cell>
          <table:table-cell/>
          <table:table-cell office:value-type="string" calcext:value-type="string">
            <text:p>2023-11-14T11:29:13.8777079Z</text:p>
          </table:table-cell>
          <table:table-cell office:value-type="string" calcext:value-type="string">
            <text:p>2023-11-14-11:30:23.0617079</text:p>
          </table:table-cell>
          <table:table-cell table:number-columns-repeated="2"/>
        </table:table-row>
        <table:table-row table:style-name="ro1">
          <table:table-cell office:value-type="float" office:value="562350040" calcext:value-type="float">
            <text:p>562350040</text:p>
          </table:table-cell>
          <table:table-cell office:value-type="float" office:value="753316123.878603" calcext:value-type="float">
            <text:p>753316123.878603</text:p>
          </table:table-cell>
          <table:table-cell/>
          <table:table-cell office:value-type="string" calcext:value-type="string">
            <text:p>2023-11-15T10:28:43.8786029Z</text:p>
          </table:table-cell>
          <table:table-cell office:value-type="string" calcext:value-type="string">
            <text:p>2023-11-15-10:29:53.0626029</text:p>
          </table:table-cell>
          <table:table-cell table:number-columns-repeated="2"/>
        </table:table-row>
        <table:table-row table:style-name="ro1">
          <table:table-cell office:value-type="float" office:value="562386004" calcext:value-type="float">
            <text:p>562386004</text:p>
          </table:table-cell>
          <table:table-cell office:value-type="float" office:value="753352087.878959" calcext:value-type="float">
            <text:p>753352087.878959</text:p>
          </table:table-cell>
          <table:table-cell/>
          <table:table-cell office:value-type="string" calcext:value-type="string">
            <text:p>2023-11-15T20:28:07.8789589Z</text:p>
          </table:table-cell>
          <table:table-cell office:value-type="string" calcext:value-type="string">
            <text:p>2023-11-15-20:29:17.0629589</text:p>
          </table:table-cell>
          <table:table-cell table:number-columns-repeated="2"/>
        </table:table-row>
        <table:table-row table:style-name="ro1">
          <table:table-cell office:value-type="float" office:value="562540808" calcext:value-type="float">
            <text:p>562540808</text:p>
          </table:table-cell>
          <table:table-cell office:value-type="float" office:value="753506891.880631" calcext:value-type="float">
            <text:p>753506891.880631</text:p>
          </table:table-cell>
          <table:table-cell/>
          <table:table-cell office:value-type="string" calcext:value-type="string">
            <text:p>2023-11-17T15:28:11.8806309Z</text:p>
          </table:table-cell>
          <table:table-cell office:value-type="string" calcext:value-type="string">
            <text:p>2023-11-17-15:29:21.0646309</text:p>
          </table:table-cell>
          <table:table-cell table:number-columns-repeated="2"/>
        </table:table-row>
        <table:table-row table:style-name="ro1">
          <table:table-cell office:value-type="float" office:value="562627199" calcext:value-type="float">
            <text:p>562627199</text:p>
          </table:table-cell>
          <table:table-cell office:value-type="float" office:value="753593282.881562" calcext:value-type="float">
            <text:p>753593282.881562</text:p>
          </table:table-cell>
          <table:table-cell/>
          <table:table-cell office:value-type="string" calcext:value-type="string">
            <text:p>2023-11-18T15:28:02.8815619Z</text:p>
          </table:table-cell>
          <table:table-cell office:value-type="string" calcext:value-type="string">
            <text:p>2023-11-18-15:29:12.0655620</text:p>
          </table:table-cell>
          <table:table-cell table:number-columns-repeated="2"/>
        </table:table-row>
        <table:table-row table:style-name="ro1">
          <table:table-cell office:value-type="float" office:value="562695606" calcext:value-type="float">
            <text:p>562695606</text:p>
          </table:table-cell>
          <table:table-cell office:value-type="float" office:value="753661689.882326" calcext:value-type="float">
            <text:p>753661689.882326</text:p>
          </table:table-cell>
          <table:table-cell/>
          <table:table-cell office:value-type="string" calcext:value-type="string">
            <text:p>2023-11-19T10:28:09.8823260Z</text:p>
          </table:table-cell>
          <table:table-cell office:value-type="string" calcext:value-type="string">
            <text:p>2023-11-19-10:29:19.0663260</text:p>
          </table:table-cell>
          <table:table-cell table:number-columns-repeated="2"/>
        </table:table-row>
        <table:table-row table:style-name="ro1">
          <table:table-cell office:value-type="float" office:value="562799976" calcext:value-type="float">
            <text:p>562799976</text:p>
          </table:table-cell>
          <table:table-cell office:value-type="float" office:value="753766059.883441" calcext:value-type="float">
            <text:p>753766059.883441</text:p>
          </table:table-cell>
          <table:table-cell/>
          <table:table-cell office:value-type="string" calcext:value-type="string">
            <text:p>2023-11-20T15:27:39.8834409Z</text:p>
          </table:table-cell>
          <table:table-cell office:value-type="string" calcext:value-type="string">
            <text:p>2023-11-20-15:28:49.0674409</text:p>
          </table:table-cell>
          <table:table-cell table:number-columns-repeated="2"/>
        </table:table-row>
        <table:table-row table:style-name="ro1">
          <table:table-cell office:value-type="float" office:value="562886368" calcext:value-type="float">
            <text:p>562886368</text:p>
          </table:table-cell>
          <table:table-cell office:value-type="float" office:value="753852451.88437" calcext:value-type="float">
            <text:p>753852451.88437</text:p>
          </table:table-cell>
          <table:table-cell/>
          <table:table-cell office:value-type="string" calcext:value-type="string">
            <text:p>2023-11-21T15:27:31.8843699Z</text:p>
          </table:table-cell>
          <table:table-cell office:value-type="string" calcext:value-type="string">
            <text:p>2023-11-21-15:28:41.0683699</text:p>
          </table:table-cell>
          <table:table-cell table:number-columns-repeated="2"/>
        </table:table-row>
        <table:table-row table:style-name="ro1">
          <table:table-cell office:value-type="float" office:value="562943954" calcext:value-type="float">
            <text:p>562943954</text:p>
          </table:table-cell>
          <table:table-cell office:value-type="float" office:value="753910037.884969" calcext:value-type="float">
            <text:p>753910037.884969</text:p>
          </table:table-cell>
          <table:table-cell/>
          <table:table-cell office:value-type="string" calcext:value-type="string">
            <text:p>2023-11-22T07:27:17.8849689Z</text:p>
          </table:table-cell>
          <table:table-cell office:value-type="string" calcext:value-type="string">
            <text:p>2023-11-22-07:28:27.0689690</text:p>
          </table:table-cell>
          <table:table-cell table:number-columns-repeated="2"/>
        </table:table-row>
        <table:table-row table:style-name="ro1">
          <table:table-cell office:value-type="float" office:value="563041185" calcext:value-type="float">
            <text:p>563041185</text:p>
          </table:table-cell>
          <table:table-cell office:value-type="float" office:value="754007268.88603" calcext:value-type="float">
            <text:p>754007268.88603</text:p>
          </table:table-cell>
          <table:table-cell/>
          <table:table-cell office:value-type="string" calcext:value-type="string">
            <text:p>2023-11-23T10:27:48.8860299Z</text:p>
          </table:table-cell>
          <table:table-cell office:value-type="string" calcext:value-type="string">
            <text:p>2023-11-23-10:28:58.0700299</text:p>
          </table:table-cell>
          <table:table-cell table:number-columns-repeated="2"/>
        </table:table-row>
        <table:table-row table:style-name="ro1">
          <table:table-cell office:value-type="float" office:value="563145531" calcext:value-type="float">
            <text:p>563145531</text:p>
          </table:table-cell>
          <table:table-cell office:value-type="float" office:value="754111614.887148" calcext:value-type="float">
            <text:p>754111614.887148</text:p>
          </table:table-cell>
          <table:table-cell/>
          <table:table-cell office:value-type="string" calcext:value-type="string">
            <text:p>2023-11-24T15:26:54.8871480Z</text:p>
          </table:table-cell>
          <table:table-cell office:value-type="string" calcext:value-type="string">
            <text:p>2023-11-24-15:28:04.0711480</text:p>
          </table:table-cell>
          <table:table-cell table:number-columns-repeated="2"/>
        </table:table-row>
        <table:table-row table:style-name="ro1">
          <table:table-cell office:value-type="float" office:value="563224721" calcext:value-type="float">
            <text:p>563224721</text:p>
          </table:table-cell>
          <table:table-cell office:value-type="float" office:value="754190804.887988" calcext:value-type="float">
            <text:p>754190804.887988</text:p>
          </table:table-cell>
          <table:table-cell/>
          <table:table-cell office:value-type="string" calcext:value-type="string">
            <text:p>2023-11-25T13:26:44.8879879Z</text:p>
          </table:table-cell>
          <table:table-cell office:value-type="string" calcext:value-type="string">
            <text:p>2023-11-25-13:27:54.0719879</text:p>
          </table:table-cell>
          <table:table-cell table:number-columns-repeated="2"/>
        </table:table-row>
        <table:table-row table:style-name="ro1">
          <table:table-cell office:value-type="float" office:value="563318315" calcext:value-type="float">
            <text:p>563318315</text:p>
          </table:table-cell>
          <table:table-cell office:value-type="float" office:value="754284398.888995" calcext:value-type="float">
            <text:p>754284398.888995</text:p>
          </table:table-cell>
          <table:table-cell/>
          <table:table-cell office:value-type="string" calcext:value-type="string">
            <text:p>2023-11-26T15:26:38.8889949Z</text:p>
          </table:table-cell>
          <table:table-cell office:value-type="string" calcext:value-type="string">
            <text:p>2023-11-26-15:27:48.0729949</text:p>
          </table:table-cell>
          <table:table-cell table:number-columns-repeated="2"/>
        </table:table-row>
        <table:table-row table:style-name="ro1">
          <table:table-cell office:value-type="float" office:value="563404699" calcext:value-type="float">
            <text:p>563404699</text:p>
          </table:table-cell>
          <table:table-cell office:value-type="float" office:value="754370782.889933" calcext:value-type="float">
            <text:p>754370782.889933</text:p>
          </table:table-cell>
          <table:table-cell/>
          <table:table-cell office:value-type="string" calcext:value-type="string">
            <text:p>2023-11-27T15:26:22.8899329Z</text:p>
          </table:table-cell>
          <table:table-cell office:value-type="string" calcext:value-type="string">
            <text:p>2023-11-27-15:27:32.0739330</text:p>
          </table:table-cell>
          <table:table-cell table:number-columns-repeated="2"/>
        </table:table-row>
        <table:table-row table:style-name="ro1">
          <table:table-cell office:value-type="float" office:value="563433482" calcext:value-type="float">
            <text:p>563433482</text:p>
          </table:table-cell>
          <table:table-cell office:value-type="float" office:value="754399565.890248" calcext:value-type="float">
            <text:p>754399565.890248</text:p>
          </table:table-cell>
          <table:table-cell/>
          <table:table-cell office:value-type="string" calcext:value-type="string">
            <text:p>2023-11-27T23:26:05.8902479Z</text:p>
          </table:table-cell>
          <table:table-cell office:value-type="string" calcext:value-type="string">
            <text:p>2023-11-27-23:27:15.0742479</text:p>
          </table:table-cell>
          <table:table-cell table:number-columns-repeated="2"/>
        </table:table-row>
        <table:table-row table:style-name="ro1">
          <table:table-cell office:value-type="float" office:value="563577481" calcext:value-type="float">
            <text:p>563577481</text:p>
          </table:table-cell>
          <table:table-cell office:value-type="float" office:value="754543564.891789" calcext:value-type="float">
            <text:p>754543564.891789</text:p>
          </table:table-cell>
          <table:table-cell/>
          <table:table-cell office:value-type="string" calcext:value-type="string">
            <text:p>2023-11-29T15:26:04.8917889Z</text:p>
          </table:table-cell>
          <table:table-cell office:value-type="string" calcext:value-type="string">
            <text:p>2023-11-29-15:27:14.0757889</text:p>
          </table:table-cell>
          <table:table-cell table:number-columns-repeated="2"/>
        </table:table-row>
        <table:table-row table:style-name="ro1">
          <table:table-cell office:value-type="float" office:value="563645913" calcext:value-type="float">
            <text:p>563645913</text:p>
          </table:table-cell>
          <table:table-cell office:value-type="float" office:value="754611996.892527" calcext:value-type="float">
            <text:p>754611996.892527</text:p>
          </table:table-cell>
          <table:table-cell/>
          <table:table-cell office:value-type="string" calcext:value-type="string">
            <text:p>2023-11-30T10:26:36.8925269Z</text:p>
          </table:table-cell>
          <table:table-cell office:value-type="string" calcext:value-type="string">
            <text:p>2023-11-30-10:27:46.0765269</text:p>
          </table:table-cell>
          <table:table-cell table:number-columns-repeated="2"/>
        </table:table-row>
        <table:table-row table:style-name="ro1">
          <table:table-cell office:value-type="float" office:value="563750268" calcext:value-type="float">
            <text:p>563750268</text:p>
          </table:table-cell>
          <table:table-cell office:value-type="float" office:value="754716351.893645" calcext:value-type="float">
            <text:p>754716351.893645</text:p>
          </table:table-cell>
          <table:table-cell/>
          <table:table-cell office:value-type="string" calcext:value-type="string">
            <text:p>2023-12-01T15:25:51.8936449Z</text:p>
          </table:table-cell>
          <table:table-cell office:value-type="string" calcext:value-type="string">
            <text:p>2023-12-01-15:27:01.0776449</text:p>
          </table:table-cell>
          <table:table-cell table:number-columns-repeated="2"/>
        </table:table-row>
        <table:table-row table:style-name="ro1">
          <table:table-cell office:value-type="float" office:value="563836654" calcext:value-type="float">
            <text:p>563836654</text:p>
          </table:table-cell>
          <table:table-cell office:value-type="float" office:value="754802737.894573" calcext:value-type="float">
            <text:p>754802737.894573</text:p>
          </table:table-cell>
          <table:table-cell/>
          <table:table-cell office:value-type="string" calcext:value-type="string">
            <text:p>2023-12-02T15:25:37.8945729Z</text:p>
          </table:table-cell>
          <table:table-cell office:value-type="string" calcext:value-type="string">
            <text:p>2023-12-02-15:26:47.0785729</text:p>
          </table:table-cell>
          <table:table-cell table:number-columns-repeated="2"/>
        </table:table-row>
        <table:table-row table:style-name="ro1">
          <table:table-cell office:value-type="float" office:value="563923043" calcext:value-type="float">
            <text:p>563923043</text:p>
          </table:table-cell>
          <table:table-cell office:value-type="float" office:value="754889126.8955" calcext:value-type="float">
            <text:p>754889126.8955</text:p>
          </table:table-cell>
          <table:table-cell/>
          <table:table-cell office:value-type="string" calcext:value-type="string">
            <text:p>2023-12-03T15:25:26.8954999Z</text:p>
          </table:table-cell>
          <table:table-cell office:value-type="string" calcext:value-type="string">
            <text:p>2023-12-03-15:26:36.0794999</text:p>
          </table:table-cell>
          <table:table-cell table:number-columns-repeated="2"/>
        </table:table-row>
        <table:table-row table:style-name="ro1">
          <table:table-cell office:value-type="float" office:value="563987871" calcext:value-type="float">
            <text:p>563987871</text:p>
          </table:table-cell>
          <table:table-cell office:value-type="float" office:value="754953954.896195" calcext:value-type="float">
            <text:p>754953954.896195</text:p>
          </table:table-cell>
          <table:table-cell/>
          <table:table-cell office:value-type="string" calcext:value-type="string">
            <text:p>2023-12-04T09:25:54.8961949Z</text:p>
          </table:table-cell>
          <table:table-cell office:value-type="string" calcext:value-type="string">
            <text:p>2023-12-04-09:27:04.0801949</text:p>
          </table:table-cell>
          <table:table-cell table:number-columns-repeated="2"/>
        </table:table-row>
        <table:table-row table:style-name="ro1">
          <table:table-cell office:value-type="float" office:value="564095833" calcext:value-type="float">
            <text:p>564095833</text:p>
          </table:table-cell>
          <table:table-cell office:value-type="float" office:value="755061916.897341" calcext:value-type="float">
            <text:p>755061916.897341</text:p>
          </table:table-cell>
          <table:table-cell/>
          <table:table-cell office:value-type="string" calcext:value-type="string">
            <text:p>2023-12-05T15:25:16.8973410Z</text:p>
          </table:table-cell>
          <table:table-cell office:value-type="string" calcext:value-type="string">
            <text:p>2023-12-05-15:26:26.0813410</text:p>
          </table:table-cell>
          <table:table-cell table:number-columns-repeated="2"/>
        </table:table-row>
        <table:table-row table:style-name="ro1">
          <table:table-cell office:value-type="float" office:value="564182225" calcext:value-type="float">
            <text:p>564182225</text:p>
          </table:table-cell>
          <table:table-cell office:value-type="float" office:value="755148308.898263" calcext:value-type="float">
            <text:p>755148308.898263</text:p>
          </table:table-cell>
          <table:table-cell/>
          <table:table-cell office:value-type="string" calcext:value-type="string">
            <text:p>2023-12-06T15:25:08.8982629Z</text:p>
          </table:table-cell>
          <table:table-cell office:value-type="string" calcext:value-type="string">
            <text:p>2023-12-06-15:26:18.0822629</text:p>
          </table:table-cell>
          <table:table-cell table:number-columns-repeated="2"/>
        </table:table-row>
        <table:table-row table:style-name="ro1">
          <table:table-cell office:value-type="float" office:value="564218357" calcext:value-type="float">
            <text:p>564218357</text:p>
          </table:table-cell>
          <table:table-cell office:value-type="float" office:value="755184440.898664" calcext:value-type="float">
            <text:p>755184440.898664</text:p>
          </table:table-cell>
          <table:table-cell/>
          <table:table-cell office:value-type="string" calcext:value-type="string">
            <text:p>2023-12-07T01:27:20.8986639Z</text:p>
          </table:table-cell>
          <table:table-cell office:value-type="string" calcext:value-type="string">
            <text:p>2023-12-07-01:28:30.0826640</text:p>
          </table:table-cell>
          <table:table-cell table:number-columns-repeated="2"/>
        </table:table-row>
        <table:table-row table:style-name="ro1">
          <table:table-cell office:value-type="float" office:value="564355008" calcext:value-type="float">
            <text:p>564355008</text:p>
          </table:table-cell>
          <table:table-cell office:value-type="float" office:value="755321091.900118" calcext:value-type="float">
            <text:p>755321091.900118</text:p>
          </table:table-cell>
          <table:table-cell/>
          <table:table-cell office:value-type="string" calcext:value-type="string">
            <text:p>2023-12-08T15:24:51.9001179Z</text:p>
          </table:table-cell>
          <table:table-cell office:value-type="string" calcext:value-type="string">
            <text:p>2023-12-08-15:26:01.0841180</text:p>
          </table:table-cell>
          <table:table-cell table:number-columns-repeated="2"/>
        </table:table-row>
        <table:table-row table:style-name="ro1">
          <table:table-cell office:value-type="float" office:value="564441405" calcext:value-type="float">
            <text:p>564441405</text:p>
          </table:table-cell>
          <table:table-cell office:value-type="float" office:value="755407488.90104" calcext:value-type="float">
            <text:p>755407488.90104</text:p>
          </table:table-cell>
          <table:table-cell/>
          <table:table-cell office:value-type="string" calcext:value-type="string">
            <text:p>2023-12-09T15:24:48.9010399Z</text:p>
          </table:table-cell>
          <table:table-cell office:value-type="string" calcext:value-type="string">
            <text:p>2023-12-09-15:25:58.0850399</text:p>
          </table:table-cell>
          <table:table-cell table:number-columns-repeated="2"/>
        </table:table-row>
        <table:table-row table:style-name="ro1">
          <table:table-cell office:value-type="float" office:value="564506227" calcext:value-type="float">
            <text:p>564506227</text:p>
          </table:table-cell>
          <table:table-cell office:value-type="float" office:value="755472310.901741" calcext:value-type="float">
            <text:p>755472310.901741</text:p>
          </table:table-cell>
          <table:table-cell/>
          <table:table-cell office:value-type="string" calcext:value-type="string">
            <text:p>2023-12-10T09:25:10.9017410Z</text:p>
          </table:table-cell>
          <table:table-cell office:value-type="string" calcext:value-type="string">
            <text:p>2023-12-10-09:26:20.0857410</text:p>
          </table:table-cell>
          <table:table-cell table:number-columns-repeated="2"/>
        </table:table-row>
        <table:table-row table:style-name="ro1">
          <table:table-cell office:value-type="float" office:value="564606979" calcext:value-type="float">
            <text:p>564606979</text:p>
          </table:table-cell>
          <table:table-cell office:value-type="float" office:value="755573062.9028" calcext:value-type="float">
            <text:p>755573062.9028</text:p>
          </table:table-cell>
          <table:table-cell/>
          <table:table-cell office:value-type="string" calcext:value-type="string">
            <text:p>2023-12-11T13:24:22.9027999Z</text:p>
          </table:table-cell>
          <table:table-cell office:value-type="string" calcext:value-type="string">
            <text:p>2023-12-11-13:25:32.0867999</text:p>
          </table:table-cell>
          <table:table-cell table:number-columns-repeated="2"/>
        </table:table-row>
        <table:table-row table:style-name="ro1">
          <table:table-cell office:value-type="float" office:value="564700576" calcext:value-type="float">
            <text:p>564700576</text:p>
          </table:table-cell>
          <table:table-cell office:value-type="float" office:value="755666659.903823" calcext:value-type="float">
            <text:p>755666659.903823</text:p>
          </table:table-cell>
          <table:table-cell/>
          <table:table-cell office:value-type="string" calcext:value-type="string">
            <text:p>2023-12-12T15:24:19.9038230Z</text:p>
          </table:table-cell>
          <table:table-cell office:value-type="string" calcext:value-type="string">
            <text:p>2023-12-12-15:25:29.0878230</text:p>
          </table:table-cell>
          <table:table-cell table:number-columns-repeated="2"/>
        </table:table-row>
        <table:table-row table:style-name="ro1">
          <table:table-cell office:value-type="float" office:value="564707793" calcext:value-type="float">
            <text:p>564707793</text:p>
          </table:table-cell>
          <table:table-cell office:value-type="float" office:value="755673876.9039" calcext:value-type="float">
            <text:p>755673876.9039</text:p>
          </table:table-cell>
          <table:table-cell/>
          <table:table-cell office:value-type="string" calcext:value-type="string">
            <text:p>2023-12-12T17:24:36.9039000Z</text:p>
          </table:table-cell>
          <table:table-cell office:value-type="string" calcext:value-type="string">
            <text:p>2023-12-12-17:25:46.0879000</text:p>
          </table:table-cell>
          <table:table-cell table:number-columns-repeated="2"/>
        </table:table-row>
        <table:table-row table:style-name="ro1">
          <table:table-cell office:value-type="float" office:value="564840958" calcext:value-type="float">
            <text:p>564840958</text:p>
          </table:table-cell>
          <table:table-cell office:value-type="float" office:value="755807041.905306" calcext:value-type="float">
            <text:p>755807041.905306</text:p>
          </table:table-cell>
          <table:table-cell/>
          <table:table-cell office:value-type="string" calcext:value-type="string">
            <text:p>2023-12-14T06:24:01.9053059Z</text:p>
          </table:table-cell>
          <table:table-cell office:value-type="string" calcext:value-type="string">
            <text:p>2023-12-14-06:25:11.0893059</text:p>
          </table:table-cell>
          <table:table-cell table:number-columns-repeated="2"/>
        </table:table-row>
        <table:table-row table:style-name="ro1">
          <table:table-cell office:value-type="float" office:value="564938179" calcext:value-type="float">
            <text:p>564938179</text:p>
          </table:table-cell>
          <table:table-cell office:value-type="float" office:value="755904262.906351" calcext:value-type="float">
            <text:p>755904262.906351</text:p>
          </table:table-cell>
          <table:table-cell/>
          <table:table-cell office:value-type="string" calcext:value-type="string">
            <text:p>2023-12-15T09:24:22.9063509Z</text:p>
          </table:table-cell>
          <table:table-cell office:value-type="string" calcext:value-type="string">
            <text:p>2023-12-15-09:25:32.0903509</text:p>
          </table:table-cell>
          <table:table-cell table:number-columns-repeated="2"/>
        </table:table-row>
        <table:table-row table:style-name="ro1">
          <table:table-cell office:value-type="float" office:value="565020984" calcext:value-type="float">
            <text:p>565020984</text:p>
          </table:table-cell>
          <table:table-cell office:value-type="float" office:value="755987067.907242" calcext:value-type="float">
            <text:p>755987067.907242</text:p>
          </table:table-cell>
          <table:table-cell/>
          <table:table-cell office:value-type="string" calcext:value-type="string">
            <text:p>2023-12-16T08:24:27.9072419Z</text:p>
          </table:table-cell>
          <table:table-cell office:value-type="string" calcext:value-type="string">
            <text:p>2023-12-16-08:25:37.0912419</text:p>
          </table:table-cell>
          <table:table-cell table:number-columns-repeated="2"/>
        </table:table-row>
        <table:table-row table:style-name="ro1">
          <table:table-cell office:value-type="float" office:value="565107365" calcext:value-type="float">
            <text:p>565107365</text:p>
          </table:table-cell>
          <table:table-cell office:value-type="float" office:value="756073448.908154" calcext:value-type="float">
            <text:p>756073448.908154</text:p>
          </table:table-cell>
          <table:table-cell/>
          <table:table-cell office:value-type="string" calcext:value-type="string">
            <text:p>2023-12-17T08:24:08.9081540Z</text:p>
          </table:table-cell>
          <table:table-cell office:value-type="string" calcext:value-type="string">
            <text:p>2023-12-17-08:25:18.0921540</text:p>
          </table:table-cell>
          <table:table-cell table:number-columns-repeated="2"/>
        </table:table-row>
        <table:table-row table:style-name="ro1">
          <table:table-cell office:value-type="float" office:value="565211728" calcext:value-type="float">
            <text:p>565211728</text:p>
          </table:table-cell>
          <table:table-cell office:value-type="float" office:value="756177811.909271" calcext:value-type="float">
            <text:p>756177811.909271</text:p>
          </table:table-cell>
          <table:table-cell/>
          <table:table-cell office:value-type="string" calcext:value-type="string">
            <text:p>2023-12-18T13:23:31.9092710Z</text:p>
          </table:table-cell>
          <table:table-cell office:value-type="string" calcext:value-type="string">
            <text:p>2023-12-18-13:24:41.0932710</text:p>
          </table:table-cell>
          <table:table-cell table:number-columns-repeated="2"/>
        </table:table-row>
        <table:table-row table:style-name="ro1">
          <table:table-cell office:value-type="float" office:value="565298115" calcext:value-type="float">
            <text:p>565298115</text:p>
          </table:table-cell>
          <table:table-cell office:value-type="float" office:value="756264198.910187" calcext:value-type="float">
            <text:p>756264198.910187</text:p>
          </table:table-cell>
          <table:table-cell/>
          <table:table-cell office:value-type="string" calcext:value-type="string">
            <text:p>2023-12-19T13:23:18.9101870Z</text:p>
          </table:table-cell>
          <table:table-cell office:value-type="string" calcext:value-type="string">
            <text:p>2023-12-19-13:24:28.0941870</text:p>
          </table:table-cell>
          <table:table-cell table:number-columns-repeated="2"/>
        </table:table-row>
        <table:table-row table:style-name="ro1">
          <table:table-cell office:value-type="float" office:value="565424118" calcext:value-type="float">
            <text:p>565424118</text:p>
          </table:table-cell>
          <table:table-cell office:value-type="float" office:value="756390201.911548" calcext:value-type="float">
            <text:p>756390201.911548</text:p>
          </table:table-cell>
          <table:table-cell/>
          <table:table-cell office:value-type="string" calcext:value-type="string">
            <text:p>2023-12-21T00:23:21.9115480Z</text:p>
          </table:table-cell>
          <table:table-cell office:value-type="string" calcext:value-type="string">
            <text:p>2023-12-21-00:24:31.0955480</text:p>
          </table:table-cell>
          <table:table-cell table:number-columns-repeated="2"/>
        </table:table-row>
        <table:table-row table:style-name="ro1">
          <table:table-cell office:value-type="float" office:value="565557298" calcext:value-type="float">
            <text:p>565557298</text:p>
          </table:table-cell>
          <table:table-cell office:value-type="float" office:value="756523381.912964" calcext:value-type="float">
            <text:p>756523381.912964</text:p>
          </table:table-cell>
          <table:table-cell/>
          <table:table-cell office:value-type="string" calcext:value-type="string">
            <text:p>2023-12-22T13:23:01.9129639Z</text:p>
          </table:table-cell>
          <table:table-cell office:value-type="string" calcext:value-type="string">
            <text:p>2023-12-22-13:24:11.0969640</text:p>
          </table:table-cell>
          <table:table-cell table:number-columns-repeated="2"/>
        </table:table-row>
        <table:table-row table:style-name="ro1">
          <table:table-cell office:value-type="float" office:value="565625714" calcext:value-type="float">
            <text:p>565625714</text:p>
          </table:table-cell>
          <table:table-cell office:value-type="float" office:value="756591797.91369" calcext:value-type="float">
            <text:p>756591797.91369</text:p>
          </table:table-cell>
          <table:table-cell/>
          <table:table-cell office:value-type="string" calcext:value-type="string">
            <text:p>2023-12-23T08:23:17.9136899Z</text:p>
          </table:table-cell>
          <table:table-cell office:value-type="string" calcext:value-type="string">
            <text:p>2023-12-23-08:24:27.0976899</text:p>
          </table:table-cell>
          <table:table-cell table:number-columns-repeated="2"/>
        </table:table-row>
        <table:table-row table:style-name="ro1">
          <table:table-cell office:value-type="float" office:value="565737292" calcext:value-type="float">
            <text:p>565737292</text:p>
          </table:table-cell>
          <table:table-cell office:value-type="float" office:value="756703375.914888" calcext:value-type="float">
            <text:p>756703375.914888</text:p>
          </table:table-cell>
          <table:table-cell/>
          <table:table-cell office:value-type="string" calcext:value-type="string">
            <text:p>2023-12-24T15:22:55.9148880Z</text:p>
          </table:table-cell>
          <table:table-cell office:value-type="string" calcext:value-type="string">
            <text:p>2023-12-24-15:24:05.0988880</text:p>
          </table:table-cell>
          <table:table-cell table:number-columns-repeated="2"/>
        </table:table-row>
        <table:table-row table:style-name="ro1">
          <table:table-cell office:value-type="float" office:value="565823693" calcext:value-type="float">
            <text:p>565823693</text:p>
          </table:table-cell>
          <table:table-cell office:value-type="float" office:value="756789776.915812" calcext:value-type="float">
            <text:p>756789776.915812</text:p>
          </table:table-cell>
          <table:table-cell/>
          <table:table-cell office:value-type="string" calcext:value-type="string">
            <text:p>2023-12-25T15:22:56.9158120Z</text:p>
          </table:table-cell>
          <table:table-cell office:value-type="string" calcext:value-type="string">
            <text:p>2023-12-25-15:24:06.0998120</text:p>
          </table:table-cell>
          <table:table-cell table:number-columns-repeated="2"/>
        </table:table-row>
        <table:table-row table:style-name="ro1">
          <table:table-cell office:value-type="float" office:value="565852485" calcext:value-type="float">
            <text:p>565852485</text:p>
          </table:table-cell>
          <table:table-cell office:value-type="float" office:value="756818568.916126" calcext:value-type="float">
            <text:p>756818568.916126</text:p>
          </table:table-cell>
          <table:table-cell/>
          <table:table-cell office:value-type="string" calcext:value-type="string">
            <text:p>2023-12-25T23:22:48.9161260Z</text:p>
          </table:table-cell>
          <table:table-cell office:value-type="string" calcext:value-type="string">
            <text:p>2023-12-25-23:23:58.1001260</text:p>
          </table:table-cell>
          <table:table-cell table:number-columns-repeated="2"/>
        </table:table-row>
        <table:table-row table:style-name="ro1">
          <table:table-cell office:value-type="float" office:value="565971304" calcext:value-type="float">
            <text:p>565971304</text:p>
          </table:table-cell>
          <table:table-cell office:value-type="float" office:value="756937387.917389" calcext:value-type="float">
            <text:p>756937387.917389</text:p>
          </table:table-cell>
          <table:table-cell/>
          <table:table-cell office:value-type="string" calcext:value-type="string">
            <text:p>2023-12-27T08:23:07.9173890Z</text:p>
          </table:table-cell>
          <table:table-cell office:value-type="string" calcext:value-type="string">
            <text:p>2023-12-27-08:24:17.1013890</text:p>
          </table:table-cell>
          <table:table-cell table:number-columns-repeated="2"/>
        </table:table-row>
        <table:table-row table:style-name="ro1">
          <table:table-cell office:value-type="float" office:value="566082873" calcext:value-type="float">
            <text:p>566082873</text:p>
          </table:table-cell>
          <table:table-cell office:value-type="float" office:value="757048956.918576" calcext:value-type="float">
            <text:p>757048956.918576</text:p>
          </table:table-cell>
          <table:table-cell/>
          <table:table-cell office:value-type="string" calcext:value-type="string">
            <text:p>2023-12-28T15:22:36.9185760Z</text:p>
          </table:table-cell>
          <table:table-cell office:value-type="string" calcext:value-type="string">
            <text:p>2023-12-28-15:23:46.1025760</text:p>
          </table:table-cell>
          <table:table-cell table:number-columns-repeated="2"/>
        </table:table-row>
        <table:table-row table:style-name="ro1">
          <table:table-cell office:value-type="float" office:value="566169296" calcext:value-type="float">
            <text:p>566169296</text:p>
          </table:table-cell>
          <table:table-cell office:value-type="float" office:value="757135379.919505" calcext:value-type="float">
            <text:p>757135379.919505</text:p>
          </table:table-cell>
          <table:table-cell/>
          <table:table-cell office:value-type="string" calcext:value-type="string">
            <text:p>2023-12-29T15:22:59.9195050Z</text:p>
          </table:table-cell>
          <table:table-cell office:value-type="string" calcext:value-type="string">
            <text:p>2023-12-29-15:24:09.1035050</text:p>
          </table:table-cell>
          <table:table-cell table:number-columns-repeated="2"/>
        </table:table-row>
        <table:table-row table:style-name="ro1">
          <table:table-cell office:value-type="float" office:value="566216046" calcext:value-type="float">
            <text:p>566216046</text:p>
          </table:table-cell>
          <table:table-cell office:value-type="float" office:value="757182129.919972" calcext:value-type="float">
            <text:p>757182129.919972</text:p>
          </table:table-cell>
          <table:table-cell/>
          <table:table-cell office:value-type="string" calcext:value-type="string">
            <text:p>2023-12-30T04:22:09.9199719Z</text:p>
          </table:table-cell>
          <table:table-cell office:value-type="string" calcext:value-type="string">
            <text:p>2023-12-30-04:23:19.1039719</text:p>
          </table:table-cell>
          <table:table-cell table:number-columns-repeated="2"/>
        </table:table-row>
        <table:table-row table:style-name="ro1">
          <table:table-cell office:value-type="float" office:value="566342075" calcext:value-type="float">
            <text:p>566342075</text:p>
          </table:table-cell>
          <table:table-cell office:value-type="float" office:value="757308158.921353" calcext:value-type="float">
            <text:p>757308158.921353</text:p>
          </table:table-cell>
          <table:table-cell/>
          <table:table-cell office:value-type="string" calcext:value-type="string">
            <text:p>2023-12-31T15:22:38.9213529Z</text:p>
          </table:table-cell>
          <table:table-cell office:value-type="string" calcext:value-type="string">
            <text:p>2023-12-31-15:23:48.1053529</text:p>
          </table:table-cell>
          <table:table-cell table:number-columns-repeated="2"/>
        </table:table-row>
        <table:table-row table:style-name="ro1">
          <table:table-cell office:value-type="float" office:value="566428494" calcext:value-type="float">
            <text:p>566428494</text:p>
          </table:table-cell>
          <table:table-cell office:value-type="float" office:value="757394577.922276" calcext:value-type="float">
            <text:p>757394577.922276</text:p>
          </table:table-cell>
          <table:table-cell/>
          <table:table-cell office:value-type="string" calcext:value-type="string">
            <text:p>2024-01-01T15:22:57.9222760Z</text:p>
          </table:table-cell>
          <table:table-cell office:value-type="string" calcext:value-type="string">
            <text:p>2024-01-01-15:24:07.1062760</text:p>
          </table:table-cell>
          <table:table-cell table:number-columns-repeated="2"/>
        </table:table-row>
        <table:table-row table:style-name="ro1">
          <table:table-cell office:value-type="float" office:value="566514890" calcext:value-type="float">
            <text:p>566514890</text:p>
          </table:table-cell>
          <table:table-cell office:value-type="float" office:value="757480973.923189" calcext:value-type="float">
            <text:p>757480973.923189</text:p>
          </table:table-cell>
          <table:table-cell/>
          <table:table-cell office:value-type="string" calcext:value-type="string">
            <text:p>2024-01-02T15:22:53.9231890Z</text:p>
          </table:table-cell>
          <table:table-cell office:value-type="string" calcext:value-type="string">
            <text:p>2024-01-02-15:24:03.1071890</text:p>
          </table:table-cell>
          <table:table-cell table:number-columns-repeated="2"/>
        </table:table-row>
        <table:table-row table:style-name="ro1">
          <table:table-cell office:value-type="float" office:value="566601226" calcext:value-type="float">
            <text:p>566601226</text:p>
          </table:table-cell>
          <table:table-cell office:value-type="float" office:value="757567309.924084" calcext:value-type="float">
            <text:p>757567309.924084</text:p>
          </table:table-cell>
          <table:table-cell/>
          <table:table-cell office:value-type="string" calcext:value-type="string">
            <text:p>2024-01-03T15:21:49.9240839Z</text:p>
          </table:table-cell>
          <table:table-cell office:value-type="string" calcext:value-type="string">
            <text:p>2024-01-03-15:22:59.1080839</text:p>
          </table:table-cell>
          <table:table-cell table:number-columns-repeated="2"/>
        </table:table-row>
        <table:table-row table:style-name="ro1">
          <table:table-cell office:value-type="float" office:value="566622809" calcext:value-type="float">
            <text:p>566622809</text:p>
          </table:table-cell>
          <table:table-cell office:value-type="float" office:value="757588892.924345" calcext:value-type="float">
            <text:p>757588892.924345</text:p>
          </table:table-cell>
          <table:table-cell/>
          <table:table-cell office:value-type="string" calcext:value-type="string">
            <text:p>2024-01-03T21:21:32.9243450Z</text:p>
          </table:table-cell>
          <table:table-cell office:value-type="string" calcext:value-type="string">
            <text:p>2024-01-03-21:22:42.1083450</text:p>
          </table:table-cell>
          <table:table-cell table:number-columns-repeated="2"/>
        </table:table-row>
        <table:table-row table:style-name="ro1">
          <table:table-cell office:value-type="float" office:value="566774015" calcext:value-type="float">
            <text:p>566774015</text:p>
          </table:table-cell>
          <table:table-cell office:value-type="float" office:value="757740098.925925" calcext:value-type="float">
            <text:p>757740098.925925</text:p>
          </table:table-cell>
          <table:table-cell/>
          <table:table-cell office:value-type="string" calcext:value-type="string">
            <text:p>2024-01-05T15:21:38.9259250Z</text:p>
          </table:table-cell>
          <table:table-cell office:value-type="string" calcext:value-type="string">
            <text:p>2024-01-05-15:22:48.1099250</text:p>
          </table:table-cell>
          <table:table-cell table:number-columns-repeated="2"/>
        </table:table-row>
        <table:table-row table:style-name="ro1">
          <table:table-cell office:value-type="float" office:value="566817213" calcext:value-type="float">
            <text:p>566817213</text:p>
          </table:table-cell>
          <table:table-cell office:value-type="float" office:value="757783296.926399" calcext:value-type="float">
            <text:p>757783296.926399</text:p>
          </table:table-cell>
          <table:table-cell/>
          <table:table-cell office:value-type="string" calcext:value-type="string">
            <text:p>2024-01-06T03:21:36.9263989Z</text:p>
          </table:table-cell>
          <table:table-cell office:value-type="string" calcext:value-type="string">
            <text:p>2024-01-06-03:22:46.1103990</text:p>
          </table:table-cell>
          <table:table-cell table:number-columns-repeated="2"/>
        </table:table-row>
        <table:table-row table:style-name="ro1">
          <table:table-cell office:value-type="float" office:value="566946858" calcext:value-type="float">
            <text:p>566946858</text:p>
          </table:table-cell>
          <table:table-cell office:value-type="float" office:value="757912941.927808" calcext:value-type="float">
            <text:p>757912941.927808</text:p>
          </table:table-cell>
          <table:table-cell/>
          <table:table-cell office:value-type="string" calcext:value-type="string">
            <text:p>2024-01-07T15:22:21.9278079Z</text:p>
          </table:table-cell>
          <table:table-cell office:value-type="string" calcext:value-type="string">
            <text:p>2024-01-07-15:23:31.1118079</text:p>
          </table:table-cell>
          <table:table-cell table:number-columns-repeated="2"/>
        </table:table-row>
        <table:table-row table:style-name="ro1">
          <table:table-cell office:value-type="float" office:value="567033260" calcext:value-type="float">
            <text:p>567033260</text:p>
          </table:table-cell>
          <table:table-cell office:value-type="float" office:value="757999343.928736" calcext:value-type="float">
            <text:p>757999343.928736</text:p>
          </table:table-cell>
          <table:table-cell/>
          <table:table-cell office:value-type="string" calcext:value-type="string">
            <text:p>2024-01-08T15:22:23.9287359Z</text:p>
          </table:table-cell>
          <table:table-cell office:value-type="string" calcext:value-type="string">
            <text:p>2024-01-08-15:23:33.1127359</text:p>
          </table:table-cell>
          <table:table-cell table:number-columns-repeated="2"/>
        </table:table-row>
        <table:table-row table:style-name="ro1">
          <table:table-cell office:value-type="float" office:value="567148408" calcext:value-type="float">
            <text:p>567148408</text:p>
          </table:table-cell>
          <table:table-cell office:value-type="float" office:value="758114491.929963" calcext:value-type="float">
            <text:p>758114491.929963</text:p>
          </table:table-cell>
          <table:table-cell/>
          <table:table-cell office:value-type="string" calcext:value-type="string">
            <text:p>2024-01-09T23:21:31.9299629Z</text:p>
          </table:table-cell>
          <table:table-cell office:value-type="string" calcext:value-type="string">
            <text:p>2024-01-09-23:22:41.1139630</text:p>
          </table:table-cell>
          <table:table-cell table:number-columns-repeated="2"/>
        </table:table-row>
        <table:table-row table:style-name="ro1">
          <table:table-cell office:value-type="float" office:value="567350040" calcext:value-type="float">
            <text:p>567350040</text:p>
          </table:table-cell>
          <table:table-cell office:value-type="float" office:value="758316123.932101" calcext:value-type="float">
            <text:p>758316123.932101</text:p>
          </table:table-cell>
          <table:table-cell/>
          <table:table-cell office:value-type="string" calcext:value-type="string">
            <text:p>2024-01-12T07:22:03.9321010Z</text:p>
          </table:table-cell>
          <table:table-cell office:value-type="string" calcext:value-type="string">
            <text:p>2024-01-12-07:23:13.1161010</text:p>
          </table:table-cell>
          <table:table-cell table:number-columns-repeated="2"/>
        </table:table-row>
        <table:table-row table:style-name="ro1">
          <table:table-cell office:value-type="float" office:value="567436439" calcext:value-type="float">
            <text:p>567436439</text:p>
          </table:table-cell>
          <table:table-cell office:value-type="float" office:value="758402522.933012" calcext:value-type="float">
            <text:p>758402522.933012</text:p>
          </table:table-cell>
          <table:table-cell/>
          <table:table-cell office:value-type="string" calcext:value-type="string">
            <text:p>2024-01-13T07:22:02.9330120Z</text:p>
          </table:table-cell>
          <table:table-cell office:value-type="string" calcext:value-type="string">
            <text:p>2024-01-13-07:23:12.1170120</text:p>
          </table:table-cell>
          <table:table-cell table:number-columns-repeated="2"/>
        </table:table-row>
        <table:table-row table:style-name="ro1">
          <table:table-cell office:value-type="float" office:value="567522837" calcext:value-type="float">
            <text:p>567522837</text:p>
          </table:table-cell>
          <table:table-cell office:value-type="float" office:value="758488920.933916" calcext:value-type="float">
            <text:p>758488920.933916</text:p>
          </table:table-cell>
          <table:table-cell/>
          <table:table-cell office:value-type="string" calcext:value-type="string">
            <text:p>2024-01-14T07:22:00.9339159Z</text:p>
          </table:table-cell>
          <table:table-cell office:value-type="string" calcext:value-type="string">
            <text:p>2024-01-14-07:23:10.1179159</text:p>
          </table:table-cell>
          <table:table-cell table:number-columns-repeated="2"/>
        </table:table-row>
        <table:table-row table:style-name="ro1">
          <table:table-cell office:value-type="float" office:value="567594779" calcext:value-type="float">
            <text:p>567594779</text:p>
          </table:table-cell>
          <table:table-cell office:value-type="float" office:value="758560862.934668" calcext:value-type="float">
            <text:p>758560862.934668</text:p>
          </table:table-cell>
          <table:table-cell/>
          <table:table-cell office:value-type="string" calcext:value-type="string">
            <text:p>2024-01-15T03:21:02.9346679Z</text:p>
          </table:table-cell>
          <table:table-cell office:value-type="string" calcext:value-type="string">
            <text:p>2024-01-15-03:22:12.1186679</text:p>
          </table:table-cell>
          <table:table-cell table:number-columns-repeated="2"/>
        </table:table-row>
        <table:table-row table:style-name="ro1">
          <table:table-cell office:value-type="float" office:value="567717186" calcext:value-type="float">
            <text:p>567717186</text:p>
          </table:table-cell>
          <table:table-cell office:value-type="float" office:value="758683269.935985" calcext:value-type="float">
            <text:p>758683269.935985</text:p>
          </table:table-cell>
          <table:table-cell/>
          <table:table-cell office:value-type="string" calcext:value-type="string">
            <text:p>2024-01-16T13:21:09.9359849Z</text:p>
          </table:table-cell>
          <table:table-cell office:value-type="string" calcext:value-type="string">
            <text:p>2024-01-16-13:22:19.1199849</text:p>
          </table:table-cell>
          <table:table-cell table:number-columns-repeated="2"/>
        </table:table-row>
        <table:table-row table:style-name="ro1">
          <table:table-cell office:value-type="float" office:value="567778406" calcext:value-type="float">
            <text:p>567778406</text:p>
          </table:table-cell>
          <table:table-cell office:value-type="float" office:value="758744489.936626" calcext:value-type="float">
            <text:p>758744489.936626</text:p>
          </table:table-cell>
          <table:table-cell/>
          <table:table-cell office:value-type="string" calcext:value-type="string">
            <text:p>2024-01-17T06:21:29.9366259Z</text:p>
          </table:table-cell>
          <table:table-cell office:value-type="string" calcext:value-type="string">
            <text:p>2024-01-17-06:22:39.1206259</text:p>
          </table:table-cell>
          <table:table-cell table:number-columns-repeated="2"/>
        </table:table-row>
        <table:table-row table:style-name="ro1">
          <table:table-cell office:value-type="float" office:value="567835984" calcext:value-type="float">
            <text:p>567835984</text:p>
          </table:table-cell>
          <table:table-cell office:value-type="float" office:value="758802067.937256" calcext:value-type="float">
            <text:p>758802067.937256</text:p>
          </table:table-cell>
          <table:table-cell/>
          <table:table-cell office:value-type="string" calcext:value-type="string">
            <text:p>2024-01-17T22:21:07.9372559Z</text:p>
          </table:table-cell>
          <table:table-cell office:value-type="string" calcext:value-type="string">
            <text:p>2024-01-17-22:22:17.1212559</text:p>
          </table:table-cell>
          <table:table-cell table:number-columns-repeated="2"/>
        </table:table-row>
        <table:table-row table:style-name="ro1">
          <table:table-cell office:value-type="float" office:value="567951194" calcext:value-type="float">
            <text:p>567951194</text:p>
          </table:table-cell>
          <table:table-cell office:value-type="float" office:value="758917277.938476" calcext:value-type="float">
            <text:p>758917277.938476</text:p>
          </table:table-cell>
          <table:table-cell/>
          <table:table-cell office:value-type="string" calcext:value-type="string">
            <text:p>2024-01-19T06:21:17.9384759Z</text:p>
          </table:table-cell>
          <table:table-cell office:value-type="string" calcext:value-type="string">
            <text:p>2024-01-19-06:22:27.1224759</text:p>
          </table:table-cell>
          <table:table-cell table:number-columns-repeated="2"/>
        </table:table-row>
        <table:table-row table:style-name="ro1">
          <table:table-cell office:value-type="float" office:value="568033979" calcext:value-type="float">
            <text:p>568033979</text:p>
          </table:table-cell>
          <table:table-cell office:value-type="float" office:value="759000062.939357" calcext:value-type="float">
            <text:p>759000062.939357</text:p>
          </table:table-cell>
          <table:table-cell/>
          <table:table-cell office:value-type="string" calcext:value-type="string">
            <text:p>2024-01-20T05:21:02.9393570Z</text:p>
          </table:table-cell>
          <table:table-cell office:value-type="string" calcext:value-type="string">
            <text:p>2024-01-20-05:22:12.1233570</text:p>
          </table:table-cell>
          <table:table-cell table:number-columns-repeated="2"/>
        </table:table-row>
        <table:table-row table:style-name="ro1">
          <table:table-cell office:value-type="float" office:value="568134845" calcext:value-type="float">
            <text:p>568134845</text:p>
          </table:table-cell>
          <table:table-cell office:value-type="float" office:value="759100928.940394" calcext:value-type="float">
            <text:p>759100928.940394</text:p>
          </table:table-cell>
          <table:table-cell/>
          <table:table-cell office:value-type="string" calcext:value-type="string">
            <text:p>2024-01-21T09:22:08.9403940Z</text:p>
          </table:table-cell>
          <table:table-cell office:value-type="string" calcext:value-type="string">
            <text:p>2024-01-21-09:23:18.1243940</text:p>
          </table:table-cell>
          <table:table-cell table:number-columns-repeated="2"/>
        </table:table-row>
        <table:table-row table:style-name="ro1">
          <table:table-cell office:value-type="float" office:value="568239210" calcext:value-type="float">
            <text:p>568239210</text:p>
          </table:table-cell>
          <table:table-cell office:value-type="float" office:value="759205293.941546" calcext:value-type="float">
            <text:p>759205293.941546</text:p>
          </table:table-cell>
          <table:table-cell/>
          <table:table-cell office:value-type="string" calcext:value-type="string">
            <text:p>2024-01-22T14:21:33.9415459Z</text:p>
          </table:table-cell>
          <table:table-cell office:value-type="string" calcext:value-type="string">
            <text:p>2024-01-22-14:22:43.1255459</text:p>
          </table:table-cell>
          <table:table-cell table:number-columns-repeated="2"/>
        </table:table-row>
        <table:table-row table:style-name="ro1">
          <table:table-cell office:value-type="float" office:value="568325560" calcext:value-type="float">
            <text:p>568325560</text:p>
          </table:table-cell>
          <table:table-cell office:value-type="float" office:value="759291643.942428" calcext:value-type="float">
            <text:p>759291643.942428</text:p>
          </table:table-cell>
          <table:table-cell/>
          <table:table-cell office:value-type="string" calcext:value-type="string">
            <text:p>2024-01-23T14:20:43.9424279Z</text:p>
          </table:table-cell>
          <table:table-cell office:value-type="string" calcext:value-type="string">
            <text:p>2024-01-23-14:21:53.1264280</text:p>
          </table:table-cell>
          <table:table-cell table:number-columns-repeated="2"/>
        </table:table-row>
        <table:table-row table:style-name="ro1">
          <table:table-cell office:value-type="float" office:value="568415558" calcext:value-type="float">
            <text:p>568415558</text:p>
          </table:table-cell>
          <table:table-cell office:value-type="float" office:value="759381641.943391" calcext:value-type="float">
            <text:p>759381641.943391</text:p>
          </table:table-cell>
          <table:table-cell/>
          <table:table-cell office:value-type="string" calcext:value-type="string">
            <text:p>2024-01-24T15:20:41.9433909Z</text:p>
          </table:table-cell>
          <table:table-cell office:value-type="string" calcext:value-type="string">
            <text:p>2024-01-24-15:21:51.1273909</text:p>
          </table:table-cell>
          <table:table-cell table:number-columns-repeated="2"/>
        </table:table-row>
        <table:table-row table:style-name="ro1">
          <table:table-cell office:value-type="float" office:value="568426337" calcext:value-type="float">
            <text:p>568426337</text:p>
          </table:table-cell>
          <table:table-cell office:value-type="float" office:value="759392420.943523" calcext:value-type="float">
            <text:p>759392420.943523</text:p>
          </table:table-cell>
          <table:table-cell/>
          <table:table-cell office:value-type="string" calcext:value-type="string">
            <text:p>2024-01-24T18:20:20.9435229Z</text:p>
          </table:table-cell>
          <table:table-cell office:value-type="string" calcext:value-type="string">
            <text:p>2024-01-24-18:21:30.1275229</text:p>
          </table:table-cell>
          <table:table-cell table:number-columns-repeated="2"/>
        </table:table-row>
        <table:table-row table:style-name="ro1">
          <table:table-cell office:value-type="float" office:value="568588355" calcext:value-type="float">
            <text:p>568588355</text:p>
          </table:table-cell>
          <table:table-cell office:value-type="float" office:value="759554438.945227" calcext:value-type="float">
            <text:p>759554438.945227</text:p>
          </table:table-cell>
          <table:table-cell/>
          <table:table-cell office:value-type="string" calcext:value-type="string">
            <text:p>2024-01-26T15:20:38.9452270Z</text:p>
          </table:table-cell>
          <table:table-cell office:value-type="string" calcext:value-type="string">
            <text:p>2024-01-26-15:21:48.1292270</text:p>
          </table:table-cell>
          <table:table-cell table:number-columns-repeated="2"/>
        </table:table-row>
        <table:table-row table:style-name="ro1">
          <table:table-cell office:value-type="float" office:value="568671212" calcext:value-type="float">
            <text:p>568671212</text:p>
          </table:table-cell>
          <table:table-cell office:value-type="float" office:value="759637295.946151" calcext:value-type="float">
            <text:p>759637295.946151</text:p>
          </table:table-cell>
          <table:table-cell/>
          <table:table-cell office:value-type="string" calcext:value-type="string">
            <text:p>2024-01-27T14:21:35.9461510Z</text:p>
          </table:table-cell>
          <table:table-cell office:value-type="string" calcext:value-type="string">
            <text:p>2024-01-27-14:22:45.1301510</text:p>
          </table:table-cell>
          <table:table-cell table:number-columns-repeated="2"/>
        </table:table-row>
        <table:table-row table:style-name="ro1">
          <table:table-cell office:value-type="float" office:value="568728804" calcext:value-type="float">
            <text:p>568728804</text:p>
          </table:table-cell>
          <table:table-cell office:value-type="float" office:value="759694887.946755" calcext:value-type="float">
            <text:p>759694887.946755</text:p>
          </table:table-cell>
          <table:table-cell/>
          <table:table-cell office:value-type="string" calcext:value-type="string">
            <text:p>2024-01-28T06:21:27.9467549Z</text:p>
          </table:table-cell>
          <table:table-cell office:value-type="string" calcext:value-type="string">
            <text:p>2024-01-28-06:22:37.1307549</text:p>
          </table:table-cell>
          <table:table-cell table:number-columns-repeated="2"/>
        </table:table-row>
        <table:table-row table:style-name="ro1">
          <table:table-cell office:value-type="float" office:value="568840389" calcext:value-type="float">
            <text:p>568840389</text:p>
          </table:table-cell>
          <table:table-cell office:value-type="float" office:value="759806472.947951" calcext:value-type="float">
            <text:p>759806472.947951</text:p>
          </table:table-cell>
          <table:table-cell/>
          <table:table-cell office:value-type="string" calcext:value-type="string">
            <text:p>2024-01-29T13:21:12.9479509Z</text:p>
          </table:table-cell>
          <table:table-cell office:value-type="string" calcext:value-type="string">
            <text:p>2024-01-29-13:22:22.1319509</text:p>
          </table:table-cell>
          <table:table-cell table:number-columns-repeated="2"/>
        </table:table-row>
        <table:table-row table:style-name="ro1">
          <table:table-cell office:value-type="float" office:value="568926785" calcext:value-type="float">
            <text:p>568926785</text:p>
          </table:table-cell>
          <table:table-cell office:value-type="float" office:value="759892868.948873" calcext:value-type="float">
            <text:p>759892868.948873</text:p>
          </table:table-cell>
          <table:table-cell/>
          <table:table-cell office:value-type="string" calcext:value-type="string">
            <text:p>2024-01-30T13:21:08.9488730Z</text:p>
          </table:table-cell>
          <table:table-cell office:value-type="string" calcext:value-type="string">
            <text:p>2024-01-30-13:22:18.1328730</text:p>
          </table:table-cell>
          <table:table-cell table:number-columns-repeated="2"/>
        </table:table-row>
        <table:table-row table:style-name="ro1">
          <table:table-cell office:value-type="float" office:value="568955546" calcext:value-type="float">
            <text:p>568955546</text:p>
          </table:table-cell>
          <table:table-cell office:value-type="float" office:value="759921629.94917" calcext:value-type="float">
            <text:p>759921629.94917</text:p>
          </table:table-cell>
          <table:table-cell/>
          <table:table-cell office:value-type="string" calcext:value-type="string">
            <text:p>2024-01-30T21:20:29.9491699Z</text:p>
          </table:table-cell>
          <table:table-cell office:value-type="string" calcext:value-type="string">
            <text:p>2024-01-30-21:21:39.1331700</text:p>
          </table:table-cell>
          <table:table-cell table:number-columns-repeated="2"/>
        </table:table-row>
        <table:table-row table:style-name="ro1">
          <table:table-cell office:value-type="float" office:value="569034731" calcext:value-type="float">
            <text:p>569034731</text:p>
          </table:table-cell>
          <table:table-cell office:value-type="float" office:value="760000814.950019" calcext:value-type="float">
            <text:p>760000814.950019</text:p>
          </table:table-cell>
          <table:table-cell/>
          <table:table-cell office:value-type="string" calcext:value-type="string">
            <text:p>2024-01-31T19:20:14.9500190Z</text:p>
          </table:table-cell>
          <table:table-cell office:value-type="string" calcext:value-type="string">
            <text:p>2024-01-31-19:21:24.1340190</text:p>
          </table:table-cell>
          <table:table-cell table:number-columns-repeated="2"/>
        </table:table-row>
        <table:table-row table:style-name="ro1">
          <table:table-cell office:value-type="float" office:value="569232747" calcext:value-type="float">
            <text:p>569232747</text:p>
          </table:table-cell>
          <table:table-cell office:value-type="float" office:value="760198830.952112" calcext:value-type="float">
            <text:p>760198830.952112</text:p>
          </table:table-cell>
          <table:table-cell/>
          <table:table-cell office:value-type="string" calcext:value-type="string">
            <text:p>2024-02-03T02:20:30.9521119Z</text:p>
          </table:table-cell>
          <table:table-cell office:value-type="string" calcext:value-type="string">
            <text:p>2024-02-03-02:21:40.1361119</text:p>
          </table:table-cell>
          <table:table-cell table:number-columns-repeated="2"/>
        </table:table-row>
        <table:table-row table:style-name="ro1">
          <table:table-cell office:value-type="float" office:value="569365953" calcext:value-type="float">
            <text:p>569365953</text:p>
          </table:table-cell>
          <table:table-cell office:value-type="float" office:value="760332036.953535" calcext:value-type="float">
            <text:p>760332036.953535</text:p>
          </table:table-cell>
          <table:table-cell/>
          <table:table-cell office:value-type="string" calcext:value-type="string">
            <text:p>2024-02-04T15:20:36.9535349Z</text:p>
          </table:table-cell>
          <table:table-cell office:value-type="string" calcext:value-type="string">
            <text:p>2024-02-04-15:21:46.1375349</text:p>
          </table:table-cell>
          <table:table-cell table:number-columns-repeated="2"/>
        </table:table-row>
        <table:table-row table:style-name="ro1">
          <table:table-cell office:value-type="float" office:value="569416399" calcext:value-type="float">
            <text:p>569416399</text:p>
          </table:table-cell>
          <table:table-cell office:value-type="float" office:value="760382482.954095" calcext:value-type="float">
            <text:p>760382482.954095</text:p>
          </table:table-cell>
          <table:table-cell/>
          <table:table-cell office:value-type="string" calcext:value-type="string">
            <text:p>2024-02-05T05:21:22.9540950Z</text:p>
          </table:table-cell>
          <table:table-cell office:value-type="string" calcext:value-type="string">
            <text:p>2024-02-05-05:22:32.1380950</text:p>
          </table:table-cell>
          <table:table-cell table:number-columns-repeated="2"/>
        </table:table-row>
        <table:table-row table:style-name="ro1">
          <table:table-cell office:value-type="float" office:value="569531608" calcext:value-type="float">
            <text:p>569531608</text:p>
          </table:table-cell>
          <table:table-cell office:value-type="float" office:value="760497691.955316" calcext:value-type="float">
            <text:p>760497691.955316</text:p>
          </table:table-cell>
          <table:table-cell/>
          <table:table-cell office:value-type="string" calcext:value-type="string">
            <text:p>2024-02-06T13:21:31.9553159Z</text:p>
          </table:table-cell>
          <table:table-cell office:value-type="string" calcext:value-type="string">
            <text:p>2024-02-06-13:22:41.1393159</text:p>
          </table:table-cell>
          <table:table-cell table:number-columns-repeated="2"/>
        </table:table-row>
        <table:table-row table:style-name="ro1">
          <table:table-cell office:value-type="float" office:value="569560369" calcext:value-type="float">
            <text:p>569560369</text:p>
          </table:table-cell>
          <table:table-cell office:value-type="float" office:value="760526452.955626" calcext:value-type="float">
            <text:p>760526452.955626</text:p>
          </table:table-cell>
          <table:table-cell/>
          <table:table-cell office:value-type="string" calcext:value-type="string">
            <text:p>2024-02-06T21:20:52.9556260Z</text:p>
          </table:table-cell>
          <table:table-cell office:value-type="string" calcext:value-type="string">
            <text:p>2024-02-06-21:22:02.1396260</text:p>
          </table:table-cell>
          <table:table-cell table:number-columns-repeated="2"/>
        </table:table-row>
        <table:table-row table:style-name="ro1">
          <table:table-cell office:value-type="float" office:value="569797956" calcext:value-type="float">
            <text:p>569797956</text:p>
          </table:table-cell>
          <table:table-cell office:value-type="float" office:value="760764039.958137" calcext:value-type="float">
            <text:p>760764039.958137</text:p>
          </table:table-cell>
          <table:table-cell/>
          <table:table-cell office:value-type="string" calcext:value-type="string">
            <text:p>2024-02-09T15:20:39.9581370Z</text:p>
          </table:table-cell>
          <table:table-cell office:value-type="string" calcext:value-type="string">
            <text:p>2024-02-09-15:21:49.1421370</text:p>
          </table:table-cell>
          <table:table-cell table:number-columns-repeated="2"/>
        </table:table-row>
        <table:table-row table:style-name="ro1">
          <table:table-cell office:value-type="float" office:value="569884358" calcext:value-type="float">
            <text:p>569884358</text:p>
          </table:table-cell>
          <table:table-cell office:value-type="float" office:value="760850441.959073" calcext:value-type="float">
            <text:p>760850441.959073</text:p>
          </table:table-cell>
          <table:table-cell/>
          <table:table-cell office:value-type="string" calcext:value-type="string">
            <text:p>2024-02-10T15:20:41.9590729Z</text:p>
          </table:table-cell>
          <table:table-cell office:value-type="string" calcext:value-type="string">
            <text:p>2024-02-10-15:21:51.1430729</text:p>
          </table:table-cell>
          <table:table-cell table:number-columns-repeated="2"/>
        </table:table-row>
        <table:table-row table:style-name="ro1">
          <table:table-cell office:value-type="float" office:value="569963598" calcext:value-type="float">
            <text:p>569963598</text:p>
          </table:table-cell>
          <table:table-cell office:value-type="float" office:value="760929681.959938" calcext:value-type="float">
            <text:p>760929681.959938</text:p>
          </table:table-cell>
          <table:table-cell/>
          <table:table-cell office:value-type="string" calcext:value-type="string">
            <text:p>2024-02-11T13:21:21.9599379Z</text:p>
          </table:table-cell>
          <table:table-cell office:value-type="string" calcext:value-type="string">
            <text:p>2024-02-11-13:22:31.1439379</text:p>
          </table:table-cell>
          <table:table-cell table:number-columns-repeated="2"/>
        </table:table-row>
        <table:table-row table:style-name="ro1">
          <table:table-cell office:value-type="float" office:value="569988749" calcext:value-type="float">
            <text:p>569988749</text:p>
          </table:table-cell>
          <table:table-cell office:value-type="float" office:value="760954832.960218" calcext:value-type="float">
            <text:p>760954832.960218</text:p>
          </table:table-cell>
          <table:table-cell/>
          <table:table-cell office:value-type="string" calcext:value-type="string">
            <text:p>2024-02-11T20:20:32.9602179Z</text:p>
          </table:table-cell>
          <table:table-cell office:value-type="string" calcext:value-type="string">
            <text:p>2024-02-11-20:21:42.1442179</text:p>
          </table:table-cell>
          <table:table-cell table:number-columns-repeated="2"/>
        </table:table-row>
        <table:table-row table:style-name="ro1">
          <table:table-cell office:value-type="float" office:value="570107605" calcext:value-type="float">
            <text:p>570107605</text:p>
          </table:table-cell>
          <table:table-cell office:value-type="float" office:value="761073688.961481" calcext:value-type="float">
            <text:p>761073688.961481</text:p>
          </table:table-cell>
          <table:table-cell/>
          <table:table-cell office:value-type="string" calcext:value-type="string">
            <text:p>2024-02-13T05:21:28.9614809Z</text:p>
          </table:table-cell>
          <table:table-cell office:value-type="string" calcext:value-type="string">
            <text:p>2024-02-13-05:22:38.1454809</text:p>
          </table:table-cell>
          <table:table-cell table:number-columns-repeated="2"/>
        </table:table-row>
        <table:table-row table:style-name="ro1">
          <table:table-cell office:value-type="float" office:value="570194006" calcext:value-type="float">
            <text:p>570194006</text:p>
          </table:table-cell>
          <table:table-cell office:value-type="float" office:value="761160089.962402" calcext:value-type="float">
            <text:p>761160089.962402</text:p>
          </table:table-cell>
          <table:table-cell/>
          <table:table-cell office:value-type="string" calcext:value-type="string">
            <text:p>2024-02-14T05:21:29.9624019Z</text:p>
          </table:table-cell>
          <table:table-cell office:value-type="string" calcext:value-type="string">
            <text:p>2024-02-14-05:22:39.1464020</text:p>
          </table:table-cell>
          <table:table-cell table:number-columns-repeated="2"/>
        </table:table-row>
        <table:table-row table:style-name="ro1">
          <table:table-cell office:value-type="float" office:value="570247960" calcext:value-type="float">
            <text:p>570247960</text:p>
          </table:table-cell>
          <table:table-cell office:value-type="float" office:value="761214043.962987" calcext:value-type="float">
            <text:p>761214043.962987</text:p>
          </table:table-cell>
          <table:table-cell/>
          <table:table-cell office:value-type="string" calcext:value-type="string">
            <text:p>2024-02-14T20:20:43.9629869Z</text:p>
          </table:table-cell>
          <table:table-cell office:value-type="string" calcext:value-type="string">
            <text:p>2024-02-14-20:21:53.1469869</text:p>
          </table:table-cell>
          <table:table-cell table:number-columns-repeated="2"/>
        </table:table-row>
        <table:table-row table:style-name="ro1">
          <table:table-cell office:value-type="float" office:value="570359644" calcext:value-type="float">
            <text:p>570359644</text:p>
          </table:table-cell>
          <table:table-cell office:value-type="float" office:value="761325727.964176" calcext:value-type="float">
            <text:p>761325727.964176</text:p>
          </table:table-cell>
          <table:table-cell/>
          <table:table-cell office:value-type="string" calcext:value-type="string">
            <text:p>2024-02-16T03:22:07.9641759Z</text:p>
          </table:table-cell>
          <table:table-cell office:value-type="string" calcext:value-type="string">
            <text:p>2024-02-16-03:23:17.1481759</text:p>
          </table:table-cell>
          <table:table-cell table:number-columns-repeated="2"/>
        </table:table-row>
        <table:table-row table:style-name="ro1">
          <table:table-cell office:value-type="float" office:value="570489162" calcext:value-type="float">
            <text:p>570489162</text:p>
          </table:table-cell>
          <table:table-cell office:value-type="float" office:value="761455245.965554" calcext:value-type="float">
            <text:p>761455245.965554</text:p>
          </table:table-cell>
          <table:table-cell/>
          <table:table-cell office:value-type="string" calcext:value-type="string">
            <text:p>2024-02-17T15:20:45.9655539Z</text:p>
          </table:table-cell>
          <table:table-cell office:value-type="string" calcext:value-type="string">
            <text:p>2024-02-17-15:21:55.1495540</text:p>
          </table:table-cell>
          <table:table-cell table:number-columns-repeated="2"/>
        </table:table-row>
        <table:table-row table:style-name="ro1">
          <table:table-cell office:value-type="float" office:value="570575561" calcext:value-type="float">
            <text:p>570575561</text:p>
          </table:table-cell>
          <table:table-cell office:value-type="float" office:value="761541644.966465" calcext:value-type="float">
            <text:p>761541644.966465</text:p>
          </table:table-cell>
          <table:table-cell/>
          <table:table-cell office:value-type="string" calcext:value-type="string">
            <text:p>2024-02-18T15:20:44.9664649Z</text:p>
          </table:table-cell>
          <table:table-cell office:value-type="string" calcext:value-type="string">
            <text:p>2024-02-18-15:21:54.1504650</text:p>
          </table:table-cell>
          <table:table-cell table:number-columns-repeated="2"/>
        </table:table-row>
        <table:table-row table:style-name="ro1">
          <table:table-cell office:value-type="float" office:value="570651163" calcext:value-type="float">
            <text:p>570651163</text:p>
          </table:table-cell>
          <table:table-cell office:value-type="float" office:value="761617246.967258" calcext:value-type="float">
            <text:p>761617246.967258</text:p>
          </table:table-cell>
          <table:table-cell/>
          <table:table-cell office:value-type="string" calcext:value-type="string">
            <text:p>2024-02-19T12:20:46.9672579Z</text:p>
          </table:table-cell>
          <table:table-cell office:value-type="string" calcext:value-type="string">
            <text:p>2024-02-19-12:21:56.1512579</text:p>
          </table:table-cell>
          <table:table-cell table:number-columns-repeated="2"/>
        </table:table-row>
        <table:table-row table:style-name="ro1">
          <table:table-cell office:value-type="float" office:value="570823968" calcext:value-type="float">
            <text:p>570823968</text:p>
          </table:table-cell>
          <table:table-cell office:value-type="float" office:value="761790051.96912" calcext:value-type="float">
            <text:p>761790051.96912</text:p>
          </table:table-cell>
          <table:table-cell/>
          <table:table-cell office:value-type="string" calcext:value-type="string">
            <text:p>2024-02-21T12:20:51.9691200Z</text:p>
          </table:table-cell>
          <table:table-cell office:value-type="string" calcext:value-type="string">
            <text:p>2024-02-21-12:22:01.1531200</text:p>
          </table:table-cell>
          <table:table-cell table:number-columns-repeated="2"/>
        </table:table-row>
        <table:table-row table:style-name="ro1">
          <table:table-cell office:value-type="float" office:value="570921181" calcext:value-type="float">
            <text:p>570921181</text:p>
          </table:table-cell>
          <table:table-cell office:value-type="float" office:value="761887264.970181" calcext:value-type="float">
            <text:p>761887264.970181</text:p>
          </table:table-cell>
          <table:table-cell/>
          <table:table-cell office:value-type="string" calcext:value-type="string">
            <text:p>2024-02-22T15:21:04.9701809Z</text:p>
          </table:table-cell>
          <table:table-cell office:value-type="string" calcext:value-type="string">
            <text:p>2024-02-22-15:22:14.1541810</text:p>
          </table:table-cell>
          <table:table-cell table:number-columns-repeated="2"/>
        </table:table-row>
        <table:table-row table:style-name="ro1">
          <table:table-cell office:value-type="float" office:value="571007576" calcext:value-type="float">
            <text:p>571007576</text:p>
          </table:table-cell>
          <table:table-cell office:value-type="float" office:value="761973659.971116" calcext:value-type="float">
            <text:p>761973659.971116</text:p>
          </table:table-cell>
          <table:table-cell/>
          <table:table-cell office:value-type="string" calcext:value-type="string">
            <text:p>2024-02-23T15:20:59.9711159Z</text:p>
          </table:table-cell>
          <table:table-cell office:value-type="string" calcext:value-type="string">
            <text:p>2024-02-23-15:22:09.1551159</text:p>
          </table:table-cell>
          <table:table-cell table:number-columns-repeated="2"/>
        </table:table-row>
        <table:table-row table:style-name="ro1">
          <table:table-cell office:value-type="float" office:value="571079708" calcext:value-type="float">
            <text:p>571079708</text:p>
          </table:table-cell>
          <table:table-cell office:value-type="float" office:value="762045791.971844" calcext:value-type="float">
            <text:p>762045791.971844</text:p>
          </table:table-cell>
          <table:table-cell/>
          <table:table-cell office:value-type="string" calcext:value-type="string">
            <text:p>2024-02-24T11:23:11.9718439Z</text:p>
          </table:table-cell>
          <table:table-cell office:value-type="string" calcext:value-type="string">
            <text:p>2024-02-24-11:24:21.1558439</text:p>
          </table:table-cell>
          <table:table-cell table:number-columns-repeated="2"/>
        </table:table-row>
        <table:table-row table:style-name="ro1">
          <table:table-cell office:value-type="float" office:value="571140824" calcext:value-type="float">
            <text:p>571140824</text:p>
          </table:table-cell>
          <table:table-cell office:value-type="float" office:value="762106907.972559" calcext:value-type="float">
            <text:p>762106907.972559</text:p>
          </table:table-cell>
          <table:table-cell/>
          <table:table-cell office:value-type="string" calcext:value-type="string">
            <text:p>2024-02-25T04:21:47.9725589Z</text:p>
          </table:table-cell>
          <table:table-cell office:value-type="string" calcext:value-type="string">
            <text:p>2024-02-25-04:22:57.1565589</text:p>
          </table:table-cell>
          <table:table-cell table:number-columns-repeated="2"/>
        </table:table-row>
        <table:table-row table:style-name="ro1">
          <table:table-cell office:value-type="float" office:value="571266777" calcext:value-type="float">
            <text:p>571266777</text:p>
          </table:table-cell>
          <table:table-cell office:value-type="float" office:value="762232860.973887" calcext:value-type="float">
            <text:p>762232860.973887</text:p>
          </table:table-cell>
          <table:table-cell/>
          <table:table-cell office:value-type="string" calcext:value-type="string">
            <text:p>2024-02-26T15:21:00.9738869Z</text:p>
          </table:table-cell>
          <table:table-cell office:value-type="string" calcext:value-type="string">
            <text:p>2024-02-26-15:22:10.1578869</text:p>
          </table:table-cell>
          <table:table-cell table:number-columns-repeated="2"/>
        </table:table-row>
        <table:table-row table:style-name="ro1">
          <table:table-cell office:value-type="float" office:value="571309995" calcext:value-type="float">
            <text:p>571309995</text:p>
          </table:table-cell>
          <table:table-cell office:value-type="float" office:value="762276078.974383" calcext:value-type="float">
            <text:p>762276078.974383</text:p>
          </table:table-cell>
          <table:table-cell/>
          <table:table-cell office:value-type="string" calcext:value-type="string">
            <text:p>2024-02-27T03:21:18.9743829Z</text:p>
          </table:table-cell>
          <table:table-cell office:value-type="string" calcext:value-type="string">
            <text:p>2024-02-27-03:22:28.1583830</text:p>
          </table:table-cell>
          <table:table-cell table:number-columns-repeated="2"/>
        </table:table-row>
        <table:table-row table:style-name="ro1">
          <table:table-cell office:value-type="float" office:value="571439584" calcext:value-type="float">
            <text:p>571439584</text:p>
          </table:table-cell>
          <table:table-cell office:value-type="float" office:value="762405667.975762" calcext:value-type="float">
            <text:p>762405667.975762</text:p>
          </table:table-cell>
          <table:table-cell/>
          <table:table-cell office:value-type="string" calcext:value-type="string">
            <text:p>2024-02-28T15:21:07.9757620Z</text:p>
          </table:table-cell>
          <table:table-cell office:value-type="string" calcext:value-type="string">
            <text:p>2024-02-28-15:22:17.1597620</text:p>
          </table:table-cell>
          <table:table-cell table:number-columns-repeated="2"/>
        </table:table-row>
        <table:table-row table:style-name="ro1">
          <table:table-cell office:value-type="float" office:value="571522387" calcext:value-type="float">
            <text:p>571522387</text:p>
          </table:table-cell>
          <table:table-cell office:value-type="float" office:value="762488470.976634" calcext:value-type="float">
            <text:p>762488470.976634</text:p>
          </table:table-cell>
          <table:table-cell/>
          <table:table-cell office:value-type="string" calcext:value-type="string">
            <text:p>2024-02-29T14:21:10.9766340Z</text:p>
          </table:table-cell>
          <table:table-cell office:value-type="string" calcext:value-type="string">
            <text:p>2024-02-29-14:22:20.1606340</text:p>
          </table:table-cell>
          <table:table-cell table:number-columns-repeated="2"/>
        </table:table-row>
        <table:table-row table:style-name="ro1">
          <table:table-cell office:value-type="float" office:value="571572827" calcext:value-type="float">
            <text:p>571572827</text:p>
          </table:table-cell>
          <table:table-cell office:value-type="float" office:value="762538910.977212" calcext:value-type="float">
            <text:p>762538910.977212</text:p>
          </table:table-cell>
          <table:table-cell/>
          <table:table-cell office:value-type="string" calcext:value-type="string">
            <text:p>2024-03-01T04:21:50.9772119Z</text:p>
          </table:table-cell>
          <table:table-cell office:value-type="string" calcext:value-type="string">
            <text:p>2024-03-01-04:23:00.1612119</text:p>
          </table:table-cell>
          <table:table-cell table:number-columns-repeated="2"/>
        </table:table-row>
        <table:table-row table:style-name="ro1">
          <table:table-cell office:value-type="float" office:value="571698793" calcext:value-type="float">
            <text:p>571698793</text:p>
          </table:table-cell>
          <table:table-cell office:value-type="float" office:value="762664876.978553" calcext:value-type="float">
            <text:p>762664876.978553</text:p>
          </table:table-cell>
          <table:table-cell/>
          <table:table-cell office:value-type="string" calcext:value-type="string">
            <text:p>2024-03-02T15:21:16.9785529Z</text:p>
          </table:table-cell>
          <table:table-cell office:value-type="string" calcext:value-type="string">
            <text:p>2024-03-02-15:22:26.1625529</text:p>
          </table:table-cell>
          <table:table-cell table:number-columns-repeated="2"/>
        </table:table-row>
        <table:table-row table:style-name="ro1">
          <table:table-cell office:value-type="float" office:value="571785197" calcext:value-type="float">
            <text:p>571785197</text:p>
          </table:table-cell>
          <table:table-cell office:value-type="float" office:value="762751280.979474" calcext:value-type="float">
            <text:p>762751280.979474</text:p>
          </table:table-cell>
          <table:table-cell/>
          <table:table-cell office:value-type="string" calcext:value-type="string">
            <text:p>2024-03-03T15:21:20.9794739Z</text:p>
          </table:table-cell>
          <table:table-cell office:value-type="string" calcext:value-type="string">
            <text:p>2024-03-03-15:22:30.1634739</text:p>
          </table:table-cell>
          <table:table-cell table:number-columns-repeated="2"/>
        </table:table-row>
        <table:table-row table:style-name="ro1">
          <table:table-cell office:value-type="float" office:value="571860801" calcext:value-type="float">
            <text:p>571860801</text:p>
          </table:table-cell>
          <table:table-cell office:value-type="float" office:value="762826884.980287" calcext:value-type="float">
            <text:p>762826884.980287</text:p>
          </table:table-cell>
          <table:table-cell/>
          <table:table-cell office:value-type="string" calcext:value-type="string">
            <text:p>2024-03-04T12:21:24.9802869Z</text:p>
          </table:table-cell>
          <table:table-cell office:value-type="string" calcext:value-type="string">
            <text:p>2024-03-04-12:22:34.1642869</text:p>
          </table:table-cell>
          <table:table-cell table:number-columns-repeated="2"/>
        </table:table-row>
        <table:table-row table:style-name="ro1">
          <table:table-cell office:value-type="float" office:value="571943601" calcext:value-type="float">
            <text:p>571943601</text:p>
          </table:table-cell>
          <table:table-cell office:value-type="float" office:value="762909684.981168" calcext:value-type="float">
            <text:p>762909684.981168</text:p>
          </table:table-cell>
          <table:table-cell/>
          <table:table-cell office:value-type="string" calcext:value-type="string">
            <text:p>2024-03-05T11:21:24.9811680Z</text:p>
          </table:table-cell>
          <table:table-cell office:value-type="string" calcext:value-type="string">
            <text:p>2024-03-05-11:22:34.1651680</text:p>
          </table:table-cell>
          <table:table-cell table:number-columns-repeated="2"/>
        </table:table-row>
        <table:table-row table:style-name="ro1">
          <table:table-cell office:value-type="float" office:value="572044410" calcext:value-type="float">
            <text:p>572044410</text:p>
          </table:table-cell>
          <table:table-cell office:value-type="float" office:value="763010493.982287" calcext:value-type="float">
            <text:p>763010493.982287</text:p>
          </table:table-cell>
          <table:table-cell/>
          <table:table-cell office:value-type="string" calcext:value-type="string">
            <text:p>2024-03-06T15:21:33.9822869Z</text:p>
          </table:table-cell>
          <table:table-cell office:value-type="string" calcext:value-type="string">
            <text:p>2024-03-06-15:22:43.1662869</text:p>
          </table:table-cell>
          <table:table-cell table:number-columns-repeated="2"/>
        </table:table-row>
        <table:table-row table:style-name="ro1">
          <table:table-cell office:value-type="float" office:value="572130811" calcext:value-type="float">
            <text:p>572130811</text:p>
          </table:table-cell>
          <table:table-cell office:value-type="float" office:value="763096894.983215" calcext:value-type="float">
            <text:p>763096894.983215</text:p>
          </table:table-cell>
          <table:table-cell/>
          <table:table-cell office:value-type="string" calcext:value-type="string">
            <text:p>2024-03-07T15:21:34.9832149Z</text:p>
          </table:table-cell>
          <table:table-cell office:value-type="string" calcext:value-type="string">
            <text:p>2024-03-07-15:22:44.1672149</text:p>
          </table:table-cell>
          <table:table-cell table:number-columns-repeated="2"/>
        </table:table-row>
        <table:table-row table:style-name="ro1">
          <table:table-cell office:value-type="float" office:value="572217824" calcext:value-type="float">
            <text:p>572217824</text:p>
          </table:table-cell>
          <table:table-cell office:value-type="float" office:value="763183907.984144" calcext:value-type="float">
            <text:p>763183907.984144</text:p>
          </table:table-cell>
          <table:table-cell/>
          <table:table-cell office:value-type="string" calcext:value-type="string">
            <text:p>2024-03-08T15:31:47.9841439Z</text:p>
          </table:table-cell>
          <table:table-cell office:value-type="string" calcext:value-type="string">
            <text:p>2024-03-08-15:32:57.1681439</text:p>
          </table:table-cell>
          <table:table-cell table:number-columns-repeated="2"/>
        </table:table-row>
        <table:table-row table:style-name="ro1">
          <table:table-cell office:value-type="float" office:value="572303613" calcext:value-type="float">
            <text:p>572303613</text:p>
          </table:table-cell>
          <table:table-cell office:value-type="float" office:value="763269696.98507" calcext:value-type="float">
            <text:p>763269696.98507</text:p>
          </table:table-cell>
          <table:table-cell/>
          <table:table-cell office:value-type="string" calcext:value-type="string">
            <text:p>2024-03-09T15:21:36.9850699Z</text:p>
          </table:table-cell>
          <table:table-cell office:value-type="string" calcext:value-type="string">
            <text:p>2024-03-09-15:22:46.1690700</text:p>
          </table:table-cell>
          <table:table-cell table:number-columns-repeated="2"/>
        </table:table-row>
        <table:table-row table:style-name="ro1">
          <table:table-cell office:value-type="float" office:value="572391249" calcext:value-type="float">
            <text:p>572391249</text:p>
          </table:table-cell>
          <table:table-cell office:value-type="float" office:value="763357332.986033" calcext:value-type="float">
            <text:p>763357332.986033</text:p>
          </table:table-cell>
          <table:table-cell/>
          <table:table-cell office:value-type="string" calcext:value-type="string">
            <text:p>2024-03-10T15:42:12.9860329Z</text:p>
          </table:table-cell>
          <table:table-cell office:value-type="string" calcext:value-type="string">
            <text:p>2024-03-10-15:43:22.1700329</text:p>
          </table:table-cell>
          <table:table-cell table:number-columns-repeated="2"/>
        </table:table-row>
        <table:table-row table:style-name="ro1">
          <table:table-cell office:value-type="float" office:value="572447617" calcext:value-type="float">
            <text:p>572447617</text:p>
          </table:table-cell>
          <table:table-cell office:value-type="float" office:value="763413700.986619" calcext:value-type="float">
            <text:p>763413700.986619</text:p>
          </table:table-cell>
          <table:table-cell/>
          <table:table-cell office:value-type="string" calcext:value-type="string">
            <text:p>2024-03-11T07:21:40.9866189Z</text:p>
          </table:table-cell>
          <table:table-cell office:value-type="string" calcext:value-type="string">
            <text:p>2024-03-11-07:22:50.1706190</text:p>
          </table:table-cell>
          <table:table-cell table:number-columns-repeated="2"/>
        </table:table-row>
        <table:table-row table:style-name="ro1">
          <table:table-cell office:value-type="float" office:value="572508825" calcext:value-type="float">
            <text:p>572508825</text:p>
          </table:table-cell>
          <table:table-cell office:value-type="float" office:value="763474908.987295" calcext:value-type="float">
            <text:p>763474908.987295</text:p>
          </table:table-cell>
          <table:table-cell/>
          <table:table-cell office:value-type="string" calcext:value-type="string">
            <text:p>2024-03-12T00:21:48.9872950Z</text:p>
          </table:table-cell>
          <table:table-cell office:value-type="string" calcext:value-type="string">
            <text:p>2024-03-12-00:22:58.1712950</text:p>
          </table:table-cell>
          <table:table-cell table:number-columns-repeated="2"/>
        </table:table-row>
        <table:table-row table:style-name="ro1">
          <table:table-cell office:value-type="float" office:value="572616827" calcext:value-type="float">
            <text:p>572616827</text:p>
          </table:table-cell>
          <table:table-cell office:value-type="float" office:value="763582910.988455" calcext:value-type="float">
            <text:p>763582910.988455</text:p>
          </table:table-cell>
          <table:table-cell/>
          <table:table-cell office:value-type="string" calcext:value-type="string">
            <text:p>2024-03-13T06:21:50.9884549Z</text:p>
          </table:table-cell>
          <table:table-cell office:value-type="string" calcext:value-type="string">
            <text:p>2024-03-13-06:23:00.1724549</text:p>
          </table:table-cell>
          <table:table-cell table:number-columns-repeated="2"/>
        </table:table-row>
        <table:table-row table:style-name="ro1">
          <table:table-cell office:value-type="float" office:value="572674427" calcext:value-type="float">
            <text:p>572674427</text:p>
          </table:table-cell>
          <table:table-cell office:value-type="float" office:value="763640510.989084" calcext:value-type="float">
            <text:p>763640510.989084</text:p>
          </table:table-cell>
          <table:table-cell/>
          <table:table-cell office:value-type="string" calcext:value-type="string">
            <text:p>2024-03-13T22:21:50.9890840Z</text:p>
          </table:table-cell>
          <table:table-cell office:value-type="string" calcext:value-type="string">
            <text:p>2024-03-13-22:23:00.1730840</text:p>
          </table:table-cell>
          <table:table-cell table:number-columns-repeated="2"/>
        </table:table-row>
        <table:table-row table:style-name="ro1">
          <table:table-cell office:value-type="float" office:value="572908443" calcext:value-type="float">
            <text:p>572908443</text:p>
          </table:table-cell>
          <table:table-cell office:value-type="float" office:value="763874526.991626" calcext:value-type="float">
            <text:p>763874526.991626</text:p>
          </table:table-cell>
          <table:table-cell/>
          <table:table-cell office:value-type="string" calcext:value-type="string">
            <text:p>2024-03-16T15:22:06.9916260Z</text:p>
          </table:table-cell>
          <table:table-cell office:value-type="string" calcext:value-type="string">
            <text:p>2024-03-16-15:23:16.1756260</text:p>
          </table:table-cell>
          <table:table-cell table:number-columns-repeated="2"/>
        </table:table-row>
        <table:table-row table:style-name="ro1">
          <table:table-cell office:value-type="float" office:value="572987649" calcext:value-type="float">
            <text:p>572987649</text:p>
          </table:table-cell>
          <table:table-cell office:value-type="float" office:value="763953732.992487" calcext:value-type="float">
            <text:p>763953732.992487</text:p>
          </table:table-cell>
          <table:table-cell/>
          <table:table-cell office:value-type="string" calcext:value-type="string">
            <text:p>2024-03-17T13:22:12.9924869Z</text:p>
          </table:table-cell>
          <table:table-cell office:value-type="string" calcext:value-type="string">
            <text:p>2024-03-17-13:23:22.1764869</text:p>
          </table:table-cell>
          <table:table-cell table:number-columns-repeated="2"/>
        </table:table-row>
        <table:table-row table:style-name="ro1">
          <table:table-cell office:value-type="float" office:value="573045254" calcext:value-type="float">
            <text:p>573045254</text:p>
          </table:table-cell>
          <table:table-cell office:value-type="float" office:value="764011337.993093" calcext:value-type="float">
            <text:p>764011337.993093</text:p>
          </table:table-cell>
          <table:table-cell/>
          <table:table-cell office:value-type="string" calcext:value-type="string">
            <text:p>2024-03-18T05:22:17.9930930Z</text:p>
          </table:table-cell>
          <table:table-cell office:value-type="string" calcext:value-type="string">
            <text:p>2024-03-18-05:23:27.1770930</text:p>
          </table:table-cell>
          <table:table-cell table:number-columns-repeated="2"/>
        </table:table-row>
        <table:table-row table:style-name="ro1">
          <table:table-cell office:value-type="float" office:value="573160457" calcext:value-type="float">
            <text:p>573160457</text:p>
          </table:table-cell>
          <table:table-cell office:value-type="float" office:value="764126540.994361" calcext:value-type="float">
            <text:p>764126540.994361</text:p>
          </table:table-cell>
          <table:table-cell/>
          <table:table-cell office:value-type="string" calcext:value-type="string">
            <text:p>2024-03-19T13:22:20.9943610Z</text:p>
          </table:table-cell>
          <table:table-cell office:value-type="string" calcext:value-type="string">
            <text:p>2024-03-19-13:23:30.1783610</text:p>
          </table:table-cell>
          <table:table-cell table:number-columns-repeated="2"/>
        </table:table-row>
        <table:table-row table:style-name="ro1">
          <table:table-cell office:value-type="float" office:value="573250457" calcext:value-type="float">
            <text:p>573250457</text:p>
          </table:table-cell>
          <table:table-cell office:value-type="float" office:value="764216540.995335" calcext:value-type="float">
            <text:p>764216540.995335</text:p>
          </table:table-cell>
          <table:table-cell/>
          <table:table-cell office:value-type="string" calcext:value-type="string">
            <text:p>2024-03-20T14:22:20.9953349Z</text:p>
          </table:table-cell>
          <table:table-cell office:value-type="string" calcext:value-type="string">
            <text:p>2024-03-20-14:23:30.1793349</text:p>
          </table:table-cell>
          <table:table-cell table:number-columns-repeated="2"/>
        </table:table-row>
        <table:table-row table:style-name="ro1">
          <table:table-cell office:value-type="float" office:value="573426869" calcext:value-type="float">
            <text:p>573426869</text:p>
          </table:table-cell>
          <table:table-cell office:value-type="float" office:value="764392952.997264" calcext:value-type="float">
            <text:p>764392952.997264</text:p>
          </table:table-cell>
          <table:table-cell/>
          <table:table-cell office:value-type="string" calcext:value-type="string">
            <text:p>2024-03-22T15:22:32.9972640Z</text:p>
          </table:table-cell>
          <table:table-cell office:value-type="string" calcext:value-type="string">
            <text:p>2024-03-22-15:23:42.1812640</text:p>
          </table:table-cell>
          <table:table-cell table:number-columns-repeated="2"/>
        </table:table-row>
        <table:table-row table:style-name="ro1">
          <table:table-cell office:value-type="float" office:value="573513273" calcext:value-type="float">
            <text:p>573513273</text:p>
          </table:table-cell>
          <table:table-cell office:value-type="float" office:value="764479356.998198" calcext:value-type="float">
            <text:p>764479356.998198</text:p>
          </table:table-cell>
          <table:table-cell/>
          <table:table-cell office:value-type="string" calcext:value-type="string">
            <text:p>2024-03-23T15:22:36.9981980Z</text:p>
          </table:table-cell>
          <table:table-cell office:value-type="string" calcext:value-type="string">
            <text:p>2024-03-23-15:23:46.1821980</text:p>
          </table:table-cell>
          <table:table-cell table:number-columns-repeated="2"/>
        </table:table-row>
        <table:table-row table:style-name="ro1">
          <table:table-cell office:value-type="float" office:value="573599676" calcext:value-type="float">
            <text:p>573599676</text:p>
          </table:table-cell>
          <table:table-cell office:value-type="float" office:value="764565759.999155" calcext:value-type="float">
            <text:p>764565759.999155</text:p>
          </table:table-cell>
          <table:table-cell/>
          <table:table-cell office:value-type="string" calcext:value-type="string">
            <text:p>2024-03-24T15:22:39.9991549Z</text:p>
          </table:table-cell>
          <table:table-cell office:value-type="string" calcext:value-type="string">
            <text:p>2024-03-24-15:23:49.1831549</text:p>
          </table:table-cell>
          <table:table-cell table:number-columns-repeated="2"/>
        </table:table-row>
        <table:table-row table:style-name="ro1">
          <table:table-cell office:value-type="float" office:value="573650077" calcext:value-type="float">
            <text:p>573650077</text:p>
          </table:table-cell>
          <table:table-cell office:value-type="float" office:value="764616160.999679" calcext:value-type="float">
            <text:p>764616160.999679</text:p>
          </table:table-cell>
          <table:table-cell/>
          <table:table-cell office:value-type="string" calcext:value-type="string">
            <text:p>2024-03-25T05:22:40.9996789Z</text:p>
          </table:table-cell>
          <table:table-cell office:value-type="string" calcext:value-type="string">
            <text:p>2024-03-25-05:23:50.1836789</text:p>
          </table:table-cell>
          <table:table-cell table:number-columns-repeated="2"/>
        </table:table-row>
        <table:table-row table:style-name="ro1">
          <table:table-cell office:value-type="float" office:value="573772487" calcext:value-type="float">
            <text:p>573772487</text:p>
          </table:table-cell>
          <table:table-cell office:value-type="float" office:value="764738571.001035" calcext:value-type="float">
            <text:p>764738571.001035</text:p>
          </table:table-cell>
          <table:table-cell/>
          <table:table-cell office:value-type="string" calcext:value-type="string">
            <text:p>2024-03-26T15:22:51.0010349Z</text:p>
          </table:table-cell>
          <table:table-cell office:value-type="string" calcext:value-type="string">
            <text:p>2024-03-26-15:24:00.1850349</text:p>
          </table:table-cell>
          <table:table-cell table:number-columns-repeated="2"/>
        </table:table-row>
        <table:table-row table:style-name="ro1">
          <table:table-cell office:value-type="float" office:value="573858889" calcext:value-type="float">
            <text:p>573858889</text:p>
          </table:table-cell>
          <table:table-cell office:value-type="float" office:value="764824973.00198" calcext:value-type="float">
            <text:p>764824973.00198</text:p>
          </table:table-cell>
          <table:table-cell/>
          <table:table-cell office:value-type="string" calcext:value-type="string">
            <text:p>2024-03-27T15:22:53.0019799Z</text:p>
          </table:table-cell>
          <table:table-cell office:value-type="string" calcext:value-type="string">
            <text:p>2024-03-27-15:24:02.1859799</text:p>
          </table:table-cell>
          <table:table-cell table:number-columns-repeated="2"/>
        </table:table-row>
        <table:table-row table:style-name="ro1">
          <table:table-cell office:value-type="float" office:value="573912887" calcext:value-type="float">
            <text:p>573912887</text:p>
          </table:table-cell>
          <table:table-cell office:value-type="float" office:value="764878971.002542" calcext:value-type="float">
            <text:p>764878971.002542</text:p>
          </table:table-cell>
          <table:table-cell/>
          <table:table-cell office:value-type="string" calcext:value-type="string">
            <text:p>2024-03-28T06:22:51.0025420Z</text:p>
          </table:table-cell>
          <table:table-cell office:value-type="string" calcext:value-type="string">
            <text:p>2024-03-28-06:24:00.1865420</text:p>
          </table:table-cell>
          <table:table-cell table:number-columns-repeated="2"/>
        </table:table-row>
        <table:table-row table:style-name="ro1">
          <table:table-cell office:value-type="float" office:value="574031703" calcext:value-type="float">
            <text:p>574031703</text:p>
          </table:table-cell>
          <table:table-cell office:value-type="float" office:value="764997787.003866" calcext:value-type="float">
            <text:p>764997787.003866</text:p>
          </table:table-cell>
          <table:table-cell/>
          <table:table-cell office:value-type="string" calcext:value-type="string">
            <text:p>2024-03-29T15:23:07.0038659Z</text:p>
          </table:table-cell>
          <table:table-cell office:value-type="string" calcext:value-type="string">
            <text:p>2024-03-29-15:24:16.1878659</text:p>
          </table:table-cell>
          <table:table-cell table:number-columns-repeated="2"/>
        </table:table-row>
        <table:table-row table:style-name="ro1">
          <table:table-cell office:value-type="float" office:value="574118108" calcext:value-type="float">
            <text:p>574118108</text:p>
          </table:table-cell>
          <table:table-cell office:value-type="float" office:value="765084192.004807" calcext:value-type="float">
            <text:p>765084192.004807</text:p>
          </table:table-cell>
          <table:table-cell/>
          <table:table-cell office:value-type="string" calcext:value-type="string">
            <text:p>2024-03-30T15:23:12.0048069Z</text:p>
          </table:table-cell>
          <table:table-cell office:value-type="string" calcext:value-type="string">
            <text:p>2024-03-30-15:24:21.1888070</text:p>
          </table:table-cell>
          <table:table-cell table:number-columns-repeated="2"/>
        </table:table-row>
        <table:table-row table:style-name="ro1">
          <table:table-cell office:value-type="float" office:value="574182901" calcext:value-type="float">
            <text:p>574182901</text:p>
          </table:table-cell>
          <table:table-cell office:value-type="float" office:value="765148985.005471" calcext:value-type="float">
            <text:p>765148985.005471</text:p>
          </table:table-cell>
          <table:table-cell/>
          <table:table-cell office:value-type="string" calcext:value-type="string">
            <text:p>2024-03-31T09:23:05.0054709Z</text:p>
          </table:table-cell>
          <table:table-cell office:value-type="string" calcext:value-type="string">
            <text:p>2024-03-31-09:24:14.1894710</text:p>
          </table:table-cell>
          <table:table-cell table:number-columns-repeated="2"/>
        </table:table-row>
        <table:table-row table:style-name="ro1">
          <table:table-cell office:value-type="float" office:value="574280107" calcext:value-type="float">
            <text:p>574280107</text:p>
          </table:table-cell>
          <table:table-cell office:value-type="float" office:value="765246191.00656" calcext:value-type="float">
            <text:p>765246191.00656</text:p>
          </table:table-cell>
          <table:table-cell/>
          <table:table-cell office:value-type="string" calcext:value-type="string">
            <text:p>2024-04-01T12:23:11.0065599Z</text:p>
          </table:table-cell>
          <table:table-cell office:value-type="string" calcext:value-type="string">
            <text:p>2024-04-01-12:24:20.1905599</text:p>
          </table:table-cell>
          <table:table-cell table:number-columns-repeated="2"/>
        </table:table-row>
        <table:table-row table:style-name="ro1">
          <table:table-cell office:value-type="float" office:value="574344916" calcext:value-type="float">
            <text:p>574344916</text:p>
          </table:table-cell>
          <table:table-cell office:value-type="float" office:value="765311000.007261" calcext:value-type="float">
            <text:p>765311000.007261</text:p>
          </table:table-cell>
          <table:table-cell/>
          <table:table-cell office:value-type="string" calcext:value-type="string">
            <text:p>2024-04-02T06:23:20.0072610Z</text:p>
          </table:table-cell>
          <table:table-cell office:value-type="string" calcext:value-type="string">
            <text:p>2024-04-02-06:24:29.1912610</text:p>
          </table:table-cell>
          <table:table-cell table:number-columns-repeated="2"/>
        </table:table-row>
        <table:table-row table:style-name="ro1">
          <table:table-cell office:value-type="float" office:value="574431321" calcext:value-type="float">
            <text:p>574431321</text:p>
          </table:table-cell>
          <table:table-cell office:value-type="float" office:value="765397405.008225" calcext:value-type="float">
            <text:p>765397405.008225</text:p>
          </table:table-cell>
          <table:table-cell/>
          <table:table-cell office:value-type="string" calcext:value-type="string">
            <text:p>2024-04-03T06:23:25.0082249Z</text:p>
          </table:table-cell>
          <table:table-cell office:value-type="string" calcext:value-type="string">
            <text:p>2024-04-03-06:24:34.1922249</text:p>
          </table:table-cell>
          <table:table-cell table:number-columns-repeated="2"/>
        </table:table-row>
        <table:table-row table:style-name="ro1">
          <table:table-cell office:value-type="float" office:value="574535719" calcext:value-type="float">
            <text:p>574535719</text:p>
          </table:table-cell>
          <table:table-cell office:value-type="float" office:value="765501803.009356" calcext:value-type="float">
            <text:p>765501803.009356</text:p>
          </table:table-cell>
          <table:table-cell/>
          <table:table-cell office:value-type="string" calcext:value-type="string">
            <text:p>2024-04-04T11:23:23.0093560Z</text:p>
          </table:table-cell>
          <table:table-cell office:value-type="string" calcext:value-type="string">
            <text:p>2024-04-04-11:24:32.1933560</text:p>
          </table:table-cell>
          <table:table-cell table:number-columns-repeated="2"/>
        </table:table-row>
        <table:table-row table:style-name="ro1">
          <table:table-cell office:value-type="float" office:value="574596940" calcext:value-type="float">
            <text:p>574596940</text:p>
          </table:table-cell>
          <table:table-cell office:value-type="float" office:value="765563024.010021" calcext:value-type="float">
            <text:p>765563024.010021</text:p>
          </table:table-cell>
          <table:table-cell/>
          <table:table-cell office:value-type="string" calcext:value-type="string">
            <text:p>2024-04-05T04:23:44.0100209Z</text:p>
          </table:table-cell>
          <table:table-cell office:value-type="string" calcext:value-type="string">
            <text:p>2024-04-05-04:24:53.1940209</text:p>
          </table:table-cell>
          <table:table-cell table:number-columns-repeated="2"/>
        </table:table-row>
        <table:table-row table:style-name="ro1">
          <table:table-cell office:value-type="float" office:value="574701381" calcext:value-type="float">
            <text:p>574701381</text:p>
          </table:table-cell>
          <table:table-cell office:value-type="float" office:value="765667465.011199" calcext:value-type="float">
            <text:p>765667465.011199</text:p>
          </table:table-cell>
          <table:table-cell/>
          <table:table-cell office:value-type="string" calcext:value-type="string">
            <text:p>2024-04-06T09:24:25.0111989Z</text:p>
          </table:table-cell>
          <table:table-cell office:value-type="string" calcext:value-type="string">
            <text:p>2024-04-06-09:25:34.1951990</text:p>
          </table:table-cell>
          <table:table-cell table:number-columns-repeated="2"/>
        </table:table-row>
        <table:table-row table:style-name="ro1">
          <table:table-cell office:value-type="float" office:value="574794933" calcext:value-type="float">
            <text:p>574794933</text:p>
          </table:table-cell>
          <table:table-cell office:value-type="float" office:value="765761017.0122" calcext:value-type="float">
            <text:p>765761017.0122</text:p>
          </table:table-cell>
          <table:table-cell/>
          <table:table-cell office:value-type="string" calcext:value-type="string">
            <text:p>2024-04-07T11:23:37.0121999Z</text:p>
          </table:table-cell>
          <table:table-cell office:value-type="string" calcext:value-type="string">
            <text:p>2024-04-07-11:24:46.1962000</text:p>
          </table:table-cell>
          <table:table-cell table:number-columns-repeated="2"/>
        </table:table-row>
        <table:table-row table:style-name="ro1">
          <table:table-cell office:value-type="float" office:value="574892140" calcext:value-type="float">
            <text:p>574892140</text:p>
          </table:table-cell>
          <table:table-cell office:value-type="float" office:value="765858224.013277" calcext:value-type="float">
            <text:p>765858224.013277</text:p>
          </table:table-cell>
          <table:table-cell/>
          <table:table-cell office:value-type="string" calcext:value-type="string">
            <text:p>2024-04-08T14:23:44.0132769Z</text:p>
          </table:table-cell>
          <table:table-cell office:value-type="string" calcext:value-type="string">
            <text:p>2024-04-08-14:24:53.1972769</text:p>
          </table:table-cell>
          <table:table-cell table:number-columns-repeated="2"/>
        </table:table-row>
        <table:table-row table:style-name="ro1">
          <table:table-cell office:value-type="float" office:value="574953356" calcext:value-type="float">
            <text:p>574953356</text:p>
          </table:table-cell>
          <table:table-cell office:value-type="float" office:value="765919440.013937" calcext:value-type="float">
            <text:p>765919440.013937</text:p>
          </table:table-cell>
          <table:table-cell/>
          <table:table-cell office:value-type="string" calcext:value-type="string">
            <text:p>2024-04-09T07:24:00.0139369Z</text:p>
          </table:table-cell>
          <table:table-cell office:value-type="string" calcext:value-type="string">
            <text:p>2024-04-09-07:25:09.1979370</text:p>
          </table:table-cell>
          <table:table-cell table:number-columns-repeated="2"/>
        </table:table-row>
        <table:table-row table:style-name="ro1">
          <table:table-cell office:value-type="float" office:value="575003740" calcext:value-type="float">
            <text:p>575003740</text:p>
          </table:table-cell>
          <table:table-cell office:value-type="float" office:value="765969824.014487" calcext:value-type="float">
            <text:p>765969824.014487</text:p>
          </table:table-cell>
          <table:table-cell/>
          <table:table-cell office:value-type="string" calcext:value-type="string">
            <text:p>2024-04-09T21:23:44.0144870Z</text:p>
          </table:table-cell>
          <table:table-cell office:value-type="string" calcext:value-type="string">
            <text:p>2024-04-09-21:24:53.1984870</text:p>
          </table:table-cell>
          <table:table-cell table:number-columns-repeated="2"/>
        </table:table-row>
        <table:table-row table:style-name="ro1">
          <table:table-cell office:value-type="float" office:value="575090154" calcext:value-type="float">
            <text:p>575090154</text:p>
          </table:table-cell>
          <table:table-cell office:value-type="float" office:value="766056238.01544" calcext:value-type="float">
            <text:p>766056238.01544</text:p>
          </table:table-cell>
          <table:table-cell/>
          <table:table-cell office:value-type="string" calcext:value-type="string">
            <text:p>2024-04-10T21:23:58.0154399Z</text:p>
          </table:table-cell>
          <table:table-cell office:value-type="string" calcext:value-type="string">
            <text:p>2024-04-10-21:25:07.1994400</text:p>
          </table:table-cell>
          <table:table-cell table:number-columns-repeated="2"/>
        </table:table-row>
        <table:table-row table:style-name="ro1">
          <table:table-cell office:value-type="float" office:value="575230564" calcext:value-type="float">
            <text:p>575230564</text:p>
          </table:table-cell>
          <table:table-cell office:value-type="float" office:value="766196648.016983" calcext:value-type="float">
            <text:p>766196648.016983</text:p>
          </table:table-cell>
          <table:table-cell/>
          <table:table-cell office:value-type="string" calcext:value-type="string">
            <text:p>2024-04-12T12:24:08.0169830Z</text:p>
          </table:table-cell>
          <table:table-cell office:value-type="string" calcext:value-type="string">
            <text:p>2024-04-12-12:25:17.2009830</text:p>
          </table:table-cell>
          <table:table-cell table:number-columns-repeated="2"/>
        </table:table-row>
        <table:table-row table:style-name="ro1">
          <table:table-cell office:value-type="float" office:value="575273767" calcext:value-type="float">
            <text:p>575273767</text:p>
          </table:table-cell>
          <table:table-cell office:value-type="float" office:value="766239851.017455" calcext:value-type="float">
            <text:p>766239851.017455</text:p>
          </table:table-cell>
          <table:table-cell/>
          <table:table-cell office:value-type="string" calcext:value-type="string">
            <text:p>2024-04-13T00:24:11.0174549Z</text:p>
          </table:table-cell>
          <table:table-cell office:value-type="string" calcext:value-type="string">
            <text:p>2024-04-13-00:25:20.2014549</text:p>
          </table:table-cell>
          <table:table-cell table:number-columns-repeated="2"/>
        </table:table-row>
        <table:table-row table:style-name="ro1">
          <table:table-cell office:value-type="float" office:value="575414178" calcext:value-type="float">
            <text:p>575414178</text:p>
          </table:table-cell>
          <table:table-cell office:value-type="float" office:value="766380262.019021" calcext:value-type="float">
            <text:p>766380262.019021</text:p>
          </table:table-cell>
          <table:table-cell/>
          <table:table-cell office:value-type="string" calcext:value-type="string">
            <text:p>2024-04-14T15:24:22.0190210Z</text:p>
          </table:table-cell>
          <table:table-cell office:value-type="string" calcext:value-type="string">
            <text:p>2024-04-14-15:25:31.2030210</text:p>
          </table:table-cell>
          <table:table-cell table:number-columns-repeated="2"/>
        </table:table-row>
        <table:table-row table:style-name="ro1">
          <table:table-cell office:value-type="float" office:value="575493376" calcext:value-type="float">
            <text:p>575493376</text:p>
          </table:table-cell>
          <table:table-cell office:value-type="float" office:value="766459460.019875" calcext:value-type="float">
            <text:p>766459460.019875</text:p>
          </table:table-cell>
          <table:table-cell/>
          <table:table-cell office:value-type="string" calcext:value-type="string">
            <text:p>2024-04-15T13:24:20.0198749Z</text:p>
          </table:table-cell>
          <table:table-cell office:value-type="string" calcext:value-type="string">
            <text:p>2024-04-15-13:25:29.2038749</text:p>
          </table:table-cell>
          <table:table-cell table:number-columns-repeated="2"/>
        </table:table-row>
        <table:table-row table:style-name="ro1">
          <table:table-cell office:value-type="float" office:value="575576182" calcext:value-type="float">
            <text:p>575576182</text:p>
          </table:table-cell>
          <table:table-cell office:value-type="float" office:value="766542266.020783" calcext:value-type="float">
            <text:p>766542266.020783</text:p>
          </table:table-cell>
          <table:table-cell/>
          <table:table-cell office:value-type="string" calcext:value-type="string">
            <text:p>2024-04-16T12:24:26.0207829Z</text:p>
          </table:table-cell>
          <table:table-cell office:value-type="string" calcext:value-type="string">
            <text:p>2024-04-16-12:25:35.2047829</text:p>
          </table:table-cell>
          <table:table-cell table:number-columns-repeated="2"/>
        </table:table-row>
        <table:table-row table:style-name="ro1">
          <table:table-cell office:value-type="float" office:value="575655385" calcext:value-type="float">
            <text:p>575655385</text:p>
          </table:table-cell>
          <table:table-cell office:value-type="float" office:value="766621469.021651" calcext:value-type="float">
            <text:p>766621469.021651</text:p>
          </table:table-cell>
          <table:table-cell/>
          <table:table-cell office:value-type="string" calcext:value-type="string">
            <text:p>2024-04-17T10:24:29.0216510Z</text:p>
          </table:table-cell>
          <table:table-cell office:value-type="string" calcext:value-type="string">
            <text:p>2024-04-17-10:25:38.2056510</text:p>
          </table:table-cell>
          <table:table-cell table:number-columns-repeated="2"/>
        </table:table-row>
        <table:table-row table:style-name="ro1">
          <table:table-cell office:value-type="float" office:value="575727382" calcext:value-type="float">
            <text:p>575727382</text:p>
          </table:table-cell>
          <table:table-cell office:value-type="float" office:value="766693466.022455" calcext:value-type="float">
            <text:p>766693466.022455</text:p>
          </table:table-cell>
          <table:table-cell/>
          <table:table-cell office:value-type="string" calcext:value-type="string">
            <text:p>2024-04-18T06:24:26.0224549Z</text:p>
          </table:table-cell>
          <table:table-cell office:value-type="string" calcext:value-type="string">
            <text:p>2024-04-18-06:25:35.2064549</text:p>
          </table:table-cell>
          <table:table-cell table:number-columns-repeated="2"/>
        </table:table-row>
        <table:table-row table:style-name="ro1">
          <table:table-cell office:value-type="float" office:value="575846197" calcext:value-type="float">
            <text:p>575846197</text:p>
          </table:table-cell>
          <table:table-cell office:value-type="float" office:value="766812281.023768" calcext:value-type="float">
            <text:p>766812281.023768</text:p>
          </table:table-cell>
          <table:table-cell/>
          <table:table-cell office:value-type="string" calcext:value-type="string">
            <text:p>2024-04-19T15:24:41.0237679Z</text:p>
          </table:table-cell>
          <table:table-cell office:value-type="string" calcext:value-type="string">
            <text:p>2024-04-19-15:25:50.2077679</text:p>
          </table:table-cell>
          <table:table-cell table:number-columns-repeated="2"/>
        </table:table-row>
        <table:table-row table:style-name="ro1">
          <table:table-cell office:value-type="float" office:value="575907439" calcext:value-type="float">
            <text:p>575907439</text:p>
          </table:table-cell>
          <table:table-cell office:value-type="float" office:value="766873523.02445" calcext:value-type="float">
            <text:p>766873523.02445</text:p>
          </table:table-cell>
          <table:table-cell/>
          <table:table-cell office:value-type="string" calcext:value-type="string">
            <text:p>2024-04-20T08:25:23.0244499Z</text:p>
          </table:table-cell>
          <table:table-cell office:value-type="string" calcext:value-type="string">
            <text:p>2024-04-20-08:26:32.2084499</text:p>
          </table:table-cell>
          <table:table-cell table:number-columns-repeated="2"/>
        </table:table-row>
        <table:table-row table:style-name="ro1">
          <table:table-cell office:value-type="float" office:value="575961402" calcext:value-type="float">
            <text:p>575961402</text:p>
          </table:table-cell>
          <table:table-cell office:value-type="float" office:value="766927486.025043" calcext:value-type="float">
            <text:p>766927486.025043</text:p>
          </table:table-cell>
          <table:table-cell/>
          <table:table-cell office:value-type="string" calcext:value-type="string">
            <text:p>2024-04-20T23:24:46.0250430Z</text:p>
          </table:table-cell>
          <table:table-cell office:value-type="string" calcext:value-type="string">
            <text:p>2024-04-20-23:25:55.2090430</text:p>
          </table:table-cell>
          <table:table-cell table:number-columns-repeated="2"/>
        </table:table-row>
        <table:table-row table:style-name="ro1">
          <table:table-cell office:value-type="float" office:value="576098205" calcext:value-type="float">
            <text:p>576098205</text:p>
          </table:table-cell>
          <table:table-cell office:value-type="float" office:value="767064289.026554" calcext:value-type="float">
            <text:p>767064289.026554</text:p>
          </table:table-cell>
          <table:table-cell/>
          <table:table-cell office:value-type="string" calcext:value-type="string">
            <text:p>2024-04-22T13:24:49.0265539Z</text:p>
          </table:table-cell>
          <table:table-cell office:value-type="string" calcext:value-type="string">
            <text:p>2024-04-22-13:25:58.2105540</text:p>
          </table:table-cell>
          <table:table-cell table:number-columns-repeated="2"/>
        </table:table-row>
        <table:table-row table:style-name="ro1">
          <table:table-cell office:value-type="float" office:value="576177408" calcext:value-type="float">
            <text:p>576177408</text:p>
          </table:table-cell>
          <table:table-cell office:value-type="float" office:value="767143492.027412" calcext:value-type="float">
            <text:p>767143492.027412</text:p>
          </table:table-cell>
          <table:table-cell/>
          <table:table-cell office:value-type="string" calcext:value-type="string">
            <text:p>2024-04-23T11:24:52.0274119Z</text:p>
          </table:table-cell>
          <table:table-cell office:value-type="string" calcext:value-type="string">
            <text:p>2024-04-23-11:26:01.2114119</text:p>
          </table:table-cell>
          <table:table-cell table:number-columns-repeated="2"/>
        </table:table-row>
        <table:table-row table:style-name="ro1">
          <table:table-cell office:value-type="float" office:value="576332225" calcext:value-type="float">
            <text:p>576332225</text:p>
          </table:table-cell>
          <table:table-cell office:value-type="float" office:value="767298309.029134" calcext:value-type="float">
            <text:p>767298309.029134</text:p>
          </table:table-cell>
          <table:table-cell/>
          <table:table-cell office:value-type="string" calcext:value-type="string">
            <text:p>2024-04-25T06:25:09.0291340Z</text:p>
          </table:table-cell>
          <table:table-cell office:value-type="string" calcext:value-type="string">
            <text:p>2024-04-25-06:26:18.2131340</text:p>
          </table:table-cell>
          <table:table-cell table:number-columns-repeated="2"/>
        </table:table-row>
        <table:table-row table:style-name="ro1">
          <table:table-cell office:value-type="float" office:value="576451041" calcext:value-type="float">
            <text:p>576451041</text:p>
          </table:table-cell>
          <table:table-cell office:value-type="float" office:value="767417125.030461" calcext:value-type="float">
            <text:p>767417125.030461</text:p>
          </table:table-cell>
          <table:table-cell/>
          <table:table-cell office:value-type="string" calcext:value-type="string">
            <text:p>2024-04-26T15:25:25.0304609Z</text:p>
          </table:table-cell>
          <table:table-cell office:value-type="string" calcext:value-type="string">
            <text:p>2024-04-26-15:26:34.2144609</text:p>
          </table:table-cell>
          <table:table-cell table:number-columns-repeated="2"/>
        </table:table-row>
        <table:table-row table:style-name="ro1">
          <table:table-cell office:value-type="float" office:value="576501421" calcext:value-type="float">
            <text:p>576501421</text:p>
          </table:table-cell>
          <table:table-cell office:value-type="float" office:value="767467505.031003" calcext:value-type="float">
            <text:p>767467505.031003</text:p>
          </table:table-cell>
          <table:table-cell/>
          <table:table-cell office:value-type="string" calcext:value-type="string">
            <text:p>2024-04-27T05:25:05.0310029Z</text:p>
          </table:table-cell>
          <table:table-cell office:value-type="string" calcext:value-type="string">
            <text:p>2024-04-27-05:26:14.2150030</text:p>
          </table:table-cell>
          <table:table-cell table:number-columns-repeated="2"/>
        </table:table-row>
        <table:table-row table:style-name="ro1">
          <table:table-cell office:value-type="float" office:value="576616630" calcext:value-type="float">
            <text:p>576616630</text:p>
          </table:table-cell>
          <table:table-cell office:value-type="float" office:value="767582714.032279" calcext:value-type="float">
            <text:p>767582714.032279</text:p>
          </table:table-cell>
          <table:table-cell/>
          <table:table-cell office:value-type="string" calcext:value-type="string">
            <text:p>2024-04-28T13:25:14.0322790Z</text:p>
          </table:table-cell>
          <table:table-cell office:value-type="string" calcext:value-type="string">
            <text:p>2024-04-28-13:26:23.2162790</text:p>
          </table:table-cell>
          <table:table-cell table:number-columns-repeated="2"/>
        </table:table-row>
        <table:table-row table:style-name="ro1">
          <table:table-cell office:value-type="float" office:value="576670627" calcext:value-type="float">
            <text:p>576670627</text:p>
          </table:table-cell>
          <table:table-cell office:value-type="float" office:value="767636711.032856" calcext:value-type="float">
            <text:p>767636711.032856</text:p>
          </table:table-cell>
          <table:table-cell/>
          <table:table-cell office:value-type="string" calcext:value-type="string">
            <text:p>2024-04-29T04:25:11.0328559Z</text:p>
          </table:table-cell>
          <table:table-cell office:value-type="string" calcext:value-type="string">
            <text:p>2024-04-29-04:26:20.2168560</text:p>
          </table:table-cell>
          <table:table-cell table:number-columns-repeated="2"/>
        </table:table-row>
        <table:table-row table:style-name="ro1">
          <table:table-cell office:value-type="float" office:value="576731828" calcext:value-type="float">
            <text:p>576731828</text:p>
          </table:table-cell>
          <table:table-cell office:value-type="float" office:value="767697912.033539" calcext:value-type="float">
            <text:p>767697912.033539</text:p>
          </table:table-cell>
          <table:table-cell/>
          <table:table-cell office:value-type="string" calcext:value-type="string">
            <text:p>2024-04-29T21:25:12.0335389Z</text:p>
          </table:table-cell>
          <table:table-cell office:value-type="string" calcext:value-type="string">
            <text:p>2024-04-29-21:26:21.2175389</text:p>
          </table:table-cell>
          <table:table-cell table:number-columns-repeated="2"/>
        </table:table-row>
        <table:table-row table:style-name="ro1">
          <table:table-cell office:value-type="float" office:value="576836249" calcext:value-type="float">
            <text:p>576836249</text:p>
          </table:table-cell>
          <table:table-cell office:value-type="float" office:value="767802333.034688" calcext:value-type="float">
            <text:p>767802333.034688</text:p>
          </table:table-cell>
          <table:table-cell/>
          <table:table-cell office:value-type="string" calcext:value-type="string">
            <text:p>2024-05-01T02:25:33.0346879Z</text:p>
          </table:table-cell>
          <table:table-cell office:value-type="string" calcext:value-type="string">
            <text:p>2024-05-01-02:26:42.2186880</text:p>
          </table:table-cell>
          <table:table-cell table:number-columns-repeated="2"/>
        </table:table-row>
        <table:table-row table:style-name="ro1">
          <table:table-cell office:value-type="float" office:value="576937052" calcext:value-type="float">
            <text:p>576937052</text:p>
          </table:table-cell>
          <table:table-cell office:value-type="float" office:value="767903136.035831" calcext:value-type="float">
            <text:p>767903136.035831</text:p>
          </table:table-cell>
          <table:table-cell/>
          <table:table-cell office:value-type="string" calcext:value-type="string">
            <text:p>2024-05-02T06:25:36.0358309Z</text:p>
          </table:table-cell>
          <table:table-cell office:value-type="string" calcext:value-type="string">
            <text:p>2024-05-02-06:26:45.2198309</text:p>
          </table:table-cell>
          <table:table-cell table:number-columns-repeated="2"/>
        </table:table-row>
        <table:table-row table:style-name="ro1">
          <table:table-cell office:value-type="float" office:value="577001887" calcext:value-type="float">
            <text:p>577001887</text:p>
          </table:table-cell>
          <table:table-cell office:value-type="float" office:value="767967971.036554" calcext:value-type="float">
            <text:p>767967971.036554</text:p>
          </table:table-cell>
          <table:table-cell/>
          <table:table-cell office:value-type="string" calcext:value-type="string">
            <text:p>2024-05-03T00:26:11.0365539Z</text:p>
          </table:table-cell>
          <table:table-cell office:value-type="string" calcext:value-type="string">
            <text:p>2024-05-03-00:27:20.2205539</text:p>
          </table:table-cell>
          <table:table-cell table:number-columns-repeated="2"/>
        </table:table-row>
        <table:table-row table:style-name="ro1">
          <table:table-cell office:value-type="float" office:value="577138659" calcext:value-type="float">
            <text:p>577138659</text:p>
          </table:table-cell>
          <table:table-cell office:value-type="float" office:value="768104743.038065" calcext:value-type="float">
            <text:p>768104743.038065</text:p>
          </table:table-cell>
          <table:table-cell/>
          <table:table-cell office:value-type="string" calcext:value-type="string">
            <text:p>2024-05-04T14:25:43.0380649Z</text:p>
          </table:table-cell>
          <table:table-cell office:value-type="string" calcext:value-type="string">
            <text:p>2024-05-04-14:26:52.2220649</text:p>
          </table:table-cell>
          <table:table-cell table:number-columns-repeated="2"/>
        </table:table-row>
        <table:table-row table:style-name="ro1">
          <table:table-cell office:value-type="float" office:value="577210657" calcext:value-type="float">
            <text:p>577210657</text:p>
          </table:table-cell>
          <table:table-cell office:value-type="float" office:value="768176741.038854" calcext:value-type="float">
            <text:p>768176741.038854</text:p>
          </table:table-cell>
          <table:table-cell/>
          <table:table-cell office:value-type="string" calcext:value-type="string">
            <text:p>2024-05-05T10:25:41.0388540Z</text:p>
          </table:table-cell>
          <table:table-cell office:value-type="string" calcext:value-type="string">
            <text:p>2024-05-05-10:26:50.2228540</text:p>
          </table:table-cell>
          <table:table-cell table:number-columns-repeated="2"/>
        </table:table-row>
        <table:table-row table:style-name="ro1">
          <table:table-cell office:value-type="float" office:value="577246656" calcext:value-type="float">
            <text:p>577246656</text:p>
          </table:table-cell>
          <table:table-cell office:value-type="float" office:value="768212740.03926" calcext:value-type="float">
            <text:p>768212740.03926</text:p>
          </table:table-cell>
          <table:table-cell/>
          <table:table-cell office:value-type="string" calcext:value-type="string">
            <text:p>2024-05-05T20:25:40.0392600Z</text:p>
          </table:table-cell>
          <table:table-cell office:value-type="string" calcext:value-type="string">
            <text:p>2024-05-05-20:26:49.2232600</text:p>
          </table:table-cell>
          <table:table-cell table:number-columns-repeated="2"/>
        </table:table-row>
        <table:table-row table:style-name="ro1">
          <table:table-cell office:value-type="float" office:value="577394269" calcext:value-type="float">
            <text:p>577394269</text:p>
          </table:table-cell>
          <table:table-cell office:value-type="float" office:value="768360353.040903" calcext:value-type="float">
            <text:p>768360353.040903</text:p>
          </table:table-cell>
          <table:table-cell/>
          <table:table-cell office:value-type="string" calcext:value-type="string">
            <text:p>2024-05-07T13:25:53.0409029Z</text:p>
          </table:table-cell>
          <table:table-cell office:value-type="string" calcext:value-type="string">
            <text:p>2024-05-07-13:27:02.2249029</text:p>
          </table:table-cell>
          <table:table-cell table:number-columns-repeated="2"/>
        </table:table-row>
        <table:table-row table:style-name="ro1">
          <table:table-cell office:value-type="float" office:value="577480675" calcext:value-type="float">
            <text:p>577480675</text:p>
          </table:table-cell>
          <table:table-cell office:value-type="float" office:value="768446759.041861" calcext:value-type="float">
            <text:p>768446759.041861</text:p>
          </table:table-cell>
          <table:table-cell/>
          <table:table-cell office:value-type="string" calcext:value-type="string">
            <text:p>2024-05-08T13:25:59.0418609Z</text:p>
          </table:table-cell>
          <table:table-cell office:value-type="string" calcext:value-type="string">
            <text:p>2024-05-08-13:27:08.2258609</text:p>
          </table:table-cell>
          <table:table-cell table:number-columns-repeated="2"/>
        </table:table-row>
        <table:table-row table:style-name="ro1">
          <table:table-cell office:value-type="float" office:value="577617472" calcext:value-type="float">
            <text:p>577617472</text:p>
          </table:table-cell>
          <table:table-cell office:value-type="float" office:value="768583556.043369" calcext:value-type="float">
            <text:p>768583556.043369</text:p>
          </table:table-cell>
          <table:table-cell/>
          <table:table-cell office:value-type="string" calcext:value-type="string">
            <text:p>2024-05-10T03:25:56.0433689Z</text:p>
          </table:table-cell>
          <table:table-cell office:value-type="string" calcext:value-type="string">
            <text:p>2024-05-10-03:27:05.2273689</text:p>
          </table:table-cell>
          <table:table-cell table:number-columns-repeated="2"/>
        </table:table-row>
        <table:table-row table:style-name="ro1">
          <table:table-cell office:value-type="float" office:value="577736277" calcext:value-type="float">
            <text:p>577736277</text:p>
          </table:table-cell>
          <table:table-cell office:value-type="float" office:value="768702361.044709" calcext:value-type="float">
            <text:p>768702361.044709</text:p>
          </table:table-cell>
          <table:table-cell/>
          <table:table-cell office:value-type="string" calcext:value-type="string">
            <text:p>2024-05-11T12:26:01.0447089Z</text:p>
          </table:table-cell>
          <table:table-cell office:value-type="string" calcext:value-type="string">
            <text:p>2024-05-11-12:27:10.2287089</text:p>
          </table:table-cell>
          <table:table-cell table:number-columns-repeated="2"/>
        </table:table-row>
        <table:table-row table:style-name="ro1">
          <table:table-cell office:value-type="float" office:value="577804722" calcext:value-type="float">
            <text:p>577804722</text:p>
          </table:table-cell>
          <table:table-cell office:value-type="float" office:value="768770806.045474" calcext:value-type="float">
            <text:p>768770806.045474</text:p>
          </table:table-cell>
          <table:table-cell/>
          <table:table-cell office:value-type="string" calcext:value-type="string">
            <text:p>2024-05-12T07:26:46.0454739Z</text:p>
          </table:table-cell>
          <table:table-cell office:value-type="string" calcext:value-type="string">
            <text:p>2024-05-12-07:27:55.2294739</text:p>
          </table:table-cell>
          <table:table-cell table:number-columns-repeated="2"/>
        </table:table-row>
        <table:table-row table:style-name="ro1">
          <table:table-cell office:value-type="float" office:value="577901886" calcext:value-type="float">
            <text:p>577901886</text:p>
          </table:table-cell>
          <table:table-cell office:value-type="float" office:value="768867970.046545" calcext:value-type="float">
            <text:p>768867970.046545</text:p>
          </table:table-cell>
          <table:table-cell/>
          <table:table-cell office:value-type="string" calcext:value-type="string">
            <text:p>2024-05-13T10:26:10.0465450Z</text:p>
          </table:table-cell>
          <table:table-cell office:value-type="string" calcext:value-type="string">
            <text:p>2024-05-13-10:27:19.2305450</text:p>
          </table:table-cell>
          <table:table-cell table:number-columns-repeated="2"/>
        </table:table-row>
        <table:table-row table:style-name="ro1">
          <table:table-cell office:value-type="float" office:value="577995487" calcext:value-type="float">
            <text:p>577995487</text:p>
          </table:table-cell>
          <table:table-cell office:value-type="float" office:value="768961571.047598" calcext:value-type="float">
            <text:p>768961571.047598</text:p>
          </table:table-cell>
          <table:table-cell/>
          <table:table-cell office:value-type="string" calcext:value-type="string">
            <text:p>2024-05-14T12:26:11.0475980Z</text:p>
          </table:table-cell>
          <table:table-cell office:value-type="string" calcext:value-type="string">
            <text:p>2024-05-14-12:27:20.2315980</text:p>
          </table:table-cell>
          <table:table-cell table:number-columns-repeated="2"/>
        </table:table-row>
        <table:table-row table:style-name="ro1">
          <table:table-cell office:value-type="float" office:value="578085495" calcext:value-type="float">
            <text:p>578085495</text:p>
          </table:table-cell>
          <table:table-cell office:value-type="float" office:value="769051579.04859" calcext:value-type="float">
            <text:p>769051579.04859</text:p>
          </table:table-cell>
          <table:table-cell/>
          <table:table-cell office:value-type="string" calcext:value-type="string">
            <text:p>2024-05-15T13:26:19.0485899Z</text:p>
          </table:table-cell>
          <table:table-cell office:value-type="string" calcext:value-type="string">
            <text:p>2024-05-15-13:27:28.2325899</text:p>
          </table:table-cell>
          <table:table-cell table:number-columns-repeated="2"/>
        </table:table-row>
        <table:table-row table:style-name="ro1">
          <table:table-cell office:value-type="float" office:value="578132285" calcext:value-type="float">
            <text:p>578132285</text:p>
          </table:table-cell>
          <table:table-cell office:value-type="float" office:value="769098369.0491" calcext:value-type="float">
            <text:p>769098369.0491</text:p>
          </table:table-cell>
          <table:table-cell/>
          <table:table-cell office:value-type="string" calcext:value-type="string">
            <text:p>2024-05-16T02:26:09.0491000Z</text:p>
          </table:table-cell>
          <table:table-cell office:value-type="string" calcext:value-type="string">
            <text:p>2024-05-16-02:27:18.2331000</text:p>
          </table:table-cell>
          <table:table-cell table:number-columns-repeated="2"/>
        </table:table-row>
        <table:table-row table:style-name="ro1">
          <table:table-cell office:value-type="float" office:value="578254699" calcext:value-type="float">
            <text:p>578254699</text:p>
          </table:table-cell>
          <table:table-cell office:value-type="float" office:value="769220783.050481" calcext:value-type="float">
            <text:p>769220783.050481</text:p>
          </table:table-cell>
          <table:table-cell/>
          <table:table-cell office:value-type="string" calcext:value-type="string">
            <text:p>2024-05-17T12:26:23.0504809Z</text:p>
          </table:table-cell>
          <table:table-cell office:value-type="string" calcext:value-type="string">
            <text:p>2024-05-17-12:27:32.2344809</text:p>
          </table:table-cell>
          <table:table-cell table:number-columns-repeated="2"/>
        </table:table-row>
        <table:table-row table:style-name="ro1">
          <table:table-cell office:value-type="float" office:value="578341103" calcext:value-type="float">
            <text:p>578341103</text:p>
          </table:table-cell>
          <table:table-cell office:value-type="float" office:value="769307187.051452" calcext:value-type="float">
            <text:p>769307187.051452</text:p>
          </table:table-cell>
          <table:table-cell/>
          <table:table-cell office:value-type="string" calcext:value-type="string">
            <text:p>2024-05-18T12:26:27.0514520Z</text:p>
          </table:table-cell>
          <table:table-cell office:value-type="string" calcext:value-type="string">
            <text:p>2024-05-18-12:27:36.2354520</text:p>
          </table:table-cell>
          <table:table-cell table:number-columns-repeated="2"/>
        </table:table-row>
        <table:table-row table:style-name="ro1">
          <table:table-cell office:value-type="float" office:value="578431103" calcext:value-type="float">
            <text:p>578431103</text:p>
          </table:table-cell>
          <table:table-cell office:value-type="float" office:value="769397187.052441" calcext:value-type="float">
            <text:p>769397187.052441</text:p>
          </table:table-cell>
          <table:table-cell/>
          <table:table-cell office:value-type="string" calcext:value-type="string">
            <text:p>2024-05-19T13:26:27.0524410Z</text:p>
          </table:table-cell>
          <table:table-cell office:value-type="string" calcext:value-type="string">
            <text:p>2024-05-19-13:27:36.2364410</text:p>
          </table:table-cell>
          <table:table-cell table:number-columns-repeated="2"/>
        </table:table-row>
        <table:table-row table:style-name="ro1">
          <table:table-cell office:value-type="float" office:value="578517515" calcext:value-type="float">
            <text:p>578517515</text:p>
          </table:table-cell>
          <table:table-cell office:value-type="float" office:value="769483599.053424" calcext:value-type="float">
            <text:p>769483599.053424</text:p>
          </table:table-cell>
          <table:table-cell/>
          <table:table-cell office:value-type="string" calcext:value-type="string">
            <text:p>2024-05-20T13:26:39.0534240Z</text:p>
          </table:table-cell>
          <table:table-cell office:value-type="string" calcext:value-type="string">
            <text:p>2024-05-20-13:27:48.2374240</text:p>
          </table:table-cell>
          <table:table-cell table:number-columns-repeated="2"/>
        </table:table-row>
        <table:table-row table:style-name="ro1">
          <table:table-cell office:value-type="float" office:value="578575182" calcext:value-type="float">
            <text:p>578575182</text:p>
          </table:table-cell>
          <table:table-cell office:value-type="float" office:value="769541266.054057" calcext:value-type="float">
            <text:p>769541266.054057</text:p>
          </table:table-cell>
          <table:table-cell/>
          <table:table-cell office:value-type="string" calcext:value-type="string">
            <text:p>2024-05-21T05:27:46.0540570Z</text:p>
          </table:table-cell>
          <table:table-cell office:value-type="string" calcext:value-type="string">
            <text:p>2024-05-21-05:28:55.2380570</text:p>
          </table:table-cell>
          <table:table-cell table:number-columns-repeated="2"/>
        </table:table-row>
        <table:table-row table:style-name="ro1">
          <table:table-cell office:value-type="float" office:value="578690313" calcext:value-type="float">
            <text:p>578690313</text:p>
          </table:table-cell>
          <table:table-cell office:value-type="float" office:value="769656397.055352" calcext:value-type="float">
            <text:p>769656397.055352</text:p>
          </table:table-cell>
          <table:table-cell/>
          <table:table-cell office:value-type="string" calcext:value-type="string">
            <text:p>2024-05-22T13:26:37.0553519Z</text:p>
          </table:table-cell>
          <table:table-cell office:value-type="string" calcext:value-type="string">
            <text:p>2024-05-22-13:27:46.2393519</text:p>
          </table:table-cell>
          <table:table-cell table:number-columns-repeated="2"/>
        </table:table-row>
        <table:table-row table:style-name="ro1">
          <table:table-cell office:value-type="float" office:value="578765909" calcext:value-type="float">
            <text:p>578765909</text:p>
          </table:table-cell>
          <table:table-cell office:value-type="float" office:value="769731993.056165" calcext:value-type="float">
            <text:p>769731993.056165</text:p>
          </table:table-cell>
          <table:table-cell/>
          <table:table-cell office:value-type="string" calcext:value-type="string">
            <text:p>2024-05-23T10:26:33.0561649Z</text:p>
          </table:table-cell>
          <table:table-cell office:value-type="string" calcext:value-type="string">
            <text:p>2024-05-23-10:27:42.2401649</text:p>
          </table:table-cell>
          <table:table-cell table:number-columns-repeated="2"/>
        </table:table-row>
        <table:table-row table:style-name="ro1">
          <table:table-cell office:value-type="float" office:value="578863124" calcext:value-type="float">
            <text:p>578863124</text:p>
          </table:table-cell>
          <table:table-cell office:value-type="float" office:value="769829208.057273" calcext:value-type="float">
            <text:p>769829208.057273</text:p>
          </table:table-cell>
          <table:table-cell/>
          <table:table-cell office:value-type="string" calcext:value-type="string">
            <text:p>2024-05-24T13:26:48.0572730Z</text:p>
          </table:table-cell>
          <table:table-cell office:value-type="string" calcext:value-type="string">
            <text:p>2024-05-24-13:27:57.2412730</text:p>
          </table:table-cell>
          <table:table-cell table:number-columns-repeated="2"/>
        </table:table-row>
        <table:table-row table:style-name="ro1">
          <table:table-cell office:value-type="float" office:value="578949525" calcext:value-type="float">
            <text:p>578949525</text:p>
          </table:table-cell>
          <table:table-cell office:value-type="float" office:value="769915609.058245" calcext:value-type="float">
            <text:p>769915609.058245</text:p>
          </table:table-cell>
          <table:table-cell/>
          <table:table-cell office:value-type="string" calcext:value-type="string">
            <text:p>2024-05-25T13:26:49.0582449Z</text:p>
          </table:table-cell>
          <table:table-cell office:value-type="string" calcext:value-type="string">
            <text:p>2024-05-25-13:27:58.2422449</text:p>
          </table:table-cell>
          <table:table-cell table:number-columns-repeated="2"/>
        </table:table-row>
        <table:table-row table:style-name="ro1">
          <table:table-cell office:value-type="float" office:value="579039544" calcext:value-type="float">
            <text:p>579039544</text:p>
          </table:table-cell>
          <table:table-cell office:value-type="float" office:value="770005628.05925" calcext:value-type="float">
            <text:p>770005628.05925</text:p>
          </table:table-cell>
          <table:table-cell/>
          <table:table-cell office:value-type="string" calcext:value-type="string">
            <text:p>2024-05-26T14:27:08.0592499Z</text:p>
          </table:table-cell>
          <table:table-cell office:value-type="string" calcext:value-type="string">
            <text:p>2024-05-26-14:28:17.2432500</text:p>
          </table:table-cell>
          <table:table-cell table:number-columns-repeated="2"/>
        </table:table-row>
        <table:table-row table:style-name="ro1">
          <table:table-cell office:value-type="float" office:value="579104320" calcext:value-type="float">
            <text:p>579104320</text:p>
          </table:table-cell>
          <table:table-cell office:value-type="float" office:value="770070404.059939" calcext:value-type="float">
            <text:p>770070404.059939</text:p>
          </table:table-cell>
          <table:table-cell/>
          <table:table-cell office:value-type="string" calcext:value-type="string">
            <text:p>2024-05-27T08:26:44.0599390Z</text:p>
          </table:table-cell>
          <table:table-cell office:value-type="string" calcext:value-type="string">
            <text:p>2024-05-27-08:27:53.2439390</text:p>
          </table:table-cell>
          <table:table-cell table:number-columns-repeated="2"/>
        </table:table-row>
        <table:table-row table:style-name="ro1">
          <table:table-cell office:value-type="float" office:value="579183513" calcext:value-type="float">
            <text:p>579183513</text:p>
          </table:table-cell>
          <table:table-cell office:value-type="float" office:value="770149597.060816" calcext:value-type="float">
            <text:p>770149597.060816</text:p>
          </table:table-cell>
          <table:table-cell/>
          <table:table-cell office:value-type="string" calcext:value-type="string">
            <text:p>2024-05-28T06:26:37.0608159Z</text:p>
          </table:table-cell>
          <table:table-cell office:value-type="string" calcext:value-type="string">
            <text:p>2024-05-28-06:27:46.2448159</text:p>
          </table:table-cell>
          <table:table-cell table:number-columns-repeated="2"/>
        </table:table-row>
        <table:table-row table:style-name="ro1">
          <table:table-cell office:value-type="float" office:value="579277122" calcext:value-type="float">
            <text:p>579277122</text:p>
          </table:table-cell>
          <table:table-cell office:value-type="float" office:value="770243206.061891" calcext:value-type="float">
            <text:p>770243206.061891</text:p>
          </table:table-cell>
          <table:table-cell/>
          <table:table-cell office:value-type="string" calcext:value-type="string">
            <text:p>2024-05-29T08:26:46.0618909Z</text:p>
          </table:table-cell>
          <table:table-cell office:value-type="string" calcext:value-type="string">
            <text:p>2024-05-29-08:27:55.2458909</text:p>
          </table:table-cell>
          <table:table-cell table:number-columns-repeated="2"/>
        </table:table-row>
        <table:table-row table:style-name="ro1">
          <table:table-cell office:value-type="float" office:value="579349129" calcext:value-type="float">
            <text:p>579349129</text:p>
          </table:table-cell>
          <table:table-cell office:value-type="float" office:value="770315213.062703" calcext:value-type="float">
            <text:p>770315213.062703</text:p>
          </table:table-cell>
          <table:table-cell/>
          <table:table-cell office:value-type="string" calcext:value-type="string">
            <text:p>2024-05-30T04:26:53.0627030Z</text:p>
          </table:table-cell>
          <table:table-cell office:value-type="string" calcext:value-type="string">
            <text:p>2024-05-30-04:28:02.2467030</text:p>
          </table:table-cell>
          <table:table-cell table:number-columns-repeated="2"/>
        </table:table-row>
        <table:table-row table:style-name="ro1">
          <table:table-cell office:value-type="float" office:value="579413959" calcext:value-type="float">
            <text:p>579413959</text:p>
          </table:table-cell>
          <table:table-cell office:value-type="float" office:value="770380043.063437" calcext:value-type="float">
            <text:p>770380043.063437</text:p>
          </table:table-cell>
          <table:table-cell/>
          <table:table-cell office:value-type="string" calcext:value-type="string">
            <text:p>2024-05-30T22:27:23.0634369Z</text:p>
          </table:table-cell>
          <table:table-cell office:value-type="string" calcext:value-type="string">
            <text:p>2024-05-30-22:28:32.2474370</text:p>
          </table:table-cell>
          <table:table-cell table:number-columns-repeated="2"/>
        </table:table-row>
        <table:table-row table:style-name="ro1">
          <table:table-cell office:value-type="float" office:value="579550732" calcext:value-type="float">
            <text:p>579550732</text:p>
          </table:table-cell>
          <table:table-cell office:value-type="float" office:value="770516816.064961" calcext:value-type="float">
            <text:p>770516816.064961</text:p>
          </table:table-cell>
          <table:table-cell/>
          <table:table-cell office:value-type="string" calcext:value-type="string">
            <text:p>2024-06-01T12:26:56.0649609Z</text:p>
          </table:table-cell>
          <table:table-cell office:value-type="string" calcext:value-type="string">
            <text:p>2024-06-01-12:28:05.2489609</text:p>
          </table:table-cell>
          <table:table-cell table:number-columns-repeated="2"/>
        </table:table-row>
        <table:table-row table:style-name="ro1">
          <table:table-cell office:value-type="float" office:value="579633527" calcext:value-type="float">
            <text:p>579633527</text:p>
          </table:table-cell>
          <table:table-cell office:value-type="float" office:value="770599611.065886" calcext:value-type="float">
            <text:p>770599611.065886</text:p>
          </table:table-cell>
          <table:table-cell/>
          <table:table-cell office:value-type="string" calcext:value-type="string">
            <text:p>2024-06-02T11:26:51.0658860Z</text:p>
          </table:table-cell>
          <table:table-cell office:value-type="string" calcext:value-type="string">
            <text:p>2024-06-02-11:28:00.2498860</text:p>
          </table:table-cell>
          <table:table-cell table:number-columns-repeated="2"/>
        </table:table-row>
        <table:table-row table:style-name="ro1">
          <table:table-cell office:value-type="float" office:value="579709129" calcext:value-type="float">
            <text:p>579709129</text:p>
          </table:table-cell>
          <table:table-cell office:value-type="float" office:value="770675213.066728" calcext:value-type="float">
            <text:p>770675213.066728</text:p>
          </table:table-cell>
          <table:table-cell/>
          <table:table-cell office:value-type="string" calcext:value-type="string">
            <text:p>2024-06-03T08:26:53.0667279Z</text:p>
          </table:table-cell>
          <table:table-cell office:value-type="string" calcext:value-type="string">
            <text:p>2024-06-03-08:28:02.2507280</text:p>
          </table:table-cell>
          <table:table-cell table:number-columns-repeated="2"/>
        </table:table-row>
        <table:table-row table:style-name="ro1">
          <table:table-cell office:value-type="float" office:value="579795524" calcext:value-type="float">
            <text:p>579795524</text:p>
          </table:table-cell>
          <table:table-cell office:value-type="float" office:value="770761608.067686" calcext:value-type="float">
            <text:p>770761608.067686</text:p>
          </table:table-cell>
          <table:table-cell/>
          <table:table-cell office:value-type="string" calcext:value-type="string">
            <text:p>2024-06-04T08:26:48.0676859Z</text:p>
          </table:table-cell>
          <table:table-cell office:value-type="string" calcext:value-type="string">
            <text:p>2024-06-04-08:27:57.2516859</text:p>
          </table:table-cell>
          <table:table-cell table:number-columns-repeated="2"/>
        </table:table-row>
        <table:table-row table:style-name="ro1">
          <table:table-cell office:value-type="float" office:value="579881928" calcext:value-type="float">
            <text:p>579881928</text:p>
          </table:table-cell>
          <table:table-cell office:value-type="float" office:value="770848012.068651" calcext:value-type="float">
            <text:p>770848012.068651</text:p>
          </table:table-cell>
          <table:table-cell/>
          <table:table-cell office:value-type="string" calcext:value-type="string">
            <text:p>2024-06-05T08:26:52.0686509Z</text:p>
          </table:table-cell>
          <table:table-cell office:value-type="string" calcext:value-type="string">
            <text:p>2024-06-05-08:28:01.2526509</text:p>
          </table:table-cell>
          <table:table-cell table:number-columns-repeated="2"/>
        </table:table-row>
        <table:table-row table:style-name="ro1">
          <table:table-cell office:value-type="float" office:value="580036731" calcext:value-type="float">
            <text:p>580036731</text:p>
          </table:table-cell>
          <table:table-cell office:value-type="float" office:value="771002815.070387" calcext:value-type="float">
            <text:p>771002815.070387</text:p>
          </table:table-cell>
          <table:table-cell/>
          <table:table-cell office:value-type="string" calcext:value-type="string">
            <text:p>2024-06-07T03:26:55.0703870Z</text:p>
          </table:table-cell>
          <table:table-cell office:value-type="string" calcext:value-type="string">
            <text:p>2024-06-07-03:28:04.2543870</text:p>
          </table:table-cell>
          <table:table-cell table:number-columns-repeated="2"/>
        </table:table-row>
        <table:table-row table:style-name="ro1">
          <table:table-cell office:value-type="float" office:value="580151933" calcext:value-type="float">
            <text:p>580151933</text:p>
          </table:table-cell>
          <table:table-cell office:value-type="float" office:value="771118017.071704" calcext:value-type="float">
            <text:p>771118017.071704</text:p>
          </table:table-cell>
          <table:table-cell/>
          <table:table-cell office:value-type="string" calcext:value-type="string">
            <text:p>2024-06-08T11:26:57.0717040Z</text:p>
          </table:table-cell>
          <table:table-cell office:value-type="string" calcext:value-type="string">
            <text:p>2024-06-08-11:28:06.2557040</text:p>
          </table:table-cell>
          <table:table-cell table:number-columns-repeated="2"/>
        </table:table-row>
        <table:table-row table:style-name="ro1">
          <table:table-cell office:value-type="float" office:value="580253674" calcext:value-type="float">
            <text:p>580253674</text:p>
          </table:table-cell>
          <table:table-cell office:value-type="float" office:value="771219758.072812" calcext:value-type="float">
            <text:p>771219758.072812</text:p>
          </table:table-cell>
          <table:table-cell/>
          <table:table-cell office:value-type="string" calcext:value-type="string">
            <text:p>2024-06-09T15:42:38.0728119Z</text:p>
          </table:table-cell>
          <table:table-cell office:value-type="string" calcext:value-type="string">
            <text:p>2024-06-09-15:43:47.2568119</text:p>
          </table:table-cell>
          <table:table-cell table:number-columns-repeated="2"/>
        </table:table-row>
        <table:table-row table:style-name="ro1">
          <table:table-cell office:value-type="float" office:value="580339781" calcext:value-type="float">
            <text:p>580339781</text:p>
          </table:table-cell>
          <table:table-cell office:value-type="float" office:value="771305865.073776" calcext:value-type="float">
            <text:p>771305865.073776</text:p>
          </table:table-cell>
          <table:table-cell/>
          <table:table-cell office:value-type="string" calcext:value-type="string">
            <text:p>2024-06-10T15:37:45.0737760Z</text:p>
          </table:table-cell>
          <table:table-cell office:value-type="string" calcext:value-type="string">
            <text:p>2024-06-10-15:38:54.2577760</text:p>
          </table:table-cell>
          <table:table-cell table:number-columns-repeated="2"/>
        </table:table-row>
        <table:table-row table:style-name="ro1">
          <table:table-cell office:value-type="float" office:value="580425560" calcext:value-type="float">
            <text:p>580425560</text:p>
          </table:table-cell>
          <table:table-cell office:value-type="float" office:value="771391644.074734" calcext:value-type="float">
            <text:p>771391644.074734</text:p>
          </table:table-cell>
          <table:table-cell/>
          <table:table-cell office:value-type="string" calcext:value-type="string">
            <text:p>2024-06-11T15:27:24.0747339Z</text:p>
          </table:table-cell>
          <table:table-cell office:value-type="string" calcext:value-type="string">
            <text:p>2024-06-11-15:28:33.2587339</text:p>
          </table:table-cell>
          <table:table-cell table:number-columns-repeated="2"/>
        </table:table-row>
        <table:table-row table:style-name="ro1">
          <table:table-cell office:value-type="float" office:value="580486735" calcext:value-type="float">
            <text:p>580486735</text:p>
          </table:table-cell>
          <table:table-cell office:value-type="float" office:value="771452819.075441" calcext:value-type="float">
            <text:p>771452819.075441</text:p>
          </table:table-cell>
          <table:table-cell/>
          <table:table-cell office:value-type="string" calcext:value-type="string">
            <text:p>2024-06-12T08:26:59.0754410Z</text:p>
          </table:table-cell>
          <table:table-cell office:value-type="string" calcext:value-type="string">
            <text:p>2024-06-12-08:28:08.2594410</text:p>
          </table:table-cell>
          <table:table-cell table:number-columns-repeated="2"/>
        </table:table-row>
        <table:table-row table:style-name="ro1">
          <table:table-cell office:value-type="float" office:value="580598368" calcext:value-type="float">
            <text:p>580598368</text:p>
          </table:table-cell>
          <table:table-cell office:value-type="float" office:value="771564452.076681" calcext:value-type="float">
            <text:p>771564452.076681</text:p>
          </table:table-cell>
          <table:table-cell/>
          <table:table-cell office:value-type="string" calcext:value-type="string">
            <text:p>2024-06-13T15:27:32.0766810Z</text:p>
          </table:table-cell>
          <table:table-cell office:value-type="string" calcext:value-type="string">
            <text:p>2024-06-13-15:28:41.2606810</text:p>
          </table:table-cell>
          <table:table-cell table:number-columns-repeated="2"/>
        </table:table-row>
        <table:table-row table:style-name="ro1">
          <table:table-cell office:value-type="float" office:value="580684752" calcext:value-type="float">
            <text:p>580684752</text:p>
          </table:table-cell>
          <table:table-cell office:value-type="float" office:value="771650836.07765" calcext:value-type="float">
            <text:p>771650836.07765</text:p>
          </table:table-cell>
          <table:table-cell/>
          <table:table-cell office:value-type="string" calcext:value-type="string">
            <text:p>2024-06-14T15:27:16.0776499Z</text:p>
          </table:table-cell>
          <table:table-cell office:value-type="string" calcext:value-type="string">
            <text:p>2024-06-14-15:28:25.2616499</text:p>
          </table:table-cell>
          <table:table-cell table:number-columns-repeated="2"/>
        </table:table-row>
        <table:table-row table:style-name="ro1">
          <table:table-cell office:value-type="float" office:value="580771152" calcext:value-type="float">
            <text:p>580771152</text:p>
          </table:table-cell>
          <table:table-cell office:value-type="float" office:value="771737236.078613" calcext:value-type="float">
            <text:p>771737236.078613</text:p>
          </table:table-cell>
          <table:table-cell/>
          <table:table-cell office:value-type="string" calcext:value-type="string">
            <text:p>2024-06-15T15:27:16.0786130Z</text:p>
          </table:table-cell>
          <table:table-cell office:value-type="string" calcext:value-type="string">
            <text:p>2024-06-15-15:28:25.2626130</text:p>
          </table:table-cell>
          <table:table-cell table:number-columns-repeated="2"/>
        </table:table-row>
        <table:table-row table:style-name="ro1">
          <table:table-cell office:value-type="float" office:value="580846871" calcext:value-type="float">
            <text:p>580846871</text:p>
          </table:table-cell>
          <table:table-cell office:value-type="float" office:value="771812955.079494" calcext:value-type="float">
            <text:p>771812955.079494</text:p>
          </table:table-cell>
          <table:table-cell/>
          <table:table-cell office:value-type="string" calcext:value-type="string">
            <text:p>2024-06-16T12:29:15.0794939Z</text:p>
          </table:table-cell>
          <table:table-cell office:value-type="string" calcext:value-type="string">
            <text:p>2024-06-16-12:30:24.2634940</text:p>
          </table:table-cell>
          <table:table-cell table:number-columns-repeated="2"/>
        </table:table-row>
        <table:table-row table:style-name="ro1">
          <table:table-cell office:value-type="float" office:value="580936788" calcext:value-type="float">
            <text:p>580936788</text:p>
          </table:table-cell>
          <table:table-cell office:value-type="float" office:value="771902872.080502" calcext:value-type="float">
            <text:p>771902872.080502</text:p>
          </table:table-cell>
          <table:table-cell/>
          <table:table-cell office:value-type="string" calcext:value-type="string">
            <text:p>2024-06-17T13:27:52.0805020Z</text:p>
          </table:table-cell>
          <table:table-cell office:value-type="string" calcext:value-type="string">
            <text:p>2024-06-17-13:29:01.2645020</text:p>
          </table:table-cell>
          <table:table-cell table:number-columns-repeated="2"/>
        </table:table-row>
        <table:table-row table:style-name="ro1">
          <table:table-cell office:value-type="float" office:value="580979928" calcext:value-type="float">
            <text:p>580979928</text:p>
          </table:table-cell>
          <table:table-cell office:value-type="float" office:value="771946012.080974" calcext:value-type="float">
            <text:p>771946012.080974</text:p>
          </table:table-cell>
          <table:table-cell/>
          <table:table-cell office:value-type="string" calcext:value-type="string">
            <text:p>2024-06-18T01:26:52.0809739Z</text:p>
          </table:table-cell>
          <table:table-cell office:value-type="string" calcext:value-type="string">
            <text:p>2024-06-18-01:28:01.2649739</text:p>
          </table:table-cell>
          <table:table-cell table:number-columns-repeated="2"/>
        </table:table-row>
        <table:table-row table:style-name="ro1">
          <table:table-cell office:value-type="float" office:value="581098727" calcext:value-type="float">
            <text:p>581098727</text:p>
          </table:table-cell>
          <table:table-cell office:value-type="float" office:value="772064811.082325" calcext:value-type="float">
            <text:p>772064811.082325</text:p>
          </table:table-cell>
          <table:table-cell/>
          <table:table-cell office:value-type="string" calcext:value-type="string">
            <text:p>2024-06-19T10:26:51.0823249Z</text:p>
          </table:table-cell>
          <table:table-cell office:value-type="string" calcext:value-type="string">
            <text:p>2024-06-19-10:28:00.2663249</text:p>
          </table:table-cell>
          <table:table-cell table:number-columns-repeated="2"/>
        </table:table-row>
        <table:table-row table:style-name="ro1">
          <table:table-cell office:value-type="float" office:value="581156326" calcext:value-type="float">
            <text:p>581156326</text:p>
          </table:table-cell>
          <table:table-cell office:value-type="float" office:value="772122410.082948" calcext:value-type="float">
            <text:p>772122410.082948</text:p>
          </table:table-cell>
          <table:table-cell/>
          <table:table-cell office:value-type="string" calcext:value-type="string">
            <text:p>2024-06-20T02:26:50.0829479Z</text:p>
          </table:table-cell>
          <table:table-cell office:value-type="string" calcext:value-type="string">
            <text:p>2024-06-20-02:27:59.2669479</text:p>
          </table:table-cell>
          <table:table-cell table:number-columns-repeated="2"/>
        </table:table-row>
        <table:table-row table:style-name="ro1">
          <table:table-cell office:value-type="float" office:value="581289542" calcext:value-type="float">
            <text:p>581289542</text:p>
          </table:table-cell>
          <table:table-cell office:value-type="float" office:value="772255626.084432" calcext:value-type="float">
            <text:p>772255626.084432</text:p>
          </table:table-cell>
          <table:table-cell/>
          <table:table-cell office:value-type="string" calcext:value-type="string">
            <text:p>2024-06-21T15:27:06.0844320Z</text:p>
          </table:table-cell>
          <table:table-cell office:value-type="string" calcext:value-type="string">
            <text:p>2024-06-21-15:28:15.2684320</text:p>
          </table:table-cell>
          <table:table-cell table:number-columns-repeated="2"/>
        </table:table-row>
        <table:table-row table:style-name="ro1">
          <table:table-cell office:value-type="float" office:value="581350724" calcext:value-type="float">
            <text:p>581350724</text:p>
          </table:table-cell>
          <table:table-cell office:value-type="float" office:value="772316808.085139" calcext:value-type="float">
            <text:p>772316808.085139</text:p>
          </table:table-cell>
          <table:table-cell/>
          <table:table-cell office:value-type="string" calcext:value-type="string">
            <text:p>2024-06-22T08:26:48.0851390Z</text:p>
          </table:table-cell>
          <table:table-cell office:value-type="string" calcext:value-type="string">
            <text:p>2024-06-22-08:27:57.2691390</text:p>
          </table:table-cell>
          <table:table-cell table:number-columns-repeated="2"/>
        </table:table-row>
        <table:table-row table:style-name="ro1">
          <table:table-cell office:value-type="float" office:value="581437123" calcext:value-type="float">
            <text:p>581437123</text:p>
          </table:table-cell>
          <table:table-cell office:value-type="float" office:value="772403207.086104" calcext:value-type="float">
            <text:p>772403207.086104</text:p>
          </table:table-cell>
          <table:table-cell/>
          <table:table-cell office:value-type="string" calcext:value-type="string">
            <text:p>2024-06-23T08:26:47.0861040Z</text:p>
          </table:table-cell>
          <table:table-cell office:value-type="string" calcext:value-type="string">
            <text:p>2024-06-23-08:27:56.2701040</text:p>
          </table:table-cell>
          <table:table-cell table:number-columns-repeated="2"/>
        </table:table-row>
        <table:table-row table:style-name="ro1">
          <table:table-cell office:value-type="float" office:value="581548737" calcext:value-type="float">
            <text:p>581548737</text:p>
          </table:table-cell>
          <table:table-cell office:value-type="float" office:value="772514821.085694" calcext:value-type="float">
            <text:p>772514821.085694</text:p>
          </table:table-cell>
          <table:table-cell/>
          <table:table-cell office:value-type="string" calcext:value-type="string">
            <text:p>2024-06-24T15:27:01.0856939Z</text:p>
          </table:table-cell>
          <table:table-cell office:value-type="string" calcext:value-type="string">
            <text:p>2024-06-24-15:28:10.2696939</text:p>
          </table:table-cell>
          <table:table-cell table:number-columns-repeated="2"/>
        </table:table-row>
        <table:table-row table:style-name="ro1">
          <table:table-cell office:value-type="float" office:value="581635139" calcext:value-type="float">
            <text:p>581635139</text:p>
          </table:table-cell>
          <table:table-cell office:value-type="float" office:value="772601223.08665" calcext:value-type="float">
            <text:p>772601223.08665</text:p>
          </table:table-cell>
          <table:table-cell/>
          <table:table-cell office:value-type="string" calcext:value-type="string">
            <text:p>2024-06-25T15:27:03.0866500Z</text:p>
          </table:table-cell>
          <table:table-cell office:value-type="string" calcext:value-type="string">
            <text:p>2024-06-25-15:28:12.2706500</text:p>
          </table:table-cell>
          <table:table-cell table:number-columns-repeated="2"/>
        </table:table-row>
        <table:table-row table:style-name="ro1">
          <table:table-cell office:value-type="float" office:value="581721538" calcext:value-type="float">
            <text:p>581721538</text:p>
          </table:table-cell>
          <table:table-cell office:value-type="float" office:value="772687622.087627" calcext:value-type="float">
            <text:p>772687622.087627</text:p>
          </table:table-cell>
          <table:table-cell/>
          <table:table-cell office:value-type="string" calcext:value-type="string">
            <text:p>2024-06-26T15:27:02.0876269Z</text:p>
          </table:table-cell>
          <table:table-cell office:value-type="string" calcext:value-type="string">
            <text:p>2024-06-26-15:28:11.2716269</text:p>
          </table:table-cell>
          <table:table-cell table:number-columns-repeated="2"/>
        </table:table-row>
        <table:table-row table:style-name="ro1">
          <table:table-cell office:value-type="float" office:value="581735931" calcext:value-type="float">
            <text:p>581735931</text:p>
          </table:table-cell>
          <table:table-cell office:value-type="float" office:value="772702015.087812" calcext:value-type="float">
            <text:p>772702015.087812</text:p>
          </table:table-cell>
          <table:table-cell/>
          <table:table-cell office:value-type="string" calcext:value-type="string">
            <text:p>2024-06-26T19:26:55.0878119Z</text:p>
          </table:table-cell>
          <table:table-cell office:value-type="string" calcext:value-type="string">
            <text:p>2024-06-26-19:28:04.2718119</text:p>
          </table:table-cell>
          <table:table-cell table:number-columns-repeated="2"/>
        </table:table-row>
        <table:table-row table:style-name="ro1">
          <table:table-cell office:value-type="float" office:value="581895231" calcext:value-type="float">
            <text:p>581895231</text:p>
          </table:table-cell>
          <table:table-cell office:value-type="float" office:value="772861315.089565" calcext:value-type="float">
            <text:p>772861315.089565</text:p>
          </table:table-cell>
          <table:table-cell/>
          <table:table-cell office:value-type="string" calcext:value-type="string">
            <text:p>2024-06-28T15:41:55.0895650Z</text:p>
          </table:table-cell>
          <table:table-cell office:value-type="string" calcext:value-type="string">
            <text:p>2024-06-28-15:43:04.2735650</text:p>
          </table:table-cell>
          <table:table-cell table:number-columns-repeated="2"/>
        </table:table-row>
        <table:table-row table:style-name="ro1">
          <table:table-cell office:value-type="float" office:value="581980723" calcext:value-type="float">
            <text:p>581980723</text:p>
          </table:table-cell>
          <table:table-cell office:value-type="float" office:value="772946807.090518" calcext:value-type="float">
            <text:p>772946807.090518</text:p>
          </table:table-cell>
          <table:table-cell/>
          <table:table-cell office:value-type="string" calcext:value-type="string">
            <text:p>2024-06-29T15:26:47.0905179Z</text:p>
          </table:table-cell>
          <table:table-cell office:value-type="string" calcext:value-type="string">
            <text:p>2024-06-29-15:27:56.2745180</text:p>
          </table:table-cell>
          <table:table-cell table:number-columns-repeated="2"/>
        </table:table-row>
        <table:table-row table:style-name="ro1">
          <table:table-cell office:value-type="float" office:value="582045504" calcext:value-type="float">
            <text:p>582045504</text:p>
          </table:table-cell>
          <table:table-cell office:value-type="float" office:value="773011588.091274" calcext:value-type="float">
            <text:p>773011588.091274</text:p>
          </table:table-cell>
          <table:table-cell/>
          <table:table-cell office:value-type="string" calcext:value-type="string">
            <text:p>2024-06-30T09:26:28.0912740Z</text:p>
          </table:table-cell>
          <table:table-cell office:value-type="string" calcext:value-type="string">
            <text:p>2024-06-30-09:27:37.2752740</text:p>
          </table:table-cell>
          <table:table-cell table:number-columns-repeated="2"/>
        </table:table-row>
        <table:table-row table:style-name="ro1">
          <table:table-cell office:value-type="float" office:value="582153519" calcext:value-type="float">
            <text:p>582153519</text:p>
          </table:table-cell>
          <table:table-cell office:value-type="float" office:value="773119603.092466" calcext:value-type="float">
            <text:p>773119603.092466</text:p>
          </table:table-cell>
          <table:table-cell/>
          <table:table-cell office:value-type="string" calcext:value-type="string">
            <text:p>2024-07-01T15:26:43.0924659Z</text:p>
          </table:table-cell>
          <table:table-cell office:value-type="string" calcext:value-type="string">
            <text:p>2024-07-01-15:27:52.2764660</text:p>
          </table:table-cell>
          <table:table-cell table:number-columns-repeated="2"/>
        </table:table-row>
        <table:table-row table:style-name="ro1">
          <table:table-cell office:value-type="float" office:value="582239944" calcext:value-type="float">
            <text:p>582239944</text:p>
          </table:table-cell>
          <table:table-cell office:value-type="float" office:value="773206028.093425" calcext:value-type="float">
            <text:p>773206028.093425</text:p>
          </table:table-cell>
          <table:table-cell/>
          <table:table-cell office:value-type="string" calcext:value-type="string">
            <text:p>2024-07-02T15:27:08.0934250Z</text:p>
          </table:table-cell>
          <table:table-cell office:value-type="string" calcext:value-type="string">
            <text:p>2024-07-02-15:28:17.2774250</text:p>
          </table:table-cell>
          <table:table-cell table:number-columns-repeated="2"/>
        </table:table-row>
        <table:table-row table:style-name="ro1">
          <table:table-cell office:value-type="float" office:value="582326317" calcext:value-type="float">
            <text:p>582326317</text:p>
          </table:table-cell>
          <table:table-cell office:value-type="float" office:value="773292401.094381" calcext:value-type="float">
            <text:p>773292401.094381</text:p>
          </table:table-cell>
          <table:table-cell/>
          <table:table-cell office:value-type="string" calcext:value-type="string">
            <text:p>2024-07-03T15:26:41.0943809Z</text:p>
          </table:table-cell>
          <table:table-cell office:value-type="string" calcext:value-type="string">
            <text:p>2024-07-03-15:27:50.2783809</text:p>
          </table:table-cell>
          <table:table-cell table:number-columns-repeated="2"/>
        </table:table-row>
        <table:table-row table:style-name="ro1">
          <table:table-cell office:value-type="float" office:value="582455926" calcext:value-type="float">
            <text:p>582455926</text:p>
          </table:table-cell>
          <table:table-cell office:value-type="float" office:value="773422010.095868" calcext:value-type="float">
            <text:p>773422010.095868</text:p>
          </table:table-cell>
          <table:table-cell/>
          <table:table-cell office:value-type="string" calcext:value-type="string">
            <text:p>2024-07-05T03:26:50.0958679Z</text:p>
          </table:table-cell>
          <table:table-cell office:value-type="string" calcext:value-type="string">
            <text:p>2024-07-05-03:27:59.2798680</text:p>
          </table:table-cell>
          <table:table-cell table:number-columns-repeated="2"/>
        </table:table-row>
        <table:table-row table:style-name="ro1">
          <table:table-cell office:value-type="float" office:value="582538697" calcext:value-type="float">
            <text:p>582538697</text:p>
          </table:table-cell>
          <table:table-cell office:value-type="float" office:value="773504781.096775" calcext:value-type="float">
            <text:p>773504781.096775</text:p>
          </table:table-cell>
          <table:table-cell/>
          <table:table-cell office:value-type="string" calcext:value-type="string">
            <text:p>2024-07-06T02:26:21.0967749Z</text:p>
          </table:table-cell>
          <table:table-cell office:value-type="string" calcext:value-type="string">
            <text:p>2024-07-06-02:27:30.2807749</text:p>
          </table:table-cell>
          <table:table-cell table:number-columns-repeated="2"/>
        </table:table-row>
        <table:table-row table:style-name="ro1">
          <table:table-cell office:value-type="float" office:value="582628727" calcext:value-type="float">
            <text:p>582628727</text:p>
          </table:table-cell>
          <table:table-cell office:value-type="float" office:value="773594811.097784" calcext:value-type="float">
            <text:p>773594811.097784</text:p>
          </table:table-cell>
          <table:table-cell/>
          <table:table-cell office:value-type="string" calcext:value-type="string">
            <text:p>2024-07-07T03:26:51.0977840Z</text:p>
          </table:table-cell>
          <table:table-cell office:value-type="string" calcext:value-type="string">
            <text:p>2024-07-07-03:28:00.2817840</text:p>
          </table:table-cell>
          <table:table-cell table:number-columns-repeated="2"/>
        </table:table-row>
        <table:table-row table:style-name="ro1">
          <table:table-cell office:value-type="float" office:value="582711493" calcext:value-type="float">
            <text:p>582711493</text:p>
          </table:table-cell>
          <table:table-cell office:value-type="float" office:value="773677577.098712" calcext:value-type="float">
            <text:p>773677577.098712</text:p>
          </table:table-cell>
          <table:table-cell/>
          <table:table-cell office:value-type="string" calcext:value-type="string">
            <text:p>2024-07-08T02:26:17.0987119Z</text:p>
          </table:table-cell>
          <table:table-cell office:value-type="string" calcext:value-type="string">
            <text:p>2024-07-08-02:27:26.2827119</text:p>
          </table:table-cell>
          <table:table-cell table:number-columns-repeated="2"/>
        </table:table-row>
        <table:table-row table:style-name="ro1">
          <table:table-cell office:value-type="float" office:value="582844698" calcext:value-type="float">
            <text:p>582844698</text:p>
          </table:table-cell>
          <table:table-cell office:value-type="float" office:value="773810782.100177" calcext:value-type="float">
            <text:p>773810782.100177</text:p>
          </table:table-cell>
          <table:table-cell/>
          <table:table-cell office:value-type="string" calcext:value-type="string">
            <text:p>2024-07-09T15:26:22.1001769Z</text:p>
          </table:table-cell>
          <table:table-cell office:value-type="string" calcext:value-type="string">
            <text:p>2024-07-09-15:27:31.2841769</text:p>
          </table:table-cell>
          <table:table-cell table:number-columns-repeated="2"/>
        </table:table-row>
        <table:table-row table:style-name="ro1">
          <table:table-cell office:value-type="float" office:value="582931089" calcext:value-type="float">
            <text:p>582931089</text:p>
          </table:table-cell>
          <table:table-cell office:value-type="float" office:value="773897173.101149" calcext:value-type="float">
            <text:p>773897173.101149</text:p>
          </table:table-cell>
          <table:table-cell/>
          <table:table-cell office:value-type="string" calcext:value-type="string">
            <text:p>2024-07-10T15:26:13.1011489Z</text:p>
          </table:table-cell>
          <table:table-cell office:value-type="string" calcext:value-type="string">
            <text:p>2024-07-10-15:27:22.2851489</text:p>
          </table:table-cell>
          <table:table-cell table:number-columns-repeated="2"/>
        </table:table-row>
        <table:table-row table:style-name="ro1">
          <table:table-cell office:value-type="float" office:value="583018084" calcext:value-type="float">
            <text:p>583018084</text:p>
          </table:table-cell>
          <table:table-cell office:value-type="float" office:value="773984168.102124" calcext:value-type="float">
            <text:p>773984168.102124</text:p>
          </table:table-cell>
          <table:table-cell/>
          <table:table-cell office:value-type="string" calcext:value-type="string">
            <text:p>2024-07-11T15:36:08.1021239Z</text:p>
          </table:table-cell>
          <table:table-cell office:value-type="string" calcext:value-type="string">
            <text:p>2024-07-11-15:37:17.2861239</text:p>
          </table:table-cell>
          <table:table-cell table:number-columns-repeated="2"/>
        </table:table-row>
        <table:table-row table:style-name="ro1">
          <table:table-cell office:value-type="float" office:value="583103883" calcext:value-type="float">
            <text:p>583103883</text:p>
          </table:table-cell>
          <table:table-cell office:value-type="float" office:value="774069967.103077" calcext:value-type="float">
            <text:p>774069967.103077</text:p>
          </table:table-cell>
          <table:table-cell/>
          <table:table-cell office:value-type="string" calcext:value-type="string">
            <text:p>2024-07-12T15:26:07.1030769Z</text:p>
          </table:table-cell>
          <table:table-cell office:value-type="string" calcext:value-type="string">
            <text:p>2024-07-12-15:27:16.2870769</text:p>
          </table:table-cell>
          <table:table-cell table:number-columns-repeated="2"/>
        </table:table-row>
        <table:table-row table:style-name="ro1">
          <table:table-cell office:value-type="float" office:value="583190278" calcext:value-type="float">
            <text:p>583190278</text:p>
          </table:table-cell>
          <table:table-cell office:value-type="float" office:value="774156362.104051" calcext:value-type="float">
            <text:p>774156362.104051</text:p>
          </table:table-cell>
          <table:table-cell/>
          <table:table-cell office:value-type="string" calcext:value-type="string">
            <text:p>2024-07-13T15:26:02.1040509Z</text:p>
          </table:table-cell>
          <table:table-cell office:value-type="string" calcext:value-type="string">
            <text:p>2024-07-13-15:27:11.2880510</text:p>
          </table:table-cell>
          <table:table-cell table:number-columns-repeated="2"/>
        </table:table-row>
        <table:table-row table:style-name="ro1">
          <table:table-cell office:value-type="float" office:value="583276678" calcext:value-type="float">
            <text:p>583276678</text:p>
          </table:table-cell>
          <table:table-cell office:value-type="float" office:value="774242762.105009" calcext:value-type="float">
            <text:p>774242762.105009</text:p>
          </table:table-cell>
          <table:table-cell/>
          <table:table-cell office:value-type="string" calcext:value-type="string">
            <text:p>2024-07-14T15:26:02.1050089Z</text:p>
          </table:table-cell>
          <table:table-cell office:value-type="string" calcext:value-type="string">
            <text:p>2024-07-14-15:27:11.2890089</text:p>
          </table:table-cell>
          <table:table-cell table:number-columns-repeated="2"/>
        </table:table-row>
        <table:table-row table:style-name="ro1">
          <table:table-cell office:value-type="float" office:value="583363065" calcext:value-type="float">
            <text:p>583363065</text:p>
          </table:table-cell>
          <table:table-cell office:value-type="float" office:value="774329149.105981" calcext:value-type="float">
            <text:p>774329149.105981</text:p>
          </table:table-cell>
          <table:table-cell/>
          <table:table-cell office:value-type="string" calcext:value-type="string">
            <text:p>2024-07-15T15:25:49.1059809Z</text:p>
          </table:table-cell>
          <table:table-cell office:value-type="string" calcext:value-type="string">
            <text:p>2024-07-15-15:26:58.2899810</text:p>
          </table:table-cell>
          <table:table-cell table:number-columns-repeated="2"/>
        </table:table-row>
        <table:table-row table:style-name="ro1">
          <table:table-cell office:value-type="float" office:value="583449463" calcext:value-type="float">
            <text:p>583449463</text:p>
          </table:table-cell>
          <table:table-cell office:value-type="float" office:value="774415547.106947" calcext:value-type="float">
            <text:p>774415547.106947</text:p>
          </table:table-cell>
          <table:table-cell/>
          <table:table-cell office:value-type="string" calcext:value-type="string">
            <text:p>2024-07-16T15:25:47.1069469Z</text:p>
          </table:table-cell>
          <table:table-cell office:value-type="string" calcext:value-type="string">
            <text:p>2024-07-16-15:26:56.2909469</text:p>
          </table:table-cell>
          <table:table-cell table:number-columns-repeated="2"/>
        </table:table-row>
        <table:table-row table:style-name="ro1">
          <table:table-cell office:value-type="float" office:value="583535858" calcext:value-type="float">
            <text:p>583535858</text:p>
          </table:table-cell>
          <table:table-cell office:value-type="float" office:value="774501942.107903" calcext:value-type="float">
            <text:p>774501942.107903</text:p>
          </table:table-cell>
          <table:table-cell/>
          <table:table-cell office:value-type="string" calcext:value-type="string">
            <text:p>2024-07-17T15:25:42.1079030Z</text:p>
          </table:table-cell>
          <table:table-cell office:value-type="string" calcext:value-type="string">
            <text:p>2024-07-17-15:26:51.2919030</text:p>
          </table:table-cell>
          <table:table-cell table:number-columns-repeated="2"/>
        </table:table-row>
        <table:table-row table:style-name="ro1">
          <table:table-cell office:value-type="float" office:value="583622250" calcext:value-type="float">
            <text:p>583622250</text:p>
          </table:table-cell>
          <table:table-cell office:value-type="float" office:value="774588334.108876" calcext:value-type="float">
            <text:p>774588334.108876</text:p>
          </table:table-cell>
          <table:table-cell/>
          <table:table-cell office:value-type="string" calcext:value-type="string">
            <text:p>2024-07-18T15:25:34.1088759Z</text:p>
          </table:table-cell>
          <table:table-cell office:value-type="string" calcext:value-type="string">
            <text:p>2024-07-18-15:26:43.2928760</text:p>
          </table:table-cell>
          <table:table-cell table:number-columns-repeated="2"/>
        </table:table-row>
        <table:table-row table:style-name="ro1">
          <table:table-cell office:value-type="float" office:value="583708649" calcext:value-type="float">
            <text:p>583708649</text:p>
          </table:table-cell>
          <table:table-cell office:value-type="float" office:value="774674733.109835" calcext:value-type="float">
            <text:p>774674733.109835</text:p>
          </table:table-cell>
          <table:table-cell/>
          <table:table-cell office:value-type="string" calcext:value-type="string">
            <text:p>2024-07-19T15:25:33.1098350Z</text:p>
          </table:table-cell>
          <table:table-cell office:value-type="string" calcext:value-type="string">
            <text:p>2024-07-19-15:26:42.2938350</text:p>
          </table:table-cell>
          <table:table-cell table:number-columns-repeated="2"/>
        </table:table-row>
        <table:table-row table:style-name="ro1">
          <table:table-cell office:value-type="float" office:value="583795041" calcext:value-type="float">
            <text:p>583795041</text:p>
          </table:table-cell>
          <table:table-cell office:value-type="float" office:value="774761125.110812" calcext:value-type="float">
            <text:p>774761125.110812</text:p>
          </table:table-cell>
          <table:table-cell/>
          <table:table-cell office:value-type="string" calcext:value-type="string">
            <text:p>2024-07-20T15:25:25.1108119Z</text:p>
          </table:table-cell>
          <table:table-cell office:value-type="string" calcext:value-type="string">
            <text:p>2024-07-20-15:26:34.2948119</text:p>
          </table:table-cell>
          <table:table-cell table:number-columns-repeated="2"/>
        </table:table-row>
        <table:table-row table:style-name="ro1">
          <table:table-cell office:value-type="float" office:value="583856218" calcext:value-type="float">
            <text:p>583856218</text:p>
          </table:table-cell>
          <table:table-cell office:value-type="float" office:value="774822302.111496" calcext:value-type="float">
            <text:p>774822302.111496</text:p>
          </table:table-cell>
          <table:table-cell/>
          <table:table-cell office:value-type="string" calcext:value-type="string">
            <text:p>2024-07-21T08:25:02.1114959Z</text:p>
          </table:table-cell>
          <table:table-cell office:value-type="string" calcext:value-type="string">
            <text:p>2024-07-21-08:26:11.2954959</text:p>
          </table:table-cell>
          <table:table-cell table:number-columns-repeated="2"/>
        </table:table-row>
        <table:table-row table:style-name="ro1">
          <table:table-cell office:value-type="float" office:value="583967829" calcext:value-type="float">
            <text:p>583967829</text:p>
          </table:table-cell>
          <table:table-cell office:value-type="float" office:value="774933913.112744" calcext:value-type="float">
            <text:p>774933913.112744</text:p>
          </table:table-cell>
          <table:table-cell/>
          <table:table-cell office:value-type="string" calcext:value-type="string">
            <text:p>2024-07-22T15:25:13.1127439Z</text:p>
          </table:table-cell>
          <table:table-cell office:value-type="string" calcext:value-type="string">
            <text:p>2024-07-22-15:26:22.2967439</text:p>
          </table:table-cell>
          <table:table-cell table:number-columns-repeated="2"/>
        </table:table-row>
        <table:table-row table:style-name="ro1">
          <table:table-cell office:value-type="float" office:value="584003809" calcext:value-type="float">
            <text:p>584003809</text:p>
          </table:table-cell>
          <table:table-cell office:value-type="float" office:value="774969893.113109" calcext:value-type="float">
            <text:p>774969893.113109</text:p>
          </table:table-cell>
          <table:table-cell/>
          <table:table-cell office:value-type="string" calcext:value-type="string">
            <text:p>2024-07-23T01:24:53.1131089Z</text:p>
          </table:table-cell>
          <table:table-cell office:value-type="string" calcext:value-type="string">
            <text:p>2024-07-23-01:26:02.2971090</text:p>
          </table:table-cell>
          <table:table-cell table:number-columns-repeated="2"/>
        </table:table-row>
        <table:table-row table:style-name="ro1">
          <table:table-cell office:value-type="float" office:value="584115407" calcext:value-type="float">
            <text:p>584115407</text:p>
          </table:table-cell>
          <table:table-cell office:value-type="float" office:value="775081491.114397" calcext:value-type="float">
            <text:p>775081491.114397</text:p>
          </table:table-cell>
          <table:table-cell/>
          <table:table-cell office:value-type="string" calcext:value-type="string">
            <text:p>2024-07-24T08:24:51.1143969Z</text:p>
          </table:table-cell>
          <table:table-cell office:value-type="string" calcext:value-type="string">
            <text:p>2024-07-24-08:26:00.2983969</text:p>
          </table:table-cell>
          <table:table-cell table:number-columns-repeated="2"/>
        </table:table-row>
        <table:table-row table:style-name="ro1">
          <table:table-cell office:value-type="float" office:value="584227012" calcext:value-type="float">
            <text:p>584227012</text:p>
          </table:table-cell>
          <table:table-cell office:value-type="float" office:value="775193096.115637" calcext:value-type="float">
            <text:p>775193096.115637</text:p>
          </table:table-cell>
          <table:table-cell/>
          <table:table-cell office:value-type="string" calcext:value-type="string">
            <text:p>2024-07-25T15:24:56.1156369Z</text:p>
          </table:table-cell>
          <table:table-cell office:value-type="string" calcext:value-type="string">
            <text:p>2024-07-25-15:26:05.2996369</text:p>
          </table:table-cell>
          <table:table-cell table:number-columns-repeated="2"/>
        </table:table-row>
        <table:table-row table:style-name="ro1">
          <table:table-cell office:value-type="float" office:value="584313412" calcext:value-type="float">
            <text:p>584313412</text:p>
          </table:table-cell>
          <table:table-cell office:value-type="float" office:value="775279496.116591" calcext:value-type="float">
            <text:p>775279496.116591</text:p>
          </table:table-cell>
          <table:table-cell/>
          <table:table-cell office:value-type="string" calcext:value-type="string">
            <text:p>2024-07-26T15:24:56.1165909Z</text:p>
          </table:table-cell>
          <table:table-cell office:value-type="string" calcext:value-type="string">
            <text:p>2024-07-26-15:26:05.3005909</text:p>
          </table:table-cell>
          <table:table-cell table:number-columns-repeated="2"/>
        </table:table-row>
        <table:table-row table:style-name="ro1">
          <table:table-cell office:value-type="float" office:value="584399804" calcext:value-type="float">
            <text:p>584399804</text:p>
          </table:table-cell>
          <table:table-cell office:value-type="float" office:value="775365888.117551" calcext:value-type="float">
            <text:p>775365888.117551</text:p>
          </table:table-cell>
          <table:table-cell/>
          <table:table-cell office:value-type="string" calcext:value-type="string">
            <text:p>2024-07-27T15:24:48.1175509Z</text:p>
          </table:table-cell>
          <table:table-cell office:value-type="string" calcext:value-type="string">
            <text:p>2024-07-27-15:25:57.3015509</text:p>
          </table:table-cell>
          <table:table-cell table:number-columns-repeated="2"/>
        </table:table-row>
        <table:table-row table:style-name="ro1">
          <table:table-cell office:value-type="float" office:value="584486197" calcext:value-type="float">
            <text:p>584486197</text:p>
          </table:table-cell>
          <table:table-cell office:value-type="float" office:value="775452281.11852" calcext:value-type="float">
            <text:p>775452281.11852</text:p>
          </table:table-cell>
          <table:table-cell/>
          <table:table-cell office:value-type="string" calcext:value-type="string">
            <text:p>2024-07-28T15:24:41.1185200Z</text:p>
          </table:table-cell>
          <table:table-cell office:value-type="string" calcext:value-type="string">
            <text:p>2024-07-28-15:25:50.3025200</text:p>
          </table:table-cell>
          <table:table-cell table:number-columns-repeated="2"/>
        </table:table-row>
        <table:table-row table:style-name="ro1">
          <table:table-cell office:value-type="float" office:value="584543769" calcext:value-type="float">
            <text:p>584543769</text:p>
          </table:table-cell>
          <table:table-cell office:value-type="float" office:value="775509853.11918" calcext:value-type="float">
            <text:p>775509853.11918</text:p>
          </table:table-cell>
          <table:table-cell/>
          <table:table-cell office:value-type="string" calcext:value-type="string">
            <text:p>2024-07-29T07:24:13.1191799Z</text:p>
          </table:table-cell>
          <table:table-cell office:value-type="string" calcext:value-type="string">
            <text:p>2024-07-29-07:25:22.3031799</text:p>
          </table:table-cell>
          <table:table-cell table:number-columns-repeated="2"/>
        </table:table-row>
        <table:table-row table:style-name="ro1">
          <table:table-cell office:value-type="float" office:value="584619407" calcext:value-type="float">
            <text:p>584619407</text:p>
          </table:table-cell>
          <table:table-cell office:value-type="float" office:value="775585491.120001" calcext:value-type="float">
            <text:p>775585491.120001</text:p>
          </table:table-cell>
          <table:table-cell/>
          <table:table-cell office:value-type="string" calcext:value-type="string">
            <text:p>2024-07-30T04:24:51.1200009Z</text:p>
          </table:table-cell>
          <table:table-cell office:value-type="string" calcext:value-type="string">
            <text:p>2024-07-30-04:26:00.3040009</text:p>
          </table:table-cell>
          <table:table-cell table:number-columns-repeated="2"/>
        </table:table-row>
        <table:table-row table:style-name="ro1">
          <table:table-cell office:value-type="float" office:value="584712995" calcext:value-type="float">
            <text:p>584712995</text:p>
          </table:table-cell>
          <table:table-cell office:value-type="float" office:value="775679079.121052" calcext:value-type="float">
            <text:p>775679079.121052</text:p>
          </table:table-cell>
          <table:table-cell/>
          <table:table-cell office:value-type="string" calcext:value-type="string">
            <text:p>2024-07-31T06:24:39.1210520Z</text:p>
          </table:table-cell>
          <table:table-cell office:value-type="string" calcext:value-type="string">
            <text:p>2024-07-31-06:25:48.3050520</text:p>
          </table:table-cell>
          <table:table-cell table:number-columns-repeated="2"/>
        </table:table-row>
        <table:table-row table:style-name="ro1">
          <table:table-cell office:value-type="float" office:value="584831771" calcext:value-type="float">
            <text:p>584831771</text:p>
          </table:table-cell>
          <table:table-cell office:value-type="float" office:value="775797855.122375" calcext:value-type="float">
            <text:p>775797855.122375</text:p>
          </table:table-cell>
          <table:table-cell/>
          <table:table-cell office:value-type="string" calcext:value-type="string">
            <text:p>2024-08-01T15:24:15.1223750Z</text:p>
          </table:table-cell>
          <table:table-cell office:value-type="string" calcext:value-type="string">
            <text:p>2024-08-01-15:25:24.3063750</text:p>
          </table:table-cell>
          <table:table-cell table:number-columns-repeated="2"/>
        </table:table-row>
        <table:table-row table:style-name="ro1">
          <table:table-cell office:value-type="float" office:value="584918165" calcext:value-type="float">
            <text:p>584918165</text:p>
          </table:table-cell>
          <table:table-cell office:value-type="float" office:value="775884249.123342" calcext:value-type="float">
            <text:p>775884249.123342</text:p>
          </table:table-cell>
          <table:table-cell/>
          <table:table-cell office:value-type="string" calcext:value-type="string">
            <text:p>2024-08-02T15:24:09.1233420Z</text:p>
          </table:table-cell>
          <table:table-cell office:value-type="string" calcext:value-type="string">
            <text:p>2024-08-02-15:25:18.3073420</text:p>
          </table:table-cell>
          <table:table-cell table:number-columns-repeated="2"/>
        </table:table-row>
        <table:table-row table:style-name="ro1">
          <table:table-cell office:value-type="float" office:value="585004555" calcext:value-type="float">
            <text:p>585004555</text:p>
          </table:table-cell>
          <table:table-cell office:value-type="float" office:value="775970639.124297" calcext:value-type="float">
            <text:p>775970639.124297</text:p>
          </table:table-cell>
          <table:table-cell/>
          <table:table-cell office:value-type="string" calcext:value-type="string">
            <text:p>2024-08-03T15:23:59.1242970Z</text:p>
          </table:table-cell>
          <table:table-cell office:value-type="string" calcext:value-type="string">
            <text:p>2024-08-03-15:25:08.3082970</text:p>
          </table:table-cell>
          <table:table-cell table:number-columns-repeated="2"/>
        </table:table-row>
        <table:table-row table:style-name="ro1">
          <table:table-cell office:value-type="float" office:value="585090944" calcext:value-type="float">
            <text:p>585090944</text:p>
          </table:table-cell>
          <table:table-cell office:value-type="float" office:value="776057028.125251" calcext:value-type="float">
            <text:p>776057028.125251</text:p>
          </table:table-cell>
          <table:table-cell/>
          <table:table-cell office:value-type="string" calcext:value-type="string">
            <text:p>2024-08-04T15:23:48.1252509Z</text:p>
          </table:table-cell>
          <table:table-cell office:value-type="string" calcext:value-type="string">
            <text:p>2024-08-04-15:24:57.3092509</text:p>
          </table:table-cell>
          <table:table-cell table:number-columns-repeated="2"/>
        </table:table-row>
        <table:table-row table:style-name="ro1">
          <table:table-cell office:value-type="float" office:value="585177343" calcext:value-type="float">
            <text:p>585177343</text:p>
          </table:table-cell>
          <table:table-cell office:value-type="float" office:value="776143427.126229" calcext:value-type="float">
            <text:p>776143427.126229</text:p>
          </table:table-cell>
          <table:table-cell/>
          <table:table-cell office:value-type="string" calcext:value-type="string">
            <text:p>2024-08-05T15:23:47.1262289Z</text:p>
          </table:table-cell>
          <table:table-cell office:value-type="string" calcext:value-type="string">
            <text:p>2024-08-05-15:24:56.3102289</text:p>
          </table:table-cell>
          <table:table-cell table:number-columns-repeated="2"/>
        </table:table-row>
        <table:table-row table:style-name="ro1">
          <table:table-cell office:value-type="float" office:value="585263731" calcext:value-type="float">
            <text:p>585263731</text:p>
          </table:table-cell>
          <table:table-cell office:value-type="float" office:value="776229815.127173" calcext:value-type="float">
            <text:p>776229815.127173</text:p>
          </table:table-cell>
          <table:table-cell/>
          <table:table-cell office:value-type="string" calcext:value-type="string">
            <text:p>2024-08-06T15:23:35.1271729Z</text:p>
          </table:table-cell>
          <table:table-cell office:value-type="string" calcext:value-type="string">
            <text:p>2024-08-06-15:24:44.3111729</text:p>
          </table:table-cell>
          <table:table-cell table:number-columns-repeated="2"/>
        </table:table-row>
        <table:table-row table:style-name="ro1">
          <table:table-cell office:value-type="float" office:value="585328536" calcext:value-type="float">
            <text:p>585328536</text:p>
          </table:table-cell>
          <table:table-cell office:value-type="float" office:value="776294620.127918" calcext:value-type="float">
            <text:p>776294620.127918</text:p>
          </table:table-cell>
          <table:table-cell/>
          <table:table-cell office:value-type="string" calcext:value-type="string">
            <text:p>2024-08-07T09:23:40.1279180Z</text:p>
          </table:table-cell>
          <table:table-cell office:value-type="string" calcext:value-type="string">
            <text:p>2024-08-07-09:24:49.3119180</text:p>
          </table:table-cell>
          <table:table-cell table:number-columns-repeated="2"/>
        </table:table-row>
        <table:table-row table:style-name="ro1">
          <table:table-cell office:value-type="float" office:value="585436514" calcext:value-type="float">
            <text:p>585436514</text:p>
          </table:table-cell>
          <table:table-cell office:value-type="float" office:value="776402598.129096" calcext:value-type="float">
            <text:p>776402598.129096</text:p>
          </table:table-cell>
          <table:table-cell/>
          <table:table-cell office:value-type="string" calcext:value-type="string">
            <text:p>2024-08-08T15:23:18.1290960Z</text:p>
          </table:table-cell>
          <table:table-cell office:value-type="string" calcext:value-type="string">
            <text:p>2024-08-08-15:24:27.3130960</text:p>
          </table:table-cell>
          <table:table-cell table:number-columns-repeated="2"/>
        </table:table-row>
        <table:table-row table:style-name="ro1">
          <table:table-cell office:value-type="float" office:value="585522906" calcext:value-type="float">
            <text:p>585522906</text:p>
          </table:table-cell>
          <table:table-cell office:value-type="float" office:value="776488990.130057" calcext:value-type="float">
            <text:p>776488990.130057</text:p>
          </table:table-cell>
          <table:table-cell/>
          <table:table-cell office:value-type="string" calcext:value-type="string">
            <text:p>2024-08-09T15:23:10.1300569Z</text:p>
          </table:table-cell>
          <table:table-cell office:value-type="string" calcext:value-type="string">
            <text:p>2024-08-09-15:24:19.3140569</text:p>
          </table:table-cell>
          <table:table-cell table:number-columns-repeated="2"/>
        </table:table-row>
        <table:table-row table:style-name="ro1">
          <table:table-cell office:value-type="float" office:value="585587704" calcext:value-type="float">
            <text:p>585587704</text:p>
          </table:table-cell>
          <table:table-cell office:value-type="float" office:value="776553788.130792" calcext:value-type="float">
            <text:p>776553788.130792</text:p>
          </table:table-cell>
          <table:table-cell/>
          <table:table-cell office:value-type="string" calcext:value-type="string">
            <text:p>2024-08-10T09:23:08.1307920Z</text:p>
          </table:table-cell>
          <table:table-cell office:value-type="string" calcext:value-type="string">
            <text:p>2024-08-10-09:24:17.3147920</text:p>
          </table:table-cell>
          <table:table-cell table:number-columns-repeated="2"/>
        </table:table-row>
        <table:table-row table:style-name="ro1">
          <table:table-cell office:value-type="float" office:value="585663269" calcext:value-type="float">
            <text:p>585663269</text:p>
          </table:table-cell>
          <table:table-cell office:value-type="float" office:value="776629353.131633" calcext:value-type="float">
            <text:p>776629353.131633</text:p>
          </table:table-cell>
          <table:table-cell/>
          <table:table-cell office:value-type="string" calcext:value-type="string">
            <text:p>2024-08-11T06:22:33.1316330Z</text:p>
          </table:table-cell>
          <table:table-cell office:value-type="string" calcext:value-type="string">
            <text:p>2024-08-11-06:23:42.3156330</text:p>
          </table:table-cell>
          <table:table-cell table:number-columns-repeated="2"/>
        </table:table-row>
        <table:table-row table:style-name="ro1">
          <table:table-cell office:value-type="float" office:value="585756880" calcext:value-type="float">
            <text:p>585756880</text:p>
          </table:table-cell>
          <table:table-cell office:value-type="float" office:value="776722964.132679" calcext:value-type="float">
            <text:p>776722964.132679</text:p>
          </table:table-cell>
          <table:table-cell/>
          <table:table-cell office:value-type="string" calcext:value-type="string">
            <text:p>2024-08-12T08:22:44.1326789Z</text:p>
          </table:table-cell>
          <table:table-cell office:value-type="string" calcext:value-type="string">
            <text:p>2024-08-12-08:23:53.3166790</text:p>
          </table:table-cell>
          <table:table-cell table:number-columns-repeated="2"/>
        </table:table-row>
        <table:table-row table:style-name="ro1">
          <table:table-cell office:value-type="float" office:value="585868475" calcext:value-type="float">
            <text:p>585868475</text:p>
          </table:table-cell>
          <table:table-cell office:value-type="float" office:value="776834559.133906" calcext:value-type="float">
            <text:p>776834559.133906</text:p>
          </table:table-cell>
          <table:table-cell/>
          <table:table-cell office:value-type="string" calcext:value-type="string">
            <text:p>2024-08-13T15:22:39.1339060Z</text:p>
          </table:table-cell>
          <table:table-cell office:value-type="string" calcext:value-type="string">
            <text:p>2024-08-13-15:23:48.3179060</text:p>
          </table:table-cell>
          <table:table-cell table:number-columns-repeated="2"/>
        </table:table-row>
        <table:table-row table:style-name="ro1">
          <table:table-cell office:value-type="float" office:value="585954865" calcext:value-type="float">
            <text:p>585954865</text:p>
          </table:table-cell>
          <table:table-cell office:value-type="float" office:value="776920949.134855" calcext:value-type="float">
            <text:p>776920949.134855</text:p>
          </table:table-cell>
          <table:table-cell/>
          <table:table-cell office:value-type="string" calcext:value-type="string">
            <text:p>2024-08-14T15:22:29.1348550Z</text:p>
          </table:table-cell>
          <table:table-cell office:value-type="string" calcext:value-type="string">
            <text:p>2024-08-14-15:23:38.3188550</text:p>
          </table:table-cell>
          <table:table-cell table:number-columns-repeated="2"/>
        </table:table-row>
        <table:table-row table:style-name="ro1">
          <table:table-cell office:value-type="float" office:value="586041394" calcext:value-type="float">
            <text:p>586041394</text:p>
          </table:table-cell>
          <table:table-cell office:value-type="float" office:value="777007478.13583" calcext:value-type="float">
            <text:p>777007478.13583</text:p>
          </table:table-cell>
          <table:table-cell/>
          <table:table-cell office:value-type="string" calcext:value-type="string">
            <text:p>2024-08-15T15:24:38.1358299Z</text:p>
          </table:table-cell>
          <table:table-cell office:value-type="string" calcext:value-type="string">
            <text:p>2024-08-15-15:25:47.3198299</text:p>
          </table:table-cell>
          <table:table-cell table:number-columns-repeated="2"/>
        </table:table-row>
        <table:table-row table:style-name="ro1">
          <table:table-cell office:value-type="float" office:value="586127650" calcext:value-type="float">
            <text:p>586127650</text:p>
          </table:table-cell>
          <table:table-cell office:value-type="float" office:value="777093734.136774" calcext:value-type="float">
            <text:p>777093734.136774</text:p>
          </table:table-cell>
          <table:table-cell/>
          <table:table-cell office:value-type="string" calcext:value-type="string">
            <text:p>2024-08-16T15:22:14.1367739Z</text:p>
          </table:table-cell>
          <table:table-cell office:value-type="string" calcext:value-type="string">
            <text:p>2024-08-16-15:23:23.3207739</text:p>
          </table:table-cell>
          <table:table-cell table:number-columns-repeated="2"/>
        </table:table-row>
        <table:table-row table:style-name="ro1">
          <table:table-cell office:value-type="float" office:value="586178018" calcext:value-type="float">
            <text:p>586178018</text:p>
          </table:table-cell>
          <table:table-cell office:value-type="float" office:value="777144102.137336" calcext:value-type="float">
            <text:p>777144102.137336</text:p>
          </table:table-cell>
          <table:table-cell/>
          <table:table-cell office:value-type="string" calcext:value-type="string">
            <text:p>2024-08-17T05:21:42.1373360Z</text:p>
          </table:table-cell>
          <table:table-cell office:value-type="string" calcext:value-type="string">
            <text:p>2024-08-17-05:22:51.3213360</text:p>
          </table:table-cell>
          <table:table-cell table:number-columns-repeated="2"/>
        </table:table-row>
        <table:table-row table:style-name="ro1">
          <table:table-cell office:value-type="float" office:value="586300442" calcext:value-type="float">
            <text:p>586300442</text:p>
          </table:table-cell>
          <table:table-cell office:value-type="float" office:value="777266526.138697" calcext:value-type="float">
            <text:p>777266526.138697</text:p>
          </table:table-cell>
          <table:table-cell/>
          <table:table-cell office:value-type="string" calcext:value-type="string">
            <text:p>2024-08-18T15:22:06.1386970Z</text:p>
          </table:table-cell>
          <table:table-cell office:value-type="string" calcext:value-type="string">
            <text:p>2024-08-18-15:23:15.3226970</text:p>
          </table:table-cell>
          <table:table-cell table:number-columns-repeated="2"/>
        </table:table-row>
        <table:table-row table:style-name="ro1">
          <table:table-cell office:value-type="float" office:value="586361621" calcext:value-type="float">
            <text:p>586361621</text:p>
          </table:table-cell>
          <table:table-cell office:value-type="float" office:value="777327705.13938" calcext:value-type="float">
            <text:p>777327705.13938</text:p>
          </table:table-cell>
          <table:table-cell/>
          <table:table-cell office:value-type="string" calcext:value-type="string">
            <text:p>2024-08-19T08:21:45.1393799Z</text:p>
          </table:table-cell>
          <table:table-cell office:value-type="string" calcext:value-type="string">
            <text:p>2024-08-19-08:22:54.3233799</text:p>
          </table:table-cell>
          <table:table-cell table:number-columns-repeated="2"/>
        </table:table-row>
        <table:table-row table:style-name="ro1">
          <table:table-cell office:value-type="float" office:value="586473220" calcext:value-type="float">
            <text:p>586473220</text:p>
          </table:table-cell>
          <table:table-cell office:value-type="float" office:value="777439304.140616" calcext:value-type="float">
            <text:p>777439304.140616</text:p>
          </table:table-cell>
          <table:table-cell/>
          <table:table-cell office:value-type="string" calcext:value-type="string">
            <text:p>2024-08-20T15:21:44.1406159Z</text:p>
          </table:table-cell>
          <table:table-cell office:value-type="string" calcext:value-type="string">
            <text:p>2024-08-20-15:22:53.3246159</text:p>
          </table:table-cell>
          <table:table-cell table:number-columns-repeated="2"/>
        </table:table-row>
        <table:table-row table:style-name="ro1">
          <table:table-cell office:value-type="float" office:value="586559609" calcext:value-type="float">
            <text:p>586559609</text:p>
          </table:table-cell>
          <table:table-cell office:value-type="float" office:value="777525693.141573" calcext:value-type="float">
            <text:p>777525693.141573</text:p>
          </table:table-cell>
          <table:table-cell/>
          <table:table-cell office:value-type="string" calcext:value-type="string">
            <text:p>2024-08-21T15:21:33.1415729Z</text:p>
          </table:table-cell>
          <table:table-cell office:value-type="string" calcext:value-type="string">
            <text:p>2024-08-21-15:22:42.3255729</text:p>
          </table:table-cell>
          <table:table-cell table:number-columns-repeated="2"/>
        </table:table-row>
        <table:table-row table:style-name="ro1">
          <table:table-cell office:value-type="float" office:value="586732388" calcext:value-type="float">
            <text:p>586732388</text:p>
          </table:table-cell>
          <table:table-cell office:value-type="float" office:value="777698472.143489" calcext:value-type="float">
            <text:p>777698472.143489</text:p>
          </table:table-cell>
          <table:table-cell/>
          <table:table-cell office:value-type="string" calcext:value-type="string">
            <text:p>2024-08-23T15:21:12.1434890Z</text:p>
          </table:table-cell>
          <table:table-cell office:value-type="string" calcext:value-type="string">
            <text:p>2024-08-23-15:22:21.3274890</text:p>
          </table:table-cell>
          <table:table-cell table:number-columns-repeated="2"/>
        </table:table-row>
        <table:table-row table:style-name="ro1">
          <table:table-cell office:value-type="float" office:value="586818777" calcext:value-type="float">
            <text:p>586818777</text:p>
          </table:table-cell>
          <table:table-cell office:value-type="float" office:value="777784861.144434" calcext:value-type="float">
            <text:p>777784861.144434</text:p>
          </table:table-cell>
          <table:table-cell/>
          <table:table-cell office:value-type="string" calcext:value-type="string">
            <text:p>2024-08-24T15:21:01.1444339Z</text:p>
          </table:table-cell>
          <table:table-cell office:value-type="string" calcext:value-type="string">
            <text:p>2024-08-24-15:22:10.3284339</text:p>
          </table:table-cell>
          <table:table-cell table:number-columns-repeated="2"/>
        </table:table-row>
        <table:table-row table:style-name="ro1">
          <table:table-cell office:value-type="float" office:value="586905167" calcext:value-type="float">
            <text:p>586905167</text:p>
          </table:table-cell>
          <table:table-cell office:value-type="float" office:value="777871251.145394" calcext:value-type="float">
            <text:p>777871251.145394</text:p>
          </table:table-cell>
          <table:table-cell/>
          <table:table-cell office:value-type="string" calcext:value-type="string">
            <text:p>2024-08-25T15:20:51.1453939Z</text:p>
          </table:table-cell>
          <table:table-cell office:value-type="string" calcext:value-type="string">
            <text:p>2024-08-25-15:22:00.3293939</text:p>
          </table:table-cell>
          <table:table-cell table:number-columns-repeated="2"/>
        </table:table-row>
        <table:table-row table:style-name="ro1">
          <table:table-cell office:value-type="float" office:value="586991556" calcext:value-type="float">
            <text:p>586991556</text:p>
          </table:table-cell>
          <table:table-cell office:value-type="float" office:value="777957640.146356" calcext:value-type="float">
            <text:p>777957640.146356</text:p>
          </table:table-cell>
          <table:table-cell/>
          <table:table-cell office:value-type="string" calcext:value-type="string">
            <text:p>2024-08-26T15:20:40.1463559Z</text:p>
          </table:table-cell>
          <table:table-cell office:value-type="string" calcext:value-type="string">
            <text:p>2024-08-26-15:21:49.3303560</text:p>
          </table:table-cell>
          <table:table-cell table:number-columns-repeated="2"/>
        </table:table-row>
        <table:table-row table:style-name="ro1">
          <table:table-cell office:value-type="float" office:value="587077945" calcext:value-type="float">
            <text:p>587077945</text:p>
          </table:table-cell>
          <table:table-cell office:value-type="float" office:value="778044029.147302" calcext:value-type="float">
            <text:p>778044029.147302</text:p>
          </table:table-cell>
          <table:table-cell/>
          <table:table-cell office:value-type="string" calcext:value-type="string">
            <text:p>2024-08-27T15:20:29.1473020Z</text:p>
          </table:table-cell>
          <table:table-cell office:value-type="string" calcext:value-type="string">
            <text:p>2024-08-27-15:21:38.3313020</text:p>
          </table:table-cell>
          <table:table-cell table:number-columns-repeated="2"/>
        </table:table-row>
        <table:table-row table:style-name="ro1">
          <table:table-cell office:value-type="float" office:value="587131912" calcext:value-type="float">
            <text:p>587131912</text:p>
          </table:table-cell>
          <table:table-cell office:value-type="float" office:value="778097996.147902" calcext:value-type="float">
            <text:p>778097996.147902</text:p>
          </table:table-cell>
          <table:table-cell/>
          <table:table-cell office:value-type="string" calcext:value-type="string">
            <text:p>2024-08-28T06:19:56.1479020Z</text:p>
          </table:table-cell>
          <table:table-cell office:value-type="string" calcext:value-type="string">
            <text:p>2024-08-28-06:21:05.3319020</text:p>
          </table:table-cell>
          <table:table-cell table:number-columns-repeated="2"/>
        </table:table-row>
        <table:table-row table:style-name="ro1">
          <table:table-cell office:value-type="float" office:value="587239913" calcext:value-type="float">
            <text:p>587239913</text:p>
          </table:table-cell>
          <table:table-cell office:value-type="float" office:value="778205997.14908" calcext:value-type="float">
            <text:p>778205997.14908</text:p>
          </table:table-cell>
          <table:table-cell/>
          <table:table-cell office:value-type="string" calcext:value-type="string">
            <text:p>2024-08-29T12:19:57.1490800Z</text:p>
          </table:table-cell>
          <table:table-cell office:value-type="string" calcext:value-type="string">
            <text:p>2024-08-29-12:21:06.3330800</text:p>
          </table:table-cell>
          <table:table-cell table:number-columns-repeated="2"/>
        </table:table-row>
        <table:table-row table:style-name="ro1">
          <table:table-cell office:value-type="float" office:value="587337123" calcext:value-type="float">
            <text:p>587337123</text:p>
          </table:table-cell>
          <table:table-cell office:value-type="float" office:value="778303207.15017" calcext:value-type="float">
            <text:p>778303207.15017</text:p>
          </table:table-cell>
          <table:table-cell/>
          <table:table-cell office:value-type="string" calcext:value-type="string">
            <text:p>2024-08-30T15:20:07.1501699Z</text:p>
          </table:table-cell>
          <table:table-cell office:value-type="string" calcext:value-type="string">
            <text:p>2024-08-30-15:21:16.3341699</text:p>
          </table:table-cell>
          <table:table-cell table:number-columns-repeated="2"/>
        </table:table-row>
        <table:table-row table:style-name="ro1">
          <table:table-cell office:value-type="float" office:value="587423545" calcext:value-type="float">
            <text:p>587423545</text:p>
          </table:table-cell>
          <table:table-cell office:value-type="float" office:value="778389629.151115" calcext:value-type="float">
            <text:p>778389629.151115</text:p>
          </table:table-cell>
          <table:table-cell/>
          <table:table-cell office:value-type="string" calcext:value-type="string">
            <text:p>2024-08-31T15:20:29.1511149Z</text:p>
          </table:table-cell>
          <table:table-cell office:value-type="string" calcext:value-type="string">
            <text:p>2024-08-31-15:21:38.3351149</text:p>
          </table:table-cell>
          <table:table-cell table:number-columns-repeated="2"/>
        </table:table-row>
        <table:table-row table:style-name="ro1">
          <table:table-cell office:value-type="float" office:value="587509906" calcext:value-type="float">
            <text:p>587509906</text:p>
          </table:table-cell>
          <table:table-cell office:value-type="float" office:value="778475990.152076" calcext:value-type="float">
            <text:p>778475990.152076</text:p>
          </table:table-cell>
          <table:table-cell/>
          <table:table-cell office:value-type="string" calcext:value-type="string">
            <text:p>2024-09-01T15:19:50.1520760Z</text:p>
          </table:table-cell>
          <table:table-cell office:value-type="string" calcext:value-type="string">
            <text:p>2024-09-01-15:20:59.3360760</text:p>
          </table:table-cell>
          <table:table-cell table:number-columns-repeated="2"/>
        </table:table-row>
        <table:table-row table:style-name="ro1">
          <table:table-cell office:value-type="float" office:value="587567493" calcext:value-type="float">
            <text:p>587567493</text:p>
          </table:table-cell>
          <table:table-cell office:value-type="float" office:value="778533577.152717" calcext:value-type="float">
            <text:p>778533577.152717</text:p>
          </table:table-cell>
          <table:table-cell/>
          <table:table-cell office:value-type="string" calcext:value-type="string">
            <text:p>2024-09-02T07:19:37.1527169Z</text:p>
          </table:table-cell>
          <table:table-cell office:value-type="string" calcext:value-type="string">
            <text:p>2024-09-02-07:20:46.3367170</text:p>
          </table:table-cell>
          <table:table-cell table:number-columns-repeated="2"/>
        </table:table-row>
        <table:table-row table:style-name="ro1">
          <table:table-cell office:value-type="float" office:value="587682688" calcext:value-type="float">
            <text:p>587682688</text:p>
          </table:table-cell>
          <table:table-cell office:value-type="float" office:value="778648772.153977" calcext:value-type="float">
            <text:p>778648772.153977</text:p>
          </table:table-cell>
          <table:table-cell/>
          <table:table-cell office:value-type="string" calcext:value-type="string">
            <text:p>2024-09-03T15:19:32.1539770Z</text:p>
          </table:table-cell>
          <table:table-cell office:value-type="string" calcext:value-type="string">
            <text:p>2024-09-03-15:20:41.3379770</text:p>
          </table:table-cell>
          <table:table-cell table:number-columns-repeated="2"/>
        </table:table-row>
        <table:table-row table:style-name="ro1">
          <table:table-cell office:value-type="float" office:value="587765460" calcext:value-type="float">
            <text:p>587765460</text:p>
          </table:table-cell>
          <table:table-cell office:value-type="float" office:value="778731544.154871" calcext:value-type="float">
            <text:p>778731544.154871</text:p>
          </table:table-cell>
          <table:table-cell/>
          <table:table-cell office:value-type="string" calcext:value-type="string">
            <text:p>2024-09-04T14:19:04.1548709Z</text:p>
          </table:table-cell>
          <table:table-cell office:value-type="string" calcext:value-type="string">
            <text:p>2024-09-04-14:20:13.3388710</text:p>
          </table:table-cell>
          <table:table-cell table:number-columns-repeated="2"/>
        </table:table-row>
        <table:table-row table:style-name="ro1">
          <table:table-cell office:value-type="float" office:value="587819429" calcext:value-type="float">
            <text:p>587819429</text:p>
          </table:table-cell>
          <table:table-cell office:value-type="float" office:value="778785513.155469" calcext:value-type="float">
            <text:p>778785513.155469</text:p>
          </table:table-cell>
          <table:table-cell/>
          <table:table-cell office:value-type="string" calcext:value-type="string">
            <text:p>2024-09-05T05:18:33.1554689Z</text:p>
          </table:table-cell>
          <table:table-cell office:value-type="string" calcext:value-type="string">
            <text:p>2024-09-05-05:19:42.3394689</text:p>
          </table:table-cell>
          <table:table-cell table:number-columns-repeated="2"/>
        </table:table-row>
        <table:table-row table:style-name="ro1">
          <table:table-cell office:value-type="float" office:value="587941876" calcext:value-type="float">
            <text:p>587941876</text:p>
          </table:table-cell>
          <table:table-cell office:value-type="float" office:value="778907960.156817" calcext:value-type="float">
            <text:p>778907960.156817</text:p>
          </table:table-cell>
          <table:table-cell/>
          <table:table-cell office:value-type="string" calcext:value-type="string">
            <text:p>2024-09-06T15:19:20.1568169Z</text:p>
          </table:table-cell>
          <table:table-cell office:value-type="string" calcext:value-type="string">
            <text:p>2024-09-06-15:20:29.3408169</text:p>
          </table:table-cell>
          <table:table-cell table:number-columns-repeated="2"/>
        </table:table-row>
        <table:table-row table:style-name="ro1">
          <table:table-cell office:value-type="float" office:value="587995812" calcext:value-type="float">
            <text:p>587995812</text:p>
          </table:table-cell>
          <table:table-cell office:value-type="float" office:value="778961896.157426" calcext:value-type="float">
            <text:p>778961896.157426</text:p>
          </table:table-cell>
          <table:table-cell/>
          <table:table-cell office:value-type="string" calcext:value-type="string">
            <text:p>2024-09-07T06:18:16.1574259Z</text:p>
          </table:table-cell>
          <table:table-cell office:value-type="string" calcext:value-type="string">
            <text:p>2024-09-07-06:19:25.3414260</text:p>
          </table:table-cell>
          <table:table-cell table:number-columns-repeated="2"/>
        </table:table-row>
        <table:table-row table:style-name="ro1">
          <table:table-cell office:value-type="float" office:value="588114642" calcext:value-type="float">
            <text:p>588114642</text:p>
          </table:table-cell>
          <table:table-cell office:value-type="float" office:value="779080726.15873" calcext:value-type="float">
            <text:p>779080726.15873</text:p>
          </table:table-cell>
          <table:table-cell/>
          <table:table-cell office:value-type="string" calcext:value-type="string">
            <text:p>2024-09-08T15:18:46.1587300Z</text:p>
          </table:table-cell>
          <table:table-cell office:value-type="string" calcext:value-type="string">
            <text:p>2024-09-08-15:19:55.3427300</text:p>
          </table:table-cell>
          <table:table-cell table:number-columns-repeated="2"/>
        </table:table-row>
        <table:table-row table:style-name="ro1">
          <table:table-cell office:value-type="float" office:value="588172239" calcext:value-type="float">
            <text:p>588172239</text:p>
          </table:table-cell>
          <table:table-cell office:value-type="float" office:value="779138323.159361" calcext:value-type="float">
            <text:p>779138323.159361</text:p>
          </table:table-cell>
          <table:table-cell/>
          <table:table-cell office:value-type="string" calcext:value-type="string">
            <text:p>2024-09-09T07:18:43.1593610Z</text:p>
          </table:table-cell>
          <table:table-cell office:value-type="string" calcext:value-type="string">
            <text:p>2024-09-09-07:19:52.3433610</text:p>
          </table:table-cell>
          <table:table-cell table:number-columns-repeated="2"/>
        </table:table-row>
        <table:table-row table:style-name="ro1">
          <table:table-cell office:value-type="float" office:value="588218974" calcext:value-type="float">
            <text:p>588218974</text:p>
          </table:table-cell>
          <table:table-cell office:value-type="float" office:value="779185058.159856" calcext:value-type="float">
            <text:p>779185058.159856</text:p>
          </table:table-cell>
          <table:table-cell/>
          <table:table-cell office:value-type="string" calcext:value-type="string">
            <text:p>2024-09-09T20:17:38.1598559Z</text:p>
          </table:table-cell>
          <table:table-cell office:value-type="string" calcext:value-type="string">
            <text:p>2024-09-09-20:18:47.3438559</text:p>
          </table:table-cell>
          <table:table-cell table:number-columns-repeated="2"/>
        </table:table-row>
        <table:table-row table:style-name="ro1">
          <table:table-cell office:value-type="float" office:value="588316162" calcext:value-type="float">
            <text:p>588316162</text:p>
          </table:table-cell>
          <table:table-cell office:value-type="float" office:value="779282246.160908" calcext:value-type="float">
            <text:p>779282246.160908</text:p>
          </table:table-cell>
          <table:table-cell/>
          <table:table-cell office:value-type="string" calcext:value-type="string">
            <text:p>2024-09-10T23:17:26.1609079Z</text:p>
          </table:table-cell>
          <table:table-cell office:value-type="string" calcext:value-type="string">
            <text:p>2024-09-10-23:18:35.3449079</text:p>
          </table:table-cell>
          <table:table-cell table:number-columns-repeated="2"/>
        </table:table-row>
        <table:table-row table:style-name="ro1">
          <table:table-cell office:value-type="float" office:value="588398973" calcext:value-type="float">
            <text:p>588398973</text:p>
          </table:table-cell>
          <table:table-cell office:value-type="float" office:value="779365057.161837" calcext:value-type="float">
            <text:p>779365057.161837</text:p>
          </table:table-cell>
          <table:table-cell/>
          <table:table-cell office:value-type="string" calcext:value-type="string">
            <text:p>2024-09-11T22:17:37.1618369Z</text:p>
          </table:table-cell>
          <table:table-cell office:value-type="string" calcext:value-type="string">
            <text:p>2024-09-11-22:18:46.3458369</text:p>
          </table:table-cell>
          <table:table-cell table:number-columns-repeated="2"/>
        </table:table-row>
        <table:table-row table:style-name="ro1">
          <table:table-cell office:value-type="float" office:value="588547526" calcext:value-type="float">
            <text:p>588547526</text:p>
          </table:table-cell>
          <table:table-cell office:value-type="float" office:value="779513610.163444" calcext:value-type="float">
            <text:p>779513610.163444</text:p>
          </table:table-cell>
          <table:table-cell/>
          <table:table-cell office:value-type="string" calcext:value-type="string">
            <text:p>2024-09-13T15:33:30.1634440Z</text:p>
          </table:table-cell>
          <table:table-cell office:value-type="string" calcext:value-type="string">
            <text:p>2024-09-13-15:34:39.3474440</text:p>
          </table:table-cell>
          <table:table-cell table:number-columns-repeated="2"/>
        </table:table-row>
        <table:table-row table:style-name="ro1">
          <table:table-cell office:value-type="float" office:value="588632987" calcext:value-type="float">
            <text:p>588632987</text:p>
          </table:table-cell>
          <table:table-cell office:value-type="float" office:value="779599071.164365" calcext:value-type="float">
            <text:p>779599071.164365</text:p>
          </table:table-cell>
          <table:table-cell/>
          <table:table-cell office:value-type="string" calcext:value-type="string">
            <text:p>2024-09-14T15:17:51.1643649Z</text:p>
          </table:table-cell>
          <table:table-cell office:value-type="string" calcext:value-type="string">
            <text:p>2024-09-14-15:19:00.3483649</text:p>
          </table:table-cell>
          <table:table-cell table:number-columns-repeated="2"/>
        </table:table-row>
        <table:table-row table:style-name="ro1">
          <table:table-cell office:value-type="float" office:value="588686932" calcext:value-type="float">
            <text:p>588686932</text:p>
          </table:table-cell>
          <table:table-cell office:value-type="float" office:value="779653016.165007" calcext:value-type="float">
            <text:p>779653016.165007</text:p>
          </table:table-cell>
          <table:table-cell/>
          <table:table-cell office:value-type="string" calcext:value-type="string">
            <text:p>2024-09-15T06:16:56.1650069Z</text:p>
          </table:table-cell>
          <table:table-cell office:value-type="string" calcext:value-type="string">
            <text:p>2024-09-15-06:18:05.3490070</text:p>
          </table:table-cell>
          <table:table-cell table:number-columns-repeated="2"/>
        </table:table-row>
        <table:table-row table:style-name="ro1">
          <table:table-cell office:value-type="float" office:value="588758900" calcext:value-type="float">
            <text:p>588758900</text:p>
          </table:table-cell>
          <table:table-cell office:value-type="float" office:value="779724984.165769" calcext:value-type="float">
            <text:p>779724984.165769</text:p>
          </table:table-cell>
          <table:table-cell/>
          <table:table-cell office:value-type="string" calcext:value-type="string">
            <text:p>2024-09-16T02:16:24.1657689Z</text:p>
          </table:table-cell>
          <table:table-cell office:value-type="string" calcext:value-type="string">
            <text:p>2024-09-16-02:17:33.3497689</text:p>
          </table:table-cell>
          <table:table-cell table:number-columns-repeated="2"/>
        </table:table-row>
        <table:table-row table:style-name="ro1">
          <table:table-cell office:value-type="float" office:value="588845285" calcext:value-type="float">
            <text:p>588845285</text:p>
          </table:table-cell>
          <table:table-cell office:value-type="float" office:value="779811369.166717" calcext:value-type="float">
            <text:p>779811369.166717</text:p>
          </table:table-cell>
          <table:table-cell/>
          <table:table-cell office:value-type="string" calcext:value-type="string">
            <text:p>2024-09-17T02:16:09.1667169Z</text:p>
          </table:table-cell>
          <table:table-cell office:value-type="string" calcext:value-type="string">
            <text:p>2024-09-17-02:17:18.3507169</text:p>
          </table:table-cell>
          <table:table-cell table:number-columns-repeated="2"/>
        </table:table-row>
        <table:table-row table:style-name="ro1">
          <table:table-cell office:value-type="float" office:value="588946090" calcext:value-type="float">
            <text:p>588946090</text:p>
          </table:table-cell>
          <table:table-cell office:value-type="float" office:value="779912174.167845" calcext:value-type="float">
            <text:p>779912174.167845</text:p>
          </table:table-cell>
          <table:table-cell/>
          <table:table-cell office:value-type="string" calcext:value-type="string">
            <text:p>2024-09-18T06:16:14.1678450Z</text:p>
          </table:table-cell>
          <table:table-cell office:value-type="string" calcext:value-type="string">
            <text:p>2024-09-18-06:17:23.3518450</text:p>
          </table:table-cell>
          <table:table-cell table:number-columns-repeated="2"/>
        </table:table-row>
        <table:table-row table:style-name="ro1">
          <table:table-cell office:value-type="float" office:value="589003718" calcext:value-type="float">
            <text:p>589003718</text:p>
          </table:table-cell>
          <table:table-cell office:value-type="float" office:value="779969802.168468" calcext:value-type="float">
            <text:p>779969802.168468</text:p>
          </table:table-cell>
          <table:table-cell/>
          <table:table-cell office:value-type="string" calcext:value-type="string">
            <text:p>2024-09-18T22:16:42.1684679Z</text:p>
          </table:table-cell>
          <table:table-cell office:value-type="string" calcext:value-type="string">
            <text:p>2024-09-18-22:17:51.3524680</text:p>
          </table:table-cell>
          <table:table-cell table:number-columns-repeated="2"/>
        </table:table-row>
        <table:table-row table:style-name="ro1">
          <table:table-cell office:value-type="float" office:value="589144206" calcext:value-type="float">
            <text:p>589144206</text:p>
          </table:table-cell>
          <table:table-cell office:value-type="float" office:value="780110290.17003" calcext:value-type="float">
            <text:p>780110290.17003</text:p>
          </table:table-cell>
          <table:table-cell/>
          <table:table-cell office:value-type="string" calcext:value-type="string">
            <text:p>2024-09-20T13:18:10.1700299Z</text:p>
          </table:table-cell>
          <table:table-cell office:value-type="string" calcext:value-type="string">
            <text:p>2024-09-20-13:19:19.3540300</text:p>
          </table:table-cell>
          <table:table-cell table:number-columns-repeated="2"/>
        </table:table-row>
        <table:table-row table:style-name="ro1">
          <table:table-cell office:value-type="float" office:value="589237706" calcext:value-type="float">
            <text:p>589237706</text:p>
          </table:table-cell>
          <table:table-cell office:value-type="float" office:value="780203790.170984" calcext:value-type="float">
            <text:p>780203790.170984</text:p>
          </table:table-cell>
          <table:table-cell/>
          <table:table-cell office:value-type="string" calcext:value-type="string">
            <text:p>2024-09-21T15:16:30.1709840Z</text:p>
          </table:table-cell>
          <table:table-cell office:value-type="string" calcext:value-type="string">
            <text:p>2024-09-21-15:17:39.3549840</text:p>
          </table:table-cell>
          <table:table-cell table:number-columns-repeated="2"/>
        </table:table-row>
        <table:table-row table:style-name="ro1">
          <table:table-cell office:value-type="float" office:value="589288037" calcext:value-type="float">
            <text:p>589288037</text:p>
          </table:table-cell>
          <table:table-cell office:value-type="float" office:value="780254121.171564" calcext:value-type="float">
            <text:p>780254121.171564</text:p>
          </table:table-cell>
          <table:table-cell/>
          <table:table-cell office:value-type="string" calcext:value-type="string">
            <text:p>2024-09-22T05:15:21.1715639Z</text:p>
          </table:table-cell>
          <table:table-cell office:value-type="string" calcext:value-type="string">
            <text:p>2024-09-22-05:16:30.3555639</text:p>
          </table:table-cell>
          <table:table-cell table:number-columns-repeated="2"/>
        </table:table-row>
        <table:table-row table:style-name="ro1">
          <table:table-cell office:value-type="float" office:value="589410481" calcext:value-type="float">
            <text:p>589410481</text:p>
          </table:table-cell>
          <table:table-cell office:value-type="float" office:value="780376565.172876" calcext:value-type="float">
            <text:p>780376565.172876</text:p>
          </table:table-cell>
          <table:table-cell/>
          <table:table-cell office:value-type="string" calcext:value-type="string">
            <text:p>2024-09-23T15:16:05.1728760Z</text:p>
          </table:table-cell>
          <table:table-cell office:value-type="string" calcext:value-type="string">
            <text:p>2024-09-23-15:17:14.3568760</text:p>
          </table:table-cell>
          <table:table-cell table:number-columns-repeated="2"/>
        </table:table-row>
        <table:table-row table:style-name="ro1">
          <table:table-cell office:value-type="float" office:value="589464454" calcext:value-type="float">
            <text:p>589464454</text:p>
          </table:table-cell>
          <table:table-cell office:value-type="float" office:value="780430538.173494" calcext:value-type="float">
            <text:p>780430538.173494</text:p>
          </table:table-cell>
          <table:table-cell/>
          <table:table-cell office:value-type="string" calcext:value-type="string">
            <text:p>2024-09-24T06:15:38.1734939Z</text:p>
          </table:table-cell>
          <table:table-cell office:value-type="string" calcext:value-type="string">
            <text:p>2024-09-24-06:16:47.3574939</text:p>
          </table:table-cell>
          <table:table-cell table:number-columns-repeated="2"/>
        </table:table-row>
        <table:table-row table:style-name="ro1">
          <table:table-cell office:value-type="float" office:value="589584137" calcext:value-type="float">
            <text:p>589584137</text:p>
          </table:table-cell>
          <table:table-cell office:value-type="float" office:value="780550221.174765" calcext:value-type="float">
            <text:p>780550221.174765</text:p>
          </table:table-cell>
          <table:table-cell/>
          <table:table-cell office:value-type="string" calcext:value-type="string">
            <text:p>2024-09-25T15:30:21.1747649Z</text:p>
          </table:table-cell>
          <table:table-cell office:value-type="string" calcext:value-type="string">
            <text:p>2024-09-25-15:31:30.3587650</text:p>
          </table:table-cell>
          <table:table-cell table:number-columns-repeated="2"/>
        </table:table-row>
        <table:table-row table:style-name="ro1">
          <table:table-cell office:value-type="float" office:value="589622782" calcext:value-type="float">
            <text:p>589622782</text:p>
          </table:table-cell>
          <table:table-cell office:value-type="float" office:value="780588866.17521" calcext:value-type="float">
            <text:p>780588866.17521</text:p>
          </table:table-cell>
          <table:table-cell/>
          <table:table-cell office:value-type="string" calcext:value-type="string">
            <text:p>2024-09-26T02:14:26.1752099Z</text:p>
          </table:table-cell>
          <table:table-cell office:value-type="string" calcext:value-type="string">
            <text:p>2024-09-26-02:15:35.3592100</text:p>
          </table:table-cell>
          <table:table-cell table:number-columns-repeated="2"/>
        </table:table-row>
        <table:table-row table:style-name="ro1">
          <table:table-cell office:value-type="float" office:value="589691184" calcext:value-type="float">
            <text:p>589691184</text:p>
          </table:table-cell>
          <table:table-cell office:value-type="float" office:value="780657268.175953" calcext:value-type="float">
            <text:p>780657268.175953</text:p>
          </table:table-cell>
          <table:table-cell/>
          <table:table-cell office:value-type="string" calcext:value-type="string">
            <text:p>2024-09-26T21:14:28.1759530Z</text:p>
          </table:table-cell>
          <table:table-cell office:value-type="string" calcext:value-type="string">
            <text:p>2024-09-26-21:15:37.3599530</text:p>
          </table:table-cell>
          <table:table-cell table:number-columns-repeated="2"/>
        </table:table-row>
        <table:table-row table:style-name="ro1">
          <table:table-cell office:value-type="float" office:value="589838924" calcext:value-type="float">
            <text:p>589838924</text:p>
          </table:table-cell>
          <table:table-cell office:value-type="float" office:value="780805008.177543" calcext:value-type="float">
            <text:p>780805008.177543</text:p>
          </table:table-cell>
          <table:table-cell/>
          <table:table-cell office:value-type="string" calcext:value-type="string">
            <text:p>2024-09-28T14:16:48.1775430Z</text:p>
          </table:table-cell>
          <table:table-cell office:value-type="string" calcext:value-type="string">
            <text:p>2024-09-28-14:17:57.3615430</text:p>
          </table:table-cell>
          <table:table-cell table:number-columns-repeated="2"/>
        </table:table-row>
        <table:table-row table:style-name="ro1">
          <table:table-cell office:value-type="float" office:value="589896389" calcext:value-type="float">
            <text:p>589896389</text:p>
          </table:table-cell>
          <table:table-cell office:value-type="float" office:value="780862473.178194" calcext:value-type="float">
            <text:p>780862473.178194</text:p>
          </table:table-cell>
          <table:table-cell/>
          <table:table-cell office:value-type="string" calcext:value-type="string">
            <text:p>2024-09-29T06:14:33.1781939Z</text:p>
          </table:table-cell>
          <table:table-cell office:value-type="string" calcext:value-type="string">
            <text:p>2024-09-29-06:15:42.3621939</text:p>
          </table:table-cell>
          <table:table-cell table:number-columns-repeated="2"/>
        </table:table-row>
        <table:table-row table:style-name="ro1">
          <table:table-cell office:value-type="float" office:value="590008091" calcext:value-type="float">
            <text:p>590008091</text:p>
          </table:table-cell>
          <table:table-cell office:value-type="float" office:value="780974175.179417" calcext:value-type="float">
            <text:p>780974175.179417</text:p>
          </table:table-cell>
          <table:table-cell/>
          <table:table-cell office:value-type="string" calcext:value-type="string">
            <text:p>2024-09-30T13:16:15.1794170Z</text:p>
          </table:table-cell>
          <table:table-cell office:value-type="string" calcext:value-type="string">
            <text:p>2024-09-30-13:17:24.3634170</text:p>
          </table:table-cell>
          <table:table-cell table:number-columns-repeated="2"/>
        </table:table-row>
        <table:table-row table:style-name="ro1">
          <table:table-cell office:value-type="float" office:value="590069175" calcext:value-type="float">
            <text:p>590069175</text:p>
          </table:table-cell>
          <table:table-cell office:value-type="float" office:value="781035259.180064" calcext:value-type="float">
            <text:p>781035259.180064</text:p>
          </table:table-cell>
          <table:table-cell/>
          <table:table-cell office:value-type="string" calcext:value-type="string">
            <text:p>2024-10-01T06:14:19.1800639Z</text:p>
          </table:table-cell>
          <table:table-cell office:value-type="string" calcext:value-type="string">
            <text:p>2024-10-01-06:15:28.3640639</text:p>
          </table:table-cell>
          <table:table-cell table:number-columns-repeated="2"/>
        </table:table-row>
        <table:table-row table:style-name="ro1">
          <table:table-cell office:value-type="float" office:value="590155558" calcext:value-type="float">
            <text:p>590155558</text:p>
          </table:table-cell>
          <table:table-cell office:value-type="float" office:value="781121642.181001" calcext:value-type="float">
            <text:p>781121642.181001</text:p>
          </table:table-cell>
          <table:table-cell/>
          <table:table-cell office:value-type="string" calcext:value-type="string">
            <text:p>2024-10-02T06:14:02.1810009Z</text:p>
          </table:table-cell>
          <table:table-cell office:value-type="string" calcext:value-type="string">
            <text:p>2024-10-02-06:15:11.3650009</text:p>
          </table:table-cell>
          <table:table-cell table:number-columns-repeated="2"/>
        </table:table-row>
        <table:table-row table:style-name="ro1">
          <table:table-cell office:value-type="float" office:value="590227534" calcext:value-type="float">
            <text:p>590227534</text:p>
          </table:table-cell>
          <table:table-cell office:value-type="float" office:value="781193618.181788" calcext:value-type="float">
            <text:p>781193618.181788</text:p>
          </table:table-cell>
          <table:table-cell/>
          <table:table-cell office:value-type="string" calcext:value-type="string">
            <text:p>2024-10-03T02:13:38.1817879Z</text:p>
          </table:table-cell>
          <table:table-cell office:value-type="string" calcext:value-type="string">
            <text:p>2024-10-03-02:14:47.3657879</text:p>
          </table:table-cell>
          <table:table-cell table:number-columns-repeated="2"/>
        </table:table-row>
        <table:table-row table:style-name="ro1">
          <table:table-cell office:value-type="float" office:value="605912033" calcext:value-type="float">
            <text:p>605912033</text:p>
          </table:table-cell>
          <table:table-cell office:value-type="float" office:value="796878117.347744" calcext:value-type="float">
            <text:p>796878117.347744</text:p>
          </table:table-cell>
          <table:table-cell/>
          <table:table-cell office:value-type="string" calcext:value-type="string">
            <text:p>2025-04-02T15:01:57.3477439Z</text:p>
          </table:table-cell>
          <table:table-cell office:value-type="string" calcext:value-type="string">
            <text:p>2025-04-02-15:03:06.5317440</text:p>
          </table:table-cell>
          <table:table-cell table:number-columns-repeated="2"/>
        </table:table-row>
        <table:table-row table:style-name="ro1">
          <table:table-cell office:value-type="float" office:value="605998451" calcext:value-type="float">
            <text:p>605998451</text:p>
          </table:table-cell>
          <table:table-cell office:value-type="float" office:value="796964535.348695" calcext:value-type="float">
            <text:p>796964535.348695</text:p>
          </table:table-cell>
          <table:table-cell/>
          <table:table-cell office:value-type="string" calcext:value-type="string">
            <text:p>2025-04-03T15:02:15.3486950Z</text:p>
          </table:table-cell>
          <table:table-cell office:value-type="string" calcext:value-type="string">
            <text:p>2025-04-03-15:03:24.5326950</text:p>
          </table:table-cell>
          <table:table-cell table:number-columns-repeated="2"/>
        </table:table-row>
        <table:table-row table:style-name="ro1">
          <table:table-cell office:value-type="float" office:value="606063240" calcext:value-type="float">
            <text:p>606063240</text:p>
          </table:table-cell>
          <table:table-cell office:value-type="float" office:value="797029324.349397" calcext:value-type="float">
            <text:p>797029324.349397</text:p>
          </table:table-cell>
          <table:table-cell/>
          <table:table-cell office:value-type="string" calcext:value-type="string">
            <text:p>2025-04-04T09:02:04.3493969Z</text:p>
          </table:table-cell>
          <table:table-cell office:value-type="string" calcext:value-type="string">
            <text:p>2025-04-04-09:03:13.5333969</text:p>
          </table:table-cell>
          <table:table-cell table:number-columns-repeated="2"/>
        </table:table-row>
        <table:table-row table:style-name="ro1">
          <table:table-cell office:value-type="float" office:value="606142443" calcext:value-type="float">
            <text:p>606142443</text:p>
          </table:table-cell>
          <table:table-cell office:value-type="float" office:value="797108527.350219" calcext:value-type="float">
            <text:p>797108527.350219</text:p>
          </table:table-cell>
          <table:table-cell/>
          <table:table-cell office:value-type="string" calcext:value-type="string">
            <text:p>2025-04-05T07:02:07.3502190Z</text:p>
          </table:table-cell>
          <table:table-cell office:value-type="string" calcext:value-type="string">
            <text:p>2025-04-05-07:03:16.5342190</text:p>
          </table:table-cell>
          <table:table-cell table:number-columns-repeated="2"/>
        </table:table-row>
        <table:table-row table:style-name="ro1">
          <table:table-cell office:value-type="float" office:value="606254041" calcext:value-type="float">
            <text:p>606254041</text:p>
          </table:table-cell>
          <table:table-cell office:value-type="float" office:value="797220125.351436" calcext:value-type="float">
            <text:p>797220125.351436</text:p>
          </table:table-cell>
          <table:table-cell/>
          <table:table-cell office:value-type="string" calcext:value-type="string">
            <text:p>2025-04-06T14:02:05.3514360Z</text:p>
          </table:table-cell>
          <table:table-cell office:value-type="string" calcext:value-type="string">
            <text:p>2025-04-06-14:03:14.5354360</text:p>
          </table:table-cell>
          <table:table-cell table:number-columns-repeated="2"/>
        </table:table-row>
        <table:table-row table:style-name="ro1">
          <table:table-cell office:value-type="float" office:value="606333102" calcext:value-type="float">
            <text:p>606333102</text:p>
          </table:table-cell>
          <table:table-cell office:value-type="float" office:value="797299186.352283" calcext:value-type="float">
            <text:p>797299186.352283</text:p>
          </table:table-cell>
          <table:table-cell/>
          <table:table-cell office:value-type="string" calcext:value-type="string">
            <text:p>2025-04-07T11:59:46.3522830Z</text:p>
          </table:table-cell>
          <table:table-cell office:value-type="string" calcext:value-type="string">
            <text:p>2025-04-07-12:00:55.5362830</text:p>
          </table:table-cell>
          <table:table-cell table:number-columns-repeated="2"/>
        </table:table-row>
        <table:table-row table:style-name="ro1">
          <table:table-cell office:value-type="float" office:value="606423113" calcext:value-type="float">
            <text:p>606423113</text:p>
          </table:table-cell>
          <table:table-cell office:value-type="float" office:value="797389197.353252" calcext:value-type="float">
            <text:p>797389197.353252</text:p>
          </table:table-cell>
          <table:table-cell/>
          <table:table-cell office:value-type="string" calcext:value-type="string">
            <text:p>2025-04-08T12:59:57.3532519Z</text:p>
          </table:table-cell>
          <table:table-cell office:value-type="string" calcext:value-type="string">
            <text:p>2025-04-08-13:01:06.5372519</text:p>
          </table:table-cell>
          <table:table-cell table:number-columns-repeated="2"/>
        </table:table-row>
        <table:table-row table:style-name="ro1">
          <table:table-cell office:value-type="float" office:value="606466350" calcext:value-type="float">
            <text:p>606466350</text:p>
          </table:table-cell>
          <table:table-cell office:value-type="float" office:value="797432434.353723" calcext:value-type="float">
            <text:p>797432434.353723</text:p>
          </table:table-cell>
          <table:table-cell/>
          <table:table-cell office:value-type="string" calcext:value-type="string">
            <text:p>2025-04-09T01:00:34.3537229Z</text:p>
          </table:table-cell>
          <table:table-cell office:value-type="string" calcext:value-type="string">
            <text:p>2025-04-09-01:01:43.5377229</text:p>
          </table:table-cell>
          <table:table-cell table:number-columns-repeated="2"/>
        </table:table-row>
        <table:table-row table:style-name="ro1">
          <table:table-cell office:value-type="float" office:value="606595920" calcext:value-type="float">
            <text:p>606595920</text:p>
          </table:table-cell>
          <table:table-cell office:value-type="float" office:value="797562004.355118" calcext:value-type="float">
            <text:p>797562004.355118</text:p>
          </table:table-cell>
          <table:table-cell/>
          <table:table-cell office:value-type="string" calcext:value-type="string">
            <text:p>2025-04-10T13:00:04.3551180Z</text:p>
          </table:table-cell>
          <table:table-cell office:value-type="string" calcext:value-type="string">
            <text:p>2025-04-10-13:01:13.5391180</text:p>
          </table:table-cell>
          <table:table-cell table:number-columns-repeated="2"/>
        </table:table-row>
        <table:table-row table:style-name="ro1">
          <table:table-cell office:value-type="float" office:value="606667969" calcext:value-type="float">
            <text:p>606667969</text:p>
          </table:table-cell>
          <table:table-cell office:value-type="float" office:value="797634053.35591" calcext:value-type="float">
            <text:p>797634053.35591</text:p>
          </table:table-cell>
          <table:table-cell/>
          <table:table-cell office:value-type="string" calcext:value-type="string">
            <text:p>2025-04-11T09:00:53.3559099Z</text:p>
          </table:table-cell>
          <table:table-cell office:value-type="string" calcext:value-type="string">
            <text:p>2025-04-11-09:02:02.5399099</text:p>
          </table:table-cell>
          <table:table-cell table:number-columns-repeated="2"/>
        </table:table-row>
        <table:table-row table:style-name="ro1">
          <table:table-cell office:value-type="float" office:value="606721938" calcext:value-type="float">
            <text:p>606721938</text:p>
          </table:table-cell>
          <table:table-cell office:value-type="float" office:value="797688022.356476" calcext:value-type="float">
            <text:p>797688022.356476</text:p>
          </table:table-cell>
          <table:table-cell/>
          <table:table-cell office:value-type="string" calcext:value-type="string">
            <text:p>2025-04-12T00:00:22.3564759Z</text:p>
          </table:table-cell>
          <table:table-cell office:value-type="string" calcext:value-type="string">
            <text:p>2025-04-12-00:01:31.5404759</text:p>
          </table:table-cell>
          <table:table-cell table:number-columns-repeated="2"/>
        </table:table-row>
        <table:table-row table:style-name="ro1">
          <table:table-cell office:value-type="float" office:value="606912735" calcext:value-type="float">
            <text:p>606912735</text:p>
          </table:table-cell>
          <table:table-cell office:value-type="float" office:value="797878819.358532" calcext:value-type="float">
            <text:p>797878819.358532</text:p>
          </table:table-cell>
          <table:table-cell/>
          <table:table-cell office:value-type="string" calcext:value-type="string">
            <text:p>2025-04-14T05:00:19.3585319Z</text:p>
          </table:table-cell>
          <table:table-cell office:value-type="string" calcext:value-type="string">
            <text:p>2025-04-14-05:01:28.5425319</text:p>
          </table:table-cell>
          <table:table-cell table:number-columns-repeated="2"/>
        </table:table-row>
        <table:table-row table:style-name="ro1">
          <table:table-cell office:value-type="float" office:value="607002745" calcext:value-type="float">
            <text:p>607002745</text:p>
          </table:table-cell>
          <table:table-cell office:value-type="float" office:value="797968829.359505" calcext:value-type="float">
            <text:p>797968829.359505</text:p>
          </table:table-cell>
          <table:table-cell/>
          <table:table-cell office:value-type="string" calcext:value-type="string">
            <text:p>2025-04-15T06:00:29.3595049Z</text:p>
          </table:table-cell>
          <table:table-cell office:value-type="string" calcext:value-type="string">
            <text:p>2025-04-15-06:01:38.5435049</text:p>
          </table:table-cell>
          <table:table-cell table:number-columns-repeated="2"/>
        </table:table-row>
        <table:table-row table:style-name="ro1">
          <table:table-cell office:value-type="float" office:value="607121560" calcext:value-type="float">
            <text:p>607121560</text:p>
          </table:table-cell>
          <table:table-cell office:value-type="float" office:value="798087644.360814" calcext:value-type="float">
            <text:p>798087644.360814</text:p>
          </table:table-cell>
          <table:table-cell/>
          <table:table-cell office:value-type="string" calcext:value-type="string">
            <text:p>2025-04-16T15:00:44.3608139Z</text:p>
          </table:table-cell>
          <table:table-cell office:value-type="string" calcext:value-type="string">
            <text:p>2025-04-16-15:01:53.5448139</text:p>
          </table:table-cell>
          <table:table-cell table:number-columns-repeated="2"/>
        </table:table-row>
        <table:table-row table:style-name="ro1">
          <table:table-cell office:value-type="float" office:value="607179169" calcext:value-type="float">
            <text:p>607179169</text:p>
          </table:table-cell>
          <table:table-cell office:value-type="float" office:value="798145253.361439" calcext:value-type="float">
            <text:p>798145253.361439</text:p>
          </table:table-cell>
          <table:table-cell/>
          <table:table-cell office:value-type="string" calcext:value-type="string">
            <text:p>2025-04-17T07:00:53.3614389Z</text:p>
          </table:table-cell>
          <table:table-cell office:value-type="string" calcext:value-type="string">
            <text:p>2025-04-17-07:02:02.5454390</text:p>
          </table:table-cell>
          <table:table-cell table:number-columns-repeated="2"/>
        </table:table-row>
        <table:table-row table:style-name="ro1">
          <table:table-cell office:value-type="float" office:value="607258354" calcext:value-type="float">
            <text:p>607258354</text:p>
          </table:table-cell>
          <table:table-cell office:value-type="float" office:value="798224438.362269" calcext:value-type="float">
            <text:p>798224438.362269</text:p>
          </table:table-cell>
          <table:table-cell/>
          <table:table-cell office:value-type="string" calcext:value-type="string">
            <text:p>2025-04-18T05:00:38.3622690Z</text:p>
          </table:table-cell>
          <table:table-cell office:value-type="string" calcext:value-type="string">
            <text:p>2025-04-18-05:01:47.5462690</text:p>
          </table:table-cell>
          <table:table-cell table:number-columns-repeated="2"/>
        </table:table-row>
        <table:table-row table:style-name="ro1">
          <table:table-cell office:value-type="float" office:value="607546372" calcext:value-type="float">
            <text:p>607546372</text:p>
          </table:table-cell>
          <table:table-cell office:value-type="float" office:value="798512456.365415" calcext:value-type="float">
            <text:p>798512456.365415</text:p>
          </table:table-cell>
          <table:table-cell/>
          <table:table-cell office:value-type="string" calcext:value-type="string">
            <text:p>2025-04-21T13:00:56.3654149Z</text:p>
          </table:table-cell>
          <table:table-cell office:value-type="string" calcext:value-type="string">
            <text:p>2025-04-21-13:02:05.5494149</text:p>
          </table:table-cell>
          <table:table-cell table:number-columns-repeated="2"/>
        </table:table-row>
        <table:table-row table:style-name="ro1">
          <table:table-cell office:value-type="float" office:value="607611203" calcext:value-type="float">
            <text:p>607611203</text:p>
          </table:table-cell>
          <table:table-cell office:value-type="float" office:value="798577287.366119" calcext:value-type="float">
            <text:p>798577287.366119</text:p>
          </table:table-cell>
          <table:table-cell/>
          <table:table-cell office:value-type="string" calcext:value-type="string">
            <text:p>2025-04-22T07:01:27.3661190Z</text:p>
          </table:table-cell>
          <table:table-cell office:value-type="string" calcext:value-type="string">
            <text:p>2025-04-22-07:02:36.5501190</text:p>
          </table:table-cell>
          <table:table-cell table:number-columns-repeated="2"/>
        </table:table-row>
        <table:table-row table:style-name="ro1">
          <table:table-cell office:value-type="float" office:value="607726386" calcext:value-type="float">
            <text:p>607726386</text:p>
          </table:table-cell>
          <table:table-cell office:value-type="float" office:value="798692470.367379" calcext:value-type="float">
            <text:p>798692470.367379</text:p>
          </table:table-cell>
          <table:table-cell/>
          <table:table-cell office:value-type="string" calcext:value-type="string">
            <text:p>2025-04-23T15:01:10.3673789Z</text:p>
          </table:table-cell>
          <table:table-cell office:value-type="string" calcext:value-type="string">
            <text:p>2025-04-23-15:02:19.5513789</text:p>
          </table:table-cell>
          <table:table-cell table:number-columns-repeated="2"/>
        </table:table-row>
        <table:table-row table:style-name="ro1">
          <table:table-cell office:value-type="float" office:value="607798385" calcext:value-type="float">
            <text:p>607798385</text:p>
          </table:table-cell>
          <table:table-cell office:value-type="float" office:value="798764469.368128" calcext:value-type="float">
            <text:p>798764469.368128</text:p>
          </table:table-cell>
          <table:table-cell/>
          <table:table-cell office:value-type="string" calcext:value-type="string">
            <text:p>2025-04-24T11:01:09.3681279Z</text:p>
          </table:table-cell>
          <table:table-cell office:value-type="string" calcext:value-type="string">
            <text:p>2025-04-24-11:02:18.5521279</text:p>
          </table:table-cell>
          <table:table-cell table:number-columns-repeated="2"/>
        </table:table-row>
        <table:table-row table:style-name="ro1">
          <table:table-cell office:value-type="float" office:value="607863189" calcext:value-type="float">
            <text:p>607863189</text:p>
          </table:table-cell>
          <table:table-cell office:value-type="float" office:value="798829273.368841" calcext:value-type="float">
            <text:p>798829273.368841</text:p>
          </table:table-cell>
          <table:table-cell/>
          <table:table-cell office:value-type="string" calcext:value-type="string">
            <text:p>2025-04-25T05:01:13.3688409Z</text:p>
          </table:table-cell>
          <table:table-cell office:value-type="string" calcext:value-type="string">
            <text:p>2025-04-25-05:02:22.5528409</text:p>
          </table:table-cell>
          <table:table-cell table:number-columns-repeated="2"/>
        </table:table-row>
        <table:table-row table:style-name="ro1">
          <table:table-cell office:value-type="float" office:value="608068404" calcext:value-type="float">
            <text:p>608068404</text:p>
          </table:table-cell>
          <table:table-cell office:value-type="float" office:value="799034488.371087" calcext:value-type="float">
            <text:p>799034488.371087</text:p>
          </table:table-cell>
          <table:table-cell/>
          <table:table-cell office:value-type="string" calcext:value-type="string">
            <text:p>2025-04-27T14:01:28.3710869Z</text:p>
          </table:table-cell>
          <table:table-cell office:value-type="string" calcext:value-type="string">
            <text:p>2025-04-27-14:02:37.5550869</text:p>
          </table:table-cell>
          <table:table-cell table:number-columns-repeated="2"/>
        </table:table-row>
        <table:table-row table:style-name="ro1">
          <table:table-cell office:value-type="float" office:value="608133247" calcext:value-type="float">
            <text:p>608133247</text:p>
          </table:table-cell>
          <table:table-cell office:value-type="float" office:value="799099331.371798" calcext:value-type="float">
            <text:p>799099331.371798</text:p>
          </table:table-cell>
          <table:table-cell/>
          <table:table-cell office:value-type="string" calcext:value-type="string">
            <text:p>2025-04-28T08:02:11.3717980Z</text:p>
          </table:table-cell>
          <table:table-cell office:value-type="string" calcext:value-type="string">
            <text:p>2025-04-28-08:03:20.5557980</text:p>
          </table:table-cell>
          <table:table-cell table:number-columns-repeated="2"/>
        </table:table-row>
        <table:table-row table:style-name="ro1">
          <table:table-cell office:value-type="float" office:value="608219656" calcext:value-type="float">
            <text:p>608219656</text:p>
          </table:table-cell>
          <table:table-cell office:value-type="float" office:value="799185740.372745" calcext:value-type="float">
            <text:p>799185740.372745</text:p>
          </table:table-cell>
          <table:table-cell/>
          <table:table-cell office:value-type="string" calcext:value-type="string">
            <text:p>2025-04-29T08:02:20.3727450Z</text:p>
          </table:table-cell>
          <table:table-cell office:value-type="string" calcext:value-type="string">
            <text:p>2025-04-29-08:03:29.5567450</text:p>
          </table:table-cell>
          <table:table-cell table:number-columns-repeated="2"/>
        </table:table-row>
        <table:table-row table:style-name="ro1">
          <table:table-cell office:value-type="float" office:value="608295211" calcext:value-type="float">
            <text:p>608295211</text:p>
          </table:table-cell>
          <table:table-cell office:value-type="float" office:value="799261295.373539" calcext:value-type="float">
            <text:p>799261295.373539</text:p>
          </table:table-cell>
          <table:table-cell/>
          <table:table-cell office:value-type="string" calcext:value-type="string">
            <text:p>2025-04-30T05:01:35.3735389Z</text:p>
          </table:table-cell>
          <table:table-cell office:value-type="string" calcext:value-type="string">
            <text:p>2025-04-30-05:02:44.5575389</text:p>
          </table:table-cell>
          <table:table-cell table:number-columns-repeated="2"/>
        </table:table-row>
        <table:table-row table:style-name="ro1">
          <table:table-cell office:value-type="float" office:value="608410413" calcext:value-type="float">
            <text:p>608410413</text:p>
          </table:table-cell>
          <table:table-cell office:value-type="float" office:value="799376497.374805" calcext:value-type="float">
            <text:p>799376497.374805</text:p>
          </table:table-cell>
          <table:table-cell/>
          <table:table-cell office:value-type="string" calcext:value-type="string">
            <text:p>2025-05-01T13:01:37.3748049Z</text:p>
          </table:table-cell>
          <table:table-cell office:value-type="string" calcext:value-type="string">
            <text:p>2025-05-01-13:02:46.5588049</text:p>
          </table:table-cell>
          <table:table-cell table:number-columns-repeated="2"/>
        </table:table-row>
        <table:table-row table:style-name="ro1">
          <table:table-cell office:value-type="float" office:value="608504182" calcext:value-type="float">
            <text:p>608504182</text:p>
          </table:table-cell>
          <table:table-cell office:value-type="float" office:value="799470266.375866" calcext:value-type="float">
            <text:p>799470266.375866</text:p>
          </table:table-cell>
          <table:table-cell/>
          <table:table-cell office:value-type="string" calcext:value-type="string">
            <text:p>2025-05-02T15:04:26.3758659Z</text:p>
          </table:table-cell>
          <table:table-cell office:value-type="string" calcext:value-type="string">
            <text:p>2025-05-02-15:05:35.5598659</text:p>
          </table:table-cell>
          <table:table-cell table:number-columns-repeated="2"/>
        </table:table-row>
        <table:table-row table:style-name="ro1">
          <table:table-cell office:value-type="float" office:value="608507749" calcext:value-type="float">
            <text:p>608507749</text:p>
          </table:table-cell>
          <table:table-cell office:value-type="float" office:value="799473833.375853" calcext:value-type="float">
            <text:p>799473833.375853</text:p>
          </table:table-cell>
          <table:table-cell/>
          <table:table-cell office:value-type="string" calcext:value-type="string">
            <text:p>2025-05-02T16:03:53.3758529Z</text:p>
          </table:table-cell>
          <table:table-cell office:value-type="string" calcext:value-type="string">
            <text:p>2025-05-02-16:05:02.5598529</text:p>
          </table:table-cell>
          <table:table-cell table:number-columns-repeated="2"/>
        </table:table-row>
        <table:table-row table:style-name="ro1">
          <table:table-cell office:value-type="float" office:value="608705671" calcext:value-type="float">
            <text:p>608705671</text:p>
          </table:table-cell>
          <table:table-cell office:value-type="float" office:value="799671755.378037" calcext:value-type="float">
            <text:p>799671755.378037</text:p>
          </table:table-cell>
          <table:table-cell/>
          <table:table-cell office:value-type="string" calcext:value-type="string">
            <text:p>2025-05-04T23:02:35.3780369Z</text:p>
          </table:table-cell>
          <table:table-cell office:value-type="string" calcext:value-type="string">
            <text:p>2025-05-04-23:03:44.5620369</text:p>
          </table:table-cell>
          <table:table-cell table:number-columns-repeated="2"/>
        </table:table-row>
        <table:table-row table:style-name="ro1">
          <table:table-cell office:value-type="float" office:value="608846168" calcext:value-type="float">
            <text:p>608846168</text:p>
          </table:table-cell>
          <table:table-cell office:value-type="float" office:value="799812252.379575" calcext:value-type="float">
            <text:p>799812252.379575</text:p>
          </table:table-cell>
          <table:table-cell/>
          <table:table-cell office:value-type="string" calcext:value-type="string">
            <text:p>2025-05-06T14:04:12.3795750Z</text:p>
          </table:table-cell>
          <table:table-cell office:value-type="string" calcext:value-type="string">
            <text:p>2025-05-06-14:05:21.5635750</text:p>
          </table:table-cell>
          <table:table-cell table:number-columns-repeated="2"/>
        </table:table-row>
        <table:table-row table:style-name="ro1">
          <table:table-cell office:value-type="float" office:value="608907283" calcext:value-type="float">
            <text:p>608907283</text:p>
          </table:table-cell>
          <table:table-cell office:value-type="float" office:value="799873367.38024" calcext:value-type="float">
            <text:p>799873367.38024</text:p>
          </table:table-cell>
          <table:table-cell/>
          <table:table-cell office:value-type="string" calcext:value-type="string">
            <text:p>2025-05-07T07:02:47.3802399Z</text:p>
          </table:table-cell>
          <table:table-cell office:value-type="string" calcext:value-type="string">
            <text:p>2025-05-07-07:03:56.5642399</text:p>
          </table:table-cell>
          <table:table-cell table:number-columns-repeated="2"/>
        </table:table-row>
        <table:table-row table:style-name="ro1">
          <table:table-cell office:value-type="float" office:value="608990056" calcext:value-type="float">
            <text:p>608990056</text:p>
          </table:table-cell>
          <table:table-cell office:value-type="float" office:value="799956140.381138" calcext:value-type="float">
            <text:p>799956140.381138</text:p>
          </table:table-cell>
          <table:table-cell/>
          <table:table-cell office:value-type="string" calcext:value-type="string">
            <text:p>2025-05-08T06:02:20.3811379Z</text:p>
          </table:table-cell>
          <table:table-cell office:value-type="string" calcext:value-type="string">
            <text:p>2025-05-08-06:03:29.5651379</text:p>
          </table:table-cell>
          <table:table-cell table:number-columns-repeated="2"/>
        </table:table-row>
        <table:table-row table:style-name="ro1">
          <table:table-cell office:value-type="float" office:value="609137674" calcext:value-type="float">
            <text:p>609137674</text:p>
          </table:table-cell>
          <table:table-cell office:value-type="float" office:value="800103758.382755" calcext:value-type="float">
            <text:p>800103758.382755</text:p>
          </table:table-cell>
          <table:table-cell/>
          <table:table-cell office:value-type="string" calcext:value-type="string">
            <text:p>2025-05-09T23:02:38.3827550Z</text:p>
          </table:table-cell>
          <table:table-cell office:value-type="string" calcext:value-type="string">
            <text:p>2025-05-09-23:03:47.5667550</text:p>
          </table:table-cell>
          <table:table-cell table:number-columns-repeated="2"/>
        </table:table-row>
        <table:table-row table:style-name="ro1">
          <table:table-cell office:value-type="float" office:value="609364594" calcext:value-type="float">
            <text:p>609364594</text:p>
          </table:table-cell>
          <table:table-cell office:value-type="float" office:value="800330678.385227" calcext:value-type="float">
            <text:p>800330678.385227</text:p>
          </table:table-cell>
          <table:table-cell/>
          <table:table-cell office:value-type="string" calcext:value-type="string">
            <text:p>2025-05-12T14:04:38.3852269Z</text:p>
          </table:table-cell>
          <table:table-cell office:value-type="string" calcext:value-type="string">
            <text:p>2025-05-12-14:05:47.5692269</text:p>
          </table:table-cell>
          <table:table-cell table:number-columns-repeated="2"/>
        </table:table-row>
        <table:table-row table:style-name="ro1">
          <table:table-cell office:value-type="float" office:value="609411252" calcext:value-type="float">
            <text:p>609411252</text:p>
          </table:table-cell>
          <table:table-cell office:value-type="float" office:value="800377336.385748" calcext:value-type="float">
            <text:p>800377336.385748</text:p>
          </table:table-cell>
          <table:table-cell/>
          <table:table-cell office:value-type="string" calcext:value-type="string">
            <text:p>2025-05-13T03:02:16.3857480Z</text:p>
          </table:table-cell>
          <table:table-cell office:value-type="string" calcext:value-type="string">
            <text:p>2025-05-13-03:03:25.5697480</text:p>
          </table:table-cell>
          <table:table-cell table:number-columns-repeated="2"/>
        </table:table-row>
        <table:table-row table:style-name="ro1">
          <table:table-cell office:value-type="float" office:value="609508489" calcext:value-type="float">
            <text:p>609508489</text:p>
          </table:table-cell>
          <table:table-cell office:value-type="float" office:value="800474573.386819" calcext:value-type="float">
            <text:p>800474573.386819</text:p>
          </table:table-cell>
          <table:table-cell/>
          <table:table-cell office:value-type="string" calcext:value-type="string">
            <text:p>2025-05-14T06:02:53.3868190Z</text:p>
          </table:table-cell>
          <table:table-cell office:value-type="string" calcext:value-type="string">
            <text:p>2025-05-14-06:04:02.5708190</text:p>
          </table:table-cell>
          <table:table-cell table:number-columns-repeated="2"/>
        </table:table-row>
        <table:table-row table:style-name="ro1">
          <table:table-cell office:value-type="float" office:value="609594879" calcext:value-type="float">
            <text:p>609594879</text:p>
          </table:table-cell>
          <table:table-cell office:value-type="float" office:value="800560963.387764" calcext:value-type="float">
            <text:p>800560963.387764</text:p>
          </table:table-cell>
          <table:table-cell/>
          <table:table-cell office:value-type="string" calcext:value-type="string">
            <text:p>2025-05-15T06:02:43.3877639Z</text:p>
          </table:table-cell>
          <table:table-cell office:value-type="string" calcext:value-type="string">
            <text:p>2025-05-15-06:03:52.5717639</text:p>
          </table:table-cell>
          <table:table-cell table:number-columns-repeated="2"/>
        </table:table-row>
        <table:table-row table:style-name="ro1">
          <table:table-cell office:value-type="float" office:value="609681331" calcext:value-type="float">
            <text:p>609681331</text:p>
          </table:table-cell>
          <table:table-cell office:value-type="float" office:value="800647415.388716" calcext:value-type="float">
            <text:p>800647415.388716</text:p>
          </table:table-cell>
          <table:table-cell/>
          <table:table-cell office:value-type="string" calcext:value-type="string">
            <text:p>2025-05-16T06:03:35.3887159Z</text:p>
          </table:table-cell>
          <table:table-cell office:value-type="string" calcext:value-type="string">
            <text:p>2025-05-16-06:04:44.5727159</text:p>
          </table:table-cell>
          <table:table-cell table:number-columns-repeated="2"/>
        </table:table-row>
        <table:table-row table:style-name="ro1">
          <table:table-cell office:value-type="float" office:value="609915316" calcext:value-type="float">
            <text:p>609915316</text:p>
          </table:table-cell>
          <table:table-cell office:value-type="float" office:value="800881400.391276" calcext:value-type="float">
            <text:p>800881400.391276</text:p>
          </table:table-cell>
          <table:table-cell/>
          <table:table-cell office:value-type="string" calcext:value-type="string">
            <text:p>2025-05-18T23:03:20.3912760Z</text:p>
          </table:table-cell>
          <table:table-cell office:value-type="string" calcext:value-type="string">
            <text:p>2025-05-18-23:04:29.5752760</text:p>
          </table:table-cell>
          <table:table-cell table:number-columns-repeated="2"/>
        </table:table-row>
        <table:table-row table:style-name="ro1">
          <table:table-cell office:value-type="float" office:value="610026895" calcext:value-type="float">
            <text:p>610026895</text:p>
          </table:table-cell>
          <table:table-cell office:value-type="float" office:value="800992979.392504" calcext:value-type="float">
            <text:p>800992979.392504</text:p>
          </table:table-cell>
          <table:table-cell/>
          <table:table-cell office:value-type="string" calcext:value-type="string">
            <text:p>2025-05-20T06:02:59.3925039Z</text:p>
          </table:table-cell>
          <table:table-cell office:value-type="string" calcext:value-type="string">
            <text:p>2025-05-20-06:04:08.5765039</text:p>
          </table:table-cell>
          <table:table-cell table:number-columns-repeated="2"/>
        </table:table-row>
        <table:table-row table:style-name="ro1">
          <table:table-cell office:value-type="float" office:value="610142245" calcext:value-type="float">
            <text:p>610142245</text:p>
          </table:table-cell>
          <table:table-cell office:value-type="float" office:value="801108329.393774" calcext:value-type="float">
            <text:p>801108329.393774</text:p>
          </table:table-cell>
          <table:table-cell/>
          <table:table-cell office:value-type="string" calcext:value-type="string">
            <text:p>2025-05-21T14:05:29.3937740Z</text:p>
          </table:table-cell>
          <table:table-cell office:value-type="string" calcext:value-type="string">
            <text:p>2025-05-21-14:06:38.5777740</text:p>
          </table:table-cell>
          <table:table-cell table:number-columns-repeated="2"/>
        </table:table-row>
        <table:table-row table:style-name="ro1">
          <table:table-cell office:value-type="float" office:value="610199736" calcext:value-type="float">
            <text:p>610199736</text:p>
          </table:table-cell>
          <table:table-cell office:value-type="float" office:value="801165820.394417" calcext:value-type="float">
            <text:p>801165820.394417</text:p>
          </table:table-cell>
          <table:table-cell/>
          <table:table-cell office:value-type="string" calcext:value-type="string">
            <text:p>2025-05-22T06:03:40.3944169Z</text:p>
          </table:table-cell>
          <table:table-cell office:value-type="string" calcext:value-type="string">
            <text:p>2025-05-22-06:04:49.5784169</text:p>
          </table:table-cell>
          <table:table-cell table:number-columns-repeated="2"/>
        </table:table-row>
        <table:table-row table:style-name="ro1">
          <table:table-cell office:value-type="float" office:value="610257320" calcext:value-type="float">
            <text:p>610257320</text:p>
          </table:table-cell>
          <table:table-cell office:value-type="float" office:value="801223404.395031" calcext:value-type="float">
            <text:p>801223404.395031</text:p>
          </table:table-cell>
          <table:table-cell/>
          <table:table-cell office:value-type="string" calcext:value-type="string">
            <text:p>2025-05-22T22:03:24.3950309Z</text:p>
          </table:table-cell>
          <table:table-cell office:value-type="string" calcext:value-type="string">
            <text:p>2025-05-22-22:04:33.5790309</text:p>
          </table:table-cell>
          <table:table-cell table:number-columns-repeated="2"/>
        </table:table-row>
        <table:table-row table:style-name="ro1">
          <table:table-cell office:value-type="float" office:value="610372536" calcext:value-type="float">
            <text:p>610372536</text:p>
          </table:table-cell>
          <table:table-cell office:value-type="float" office:value="801338620.395884" calcext:value-type="float">
            <text:p>801338620.395884</text:p>
          </table:table-cell>
          <table:table-cell/>
          <table:table-cell office:value-type="string" calcext:value-type="string">
            <text:p>2025-05-24T06:03:40.3958840Z</text:p>
          </table:table-cell>
          <table:table-cell office:value-type="string" calcext:value-type="string">
            <text:p>2025-05-24-06:04:49.5798840</text:p>
          </table:table-cell>
          <table:table-cell table:number-columns-repeated="2"/>
        </table:table-row>
        <table:table-row table:style-name="ro1">
          <table:table-cell office:value-type="float" office:value="610430121" calcext:value-type="float">
            <text:p>610430121</text:p>
          </table:table-cell>
          <table:table-cell office:value-type="float" office:value="801396205.396937" calcext:value-type="float">
            <text:p>801396205.396937</text:p>
          </table:table-cell>
          <table:table-cell/>
          <table:table-cell office:value-type="string" calcext:value-type="string">
            <text:p>2025-05-24T22:03:25.3969370Z</text:p>
          </table:table-cell>
          <table:table-cell office:value-type="string" calcext:value-type="string">
            <text:p>2025-05-24-22:04:34.5809370</text:p>
          </table:table-cell>
          <table:table-cell table:number-columns-repeated="2"/>
        </table:table-row>
        <table:table-row table:style-name="ro1">
          <table:table-cell office:value-type="float" office:value="610570639" calcext:value-type="float">
            <text:p>610570639</text:p>
          </table:table-cell>
          <table:table-cell office:value-type="float" office:value="801536723.398508" calcext:value-type="float">
            <text:p>801536723.398508</text:p>
          </table:table-cell>
          <table:table-cell/>
          <table:table-cell office:value-type="string" calcext:value-type="string">
            <text:p>2025-05-26T13:05:23.3985079Z</text:p>
          </table:table-cell>
          <table:table-cell office:value-type="string" calcext:value-type="string">
            <text:p>2025-05-26-13:06:32.5825079</text:p>
          </table:table-cell>
          <table:table-cell table:number-columns-repeated="2"/>
        </table:table-row>
        <table:table-row table:style-name="ro1">
          <table:table-cell office:value-type="float" office:value="610631744" calcext:value-type="float">
            <text:p>610631744</text:p>
          </table:table-cell>
          <table:table-cell office:value-type="float" office:value="801597828.39875" calcext:value-type="float">
            <text:p>801597828.39875</text:p>
          </table:table-cell>
          <table:table-cell/>
          <table:table-cell office:value-type="string" calcext:value-type="string">
            <text:p>2025-05-27T06:03:48.3987499Z</text:p>
          </table:table-cell>
          <table:table-cell office:value-type="string" calcext:value-type="string">
            <text:p>2025-05-27-06:04:57.5827499</text:p>
          </table:table-cell>
          <table:table-cell table:number-columns-repeated="2"/>
        </table:table-row>
        <table:table-row table:style-name="ro1">
          <table:table-cell office:value-type="float" office:value="610804544" calcext:value-type="float">
            <text:p>610804544</text:p>
          </table:table-cell>
          <table:table-cell office:value-type="float" office:value="801770628.40105" calcext:value-type="float">
            <text:p>801770628.40105</text:p>
          </table:table-cell>
          <table:table-cell/>
          <table:table-cell office:value-type="string" calcext:value-type="string">
            <text:p>2025-05-29T06:03:48.4010499Z</text:p>
          </table:table-cell>
          <table:table-cell office:value-type="string" calcext:value-type="string">
            <text:p>2025-05-29-06:04:57.5850499</text:p>
          </table:table-cell>
          <table:table-cell table:number-columns-repeated="2"/>
        </table:table-row>
        <table:table-row table:style-name="ro1">
          <table:table-cell office:value-type="float" office:value="610862127" calcext:value-type="float">
            <text:p>610862127</text:p>
          </table:table-cell>
          <table:table-cell office:value-type="float" office:value="801828211.401683" calcext:value-type="float">
            <text:p>801828211.401683</text:p>
          </table:table-cell>
          <table:table-cell/>
          <table:table-cell office:value-type="string" calcext:value-type="string">
            <text:p>2025-05-29T22:03:31.4016829Z</text:p>
          </table:table-cell>
          <table:table-cell office:value-type="string" calcext:value-type="string">
            <text:p>2025-05-29-22:04:40.5856829</text:p>
          </table:table-cell>
          <table:table-cell table:number-columns-repeated="2"/>
        </table:table-row>
        <table:table-row table:style-name="ro1">
          <table:table-cell office:value-type="float" office:value="611146518" calcext:value-type="float">
            <text:p>611146518</text:p>
          </table:table-cell>
          <table:table-cell office:value-type="float" office:value="802112602.404827" calcext:value-type="float">
            <text:p>802112602.404827</text:p>
          </table:table-cell>
          <table:table-cell/>
          <table:table-cell office:value-type="string" calcext:value-type="string">
            <text:p>2025-06-02T05:03:22.4048269Z</text:p>
          </table:table-cell>
          <table:table-cell office:value-type="string" calcext:value-type="string">
            <text:p>2025-06-02-05:04:31.5888270</text:p>
          </table:table-cell>
          <table:table-cell table:number-columns-repeated="2"/>
        </table:table-row>
        <table:table-row table:style-name="ro1">
          <table:table-cell office:value-type="float" office:value="611229310" calcext:value-type="float">
            <text:p>611229310</text:p>
          </table:table-cell>
          <table:table-cell office:value-type="float" office:value="802195394.405739" calcext:value-type="float">
            <text:p>802195394.405739</text:p>
          </table:table-cell>
          <table:table-cell/>
          <table:table-cell office:value-type="string" calcext:value-type="string">
            <text:p>2025-06-03T04:03:14.4057389Z</text:p>
          </table:table-cell>
          <table:table-cell office:value-type="string" calcext:value-type="string">
            <text:p>2025-06-03-04:04:23.5897389</text:p>
          </table:table-cell>
          <table:table-cell table:number-columns-repeated="2"/>
        </table:table-row>
        <table:table-row table:style-name="ro1">
          <table:table-cell office:value-type="float" office:value="611348237" calcext:value-type="float">
            <text:p>611348237</text:p>
          </table:table-cell>
          <table:table-cell office:value-type="float" office:value="802314321.407029" calcext:value-type="float">
            <text:p>802314321.407029</text:p>
          </table:table-cell>
          <table:table-cell/>
          <table:table-cell office:value-type="string" calcext:value-type="string">
            <text:p>2025-06-04T13:05:21.4070290Z</text:p>
          </table:table-cell>
          <table:table-cell office:value-type="string" calcext:value-type="string">
            <text:p>2025-06-04-13:06:30.5910290</text:p>
          </table:table-cell>
          <table:table-cell table:number-columns-repeated="2"/>
        </table:table-row>
        <table:table-row table:style-name="ro1">
          <table:table-cell office:value-type="float" office:value="611463325" calcext:value-type="float">
            <text:p>611463325</text:p>
          </table:table-cell>
          <table:table-cell office:value-type="float" office:value="802429409.408313" calcext:value-type="float">
            <text:p>802429409.408313</text:p>
          </table:table-cell>
          <table:table-cell/>
          <table:table-cell office:value-type="string" calcext:value-type="string">
            <text:p>2025-06-05T21:03:29.4083130Z</text:p>
          </table:table-cell>
          <table:table-cell office:value-type="string" calcext:value-type="string">
            <text:p>2025-06-05-21:04:38.5923130</text:p>
          </table:table-cell>
          <table:table-cell table:number-columns-repeated="2"/>
        </table:table-row>
        <table:table-row table:style-name="ro1">
          <table:table-cell office:value-type="float" office:value="611549724" calcext:value-type="float">
            <text:p>611549724</text:p>
          </table:table-cell>
          <table:table-cell office:value-type="float" office:value="802515808.409269" calcext:value-type="float">
            <text:p>802515808.409269</text:p>
          </table:table-cell>
          <table:table-cell/>
          <table:table-cell office:value-type="string" calcext:value-type="string">
            <text:p>2025-06-06T21:03:28.4092689Z</text:p>
          </table:table-cell>
          <table:table-cell office:value-type="string" calcext:value-type="string">
            <text:p>2025-06-06-21:04:37.5932689</text:p>
          </table:table-cell>
          <table:table-cell table:number-columns-repeated="2"/>
        </table:table-row>
        <table:table-row table:style-name="ro1">
          <table:table-cell office:value-type="float" office:value="611747719" calcext:value-type="float">
            <text:p>611747719</text:p>
          </table:table-cell>
          <table:table-cell office:value-type="float" office:value="802713803.411449" calcext:value-type="float">
            <text:p>802713803.411449</text:p>
          </table:table-cell>
          <table:table-cell/>
          <table:table-cell office:value-type="string" calcext:value-type="string">
            <text:p>2025-06-09T04:03:23.4114489Z</text:p>
          </table:table-cell>
          <table:table-cell office:value-type="string" calcext:value-type="string">
            <text:p>2025-06-09-04:04:32.5954489</text:p>
          </table:table-cell>
          <table:table-cell table:number-columns-repeated="2"/>
        </table:table-row>
        <table:table-row table:style-name="ro1">
          <table:table-cell office:value-type="float" office:value="611874980" calcext:value-type="float">
            <text:p>611874980</text:p>
          </table:table-cell>
          <table:table-cell office:value-type="float" office:value="802841064.412828" calcext:value-type="float">
            <text:p>802841064.412828</text:p>
          </table:table-cell>
          <table:table-cell/>
          <table:table-cell office:value-type="string" calcext:value-type="string">
            <text:p>2025-06-10T15:24:24.4128279Z</text:p>
          </table:table-cell>
          <table:table-cell office:value-type="string" calcext:value-type="string">
            <text:p>2025-06-10-15:25:33.5968279</text:p>
          </table:table-cell>
          <table:table-cell table:number-columns-repeated="2"/>
        </table:table-row>
        <table:table-row table:style-name="ro1">
          <table:table-cell office:value-type="float" office:value="611924143" calcext:value-type="float">
            <text:p>611924143</text:p>
          </table:table-cell>
          <table:table-cell office:value-type="float" office:value="802890227.413402" calcext:value-type="float">
            <text:p>802890227.413402</text:p>
          </table:table-cell>
          <table:table-cell/>
          <table:table-cell office:value-type="string" calcext:value-type="string">
            <text:p>2025-06-11T05:03:47.4134019Z</text:p>
          </table:table-cell>
          <table:table-cell office:value-type="string" calcext:value-type="string">
            <text:p>2025-06-11-05:04:56.5974019</text:p>
          </table:table-cell>
          <table:table-cell table:number-columns-repeated="2"/>
        </table:table-row>
        <table:table-row table:style-name="ro1">
          <table:table-cell office:value-type="float" office:value="611981748" calcext:value-type="float">
            <text:p>611981748</text:p>
          </table:table-cell>
          <table:table-cell office:value-type="float" office:value="802947832.414046" calcext:value-type="float">
            <text:p>802947832.414046</text:p>
          </table:table-cell>
          <table:table-cell/>
          <table:table-cell office:value-type="string" calcext:value-type="string">
            <text:p>2025-06-11T21:03:52.4140459Z</text:p>
          </table:table-cell>
          <table:table-cell office:value-type="string" calcext:value-type="string">
            <text:p>2025-06-11-21:05:01.5980459</text:p>
          </table:table-cell>
          <table:table-cell table:number-columns-repeated="2"/>
        </table:table-row>
        <table:table-row table:style-name="ro1">
          <table:table-cell office:value-type="float" office:value="612096944" calcext:value-type="float">
            <text:p>612096944</text:p>
          </table:table-cell>
          <table:table-cell office:value-type="float" office:value="803063028.415322" calcext:value-type="float">
            <text:p>803063028.415322</text:p>
          </table:table-cell>
          <table:table-cell/>
          <table:table-cell office:value-type="string" calcext:value-type="string">
            <text:p>2025-06-13T05:03:48.4153219Z</text:p>
          </table:table-cell>
          <table:table-cell office:value-type="string" calcext:value-type="string">
            <text:p>2025-06-13-05:04:57.5993219</text:p>
          </table:table-cell>
          <table:table-cell table:number-columns-repeated="2"/>
        </table:table-row>
        <table:table-row table:style-name="ro1">
          <table:table-cell office:value-type="float" office:value="612341703" calcext:value-type="float">
            <text:p>612341703</text:p>
          </table:table-cell>
          <table:table-cell office:value-type="float" office:value="803307787.417995" calcext:value-type="float">
            <text:p>803307787.417995</text:p>
          </table:table-cell>
          <table:table-cell/>
          <table:table-cell office:value-type="string" calcext:value-type="string">
            <text:p>2025-06-16T01:03:07.4179949Z</text:p>
          </table:table-cell>
          <table:table-cell office:value-type="string" calcext:value-type="string">
            <text:p>2025-06-16-01:04:16.6019949</text:p>
          </table:table-cell>
          <table:table-cell table:number-columns-repeated="2"/>
        </table:table-row>
        <table:table-row table:style-name="ro1">
          <table:table-cell office:value-type="float" office:value="612406494" calcext:value-type="float">
            <text:p>612406494</text:p>
          </table:table-cell>
          <table:table-cell office:value-type="float" office:value="803372578.418716" calcext:value-type="float">
            <text:p>803372578.418716</text:p>
          </table:table-cell>
          <table:table-cell/>
          <table:table-cell office:value-type="string" calcext:value-type="string">
            <text:p>2025-06-16T19:02:58.4187159Z</text:p>
          </table:table-cell>
          <table:table-cell office:value-type="string" calcext:value-type="string">
            <text:p>2025-06-16-19:04:07.6027159</text:p>
          </table:table-cell>
          <table:table-cell table:number-columns-repeated="2"/>
        </table:table-row>
        <table:table-row table:style-name="ro1">
          <table:table-cell office:value-type="float" office:value="612525355" calcext:value-type="float">
            <text:p>612525355</text:p>
          </table:table-cell>
          <table:table-cell office:value-type="float" office:value="803491439.420042" calcext:value-type="float">
            <text:p>803491439.420042</text:p>
          </table:table-cell>
          <table:table-cell/>
          <table:table-cell office:value-type="string" calcext:value-type="string">
            <text:p>2025-06-18T04:03:59.4200420Z</text:p>
          </table:table-cell>
          <table:table-cell office:value-type="string" calcext:value-type="string">
            <text:p>2025-06-18-04:05:08.6040420</text:p>
          </table:table-cell>
          <table:table-cell table:number-columns-repeated="2"/>
        </table:table-row>
        <table:table-row table:style-name="ro1">
          <table:table-cell office:value-type="float" office:value="612611741" calcext:value-type="float">
            <text:p>612611741</text:p>
          </table:table-cell>
          <table:table-cell office:value-type="float" office:value="803577825.421004" calcext:value-type="float">
            <text:p>803577825.421004</text:p>
          </table:table-cell>
          <table:table-cell/>
          <table:table-cell office:value-type="string" calcext:value-type="string">
            <text:p>2025-06-19T04:03:45.4210039Z</text:p>
          </table:table-cell>
          <table:table-cell office:value-type="string" calcext:value-type="string">
            <text:p>2025-06-19-04:04:54.6050039</text:p>
          </table:table-cell>
          <table:table-cell table:number-columns-repeated="2"/>
        </table:table-row>
        <table:table-row table:style-name="ro1">
          <table:table-cell office:value-type="float" office:value="612698146" calcext:value-type="float">
            <text:p>612698146</text:p>
          </table:table-cell>
          <table:table-cell office:value-type="float" office:value="803664230.421948" calcext:value-type="float">
            <text:p>803664230.421948</text:p>
          </table:table-cell>
          <table:table-cell/>
          <table:table-cell office:value-type="string" calcext:value-type="string">
            <text:p>2025-06-20T04:03:50.4219479Z</text:p>
          </table:table-cell>
          <table:table-cell office:value-type="string" calcext:value-type="string">
            <text:p>2025-06-20-04:04:59.6059479</text:p>
          </table:table-cell>
          <table:table-cell table:number-columns-repeated="2"/>
        </table:table-row>
        <table:table-row table:style-name="ro1">
          <table:table-cell office:value-type="float" office:value="612957343" calcext:value-type="float">
            <text:p>612957343</text:p>
          </table:table-cell>
          <table:table-cell office:value-type="float" office:value="803923427.424824" calcext:value-type="float">
            <text:p>803923427.424824</text:p>
          </table:table-cell>
          <table:table-cell/>
          <table:table-cell office:value-type="string" calcext:value-type="string">
            <text:p>2025-06-23T04:03:47.4248239Z</text:p>
          </table:table-cell>
          <table:table-cell office:value-type="string" calcext:value-type="string">
            <text:p>2025-06-23-04:04:56.6088240</text:p>
          </table:table-cell>
          <table:table-cell table:number-columns-repeated="2"/>
        </table:table-row>
        <table:table-row table:style-name="ro1">
          <table:table-cell office:value-type="float" office:value="613014938" calcext:value-type="float">
            <text:p>613014938</text:p>
          </table:table-cell>
          <table:table-cell office:value-type="float" office:value="803981022.425466" calcext:value-type="float">
            <text:p>803981022.425466</text:p>
          </table:table-cell>
          <table:table-cell/>
          <table:table-cell office:value-type="string" calcext:value-type="string">
            <text:p>2025-06-23T20:03:42.4254659Z</text:p>
          </table:table-cell>
          <table:table-cell office:value-type="string" calcext:value-type="string">
            <text:p>2025-06-23-20:04:51.6094659</text:p>
          </table:table-cell>
          <table:table-cell table:number-columns-repeated="2"/>
        </table:table-row>
        <table:table-row table:style-name="ro1">
          <table:table-cell office:value-type="float" office:value="613130132" calcext:value-type="float">
            <text:p>613130132</text:p>
          </table:table-cell>
          <table:table-cell office:value-type="float" office:value="804096216.42673" calcext:value-type="float">
            <text:p>804096216.42673</text:p>
          </table:table-cell>
          <table:table-cell/>
          <table:table-cell office:value-type="string" calcext:value-type="string">
            <text:p>2025-06-25T04:03:36.4267300Z</text:p>
          </table:table-cell>
          <table:table-cell office:value-type="string" calcext:value-type="string">
            <text:p>2025-06-25-04:04:45.6107300</text:p>
          </table:table-cell>
          <table:table-cell table:number-columns-repeated="2"/>
        </table:table-row>
        <table:table-row table:style-name="ro1">
          <table:table-cell office:value-type="float" office:value="613245459" calcext:value-type="float">
            <text:p>613245459</text:p>
          </table:table-cell>
          <table:table-cell office:value-type="float" office:value="804211543.428027" calcext:value-type="float">
            <text:p>804211543.428027</text:p>
          </table:table-cell>
          <table:table-cell/>
          <table:table-cell office:value-type="string" calcext:value-type="string">
            <text:p>2025-06-26T12:05:43.4280270Z</text:p>
          </table:table-cell>
          <table:table-cell office:value-type="string" calcext:value-type="string">
            <text:p>2025-06-26-12:06:52.6120270</text:p>
          </table:table-cell>
          <table:table-cell table:number-columns-repeated="2"/>
        </table:table-row>
        <table:table-row table:style-name="ro1">
          <table:table-cell office:value-type="float" office:value="613302941" calcext:value-type="float">
            <text:p>613302941</text:p>
          </table:table-cell>
          <table:table-cell office:value-type="float" office:value="804269025.428645" calcext:value-type="float">
            <text:p>804269025.428645</text:p>
          </table:table-cell>
          <table:table-cell/>
          <table:table-cell office:value-type="string" calcext:value-type="string">
            <text:p>2025-06-27T04:03:45.4286450Z</text:p>
          </table:table-cell>
          <table:table-cell office:value-type="string" calcext:value-type="string">
            <text:p>2025-06-27-04:04:54.6126450</text:p>
          </table:table-cell>
          <table:table-cell table:number-columns-repeated="2"/>
        </table:table-row>
        <table:table-row table:style-name="ro1">
          <table:table-cell office:value-type="float" office:value="613428907" calcext:value-type="float">
            <text:p>613428907</text:p>
          </table:table-cell>
          <table:table-cell office:value-type="float" office:value="804394991.430011" calcext:value-type="float">
            <text:p>804394991.430011</text:p>
          </table:table-cell>
          <table:table-cell/>
          <table:table-cell office:value-type="string" calcext:value-type="string">
            <text:p>2025-06-28T15:03:11.4300110Z</text:p>
          </table:table-cell>
          <table:table-cell office:value-type="string" calcext:value-type="string">
            <text:p>2025-06-28-15:04:20.6140110</text:p>
          </table:table-cell>
          <table:table-cell table:number-columns-repeated="2"/>
        </table:table-row>
        <table:table-row table:style-name="ro1">
          <table:table-cell office:value-type="float" office:value="613457678" calcext:value-type="float">
            <text:p>613457678</text:p>
          </table:table-cell>
          <table:table-cell office:value-type="float" office:value="804423762.43033" calcext:value-type="float">
            <text:p>804423762.43033</text:p>
          </table:table-cell>
          <table:table-cell/>
          <table:table-cell office:value-type="string" calcext:value-type="string">
            <text:p>2025-06-28T23:02:42.4303300Z</text:p>
          </table:table-cell>
          <table:table-cell office:value-type="string" calcext:value-type="string">
            <text:p>2025-06-28-23:03:51.6143300</text:p>
          </table:table-cell>
          <table:table-cell table:number-columns-repeated="2"/>
        </table:table-row>
        <table:table-row table:style-name="ro1">
          <table:table-cell office:value-type="float" office:value="613562132" calcext:value-type="float">
            <text:p>613562132</text:p>
          </table:table-cell>
          <table:table-cell office:value-type="float" office:value="804528216.431509" calcext:value-type="float">
            <text:p>804528216.431509</text:p>
          </table:table-cell>
          <table:table-cell/>
          <table:table-cell office:value-type="string" calcext:value-type="string">
            <text:p>2025-06-30T04:03:36.4315090Z</text:p>
          </table:table-cell>
          <table:table-cell office:value-type="string" calcext:value-type="string">
            <text:p>2025-06-30-04:04:45.6155090</text:p>
          </table:table-cell>
          <table:table-cell table:number-columns-repeated="2"/>
        </table:table-row>
        <table:table-row table:style-name="ro1">
          <table:table-cell office:value-type="float" office:value="613630475" calcext:value-type="float">
            <text:p>613630475</text:p>
          </table:table-cell>
          <table:table-cell office:value-type="float" office:value="804596559.432238" calcext:value-type="float">
            <text:p>804596559.432238</text:p>
          </table:table-cell>
          <table:table-cell/>
          <table:table-cell office:value-type="string" calcext:value-type="string">
            <text:p>2025-06-30T23:02:39.4322379Z</text:p>
          </table:table-cell>
          <table:table-cell office:value-type="string" calcext:value-type="string">
            <text:p>2025-06-30-23:03:48.6162379</text:p>
          </table:table-cell>
          <table:table-cell table:number-columns-repeated="2"/>
        </table:table-row>
        <table:table-row table:style-name="ro1">
          <table:table-cell office:value-type="float" office:value="613774488" calcext:value-type="float">
            <text:p>613774488</text:p>
          </table:table-cell>
          <table:table-cell office:value-type="float" office:value="804740572.43383" calcext:value-type="float">
            <text:p>804740572.43383</text:p>
          </table:table-cell>
          <table:table-cell/>
          <table:table-cell office:value-type="string" calcext:value-type="string">
            <text:p>2025-07-02T15:02:52.4338300Z</text:p>
          </table:table-cell>
          <table:table-cell office:value-type="string" calcext:value-type="string">
            <text:p>2025-07-02-15:04:01.6178300</text:p>
          </table:table-cell>
          <table:table-cell table:number-columns-repeated="2"/>
        </table:table-row>
        <table:table-row table:style-name="ro1">
          <table:table-cell office:value-type="float" office:value="613850211" calcext:value-type="float">
            <text:p>613850211</text:p>
          </table:table-cell>
          <table:table-cell office:value-type="float" office:value="804816295.434716" calcext:value-type="float">
            <text:p>804816295.434716</text:p>
          </table:table-cell>
          <table:table-cell/>
          <table:table-cell office:value-type="string" calcext:value-type="string">
            <text:p>2025-07-03T12:04:55.4347159Z</text:p>
          </table:table-cell>
          <table:table-cell office:value-type="string" calcext:value-type="string">
            <text:p>2025-07-03-12:06:04.6187160</text:p>
          </table:table-cell>
          <table:table-cell table:number-columns-repeated="2"/>
        </table:table-row>
        <table:table-row table:style-name="ro1">
          <table:table-cell office:value-type="float" office:value="613904109" calcext:value-type="float">
            <text:p>613904109</text:p>
          </table:table-cell>
          <table:table-cell office:value-type="float" office:value="804870193.435293" calcext:value-type="float">
            <text:p>804870193.435293</text:p>
          </table:table-cell>
          <table:table-cell/>
          <table:table-cell office:value-type="string" calcext:value-type="string">
            <text:p>2025-07-04T03:03:13.4352929Z</text:p>
          </table:table-cell>
          <table:table-cell office:value-type="string" calcext:value-type="string">
            <text:p>2025-07-04-03:04:22.6192929</text:p>
          </table:table-cell>
          <table:table-cell table:number-columns-repeated="2"/>
        </table:table-row>
        <table:table-row table:style-name="ro1">
          <table:table-cell office:value-type="float" office:value="613961700" calcext:value-type="float">
            <text:p>613961700</text:p>
          </table:table-cell>
          <table:table-cell office:value-type="float" office:value="804927784.435926" calcext:value-type="float">
            <text:p>804927784.435926</text:p>
          </table:table-cell>
          <table:table-cell/>
          <table:table-cell office:value-type="string" calcext:value-type="string">
            <text:p>2025-07-04T19:03:04.4359259Z</text:p>
          </table:table-cell>
          <table:table-cell office:value-type="string" calcext:value-type="string">
            <text:p>2025-07-04-19:04:13.6199259</text:p>
          </table:table-cell>
          <table:table-cell table:number-columns-repeated="2"/>
        </table:table-row>
        <table:table-row table:style-name="ro1">
          <table:table-cell office:value-type="float" office:value="614120084" calcext:value-type="float">
            <text:p>614120084</text:p>
          </table:table-cell>
          <table:table-cell office:value-type="float" office:value="805086168.437659" calcext:value-type="float">
            <text:p>805086168.437659</text:p>
          </table:table-cell>
          <table:table-cell/>
          <table:table-cell office:value-type="string" calcext:value-type="string">
            <text:p>2025-07-06T15:02:48.4376590Z</text:p>
          </table:table-cell>
          <table:table-cell office:value-type="string" calcext:value-type="string">
            <text:p>2025-07-06-15:03:57.6216590</text:p>
          </table:table-cell>
          <table:table-cell table:number-columns-repeated="2"/>
        </table:table-row>
        <table:table-row table:style-name="ro1">
          <table:table-cell office:value-type="float" office:value="614134504" calcext:value-type="float">
            <text:p>614134504</text:p>
          </table:table-cell>
          <table:table-cell office:value-type="float" office:value="805100588.437831" calcext:value-type="float">
            <text:p>805100588.437831</text:p>
          </table:table-cell>
          <table:table-cell/>
          <table:table-cell office:value-type="string" calcext:value-type="string">
            <text:p>2025-07-06T19:03:08.4378310Z</text:p>
          </table:table-cell>
          <table:table-cell office:value-type="string" calcext:value-type="string">
            <text:p>2025-07-06-19:04:17.6218310</text:p>
          </table:table-cell>
          <table:table-cell table:number-columns-repeated="2"/>
        </table:table-row>
        <table:table-row table:style-name="ro1">
          <table:table-cell office:value-type="float" office:value="614292874" calcext:value-type="float">
            <text:p>614292874</text:p>
          </table:table-cell>
          <table:table-cell office:value-type="float" office:value="805258958.43958" calcext:value-type="float">
            <text:p>805258958.43958</text:p>
          </table:table-cell>
          <table:table-cell/>
          <table:table-cell office:value-type="string" calcext:value-type="string">
            <text:p>2025-07-08T15:02:38.4395799Z</text:p>
          </table:table-cell>
          <table:table-cell office:value-type="string" calcext:value-type="string">
            <text:p>2025-07-08-15:03:47.6235799</text:p>
          </table:table-cell>
          <table:table-cell table:number-columns-repeated="2"/>
        </table:table-row>
        <table:table-row table:style-name="ro1">
          <table:table-cell office:value-type="float" office:value="614307289" calcext:value-type="float">
            <text:p>614307289</text:p>
          </table:table-cell>
          <table:table-cell office:value-type="float" office:value="805273373.43976" calcext:value-type="float">
            <text:p>805273373.43976</text:p>
          </table:table-cell>
          <table:table-cell/>
          <table:table-cell office:value-type="string" calcext:value-type="string">
            <text:p>2025-07-08T19:02:53.4397599Z</text:p>
          </table:table-cell>
          <table:table-cell office:value-type="string" calcext:value-type="string">
            <text:p>2025-07-08-19:04:02.6237599</text:p>
          </table:table-cell>
          <table:table-cell table:number-columns-repeated="2"/>
        </table:table-row>
        <table:table-row table:style-name="ro1">
          <table:table-cell office:value-type="float" office:value="614465664" calcext:value-type="float">
            <text:p>614465664</text:p>
          </table:table-cell>
          <table:table-cell office:value-type="float" office:value="805431748.44149" calcext:value-type="float">
            <text:p>805431748.44149</text:p>
          </table:table-cell>
          <table:table-cell/>
          <table:table-cell office:value-type="string" calcext:value-type="string">
            <text:p>2025-07-10T15:02:28.4414899Z</text:p>
          </table:table-cell>
          <table:table-cell office:value-type="string" calcext:value-type="string">
            <text:p>2025-07-10-15:03:37.6254899</text:p>
          </table:table-cell>
          <table:table-cell table:number-columns-repeated="2"/>
        </table:table-row>
        <table:table-row table:style-name="ro1">
          <table:table-cell office:value-type="float" office:value="614552058" calcext:value-type="float">
            <text:p>614552058</text:p>
          </table:table-cell>
          <table:table-cell office:value-type="float" office:value="805518142.44243" calcext:value-type="float">
            <text:p>805518142.44243</text:p>
          </table:table-cell>
          <table:table-cell/>
          <table:table-cell office:value-type="string" calcext:value-type="string">
            <text:p>2025-07-11T15:02:22.4424300Z</text:p>
          </table:table-cell>
          <table:table-cell office:value-type="string" calcext:value-type="string">
            <text:p>2025-07-11-15:03:31.6264300</text:p>
          </table:table-cell>
          <table:table-cell table:number-columns-repeated="2"/>
        </table:table-row>
        <table:table-row table:style-name="ro1">
          <table:table-cell office:value-type="float" office:value="614638457" calcext:value-type="float">
            <text:p>614638457</text:p>
          </table:table-cell>
          <table:table-cell office:value-type="float" office:value="805604541.443398" calcext:value-type="float">
            <text:p>805604541.443398</text:p>
          </table:table-cell>
          <table:table-cell/>
          <table:table-cell office:value-type="string" calcext:value-type="string">
            <text:p>2025-07-12T15:02:21.4433979Z</text:p>
          </table:table-cell>
          <table:table-cell office:value-type="string" calcext:value-type="string">
            <text:p>2025-07-12-15:03:30.6273980</text:p>
          </table:table-cell>
          <table:table-cell table:number-columns-repeated="2"/>
        </table:table-row>
        <table:table-row table:style-name="ro1">
          <table:table-cell office:value-type="float" office:value="614706980" calcext:value-type="float">
            <text:p>614706980</text:p>
          </table:table-cell>
          <table:table-cell office:value-type="float" office:value="805673064.444148" calcext:value-type="float">
            <text:p>805673064.444148</text:p>
          </table:table-cell>
          <table:table-cell/>
          <table:table-cell office:value-type="string" calcext:value-type="string">
            <text:p>2025-07-13T10:04:24.4441479Z</text:p>
          </table:table-cell>
          <table:table-cell office:value-type="string" calcext:value-type="string">
            <text:p>2025-07-13-10:05:33.6281479</text:p>
          </table:table-cell>
          <table:table-cell table:number-columns-repeated="2"/>
        </table:table-row>
        <table:table-row table:style-name="ro1">
          <table:table-cell office:value-type="float" office:value="614768072" calcext:value-type="float">
            <text:p>614768072</text:p>
          </table:table-cell>
          <table:table-cell office:value-type="float" office:value="805734156.444696" calcext:value-type="float">
            <text:p>805734156.444696</text:p>
          </table:table-cell>
          <table:table-cell/>
          <table:table-cell office:value-type="string" calcext:value-type="string">
            <text:p>2025-07-14T03:02:36.4446959Z</text:p>
          </table:table-cell>
          <table:table-cell office:value-type="string" calcext:value-type="string">
            <text:p>2025-07-14-03:03:45.6286959</text:p>
          </table:table-cell>
          <table:table-cell table:number-columns-repeated="2"/>
        </table:table-row>
        <table:table-row table:style-name="ro1">
          <table:table-cell office:value-type="float" office:value="614850913" calcext:value-type="float">
            <text:p>614850913</text:p>
          </table:table-cell>
          <table:table-cell office:value-type="float" office:value="805816997.445598" calcext:value-type="float">
            <text:p>805816997.445598</text:p>
          </table:table-cell>
          <table:table-cell/>
          <table:table-cell office:value-type="string" calcext:value-type="string">
            <text:p>2025-07-15T02:03:17.4455980Z</text:p>
          </table:table-cell>
          <table:table-cell office:value-type="string" calcext:value-type="string">
            <text:p>2025-07-15-02:04:26.6295980</text:p>
          </table:table-cell>
          <table:table-cell table:number-columns-repeated="2"/>
        </table:table-row>
        <table:table-row table:style-name="ro1">
          <table:table-cell office:value-type="float" office:value="614962568" calcext:value-type="float">
            <text:p>614962568</text:p>
          </table:table-cell>
          <table:table-cell office:value-type="float" office:value="805928652.446838" calcext:value-type="float">
            <text:p>805928652.446838</text:p>
          </table:table-cell>
          <table:table-cell/>
          <table:table-cell office:value-type="string" calcext:value-type="string">
            <text:p>2025-07-16T09:04:12.4468380Z</text:p>
          </table:table-cell>
          <table:table-cell office:value-type="string" calcext:value-type="string">
            <text:p>2025-07-16-09:05:21.6308380</text:p>
          </table:table-cell>
          <table:table-cell table:number-columns-repeated="2"/>
        </table:table-row>
        <table:table-row table:style-name="ro1">
          <table:table-cell office:value-type="float" office:value="615070430" calcext:value-type="float">
            <text:p>615070430</text:p>
          </table:table-cell>
          <table:table-cell office:value-type="float" office:value="806036514.448015" calcext:value-type="float">
            <text:p>806036514.448015</text:p>
          </table:table-cell>
          <table:table-cell/>
          <table:table-cell office:value-type="string" calcext:value-type="string">
            <text:p>2025-07-17T15:01:54.4480149Z</text:p>
          </table:table-cell>
          <table:table-cell office:value-type="string" calcext:value-type="string">
            <text:p>2025-07-17-15:03:03.6320149</text:p>
          </table:table-cell>
          <table:table-cell table:number-columns-repeated="2"/>
        </table:table-row>
        <table:table-row table:style-name="ro1">
          <table:table-cell office:value-type="float" office:value="615156828" calcext:value-type="float">
            <text:p>615156828</text:p>
          </table:table-cell>
          <table:table-cell office:value-type="float" office:value="806122912.448974" calcext:value-type="float">
            <text:p>806122912.448974</text:p>
          </table:table-cell>
          <table:table-cell/>
          <table:table-cell office:value-type="string" calcext:value-type="string">
            <text:p>2025-07-18T15:01:52.4489740Z</text:p>
          </table:table-cell>
          <table:table-cell office:value-type="string" calcext:value-type="string">
            <text:p>2025-07-18-15:03:01.6329740</text:p>
          </table:table-cell>
          <table:table-cell table:number-columns-repeated="2"/>
        </table:table-row>
        <table:table-row table:style-name="ro1">
          <table:table-cell office:value-type="float" office:value="615243221" calcext:value-type="float">
            <text:p>615243221</text:p>
          </table:table-cell>
          <table:table-cell office:value-type="float" office:value="806209305.449925" calcext:value-type="float">
            <text:p>806209305.449925</text:p>
          </table:table-cell>
          <table:table-cell/>
          <table:table-cell office:value-type="string" calcext:value-type="string">
            <text:p>2025-07-19T15:01:45.4499249Z</text:p>
          </table:table-cell>
          <table:table-cell office:value-type="string" calcext:value-type="string">
            <text:p>2025-07-19-15:02:54.6339249</text:p>
          </table:table-cell>
          <table:table-cell table:number-columns-repeated="2"/>
        </table:table-row>
        <table:table-row table:style-name="ro1">
          <table:table-cell office:value-type="float" office:value="615282841" calcext:value-type="float">
            <text:p>615282841</text:p>
          </table:table-cell>
          <table:table-cell office:value-type="float" office:value="806248925.450384" calcext:value-type="float">
            <text:p>806248925.450384</text:p>
          </table:table-cell>
          <table:table-cell/>
          <table:table-cell office:value-type="string" calcext:value-type="string">
            <text:p>2025-07-20T02:02:05.4503840Z</text:p>
          </table:table-cell>
          <table:table-cell office:value-type="string" calcext:value-type="string">
            <text:p>2025-07-20-02:03:14.6343840</text:p>
          </table:table-cell>
          <table:table-cell table:number-columns-repeated="2"/>
        </table:table-row>
        <table:table-row table:style-name="ro1">
          <table:table-cell office:value-type="float" office:value="615416008" calcext:value-type="float">
            <text:p>615416008</text:p>
          </table:table-cell>
          <table:table-cell office:value-type="float" office:value="806382092.45183" calcext:value-type="float">
            <text:p>806382092.45183</text:p>
          </table:table-cell>
          <table:table-cell/>
          <table:table-cell office:value-type="string" calcext:value-type="string">
            <text:p>2025-07-21T15:01:32.4518300Z</text:p>
          </table:table-cell>
          <table:table-cell office:value-type="string" calcext:value-type="string">
            <text:p>2025-07-21-15:02:41.6358300</text:p>
          </table:table-cell>
          <table:table-cell table:number-columns-repeated="2"/>
        </table:table-row>
        <table:table-row table:style-name="ro1">
          <table:table-cell office:value-type="float" office:value="615484553" calcext:value-type="float">
            <text:p>615484553</text:p>
          </table:table-cell>
          <table:table-cell office:value-type="float" office:value="806450637.452608" calcext:value-type="float">
            <text:p>806450637.452608</text:p>
          </table:table-cell>
          <table:table-cell/>
          <table:table-cell office:value-type="string" calcext:value-type="string">
            <text:p>2025-07-22T10:03:57.4526079Z</text:p>
          </table:table-cell>
          <table:table-cell office:value-type="string" calcext:value-type="string">
            <text:p>2025-07-22-10:05:06.6366080</text:p>
          </table:table-cell>
          <table:table-cell table:number-columns-repeated="2"/>
        </table:table-row>
        <table:table-row table:style-name="ro1">
          <table:table-cell office:value-type="float" office:value="615588803" calcext:value-type="float">
            <text:p>615588803</text:p>
          </table:table-cell>
          <table:table-cell office:value-type="float" office:value="806554887.45374" calcext:value-type="float">
            <text:p>806554887.45374</text:p>
          </table:table-cell>
          <table:table-cell/>
          <table:table-cell office:value-type="string" calcext:value-type="string">
            <text:p>2025-07-23T15:01:27.4537400Z</text:p>
          </table:table-cell>
          <table:table-cell office:value-type="string" calcext:value-type="string">
            <text:p>2025-07-23-15:02:36.6377400</text:p>
          </table:table-cell>
          <table:table-cell table:number-columns-repeated="2"/>
        </table:table-row>
        <table:table-row table:style-name="ro1">
          <table:table-cell office:value-type="float" office:value="615675197" calcext:value-type="float">
            <text:p>615675197</text:p>
          </table:table-cell>
          <table:table-cell office:value-type="float" office:value="806641281.454682" calcext:value-type="float">
            <text:p>806641281.454682</text:p>
          </table:table-cell>
          <table:table-cell/>
          <table:table-cell office:value-type="string" calcext:value-type="string">
            <text:p>2025-07-24T15:01:21.4546819Z</text:p>
          </table:table-cell>
          <table:table-cell office:value-type="string" calcext:value-type="string">
            <text:p>2025-07-24-15:02:30.6386820</text:p>
          </table:table-cell>
          <table:table-cell table:number-columns-repeated="2"/>
        </table:table-row>
        <table:table-row table:style-name="ro1">
          <table:table-cell office:value-type="float" office:value="615761591" calcext:value-type="float">
            <text:p>615761591</text:p>
          </table:table-cell>
          <table:table-cell office:value-type="float" office:value="806727675.455645" calcext:value-type="float">
            <text:p>806727675.455645</text:p>
          </table:table-cell>
          <table:table-cell/>
          <table:table-cell office:value-type="string" calcext:value-type="string">
            <text:p>2025-07-25T15:01:15.4556449Z</text:p>
          </table:table-cell>
          <table:table-cell office:value-type="string" calcext:value-type="string">
            <text:p>2025-07-25-15:02:24.6396449</text:p>
          </table:table-cell>
          <table:table-cell table:number-columns-repeated="2"/>
        </table:table-row>
        <table:table-row table:style-name="ro1">
          <table:table-cell office:value-type="float" office:value="615849487" calcext:value-type="float">
            <text:p>615849487</text:p>
          </table:table-cell>
          <table:table-cell office:value-type="float" office:value="806815571.456607" calcext:value-type="float">
            <text:p>806815571.456607</text:p>
          </table:table-cell>
          <table:table-cell/>
          <table:table-cell office:value-type="string" calcext:value-type="string">
            <text:p>2025-07-26T15:26:11.4566069Z</text:p>
          </table:table-cell>
          <table:table-cell office:value-type="string" calcext:value-type="string">
            <text:p>2025-07-26-15:27:20.6406069</text:p>
          </table:table-cell>
          <table:table-cell table:number-columns-repeated="2"/>
        </table:table-row>
        <table:table-row table:style-name="ro1">
          <table:table-cell office:value-type="float" office:value="615858806" calcext:value-type="float">
            <text:p>615858806</text:p>
          </table:table-cell>
          <table:table-cell office:value-type="float" office:value="806824890.456726" calcext:value-type="float">
            <text:p>806824890.456726</text:p>
          </table:table-cell>
          <table:table-cell/>
          <table:table-cell office:value-type="string" calcext:value-type="string">
            <text:p>2025-07-26T18:01:30.4567259Z</text:p>
          </table:table-cell>
          <table:table-cell office:value-type="string" calcext:value-type="string">
            <text:p>2025-07-26-18:02:39.6407259</text:p>
          </table:table-cell>
          <table:table-cell table:number-columns-repeated="2"/>
        </table:table-row>
        <table:table-row table:style-name="ro1">
          <table:table-cell office:value-type="float" office:value="616020771" calcext:value-type="float">
            <text:p>616020771</text:p>
          </table:table-cell>
          <table:table-cell office:value-type="float" office:value="806986855.458507" calcext:value-type="float">
            <text:p>806986855.458507</text:p>
          </table:table-cell>
          <table:table-cell/>
          <table:table-cell office:value-type="string" calcext:value-type="string">
            <text:p>2025-07-28T15:00:55.4585069Z</text:p>
          </table:table-cell>
          <table:table-cell office:value-type="string" calcext:value-type="string">
            <text:p>2025-07-28-15:02:04.6425069</text:p>
          </table:table-cell>
          <table:table-cell table:number-columns-repeated="2"/>
        </table:table-row>
        <table:table-row table:style-name="ro1">
          <table:table-cell office:value-type="float" office:value="616085668" calcext:value-type="float">
            <text:p>616085668</text:p>
          </table:table-cell>
          <table:table-cell office:value-type="float" office:value="807051752.459189" calcext:value-type="float">
            <text:p>807051752.459189</text:p>
          </table:table-cell>
          <table:table-cell/>
          <table:table-cell office:value-type="string" calcext:value-type="string">
            <text:p>2025-07-29T09:02:32.4591889Z</text:p>
          </table:table-cell>
          <table:table-cell office:value-type="string" calcext:value-type="string">
            <text:p>2025-07-29-09:03:41.6431889</text:p>
          </table:table-cell>
          <table:table-cell table:number-columns-repeated="2"/>
        </table:table-row>
        <table:table-row table:style-name="ro1">
          <table:table-cell office:value-type="float" office:value="616193557" calcext:value-type="float">
            <text:p>616193557</text:p>
          </table:table-cell>
          <table:table-cell office:value-type="float" office:value="807159641.460408" calcext:value-type="float">
            <text:p>807159641.460408</text:p>
          </table:table-cell>
          <table:table-cell/>
          <table:table-cell office:value-type="string" calcext:value-type="string">
            <text:p>2025-07-30T15:00:41.4604079Z</text:p>
          </table:table-cell>
          <table:table-cell office:value-type="string" calcext:value-type="string">
            <text:p>2025-07-30-15:01:50.6444079</text:p>
          </table:table-cell>
          <table:table-cell table:number-columns-repeated="2"/>
        </table:table-row>
        <table:table-row table:style-name="ro1">
          <table:table-cell office:value-type="float" office:value="616261991" calcext:value-type="float">
            <text:p>616261991</text:p>
          </table:table-cell>
          <table:table-cell office:value-type="float" office:value="807228075.461187" calcext:value-type="float">
            <text:p>807228075.461187</text:p>
          </table:table-cell>
          <table:table-cell/>
          <table:table-cell office:value-type="string" calcext:value-type="string">
            <text:p>2025-07-31T10:01:15.4611870Z</text:p>
          </table:table-cell>
          <table:table-cell office:value-type="string" calcext:value-type="string">
            <text:p>2025-07-31-10:02:24.6451870</text:p>
          </table:table-cell>
          <table:table-cell table:number-columns-repeated="2"/>
        </table:table-row>
        <table:table-row table:style-name="ro1">
          <table:table-cell office:value-type="float" office:value="616366348" calcext:value-type="float">
            <text:p>616366348</text:p>
          </table:table-cell>
          <table:table-cell office:value-type="float" office:value="807332432.462313" calcext:value-type="float">
            <text:p>807332432.462313</text:p>
          </table:table-cell>
          <table:table-cell/>
          <table:table-cell office:value-type="string" calcext:value-type="string">
            <text:p>2025-08-01T15:00:32.4623129Z</text:p>
          </table:table-cell>
          <table:table-cell office:value-type="string" calcext:value-type="string">
            <text:p>2025-08-01-15:01:41.6463129</text:p>
          </table:table-cell>
          <table:table-cell table:number-columns-repeated="2"/>
        </table:table-row>
        <table:table-row table:style-name="ro1">
          <table:table-cell office:value-type="float" office:value="616373565" calcext:value-type="float">
            <text:p>616373565</text:p>
          </table:table-cell>
          <table:table-cell office:value-type="float" office:value="807339649.462409" calcext:value-type="float">
            <text:p>807339649.462409</text:p>
          </table:table-cell>
          <table:table-cell/>
          <table:table-cell office:value-type="string" calcext:value-type="string">
            <text:p>2025-08-01T17:00:49.4624090Z</text:p>
          </table:table-cell>
          <table:table-cell office:value-type="string" calcext:value-type="string">
            <text:p>2025-08-01-17:01:58.6464090</text:p>
          </table:table-cell>
          <table:table-cell table:number-columns-repeated="2"/>
        </table:table-row>
        <table:table-row table:style-name="ro1">
          <table:table-cell office:value-type="float" office:value="616625529" calcext:value-type="float">
            <text:p>616625529</text:p>
          </table:table-cell>
          <table:table-cell office:value-type="float" office:value="807591613.465164" calcext:value-type="float">
            <text:p>807591613.465164</text:p>
          </table:table-cell>
          <table:table-cell/>
          <table:table-cell office:value-type="string" calcext:value-type="string">
            <text:p>2025-08-04T15:00:13.4651639Z</text:p>
          </table:table-cell>
          <table:table-cell office:value-type="string" calcext:value-type="string">
            <text:p>2025-08-04-15:01:22.6491639</text:p>
          </table:table-cell>
          <table:table-cell table:number-columns-repeated="2"/>
        </table:table-row>
        <table:table-row table:style-name="ro1">
          <table:table-cell office:value-type="float" office:value="616690428" calcext:value-type="float">
            <text:p>616690428</text:p>
          </table:table-cell>
          <table:table-cell office:value-type="float" office:value="807656512.465925" calcext:value-type="float">
            <text:p>807656512.465925</text:p>
          </table:table-cell>
          <table:table-cell/>
          <table:table-cell office:value-type="string" calcext:value-type="string">
            <text:p>2025-08-05T09:01:52.4659249Z</text:p>
          </table:table-cell>
          <table:table-cell office:value-type="string" calcext:value-type="string">
            <text:p>2025-08-05-09:03:01.6499249</text:p>
          </table:table-cell>
          <table:table-cell table:number-columns-repeated="2"/>
        </table:table-row>
        <table:table-row table:style-name="ro1">
          <table:table-cell office:value-type="float" office:value="616766026" calcext:value-type="float">
            <text:p>616766026</text:p>
          </table:table-cell>
          <table:table-cell office:value-type="float" office:value="807732110.46672" calcext:value-type="float">
            <text:p>807732110.46672</text:p>
          </table:table-cell>
          <table:table-cell/>
          <table:table-cell office:value-type="string" calcext:value-type="string">
            <text:p>2025-08-06T06:01:50.4667199Z</text:p>
          </table:table-cell>
          <table:table-cell office:value-type="string" calcext:value-type="string">
            <text:p>2025-08-06-06:02:59.6507200</text:p>
          </table:table-cell>
          <table:table-cell table:number-columns-repeated="2"/>
        </table:table-row>
        <table:table-row table:style-name="ro1">
          <table:table-cell office:value-type="float" office:value="616819932" calcext:value-type="float">
            <text:p>616819932</text:p>
          </table:table-cell>
          <table:table-cell office:value-type="float" office:value="807786016.467292" calcext:value-type="float">
            <text:p>807786016.467292</text:p>
          </table:table-cell>
          <table:table-cell/>
          <table:table-cell office:value-type="string" calcext:value-type="string">
            <text:p>2025-08-06T21:00:16.4672919Z</text:p>
          </table:table-cell>
          <table:table-cell office:value-type="string" calcext:value-type="string">
            <text:p>2025-08-06-21:01:25.6512919</text:p>
          </table:table-cell>
          <table:table-cell table:number-columns-repeated="2"/>
        </table:table-row>
        <table:table-row table:style-name="ro1">
          <table:table-cell office:value-type="float" office:value="1247971932" calcext:value-type="float">
            <text:p>1247971932</text:p>
          </table:table-cell>
          <table:table-cell office:value-type="float" office:value="1438938023.39103" calcext:value-type="float">
            <text:p>1438938023.39103</text:p>
          </table:table-cell>
          <table:table-cell/>
          <table:table-cell office:value-type="string" calcext:value-type="string">
            <text:p>2045-08-06T21:00:23.3910293Z</text:p>
          </table:table-cell>
          <table:table-cell office:value-type="string" calcext:value-type="string">
            <text:p>2045-08-06-21:01:32.5750293</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5">00/00/0000</text:date>, <text:time style:data-style-name="N2" text:time-value="16:00:49.15190240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6-25T16:01:52.141909060</dc:date>
    <meta:editing-duration>PT3H38M43S</meta:editing-duration>
    <meta:editing-cycles>14</meta:editing-cycles>
    <meta:document-statistic meta:table-count="1" meta:cell-count="7952" meta:object-count="0"/>
  </office:meta>
</office:document-meta>
</file>

<file path=Basic/Standard/met2utc.xml><?xml version="1.0" encoding="utf-8"?>
<!DOCTYPE module  PUBLIC '-//OpenOffice.org//DTD OfficeDocument 1.0//EN'  'module.dtd'>
<script:module xmlns:script="http://openoffice.org/2000/script" script:name="met2utc" script:language="StarBasic" script:moduleType="normal">REM  *****  BASIC  *****

Function met2utc(met As Double) As String
    Dim oDoc As Object
    Dim oSheet As Object
    Dim xRange As Object, yRange As Object, configRange As Object
    Dim oFunc As Object
    Dim idx As Variant
    Dim x1 As Double, x2 As Double
    Dim y1 As Double, y2 As Double
    Dim interpolatedY As Double
    Dim offsetVal As Double
    Dim scaleFactor As Double
    Dim finalYDayRaw As Double
    Dim finalYDate As Double
    Dim doy As Long
    Dim totalSeconds As Double
    Dim fracSeconds As Double
    Dim fracString As String
    Dim sYear As String, sDoy As String, sTime As String
    Dim oOffsetCell As Object, oScaleCell As Object

    ' Universal error handler setup for LibreOffice Basic
    On Local Error GoTo RangeError

    ' 1. Access the document and the specific sheet
    oDoc = ThisComponent
    oSheet = oDoc.Sheets.getByName("sclk_data")

    ' 2. Dynamically set ranges based on the text definitions in A2, B2, and C2
    xRange = oSheet.getCellRangeByName(oSheet.getCellRangeByName("A2").String)
    yRange = oSheet.getCellRangeByName(oSheet.getCellRangeByName("B2").String)
    configRange = oSheet.getCellRangeByName(oSheet.getCellRangeByName("C2").String)
    On Local Error GoTo 0 ' Clear error handler for normal logic

    ' 3. Initialize Calc functions service
    oFunc = CreateUnoService("com.sun.star.sheet.FunctionAccess")

    ' Retrieve Offset and Scale Factor with type safety fallbacks
    oOffsetCell = configRange.getCellByPosition(0, 0)
    oScaleCell = configRange.getCellByPosition(0, 1)

    If oOffsetCell.Value = 0 And oOffsetCell.String &lt;&gt; "" Then
        offsetVal = CDbl(oFunc.callFunction("VALUE", Array(oOffsetCell.String)))
    Else
        offsetVal = oOffsetCell.Value
    End If

    scaleFactor = oScaleCell.Value

    ' Check for division by zero on the scale factor
    If scaleFactor = 0 Then
        met2utc = "Error: Scale Factor is 0"
        Exit Function
    End If

    ' 4. Use Calc's MATCH function
    On Local Error Resume Next
    idx = oFunc.callFunction("MATCH", Array(met, xRange, 1))
    On Local Error GoTo 0

    ' Handle errors or out-of-bounds cases
    If IsEmpty(idx) Or IsNull(idx) Or idx &lt; 1 Then
        met2utc = "Error: Below Range"
        Exit Function
    ElseIf idx &gt;= xRange.Rows.Count Then
        met2utc = "Error: Above Range"
        Exit Function
    End If

    ' 5. Extract bounding points (Rows are 0-indexed in API)
    x1 = xRange.getCellByPosition(0, idx - 1).Value
    x2 = xRange.getCellByPosition(0, idx).Value
    y1 = yRange.getCellByPosition(0, idx - 1).Value
    y2 = yRange.getCellByPosition(0, idx).Value

    ' Check for division by zero
    If x2 = x1 Then
        met2utc = "Error: Div by 0"
        Exit Function
    End If

    ' 6. Perform Piecewise Linear Interpolation
    interpolatedY = y1 + ((met - x1) / (x2 - x1)) * (y2 - y1)

    ' 7. DIVIDE by Scale Factor to convert seconds BEFORE adding the Day Offset
    finalYDayRaw = (interpolatedY / scaleFactor) + offsetVal
    finalYDate = Int(finalYDayRaw)

    ' 8. Calculate Day of Year (DOY) using Calc function access
    sYear = oFunc.callFunction("TEXT", Array(finalYDate, "yyyy"))
    Dim firstDayOfYear As Double
    firstDayOfYear = oFunc.callFunction("DATE", Array(CInt(oFunc.callFunction("YEAR", Array(finalYDate))), 1, 1))
    doy = Clng(finalYDate - firstDayOfYear + 1)

    ' 9. Isolate fractional seconds to 6 decimal places
    totalSeconds = (finalYDayRaw - Int(finalYDayRaw)) * 86400.0
    fracSeconds = totalSeconds - Int(totalSeconds)

    ' Format components
    fracString = oFunc.callFunction("TEXT", Array(fracSeconds, ".000000"))
    sDoy = oFunc.callFunction("TEXT", Array(doy, "000"))
    sTime = oFunc.callFunction("TEXT", Array(finalYDayRaw, "hh:mm:ss"))

    ' 10. Construct final string
    met2utc = sYear &amp; "-" &amp; sDoy &amp; "/" &amp; sTime &amp; fracString
    Exit Function

RangeError:
    met2utc = "Error: Invalid Range Definit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t2utc"/>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